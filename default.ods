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3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2.0972in"/>
    </style:style>
    <style:style style:name="co4" style:family="table-column">
      <style:table-column-properties fo:break-before="auto" style:column-width="1.8681in"/>
    </style:style>
    <style:style style:name="co5" style:family="table-column">
      <style:table-column-properties fo:break-before="auto" style:column-width="1.922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1.4417in"/>
    </style:style>
    <style:style style:name="co8" style:family="table-column">
      <style:table-column-properties fo:break-before="auto" style:column-width="1.4638in"/>
    </style:style>
    <style:style style:name="co9" style:family="table-column">
      <style:table-column-properties fo:break-before="auto" style:column-width="1.2236in"/>
    </style:style>
    <style:style style:name="co10" style:family="table-column">
      <style:table-column-properties fo:break-before="auto" style:column-width="1.6602in"/>
    </style:style>
    <style:style style:name="co11" style:family="table-column">
      <style:table-column-properties fo:break-before="auto" style:column-width="1.5728in"/>
    </style:style>
    <style:style style:name="co12" style:family="table-column">
      <style:table-column-properties fo:break-before="auto" style:column-width="1.5839in"/>
    </style:style>
    <style:style style:name="co13" style:family="table-column">
      <style:table-column-properties fo:break-before="auto" style:column-width="1.4965in"/>
    </style:style>
    <style:style style:name="co14" style:family="table-column">
      <style:table-column-properties fo:break-before="auto" style:column-width="1.4744in"/>
    </style:style>
    <style:style style:name="co15" style:family="table-column">
      <style:table-column-properties fo:break-before="auto" style:column-width="1.2126in"/>
    </style:style>
    <style:style style:name="co16" style:family="table-column">
      <style:table-column-properties fo:break-before="auto" style:column-width="1.2339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1252in"/>
    </style:style>
    <style:style style:name="co19" style:family="table-column">
      <style:table-column-properties fo:break-before="auto" style:column-width="1.1799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3437in"/>
    </style:style>
    <style:style style:name="co22" style:family="table-column">
      <style:table-column-properties fo:break-before="auto" style:column-width="1.9984in"/>
    </style:style>
    <style:style style:name="co23" style:family="table-column">
      <style:table-column-properties fo:break-before="auto" style:column-width="2.6102in"/>
    </style:style>
    <style:style style:name="co24" style:family="table-column">
      <style:table-column-properties fo:break-before="auto" style:column-width="2.3701in"/>
    </style:style>
    <style:style style:name="co25" style:family="table-column">
      <style:table-column-properties fo:break-before="auto" style:column-width="1.5945in"/>
    </style:style>
    <style:style style:name="co26" style:family="table-column">
      <style:table-column-properties fo:break-before="auto" style:column-width="2.1409in"/>
    </style:style>
    <style:style style:name="co27" style:family="table-column">
      <style:table-column-properties fo:break-before="auto" style:column-width="2.1193in"/>
    </style:style>
    <style:style style:name="co28" style:family="table-column">
      <style:table-column-properties fo:break-before="auto" style:column-width="1.9118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ultimate-singles_20_Set_20_Records">
      <style:table-properties table:display="true" style:writing-mode="lr-tb"/>
    </style:style>
    <style:style style:name="ta2" style:family="table" style:master-page-name="PageStyle_5f_ultimate-singles_20_Match_20_Records">
      <style:table-properties table:display="true" style:writing-mode="lr-tb"/>
    </style:style>
    <style:style style:name="ta3" style:family="table" style:master-page-name="PageStyle_5f_melee-singles_20_Set_20_Records">
      <style:table-properties table:display="true" style:writing-mode="lr-tb"/>
    </style:style>
    <style:style style:name="ta4" style:family="table" style:master-page-name="PageStyle_5f_melee-singles_20_Match_20_Records">
      <style:table-properties table:display="true" style:writing-mode="lr-tb"/>
    </style:style>
    <style:style style:name="ta5" style:family="table" style:master-page-name="PageStyle_5f_Tournament_20_1">
      <style:table-properties table:display="true" style:writing-mode="lr-tb"/>
    </style:style>
    <style:style style:name="ta6" style:family="table" style:master-page-name="PageStyle_5f_Tournament_20_2">
      <style:table-properties table:display="true" style:writing-mode="lr-tb"/>
    </style:style>
    <style:style style:name="ta7" style:family="table" style:master-page-name="PageStyle_5f_Tournament_20_3">
      <style:table-properties table:display="true" style:writing-mode="lr-tb"/>
    </style:style>
    <style:style style:name="ta8" style:family="table" style:master-page-name="PageStyle_5f_Tournament_20_4">
      <style:table-properties table:display="true" style:writing-mode="lr-tb"/>
    </style:style>
    <style:style style:name="ta9" style:family="table" style:master-page-name="PageStyle_5f_Tournament_20_5">
      <style:table-properties table:display="true" style:writing-mode="lr-tb"/>
    </style:style>
    <style:style style:name="ta10" style:family="table" style:master-page-name="PageStyle_5f_Tournament_20_6">
      <style:table-properties table:display="true" style:writing-mode="lr-tb"/>
    </style:style>
    <style:style style:name="ta11" style:family="table" style:master-page-name="PageStyle_5f_JEDISMASH">
      <style:table-properties table:display="true" style:writing-mode="lr-tb"/>
    </style:style>
    <style:style style:name="ta12" style:family="table" style:master-page-name="PageStyle_5f_SCUFFED">
      <style:table-properties table:display="true" style:writing-mode="lr-tb"/>
    </style:style>
    <style:style style:name="ta13" style:family="table" style:master-page-name="PageStyle_5f_ZORRIN">
      <style:table-properties table:display="true" style:writing-mode="lr-tb"/>
    </style:style>
    <style:style style:name="ta14" style:family="table" style:master-page-name="PageStyle_5f_OWIEPOWIE69">
      <style:table-properties table:display="true" style:writing-mode="lr-tb"/>
    </style:style>
    <style:style style:name="ta15" style:family="table" style:master-page-name="PageStyle_5f_CHEZ">
      <style:table-properties table:display="true" style:writing-mode="lr-tb"/>
    </style:style>
    <style:style style:name="ta16" style:family="table" style:master-page-name="PageStyle_5f_REDEMPTION">
      <style:table-properties table:display="true" style:writing-mode="lr-tb"/>
    </style:style>
    <style:style style:name="ta17" style:family="table" style:master-page-name="PageStyle_5f_SR-HUGE">
      <style:table-properties table:display="true" style:writing-mode="lr-tb"/>
    </style:style>
    <style:style style:name="ta18" style:family="table" style:master-page-name="PageStyle_5f_KURRYROSE">
      <style:table-properties table:display="true" style:writing-mode="lr-tb"/>
    </style:style>
    <style:style style:name="ta19" style:family="table" style:master-page-name="PageStyle_5f_VINNY_2c__20_THE_20_LICK">
      <style:table-properties table:display="true" style:writing-mode="lr-tb"/>
    </style:style>
    <style:style style:name="ta20" style:family="table" style:master-page-name="PageStyle_5f_HOLLYWOOD">
      <style:table-properties table:display="true" style:writing-mode="lr-tb"/>
    </style:style>
    <style:style style:name="ta21" style:family="table" style:master-page-name="PageStyle_5f_JACEN">
      <style:table-properties table:display="true" style:writing-mode="lr-tb"/>
    </style:style>
    <style:style style:name="ta22" style:family="table" style:master-page-name="PageStyle_5f_REC">
      <style:table-properties table:display="true" style:writing-mode="lr-tb"/>
    </style:style>
    <style:style style:name="ta23" style:family="table" style:master-page-name="PageStyle_5f_JOEYSMEMETEAM">
      <style:table-properties table:display="true" style:writing-mode="lr-tb"/>
    </style:style>
    <style:style style:name="ta24" style:family="table" style:master-page-name="PageStyle_5f_SENTPAIN">
      <style:table-properties table:display="true" style:writing-mode="lr-tb"/>
    </style:style>
    <style:style style:name="ta25" style:family="table" style:master-page-name="PageStyle_5f_SQUILLIAM_20_AFTON">
      <style:table-properties table:display="true" style:writing-mode="lr-tb"/>
    </style:style>
    <style:style style:name="ta26" style:family="table" style:master-page-name="PageStyle_5f_DONEGG">
      <style:table-properties table:display="true" style:writing-mode="lr-tb"/>
    </style:style>
    <style:style style:name="ta27" style:family="table" style:master-page-name="PageStyle_5f_DIAM">
      <style:table-properties table:display="true" style:writing-mode="lr-tb"/>
    </style:style>
    <style:style style:name="ta28" style:family="table" style:master-page-name="PageStyle_5f_LXIX">
      <style:table-properties table:display="true" style:writing-mode="lr-tb"/>
    </style:style>
    <style:style style:name="ta29" style:family="table" style:master-page-name="PageStyle_5f_ZOMBA">
      <style:table-properties table:display="true" style:writing-mode="lr-tb"/>
    </style:style>
    <style:style style:name="ta30" style:family="table" style:master-page-name="PageStyle_5f_FONICA">
      <style:table-properties table:display="true" style:writing-mode="lr-tb"/>
    </style:style>
    <style:style style:name="ta31" style:family="table" style:master-page-name="PageStyle_5f_PLUMMET">
      <style:table-properties table:display="true" style:writing-mode="lr-tb"/>
    </style:style>
    <style:style style:name="ta32" style:family="table" style:master-page-name="PageStyle_5f_VENIKKI">
      <style:table-properties table:display="true" style:writing-mode="lr-tb"/>
    </style:style>
    <style:style style:name="ta33" style:family="table" style:master-page-name="PageStyle_5f_BREEZY_20_400">
      <style:table-properties table:display="true" style:writing-mode="lr-tb"/>
    </style:style>
    <style:style style:name="ta34" style:family="table" style:master-page-name="PageStyle_5f_KIKI">
      <style:table-properties table:display="true" style:writing-mode="lr-tb"/>
    </style:style>
    <style:style style:name="ta35" style:family="table" style:master-page-name="PageStyle_5f_SPAM_20_NO_20_JUTSU">
      <style:table-properties table:display="true" style:writing-mode="lr-tb"/>
    </style:style>
    <style:style style:name="ta36" style:family="table" style:master-page-name="PageStyle_5f_OCTO">
      <style:table-properties table:display="true" style:writing-mode="lr-tb"/>
    </style:style>
    <style:style style:name="ta37" style:family="table" style:master-page-name="PageStyle_5f_OLSEN">
      <style:table-properties table:display="true" style:writing-mode="lr-tb"/>
    </style:style>
    <style:style style:name="ta38" style:family="table" style:master-page-name="PageStyle_5f_TWILIGHT">
      <style:table-properties table:display="true" style:writing-mode="lr-tb"/>
    </style:style>
    <style:style style:name="ta39" style:family="table" style:master-page-name="PageStyle_5f_SHIRO">
      <style:table-properties table:display="true" style:writing-mode="lr-tb"/>
    </style:style>
    <style:style style:name="ta40" style:family="table" style:master-page-name="PageStyle_5f_DARTHCJ8">
      <style:table-properties table:display="true" style:writing-mode="lr-tb"/>
    </style:style>
    <style:style style:name="ta41" style:family="table" style:master-page-name="PageStyle_5f_SEV7X">
      <style:table-properties table:display="true" style:writing-mode="lr-tb"/>
    </style:style>
    <style:style style:name="ta42" style:family="table" style:master-page-name="PageStyle_5f_PENDRAGON">
      <style:table-properties table:display="true" style:writing-mode="lr-tb"/>
    </style:style>
    <style:style style:name="ta43" style:family="table" style:master-page-name="PageStyle_5f_YAMAOKAI">
      <style:table-properties table:display="true" style:writing-mode="lr-tb"/>
    </style:style>
    <style:style style:name="ta44" style:family="table" style:master-page-name="PageStyle_5f_SHUNNING">
      <style:table-properties table:display="true" style:writing-mode="lr-tb"/>
    </style:style>
    <style:style style:name="ta45" style:family="table" style:master-page-name="PageStyle_5f_AJG">
      <style:table-properties table:display="true" style:writing-mode="lr-tb"/>
    </style:style>
    <style:style style:name="ta46" style:family="table" style:master-page-name="PageStyle_5f_MAYO">
      <style:table-properties table:display="true" style:writing-mode="lr-tb"/>
    </style:style>
    <style:style style:name="ta47" style:family="table" style:master-page-name="PageStyle_5f_GALAXIA">
      <style:table-properties table:display="true" style:writing-mode="lr-tb"/>
    </style:style>
    <style:style style:name="ta48" style:family="table" style:master-page-name="PageStyle_5f_MRNUBS">
      <style:table-properties table:display="true" style:writing-mode="lr-tb"/>
    </style:style>
    <style:style style:name="ta49" style:family="table" style:master-page-name="PageStyle_5f_DANE">
      <style:table-properties table:display="true" style:writing-mode="lr-tb"/>
    </style:style>
    <style:style style:name="ta50" style:family="table" style:master-page-name="PageStyle_5f_SAMERSONT">
      <style:table-properties table:display="true" style:writing-mode="lr-tb"/>
    </style:style>
    <style:style style:name="ta51" style:family="table" style:master-page-name="PageStyle_5f_CZAR">
      <style:table-properties table:display="true" style:writing-mode="lr-tb"/>
    </style:style>
    <style:style style:name="ta52" style:family="table" style:master-page-name="PageStyle_5f_BEASTMODEPAUL">
      <style:table-properties table:display="true" style:writing-mode="lr-tb"/>
    </style:style>
    <style:style style:name="ta53" style:family="table" style:master-page-name="PageStyle_5f_HUNGRYBOX">
      <style:table-properties table:display="true" style:writing-mode="lr-tb"/>
    </style:style>
    <style:style style:name="ta54" style:family="table" style:master-page-name="PageStyle_5f_BHAND">
      <style:table-properties table:display="true" style:writing-mode="lr-tb"/>
    </style:style>
    <style:style style:name="ta55" style:family="table" style:master-page-name="PageStyle_5f_GUNSLINGING_20_GATOS">
      <style:table-properties table:display="true" style:writing-mode="lr-tb"/>
    </style:style>
    <style:style style:name="ta56" style:family="table" style:master-page-name="PageStyle_5f_NEWO">
      <style:table-properties table:display="true" style:writing-mode="lr-tb"/>
    </style:style>
    <style:style style:name="ta57" style:family="table" style:master-page-name="PageStyle_5f_DINGODILE">
      <style:table-properties table:display="true" style:writing-mode="lr-tb"/>
    </style:style>
    <style:style style:name="ta58" style:family="table" style:master-page-name="PageStyle_5f_CHPSTKS">
      <style:table-properties table:display="true" style:writing-mode="lr-tb"/>
    </style:style>
    <style:style style:name="ta59" style:family="table" style:master-page-name="PageStyle_5f_ZESP">
      <style:table-properties table:display="true" style:writing-mode="lr-tb"/>
    </style:style>
    <style:style style:name="ta60" style:family="table" style:master-page-name="PageStyle_5f_ZANIEL">
      <style:table-properties table:display="true" style:writing-mode="lr-tb"/>
    </style:style>
    <style:style style:name="ta61" style:family="table" style:master-page-name="PageStyle_5f_ROAN_20_LING">
      <style:table-properties table:display="true" style:writing-mode="lr-tb"/>
    </style:style>
    <style:style style:name="ta62" style:family="table" style:master-page-name="PageStyle_5f_SYNVY">
      <style:table-properties table:display="true" style:writing-mode="lr-tb"/>
    </style:style>
    <style:style style:name="ta63" style:family="table" style:master-page-name="PageStyle_5f_WICCAN">
      <style:table-properties table:display="true" style:writing-mode="lr-tb"/>
    </style:style>
    <style:style style:name="ta64" style:family="table" style:master-page-name="PageStyle_5f_ELIASTAR">
      <style:table-properties table:display="true" style:writing-mode="lr-tb"/>
    </style:style>
    <style:style style:name="ta65" style:family="table" style:master-page-name="PageStyle_5f_SAIBAMAN">
      <style:table-properties table:display="true" style:writing-mode="lr-tb"/>
    </style:style>
    <style:style style:name="ta66" style:family="table" style:master-page-name="PageStyle_5f_SECOND_20_FLOOR_20_BASEMENT">
      <style:table-properties table:display="true" style:writing-mode="lr-tb"/>
    </style:style>
    <style:style style:name="ta67" style:family="table" style:master-page-name="PageStyle_5f_CAPTAINLED">
      <style:table-properties table:display="true" style:writing-mode="lr-tb"/>
    </style:style>
    <style:style style:name="ta68" style:family="table" style:master-page-name="PageStyle_5f_EWGF">
      <style:table-properties table:display="true" style:writing-mode="lr-tb"/>
    </style:style>
    <style:style style:name="ta69" style:family="table" style:master-page-name="PageStyle_5f_SNEAKERS_20_O_27_TOOLE">
      <style:table-properties table:display="true" style:writing-mode="lr-tb"/>
    </style:style>
    <style:style style:name="ta70" style:family="table" style:master-page-name="PageStyle_5f_BOWLIN">
      <style:table-properties table:display="true" style:writing-mode="lr-tb"/>
    </style:style>
    <style:style style:name="ta71" style:family="table" style:master-page-name="PageStyle_5f_SCHEF">
      <style:table-properties table:display="true" style:writing-mode="lr-tb"/>
    </style:style>
    <style:style style:name="ta72" style:family="table" style:master-page-name="PageStyle_5f_JUST_5f_A_5f_TARRASQUE">
      <style:table-properties table:display="true" style:writing-mode="lr-tb"/>
    </style:style>
    <style:style style:name="ta73" style:family="table" style:master-page-name="PageStyle_5f_DIRT">
      <style:table-properties table:display="true" style:writing-mode="lr-tb"/>
    </style:style>
    <style:style style:name="ta74" style:family="table" style:master-page-name="PageStyle_5f_JUNO">
      <style:table-properties table:display="true" style:writing-mode="lr-tb"/>
    </style:style>
    <style:style style:name="ta75" style:family="table" style:master-page-name="PageStyle_5f_A_5f_SUCCESSOR">
      <style:table-properties table:display="true" style:writing-mode="lr-tb"/>
    </style:style>
    <style:style style:name="ta76" style:family="table" style:master-page-name="PageStyle_5f_EPIC_5f_GABRIEL">
      <style:table-properties table:display="true" style:writing-mode="lr-tb"/>
    </style:style>
    <style:style style:name="ta77" style:family="table" style:master-page-name="PageStyle_5f_MY_20_DAD">
      <style:table-properties table:display="true" style:writing-mode="lr-tb"/>
    </style:style>
    <style:style style:name="ta78" style:family="table" style:master-page-name="PageStyle_5f_MCFUNNY">
      <style:table-properties table:display="true" style:writing-mode="lr-tb"/>
    </style:style>
    <style:style style:name="ta79" style:family="table" style:master-page-name="PageStyle_5f_SQUISHY_7e_">
      <style:table-properties table:display="true" style:writing-mode="lr-tb"/>
    </style:style>
    <style:style style:name="ta80" style:family="table" style:master-page-name="PageStyle_5f_SHAINE">
      <style:table-properties table:display="true" style:writing-mode="lr-tb"/>
    </style:style>
    <style:style style:name="ta81" style:family="table" style:master-page-name="PageStyle_5f_LUCIDA">
      <style:table-properties table:display="true" style:writing-mode="lr-tb"/>
    </style:style>
    <style:style style:name="ta82" style:family="table" style:master-page-name="PageStyle_5f_KOLOAX">
      <style:table-properties table:display="true" style:writing-mode="lr-tb"/>
    </style:style>
    <style:style style:name="ta83" style:family="table" style:master-page-name="PageStyle_5f_SOMEHOWNERDY">
      <style:table-properties table:display="true" style:writing-mode="lr-tb"/>
    </style:style>
    <style:style style:name="ta84" style:family="table" style:master-page-name="PageStyle_5f_RYEISCOOL">
      <style:table-properties table:display="true" style:writing-mode="lr-tb"/>
    </style:style>
    <style:style style:name="ta85" style:family="table" style:master-page-name="PageStyle_5f_R3M1X">
      <style:table-properties table:display="true" style:writing-mode="lr-tb"/>
    </style:style>
    <style:style style:name="ta86" style:family="table" style:master-page-name="PageStyle_5f_CHEZFARACH001">
      <style:table-properties table:display="true" style:writing-mode="lr-tb"/>
    </style:style>
    <style:style style:name="ta87" style:family="table" style:master-page-name="PageStyle_5f_MANA">
      <style:table-properties table:display="true" style:writing-mode="lr-tb"/>
    </style:style>
    <style:style style:name="ta88" style:family="table" style:master-page-name="PageStyle_5f_NAMESSKYY">
      <style:table-properties table:display="true" style:writing-mode="lr-tb"/>
    </style:style>
    <style:style style:name="ta89" style:family="table" style:master-page-name="PageStyle_5f_PAPI">
      <style:table-properties table:display="true" style:writing-mode="lr-tb"/>
    </style:style>
    <style:style style:name="ta90" style:family="table" style:master-page-name="PageStyle_5f_NOTHBOX">
      <style:table-properties table:display="true" style:writing-mode="lr-tb"/>
    </style:style>
    <style:style style:name="ta91" style:family="table" style:master-page-name="PageStyle_5f_WORLD_20_JADE_20_CENTER">
      <style:table-properties table:display="true" style:writing-mode="lr-tb"/>
    </style:style>
    <style:style style:name="ta92" style:family="table" style:master-page-name="PageStyle_5f_DOC_20_SHOCK">
      <style:table-properties table:display="true" style:writing-mode="lr-tb"/>
    </style:style>
    <style:style style:name="ta93" style:family="table" style:master-page-name="PageStyle_5f_GOLDENDARK">
      <style:table-properties table:display="true" style:writing-mode="lr-tb"/>
    </style:style>
    <style:style style:name="ta94" style:family="table" style:master-page-name="PageStyle_5f_HAYDENEATSSHRIMP">
      <style:table-properties table:display="true" style:writing-mode="lr-tb"/>
    </style:style>
    <style:style style:name="ta95" style:family="table" style:master-page-name="PageStyle_5f_SALTSTORM">
      <style:table-properties table:display="true" style:writing-mode="lr-tb"/>
    </style:style>
    <style:style style:name="ta96" style:family="table" style:master-page-name="PageStyle_5f_CHAVALAVA">
      <style:table-properties table:display="true" style:writing-mode="lr-tb"/>
    </style:style>
    <style:style style:name="ta97" style:family="table" style:master-page-name="PageStyle_5f_PRINCESSPOPKORN">
      <style:table-properties table:display="true" style:writing-mode="lr-tb"/>
    </style:style>
    <style:style style:name="ta98" style:family="table" style:master-page-name="PageStyle_5f_KRYON">
      <style:table-properties table:display="true" style:writing-mode="lr-tb"/>
    </style:style>
    <style:style style:name="ta99" style:family="table" style:master-page-name="PageStyle_5f_SERPH">
      <style:table-properties table:display="true" style:writing-mode="lr-tb"/>
    </style:style>
    <style:style style:name="ta100" style:family="table" style:master-page-name="PageStyle_5f_KARU_21_">
      <style:table-properties table:display="true" style:writing-mode="lr-tb"/>
    </style:style>
    <style:style style:name="ta101" style:family="table" style:master-page-name="PageStyle_5f_XXX_5f_PETERGOKUGRIFFIN_5f_XXX">
      <style:table-properties table:display="true" style:writing-mode="lr-tb"/>
    </style:style>
    <style:style style:name="ta102" style:family="table" style:master-page-name="PageStyle_5f_BENJI">
      <style:table-properties table:display="true" style:writing-mode="lr-tb"/>
    </style:style>
    <style:style style:name="ta103" style:family="table" style:master-page-name="PageStyle_5f_SEAL_20_KING_20_BARBAROS">
      <style:table-properties table:display="true" style:writing-mode="lr-tb"/>
    </style:style>
    <style:style style:name="ta104" style:family="table" style:master-page-name="PageStyle_5f_GOBLIN">
      <style:table-properties table:display="true" style:writing-mode="lr-tb"/>
    </style:style>
    <style:style style:name="ta105" style:family="table" style:master-page-name="PageStyle_5f_POOBII">
      <style:table-properties table:display="true" style:writing-mode="lr-tb"/>
    </style:style>
    <style:style style:name="ta106" style:family="table" style:master-page-name="PageStyle_5f_WONDERBREAD">
      <style:table-properties table:display="true" style:writing-mode="lr-tb"/>
    </style:style>
    <style:style style:name="ta107" style:family="table" style:master-page-name="PageStyle_5f_FIEND">
      <style:table-properties table:display="true" style:writing-mode="lr-tb"/>
    </style:style>
    <style:style style:name="ta108" style:family="table" style:master-page-name="PageStyle_5f_FRARDVARK">
      <style:table-properties table:display="true" style:writing-mode="lr-tb"/>
    </style:style>
    <style:style style:name="ta109" style:family="table" style:master-page-name="PageStyle_5f_BROKENYEW">
      <style:table-properties table:display="true" style:writing-mode="lr-tb"/>
    </style:style>
    <style:style style:name="ta110" style:family="table" style:master-page-name="PageStyle_5f_JOVIAN">
      <style:table-properties table:display="true" style:writing-mode="lr-tb"/>
    </style:style>
    <style:style style:name="ta111" style:family="table" style:master-page-name="PageStyle_5f_YETI">
      <style:table-properties table:display="true" style:writing-mode="lr-tb"/>
    </style:style>
    <style:style style:name="ta112" style:family="table" style:master-page-name="PageStyle_5f_LAPI">
      <style:table-properties table:display="true" style:writing-mode="lr-tb"/>
    </style:style>
    <style:style style:name="ta113" style:family="table" style:master-page-name="PageStyle_5f_GAHTZU">
      <style:table-properties table:display="true" style:writing-mode="lr-tb"/>
    </style:style>
    <style:style style:name="ta114" style:family="table" style:master-page-name="PageStyle_5f_SLOWPEZ">
      <style:table-properties table:display="true" style:writing-mode="lr-tb"/>
    </style:style>
    <style:style style:name="ta115" style:family="table" style:master-page-name="PageStyle_5f_RICKY6">
      <style:table-properties table:display="true" style:writing-mode="lr-tb"/>
    </style:style>
    <style:style style:name="ta116" style:family="table" style:master-page-name="PageStyle_5f_QUELITY">
      <style:table-properties table:display="true" style:writing-mode="lr-tb"/>
    </style:style>
    <style:style style:name="ta117" style:family="table" style:master-page-name="PageStyle_5f_CAPTAIN_20_G">
      <style:table-properties table:display="true" style:writing-mode="lr-tb"/>
    </style:style>
    <style:style style:name="ta118" style:family="table" style:master-page-name="PageStyle_5f_TGAGS">
      <style:table-properties table:display="true" style:writing-mode="lr-tb"/>
    </style:style>
    <style:style style:name="ta119" style:family="table" style:master-page-name="PageStyle_5f_HOD_20_STRAT">
      <style:table-properties table:display="true" style:writing-mode="lr-tb"/>
    </style:style>
    <style:style style:name="ta120" style:family="table" style:master-page-name="PageStyle_5f_CCGRABS">
      <style:table-properties table:display="true" style:writing-mode="lr-tb"/>
    </style:style>
    <style:style style:name="ta121" style:family="table" style:master-page-name="PageStyle_5f_PROTO">
      <style:table-properties table:display="true" style:writing-mode="lr-tb"/>
    </style:style>
    <style:style style:name="ta122" style:family="table" style:master-page-name="PageStyle_5f_DRC">
      <style:table-properties table:display="true" style:writing-mode="lr-tb"/>
    </style:style>
    <style:style style:name="ta123" style:family="table" style:master-page-name="PageStyle_5f_KING_20_MOMO">
      <style:table-properties table:display="true" style:writing-mode="lr-tb"/>
    </style:style>
    <style:style style:name="ta124" style:family="table" style:master-page-name="PageStyle_5f_NOTTONY">
      <style:table-properties table:display="true" style:writing-mode="lr-tb"/>
    </style:style>
    <style:style style:name="ta125" style:family="table" style:master-page-name="PageStyle_5f_BENNY">
      <style:table-properties table:display="true" style:writing-mode="lr-tb"/>
    </style:style>
    <style:style style:name="ta126" style:family="table" style:master-page-name="PageStyle_5f_OKUSUII">
      <style:table-properties table:display="true" style:writing-mode="lr-tb"/>
    </style:style>
    <style:style style:name="ta127" style:family="table" style:master-page-name="PageStyle_5f_HOWIE">
      <style:table-properties table:display="true" style:writing-mode="lr-tb"/>
    </style:style>
    <style:style style:name="ta128" style:family="table" style:master-page-name="PageStyle_5f_CLOAK">
      <style:table-properties table:display="true" style:writing-mode="lr-tb"/>
    </style:style>
    <style:style style:name="ta129" style:family="table" style:master-page-name="PageStyle_5f_OG_20_KID">
      <style:table-properties table:display="true" style:writing-mode="lr-tb"/>
    </style:style>
    <style:style style:name="ta130" style:family="table" style:master-page-name="PageStyle_5f_THATONEGUY">
      <style:table-properties table:display="true" style:writing-mode="lr-tb"/>
    </style:style>
    <style:style style:name="ta131" style:family="table" style:master-page-name="PageStyle_5f_SANDBAG">
      <style:table-properties table:display="true" style:writing-mode="lr-tb"/>
    </style:style>
    <style:style style:name="ta132" style:family="table" style:master-page-name="PageStyle_5f_PSH4RKY">
      <style:table-properties table:display="true" style:writing-mode="lr-tb"/>
    </style:style>
    <style:style style:name="ta133" style:family="table" style:master-page-name="PageStyle_5f_KRUDO">
      <style:table-properties table:display="true" style:writing-mode="lr-tb"/>
    </style:style>
    <style:style style:name="ta134" style:family="table" style:master-page-name="PageStyle_5f_PANDA">
      <style:table-properties table:display="true" style:writing-mode="lr-tb"/>
    </style:style>
    <style:style style:name="ta135" style:family="table" style:master-page-name="PageStyle_5f_SWIFTSPANK">
      <style:table-properties table:display="true" style:writing-mode="lr-tb"/>
    </style:style>
    <style:style style:name="ta136" style:family="table" style:master-page-name="PageStyle_5f_AHIMELEC_20_VELEZ">
      <style:table-properties table:display="true" style:writing-mode="lr-tb"/>
    </style:style>
    <style:style style:name="ta137" style:family="table" style:master-page-name="PageStyle_5f_ABRAHAM">
      <style:table-properties table:display="true" style:writing-mode="lr-tb"/>
    </style:style>
    <style:style style:name="ta138" style:family="table" style:master-page-name="PageStyle_5f_TITAN">
      <style:table-properties table:display="true" style:writing-mode="lr-tb"/>
    </style:style>
    <style:style style:name="ta139" style:family="table" style:master-page-name="PageStyle_5f_THAT0NEGUY">
      <style:table-properties table:display="true" style:writing-mode="lr-tb"/>
    </style:style>
    <style:style style:name="ta140" style:family="table" style:master-page-name="PageStyle_5f_VINTNER">
      <style:table-properties table:display="true" style:writing-mode="lr-tb"/>
    </style:style>
    <style:style style:name="ta141" style:family="table" style:master-page-name="PageStyle_5f_A-K_20_SIN">
      <style:table-properties table:display="true" style:writing-mode="lr-tb"/>
    </style:style>
    <style:style style:name="ta142" style:family="table" style:master-page-name="PageStyle_5f_LITT">
      <style:table-properties table:display="true" style:writing-mode="lr-tb"/>
    </style:style>
    <style:style style:name="ta143" style:family="table" style:master-page-name="PageStyle_5f_TED.">
      <style:table-properties table:display="true" style:writing-mode="lr-tb"/>
    </style:style>
    <style:style style:name="ta144" style:family="table" style:master-page-name="PageStyle_5f_AZLU">
      <style:table-properties table:display="true" style:writing-mode="lr-tb"/>
    </style:style>
    <style:style style:name="ta145" style:family="table" style:master-page-name="PageStyle_5f_PEELE">
      <style:table-properties table:display="true" style:writing-mode="lr-tb"/>
    </style:style>
    <style:style style:name="ta146" style:family="table" style:master-page-name="PageStyle_5f_KOMODO">
      <style:table-properties table:display="true" style:writing-mode="lr-tb"/>
    </style:style>
    <style:style style:name="ta147" style:family="table" style:master-page-name="PageStyle_5f_JCHU">
      <style:table-properties table:display="true" style:writing-mode="lr-tb"/>
    </style:style>
    <style:style style:name="ta148" style:family="table" style:master-page-name="PageStyle_5f_ESAM">
      <style:table-properties table:display="true" style:writing-mode="lr-tb"/>
    </style:style>
    <style:style style:name="ta149" style:family="table" style:master-page-name="PageStyle_5f_HUNGRY_20_PIGEON">
      <style:table-properties table:display="true" style:writing-mode="lr-tb"/>
    </style:style>
    <style:style style:name="ta150" style:family="table" style:master-page-name="PageStyle_5f_JFALCO">
      <style:table-properties table:display="true" style:writing-mode="lr-tb"/>
    </style:style>
    <style:style style:name="ta151" style:family="table" style:master-page-name="PageStyle_5f_SNEAKYWILL">
      <style:table-properties table:display="true" style:writing-mode="lr-tb"/>
    </style:style>
    <style:style style:name="ta152" style:family="table" style:master-page-name="PageStyle_5f_KIP">
      <style:table-properties table:display="true" style:writing-mode="lr-tb"/>
    </style:style>
    <style:style style:name="ta153" style:family="table" style:master-page-name="PageStyle_5f_JAPE">
      <style:table-properties table:display="true" style:writing-mode="lr-tb"/>
    </style:style>
    <style:style style:name="ta154" style:family="table" style:master-page-name="PageStyle_5f_PAINUS">
      <style:table-properties table:display="true" style:writing-mode="lr-tb"/>
    </style:style>
    <style:style style:name="ta155" style:family="table" style:master-page-name="PageStyle_5f_ROAD">
      <style:table-properties table:display="true" style:writing-mode="lr-tb"/>
    </style:style>
    <style:style style:name="ta156" style:family="table" style:master-page-name="PageStyle_5f_AXL">
      <style:table-properties table:display="true" style:writing-mode="lr-tb"/>
    </style:style>
    <style:style style:name="ta157" style:family="table" style:master-page-name="PageStyle_5f_EL_20_PINGU">
      <style:table-properties table:display="true" style:writing-mode="lr-tb"/>
    </style:style>
    <style:style style:name="ta158" style:family="table" style:master-page-name="PageStyle_5f_VIPRSKREEN">
      <style:table-properties table:display="true" style:writing-mode="lr-tb"/>
    </style:style>
    <style:style style:name="ta159" style:family="table" style:master-page-name="PageStyle_5f_DTHEMAN">
      <style:table-properties table:display="true" style:writing-mode="lr-tb"/>
    </style:style>
    <style:style style:name="ta160" style:family="table" style:master-page-name="PageStyle_5f_NAP">
      <style:table-properties table:display="true" style:writing-mode="lr-tb"/>
    </style:style>
    <style:style style:name="ta161" style:family="table" style:master-page-name="PageStyle_5f_FLOPPY_5f_DUCK049">
      <style:table-properties table:display="true" style:writing-mode="lr-tb"/>
    </style:style>
    <style:style style:name="ta162" style:family="table" style:master-page-name="PageStyle_5f_NUOCA">
      <style:table-properties table:display="true" style:writing-mode="lr-tb"/>
    </style:style>
    <style:style style:name="ta163" style:family="table" style:master-page-name="PageStyle_5f_DOORMATT">
      <style:table-properties table:display="true" style:writing-mode="lr-tb"/>
    </style:style>
    <style:style style:name="ta164" style:family="table" style:master-page-name="PageStyle_5f_FAPPLE">
      <style:table-properties table:display="true" style:writing-mode="lr-tb"/>
    </style:style>
    <style:style style:name="ta165" style:family="table" style:master-page-name="PageStyle_5f_STEPKNIGHTUP">
      <style:table-properties table:display="true" style:writing-mode="lr-tb"/>
    </style:style>
    <style:style style:name="ta166" style:family="table" style:master-page-name="PageStyle_5f_AELO.PLAYS">
      <style:table-properties table:display="true" style:writing-mode="lr-tb"/>
    </style:style>
    <style:style style:name="ta167" style:family="table" style:master-page-name="PageStyle_5f_RONDON">
      <style:table-properties table:display="true" style:writing-mode="lr-tb"/>
    </style:style>
    <style:style style:name="ta168" style:family="table" style:master-page-name="PageStyle_5f_KOBE">
      <style:table-properties table:display="true" style:writing-mode="lr-tb"/>
    </style:style>
    <style:style style:name="ta169" style:family="table" style:master-page-name="PageStyle_5f_PELLONIAN">
      <style:table-properties table:display="true" style:writing-mode="lr-tb"/>
    </style:style>
    <style:style style:name="ta170" style:family="table" style:master-page-name="PageStyle_5f_BLITZ">
      <style:table-properties table:display="true" style:writing-mode="lr-tb"/>
    </style:style>
    <style:style style:name="ta171" style:family="table" style:master-page-name="PageStyle_5f_MR.FEENY">
      <style:table-properties table:display="true" style:writing-mode="lr-tb"/>
    </style:style>
    <style:style style:name="ta172" style:family="table" style:master-page-name="PageStyle_5f_IRUSH">
      <style:table-properties table:display="true" style:writing-mode="lr-tb"/>
    </style:style>
    <style:style style:name="ta173" style:family="table" style:master-page-name="PageStyle_5f_HYPERLUVSGOD">
      <style:table-properties table:display="true" style:writing-mode="lr-tb"/>
    </style:style>
    <style:style style:name="ta174" style:family="table" style:master-page-name="PageStyle_5f_BOOBELL">
      <style:table-properties table:display="true" style:writing-mode="lr-tb"/>
    </style:style>
    <style:style style:name="ta175" style:family="table" style:master-page-name="PageStyle_5f_NARWHAL">
      <style:table-properties table:display="true" style:writing-mode="lr-tb"/>
    </style:style>
    <style:style style:name="ta176" style:family="table" style:master-page-name="PageStyle_5f_ANTHZENY">
      <style:table-properties table:display="true" style:writing-mode="lr-tb"/>
    </style:style>
    <style:style style:name="ta177" style:family="table" style:master-page-name="PageStyle_5f_STILIOS">
      <style:table-properties table:display="true" style:writing-mode="lr-tb"/>
    </style:style>
    <style:style style:name="ta178" style:family="table" style:master-page-name="PageStyle_5f_DM">
      <style:table-properties table:display="true" style:writing-mode="lr-tb"/>
    </style:style>
    <style:style style:name="ta179" style:family="table" style:master-page-name="PageStyle_5f_ZARBERIAN">
      <style:table-properties table:display="true" style:writing-mode="lr-tb"/>
    </style:style>
    <style:style style:name="ta180" style:family="table" style:master-page-name="PageStyle_5f_NESSQUIK">
      <style:table-properties table:display="true" style:writing-mode="lr-tb"/>
    </style:style>
    <style:style style:name="ta181" style:family="table" style:master-page-name="PageStyle_5f_UPCHUCK">
      <style:table-properties table:display="true" style:writing-mode="lr-tb"/>
    </style:style>
    <style:style style:name="ta182" style:family="table" style:master-page-name="PageStyle_5f_SPICYWINGZ11">
      <style:table-properties table:display="true" style:writing-mode="lr-tb"/>
    </style:style>
    <style:style style:name="ta183" style:family="table" style:master-page-name="PageStyle_5f_AWSMSUN">
      <style:table-properties table:display="true" style:writing-mode="lr-tb"/>
    </style:style>
    <style:style style:name="ta184" style:family="table" style:master-page-name="PageStyle_5f__21_MAMA_5f_MIA_21_">
      <style:table-properties table:display="true" style:writing-mode="lr-tb"/>
    </style:style>
    <style:style style:name="ta185" style:family="table" style:master-page-name="PageStyle_5f_ROB">
      <style:table-properties table:display="true" style:writing-mode="lr-tb"/>
    </style:style>
    <style:style style:name="ta186" style:family="table" style:master-page-name="PageStyle_5f_CLEAN">
      <style:table-properties table:display="true" style:writing-mode="lr-tb"/>
    </style:style>
    <style:style style:name="ta187" style:family="table" style:master-page-name="PageStyle_5f_SHNISSUGAH">
      <style:table-properties table:display="true" style:writing-mode="lr-tb"/>
    </style:style>
    <style:style style:name="ta188" style:family="table" style:master-page-name="PageStyle_5f_STARZ">
      <style:table-properties table:display="true" style:writing-mode="lr-tb"/>
    </style:style>
    <style:style style:name="ta189" style:family="table" style:master-page-name="PageStyle_5f_LUMISADI">
      <style:table-properties table:display="true" style:writing-mode="lr-tb"/>
    </style:style>
    <style:style style:name="ta190" style:family="table" style:master-page-name="PageStyle_5f_OKI">
      <style:table-properties table:display="true" style:writing-mode="lr-tb"/>
    </style:style>
    <style:style style:name="ta191" style:family="table" style:master-page-name="PageStyle_5f_VILESPECTER">
      <style:table-properties table:display="true" style:writing-mode="lr-tb"/>
    </style:style>
    <style:style style:name="ta192" style:family="table" style:master-page-name="PageStyle_5f_STROBICS">
      <style:table-properties table:display="true" style:writing-mode="lr-tb"/>
    </style:style>
    <style:style style:name="ta193" style:family="table" style:master-page-name="PageStyle_5f_YHO_21_">
      <style:table-properties table:display="true" style:writing-mode="lr-tb"/>
    </style:style>
    <style:style style:name="ta194" style:family="table" style:master-page-name="PageStyle_5f_KUYA">
      <style:table-properties table:display="true" style:writing-mode="lr-tb"/>
    </style:style>
    <style:style style:name="ta195" style:family="table" style:master-page-name="PageStyle_5f_LARS">
      <style:table-properties table:display="true" style:writing-mode="lr-tb"/>
    </style:style>
    <style:style style:name="ta196" style:family="table" style:master-page-name="PageStyle_5f_20XQUEST">
      <style:table-properties table:display="true" style:writing-mode="lr-tb"/>
    </style:style>
    <style:style style:name="ta197" style:family="table" style:master-page-name="PageStyle_5f_SENTINEL">
      <style:table-properties table:display="true" style:writing-mode="lr-tb"/>
    </style:style>
    <style:style style:name="ta198" style:family="table" style:master-page-name="PageStyle_5f_AARON">
      <style:table-properties table:display="true" style:writing-mode="lr-tb"/>
    </style:style>
    <style:style style:name="ta199" style:family="table" style:master-page-name="PageStyle_5f_TEXTBOOK">
      <style:table-properties table:display="true" style:writing-mode="lr-tb"/>
    </style:style>
    <style:style style:name="ta200" style:family="table" style:master-page-name="PageStyle_5f_240P">
      <style:table-properties table:display="true" style:writing-mode="lr-tb"/>
    </style:style>
    <style:style style:name="ta201" style:family="table" style:master-page-name="PageStyle_5f_STYLISH_20_THUG_20_SLAYER">
      <style:table-properties table:display="true" style:writing-mode="lr-tb"/>
    </style:style>
    <style:style style:name="ta202" style:family="table" style:master-page-name="PageStyle_5f_A1.EXE">
      <style:table-properties table:display="true" style:writing-mode="lr-tb"/>
    </style:style>
    <style:style style:name="ta203" style:family="table" style:master-page-name="PageStyle_5f_BOBATEATIME">
      <style:table-properties table:display="true" style:writing-mode="lr-tb"/>
    </style:style>
    <style:style style:name="ta204" style:family="table" style:master-page-name="PageStyle_5f_JITMASTERSWAG">
      <style:table-properties table:display="true" style:writing-mode="lr-tb"/>
    </style:style>
    <style:style style:name="ta205" style:family="table" style:master-page-name="PageStyle_5f_CHECKMATE">
      <style:table-properties table:display="true" style:writing-mode="lr-tb"/>
    </style:style>
    <style:style style:name="ta206" style:family="table" style:master-page-name="PageStyle_5f_CAPPUCCINO">
      <style:table-properties table:display="true" style:writing-mode="lr-tb"/>
    </style:style>
    <style:style style:name="ta207" style:family="table" style:master-page-name="PageStyle_5f_UHLINE">
      <style:table-properties table:display="true" style:writing-mode="lr-tb"/>
    </style:style>
    <style:style style:name="ta208" style:family="table" style:master-page-name="PageStyle_5f_EQUILATERAL">
      <style:table-properties table:display="true" style:writing-mode="lr-tb"/>
    </style:style>
    <style:style style:name="ta209" style:family="table" style:master-page-name="PageStyle_5f_PACE">
      <style:table-properties table:display="true" style:writing-mode="lr-tb"/>
    </style:style>
    <style:style style:name="ta210" style:family="table" style:master-page-name="PageStyle_5f_WIZZROBE">
      <style:table-properties table:display="true" style:writing-mode="lr-tb"/>
    </style:style>
    <style:style style:name="ta211" style:family="table" style:master-page-name="PageStyle_5f_FRANCO">
      <style:table-properties table:display="true" style:writing-mode="lr-tb"/>
    </style:style>
    <style:style style:name="ta212" style:family="table" style:master-page-name="PageStyle_5f_DGK">
      <style:table-properties table:display="true" style:writing-mode="lr-tb"/>
    </style:style>
    <style:style style:name="ta213" style:family="table" style:master-page-name="PageStyle_5f_TOTO_5f_PINK">
      <style:table-properties table:display="true" style:writing-mode="lr-tb"/>
    </style:style>
    <style:style style:name="ta214" style:family="table" style:master-page-name="PageStyle_5f_YUNAKA">
      <style:table-properties table:display="true" style:writing-mode="lr-tb"/>
    </style:style>
    <style:style style:name="ta215" style:family="table" style:master-page-name="PageStyle_5f_DOMINATOR">
      <style:table-properties table:display="true" style:writing-mode="lr-tb"/>
    </style:style>
    <style:style style:name="ta216" style:family="table" style:master-page-name="PageStyle_5f_TUNIC">
      <style:table-properties table:display="true" style:writing-mode="lr-tb"/>
    </style:style>
    <style:style style:name="ta217" style:family="table" style:master-page-name="PageStyle_5f_D0G3">
      <style:table-properties table:display="true" style:writing-mode="lr-tb"/>
    </style:style>
    <style:style style:name="ta218" style:family="table" style:master-page-name="PageStyle_5f_GRYMLYNN">
      <style:table-properties table:display="true" style:writing-mode="lr-tb"/>
    </style:style>
    <style:style style:name="ta219" style:family="table" style:master-page-name="PageStyle_5f_S._20_PHANTM">
      <style:table-properties table:display="true" style:writing-mode="lr-tb"/>
    </style:style>
    <style:style style:name="ta220" style:family="table" style:master-page-name="PageStyle_5f_B_5f_SLAM">
      <style:table-properties table:display="true" style:writing-mode="lr-tb"/>
    </style:style>
    <style:style style:name="ta221" style:family="table" style:master-page-name="PageStyle_5f_SHAWNBD3">
      <style:table-properties table:display="true" style:writing-mode="lr-tb"/>
    </style:style>
    <style:style style:name="ta222" style:family="table" style:master-page-name="PageStyle_5f_SYNTAX">
      <style:table-properties table:display="true" style:writing-mode="lr-tb"/>
    </style:style>
    <style:style style:name="ta223" style:family="table" style:master-page-name="PageStyle_5f_JEAN_20_PAPITAS">
      <style:table-properties table:display="true" style:writing-mode="lr-tb"/>
    </style:style>
    <style:style style:name="ta224" style:family="table" style:master-page-name="PageStyle_5f_ELITE">
      <style:table-properties table:display="true" style:writing-mode="lr-tb"/>
    </style:style>
    <style:style style:name="ta225" style:family="table" style:master-page-name="PageStyle_5f_THE_20_CHUCKSTER">
      <style:table-properties table:display="true" style:writing-mode="lr-tb"/>
    </style:style>
    <style:style style:name="ta226" style:family="table" style:master-page-name="PageStyle_5f_EBAT">
      <style:table-properties table:display="true" style:writing-mode="lr-tb"/>
    </style:style>
    <style:style style:name="ta227" style:family="table" style:master-page-name="PageStyle_5f_NAVÉ">
      <style:table-properties table:display="true" style:writing-mode="lr-tb"/>
    </style:style>
    <style:style style:name="ta228" style:family="table" style:master-page-name="PageStyle_5f_MADERA">
      <style:table-properties table:display="true" style:writing-mode="lr-tb"/>
    </style:style>
    <style:style style:name="ta229" style:family="table" style:master-page-name="PageStyle_5f_SUREHYPER">
      <style:table-properties table:display="true" style:writing-mode="lr-tb"/>
    </style:style>
    <style:style style:name="ta230" style:family="table" style:master-page-name="PageStyle_5f_BLAINE">
      <style:table-properties table:display="true" style:writing-mode="lr-tb"/>
    </style:style>
    <style:style style:name="ta231" style:family="table" style:master-page-name="PageStyle_5f_MANTA">
      <style:table-properties table:display="true" style:writing-mode="lr-tb"/>
    </style:style>
    <style:style style:name="ta232" style:family="table" style:master-page-name="PageStyle_5f_JDQ05">
      <style:table-properties table:display="true" style:writing-mode="lr-tb"/>
    </style:style>
    <style:style style:name="ta233" style:family="table" style:master-page-name="PageStyle_5f_MUSTSEEK">
      <style:table-properties table:display="true" style:writing-mode="lr-tb"/>
    </style:style>
    <style:style style:name="ta234" style:family="table" style:master-page-name="PageStyle_5f_JONIN">
      <style:table-properties table:display="true" style:writing-mode="lr-tb"/>
    </style:style>
    <style:style style:name="ta235" style:family="table" style:master-page-name="PageStyle_5f_PC_5f_TWEEKIN">
      <style:table-properties table:display="true" style:writing-mode="lr-tb"/>
    </style:style>
    <style:style style:name="ta236" style:family="table" style:master-page-name="PageStyle_5f_PACKET">
      <style:table-properties table:display="true" style:writing-mode="lr-tb"/>
    </style:style>
    <style:style style:name="ta237" style:family="table" style:master-page-name="PageStyle_5f_HIDDEKEL">
      <style:table-properties table:display="true" style:writing-mode="lr-tb"/>
    </style:style>
    <style:style style:name="ta238" style:family="table" style:master-page-name="PageStyle_5f_DARK4ORCE">
      <style:table-properties table:display="true" style:writing-mode="lr-tb"/>
    </style:style>
    <style:style style:name="ta239" style:family="table" style:master-page-name="PageStyle_5f_BLACK_20_LEMONADE">
      <style:table-properties table:display="true" style:writing-mode="lr-tb"/>
    </style:style>
    <style:style style:name="ta240" style:family="table" style:master-page-name="PageStyle_5f_RIKU">
      <style:table-properties table:display="true" style:writing-mode="lr-tb"/>
    </style:style>
    <style:style style:name="ta241" style:family="table" style:master-page-name="PageStyle_5f_STICCCY">
      <style:table-properties table:display="true" style:writing-mode="lr-tb"/>
    </style:style>
    <style:style style:name="ta242" style:family="table" style:master-page-name="PageStyle_5f_G00MBA">
      <style:table-properties table:display="true" style:writing-mode="lr-tb"/>
    </style:style>
    <style:style style:name="ta243" style:family="table" style:master-page-name="PageStyle_5f_NACLG0D">
      <style:table-properties table:display="true" style:writing-mode="lr-tb"/>
    </style:style>
    <style:style style:name="ta244" style:family="table" style:master-page-name="PageStyle_5f_GINGER">
      <style:table-properties table:display="true" style:writing-mode="lr-tb"/>
    </style:style>
    <style:style style:name="ta245" style:family="table" style:master-page-name="PageStyle_5f_MINIMAXIFY">
      <style:table-properties table:display="true" style:writing-mode="lr-tb"/>
    </style:style>
    <style:style style:name="ta246" style:family="table" style:master-page-name="PageStyle_5f_PSYSILEX">
      <style:table-properties table:display="true" style:writing-mode="lr-tb"/>
    </style:style>
    <style:style style:name="ta247" style:family="table" style:master-page-name="PageStyle_5f_HISPANIC_21__20_AT_20_THE_20_DISCO">
      <style:table-properties table:display="true" style:writing-mode="lr-tb"/>
    </style:style>
    <style:style style:name="ta248" style:family="table" style:master-page-name="PageStyle_5f_MANZANA">
      <style:table-properties table:display="true" style:writing-mode="lr-tb"/>
    </style:style>
    <style:style style:name="ta249" style:family="table" style:master-page-name="PageStyle_5f_DOMINGO">
      <style:table-properties table:display="true" style:writing-mode="lr-tb"/>
    </style:style>
    <style:style style:name="ta250" style:family="table" style:master-page-name="PageStyle_5f_REDPIK">
      <style:table-properties table:display="true" style:writing-mode="lr-tb"/>
    </style:style>
    <style:style style:name="ta251" style:family="table" style:master-page-name="PageStyle_5f_TJNIKHAZY">
      <style:table-properties table:display="true" style:writing-mode="lr-tb"/>
    </style:style>
    <style:style style:name="ta252" style:family="table" style:master-page-name="PageStyle_5f_VIRI">
      <style:table-properties table:display="true" style:writing-mode="lr-tb"/>
    </style:style>
    <style:style style:name="ta253" style:family="table" style:master-page-name="PageStyle_5f_SUNDAYGARY">
      <style:table-properties table:display="true" style:writing-mode="lr-tb"/>
    </style:style>
    <style:style style:name="ta254" style:family="table" style:master-page-name="PageStyle_5f_THITKHO">
      <style:table-properties table:display="true" style:writing-mode="lr-tb"/>
    </style:style>
    <style:style style:name="ta255" style:family="table" style:master-page-name="PageStyle_5f_PRYVATE_20_PIGEON">
      <style:table-properties table:display="true" style:writing-mode="lr-tb"/>
    </style:style>
    <style:style style:name="ta256" style:family="table" style:master-page-name="PageStyle_5f_BIGNEWS.CO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ltimate-singles Set Record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office:value-type="string">
            <text:p>ultimate-singles</text:p>
          </table:table-cell>
          <table:table-cell table:number-columns-repeated="1023"/>
        </table:table-row>
        <table:table-row table:style-name="ro1">
          <table:table-cell office:value-type="string">
            <text:p>Competitor</text:p>
          </table:table-cell>
          <table:table-cell office:value-type="string">
            <text:p>Compiled Record</text:p>
          </table:table-cell>
          <table:table-cell office:value-type="string">
            <text:p>Wins</text:p>
          </table:table-cell>
          <table:table-cell office:value-type="string">
            <text:p>Losses</text:p>
          </table:table-cell>
          <table:table-cell office:value-type="string">
            <text:p>DQs</text:p>
          </table:table-cell>
          <table:table-cell table:number-columns-repeated="1019"/>
        </table:table-row>
        <table:table-row table:style-name="ro1">
          <table:table-cell office:value-type="string">
            <text:p>JediSmash</text:p>
          </table:table-cell>
          <table:table-cell office:value-type="string">
            <text:p>4 - 10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cuffed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Zorrin</text:p>
          </table:table-cell>
          <table:table-cell office:value-type="string">
            <text:p>8 - 8</text:p>
          </table:table-cell>
          <table:table-cell table:number-columns-repeated="2"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OwiePowie69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hez</text:p>
          </table:table-cell>
          <table:table-cell office:value-type="string">
            <text:p>11 - 12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edemption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r-Huge</text:p>
          </table:table-cell>
          <table:table-cell office:value-type="string">
            <text:p>4 - 4</text:p>
          </table:table-cell>
          <table:table-cell table:number-columns-repeated="2"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KurryRose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13 - 8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ollywood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acen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Rec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JoeysMemeTeam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entPain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quilliam Afton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onegg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iam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XIX</text:p>
          </table:table-cell>
          <table:table-cell office:value-type="string">
            <text:p>0 - 6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Zomba</text:p>
          </table:table-cell>
          <table:table-cell office:value-type="string">
            <text:p>7 - 0</text:p>
          </table:table-cell>
          <table:table-cell office:value-type="string">
            <text:p>7</text:p>
          </table:table-cell>
          <table:table-cell table:number-columns-repeated="2"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Fonica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Plummet</text:p>
          </table:table-cell>
          <table:table-cell office:value-type="string">
            <text:p>15 - 10</text:p>
          </table:table-cell>
          <table:table-cell office:value-type="string">
            <text:p>15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enikki</text:p>
          </table:table-cell>
          <table:table-cell office:value-type="string">
            <text:p>13 - 8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reezy 400</text:p>
          </table:table-cell>
          <table:table-cell office:value-type="string">
            <text:p>8 - 8</text:p>
          </table:table-cell>
          <table:table-cell table:number-columns-repeated="2"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Kiki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pam no jutsu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Octo</text:p>
          </table:table-cell>
          <table:table-cell office:value-type="string">
            <text:p>3 - 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Olsen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13 - 12</text:p>
          </table:table-cell>
          <table:table-cell office:value-type="string">
            <text:p>13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hiro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12 - 10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ev7x</text:p>
          </table:table-cell>
          <table:table-cell office:value-type="string">
            <text:p>4 - 8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endragon</text:p>
          </table:table-cell>
          <table:table-cell office:value-type="string">
            <text:p>6 - 8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yamaokai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hunning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JG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ayo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alaxia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rNubs</text:p>
          </table:table-cell>
          <table:table-cell office:value-type="string">
            <text:p>10 - 12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ane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9 - 9</text:p>
          </table:table-cell>
          <table:table-cell table:number-columns-repeated="2" office:value-type="string">
            <text:p>9</text:p>
          </table:table-cell>
          <table:table-cell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Czar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35 - 7</text:p>
          </table:table-cell>
          <table:table-cell office:value-type="string">
            <text:p>35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14 - 8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hand</text:p>
          </table:table-cell>
          <table:table-cell office:value-type="string">
            <text:p>16 - 12</text:p>
          </table:table-cell>
          <table:table-cell office:value-type="string">
            <text:p>16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UNSLINGING GATOS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Newo</text:p>
          </table:table-cell>
          <table:table-cell office:value-type="string">
            <text:p>17 - 6</text:p>
          </table:table-cell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12 - 10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hpstks</text:p>
          </table:table-cell>
          <table:table-cell office:value-type="string">
            <text:p>10 - 6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zesp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Zaniel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oan ling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ynvy</text:p>
          </table:table-cell>
          <table:table-cell office:value-type="string">
            <text:p>0 - 6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Wiccan</text:p>
          </table:table-cell>
          <table:table-cell office:value-type="string">
            <text:p>9 - 8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liastar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aibaman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econd Floor Basement</text:p>
          </table:table-cell>
          <table:table-cell office:value-type="string">
            <text:p>7 - 4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aptainLED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WGF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neakers O'Toole</text:p>
          </table:table-cell>
          <table:table-cell office:value-type="string">
            <text:p>0 - 6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owlin</text:p>
          </table:table-cell>
          <table:table-cell office:value-type="string">
            <text:p>4 - 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chef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ust_A_Tarrasque</text:p>
          </table:table-cell>
          <table:table-cell office:value-type="string">
            <text:p>2 - 6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iRT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uno</text:p>
          </table:table-cell>
          <table:table-cell office:value-type="string">
            <text:p>9 - 8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_Successor</text:p>
          </table:table-cell>
          <table:table-cell office:value-type="string">
            <text:p>2 - 6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33 - 10</text:p>
          </table:table-cell>
          <table:table-cell office:value-type="string">
            <text:p>33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y Dad</text:p>
          </table:table-cell>
          <table:table-cell office:value-type="string">
            <text:p>8 - 10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Funny</text:p>
          </table:table-cell>
          <table:table-cell office:value-type="string">
            <text:p>20 - 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21 - 12</text:p>
          </table:table-cell>
          <table:table-cell office:value-type="string">
            <text:p>2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haine</text:p>
          </table:table-cell>
          <table:table-cell office:value-type="string">
            <text:p>26 - 9</text:p>
          </table:table-cell>
          <table:table-cell office:value-type="string">
            <text:p>26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ucida</text:p>
          </table:table-cell>
          <table:table-cell office:value-type="string">
            <text:p>8 - 6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Koloax</text:p>
          </table:table-cell>
          <table:table-cell office:value-type="string">
            <text:p>15 - 8</text:p>
          </table:table-cell>
          <table:table-cell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omehowNerdy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yeiscool</text:p>
          </table:table-cell>
          <table:table-cell office:value-type="string">
            <text:p>1 - 6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3M1X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hezFarach001</text:p>
          </table:table-cell>
          <table:table-cell office:value-type="string">
            <text:p>7 - 6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na</text:p>
          </table:table-cell>
          <table:table-cell office:value-type="string">
            <text:p>0 - 7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Namesskyy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api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table:number-columns-repeated="2"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NotHbox</text:p>
          </table:table-cell>
          <table:table-cell office:value-type="string">
            <text:p>13 - 10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World Jade Center</text:p>
          </table:table-cell>
          <table:table-cell office:value-type="string">
            <text:p>2 - 6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oc Shock</text:p>
          </table:table-cell>
          <table:table-cell office:value-type="string">
            <text:p>3 - 6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GoldenDark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17 - 12</text:p>
          </table:table-cell>
          <table:table-cell office:value-type="string">
            <text:p>17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altstorm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12 - 10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rincessPopkorn</text:p>
          </table:table-cell>
          <table:table-cell office:value-type="string">
            <text:p>0 - 5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Kryon</text:p>
          </table:table-cell>
          <table:table-cell office:value-type="string">
            <text:p>5 - 6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erph</text:p>
          </table:table-cell>
          <table:table-cell office:value-type="string">
            <text:p>4 - 6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Karu!</text:p>
          </table:table-cell>
          <table:table-cell office:value-type="string">
            <text:p>11 - 4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12 - 12</text:p>
          </table:table-cell>
          <table:table-cell table:number-columns-repeated="2"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enji</text:p>
          </table:table-cell>
          <table:table-cell office:value-type="string">
            <text:p>21 - 10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eal King Barbaros</text:p>
          </table:table-cell>
          <table:table-cell office:value-type="string">
            <text:p>10 - 6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oblin</text:p>
          </table:table-cell>
          <table:table-cell office:value-type="string">
            <text:p>6 - 2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oobii</text:p>
          </table:table-cell>
          <table:table-cell office:value-type="string">
            <text:p>10 - 10</text:p>
          </table:table-cell>
          <table:table-cell table:number-columns-repeated="2"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18 - 9</text:p>
          </table:table-cell>
          <table:table-cell office:value-type="string">
            <text:p>18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fiend</text:p>
          </table:table-cell>
          <table:table-cell office:value-type="string">
            <text:p>11 - 10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lowpez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Quelity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roto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OG Kid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hatOneGuy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-K SiN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zLu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SAM</text:p>
          </table:table-cell>
          <table:table-cell office:value-type="string">
            <text:p>9 - 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ainus</text:p>
          </table:table-cell>
          <table:table-cell office:value-type="string">
            <text:p>1 - 1</text:p>
          </table:table-cell>
          <table:table-cell table:number-columns-repeated="3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oad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xl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L Pingu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prskreen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TheMan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nap</text:p>
          </table:table-cell>
          <table:table-cell office:value-type="string">
            <text:p>7 - 6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Floppy_duck049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uoca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oormatt</text:p>
          </table:table-cell>
          <table:table-cell office:value-type="string">
            <text:p>4 - 6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Fapple</text:p>
          </table:table-cell>
          <table:table-cell office:value-type="string">
            <text:p>1 - 6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tepKnightUp</text:p>
          </table:table-cell>
          <table:table-cell office:value-type="string">
            <text:p>3 - 8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elo.plays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ondon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Kobe</text:p>
          </table:table-cell>
          <table:table-cell office:value-type="string">
            <text:p>16 - 6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ellonian</text:p>
          </table:table-cell>
          <table:table-cell office:value-type="string">
            <text:p>5 - 6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litz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r.Feeny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IRUSH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yperLuvsGod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ooBell</text:p>
          </table:table-cell>
          <table:table-cell office:value-type="string">
            <text:p>4 - 8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Narwhal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nthzeny</text:p>
          </table:table-cell>
          <table:table-cell office:value-type="string">
            <text:p>6 - 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tilios</text:p>
          </table:table-cell>
          <table:table-cell office:value-type="string">
            <text:p>4 - 4</text:p>
          </table:table-cell>
          <table:table-cell table:number-columns-repeated="2"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M</text:p>
          </table:table-cell>
          <table:table-cell office:value-type="string">
            <text:p>8 - 2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Zarberian</text:p>
          </table:table-cell>
          <table:table-cell office:value-type="string">
            <text:p>4 - 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essQuik</text:p>
          </table:table-cell>
          <table:table-cell office:value-type="string">
            <text:p>4 - 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UpChuck</text:p>
          </table:table-cell>
          <table:table-cell office:value-type="string">
            <text:p>4 - 4</text:p>
          </table:table-cell>
          <table:table-cell table:number-columns-repeated="2"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picywingz11</text:p>
          </table:table-cell>
          <table:table-cell office:value-type="string">
            <text:p>3 - 6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wsmsun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!Mama_Mia!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ob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lean</text:p>
          </table:table-cell>
          <table:table-cell office:value-type="string">
            <text:p>5 - 2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hnissugah</text:p>
          </table:table-cell>
          <table:table-cell office:value-type="string">
            <text:p>0 - 6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tarZ</text:p>
          </table:table-cell>
          <table:table-cell office:value-type="string">
            <text:p>4 - 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11 - 10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Oki</text:p>
          </table:table-cell>
          <table:table-cell office:value-type="string">
            <text:p>14 - 8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leSpecter</text:p>
          </table:table-cell>
          <table:table-cell office:value-type="string">
            <text:p>3 - 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14 - 8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Aaron</text:p>
          </table:table-cell>
          <table:table-cell office:value-type="string">
            <text:p>6 - 2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heckmate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Franco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GK</text:p>
          </table:table-cell>
          <table:table-cell office:value-type="string">
            <text:p>3 - 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OTO_PINK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Yunaka</text:p>
          </table:table-cell>
          <table:table-cell office:value-type="string">
            <text:p>6 - 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ominator</text:p>
          </table:table-cell>
          <table:table-cell office:value-type="string">
            <text:p>15 - 0</text:p>
          </table:table-cell>
          <table:table-cell office:value-type="string">
            <text:p>15</text:p>
          </table:table-cell>
          <table:table-cell table:number-columns-repeated="2"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unic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0g3</text:p>
          </table:table-cell>
          <table:table-cell office:value-type="string">
            <text:p>8 - 4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Grymlynn</text:p>
          </table:table-cell>
          <table:table-cell office:value-type="string">
            <text:p>9 - 6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. Phantm</text:p>
          </table:table-cell>
          <table:table-cell office:value-type="string">
            <text:p>11 - 6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_Slam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hawnbd3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yntax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table:number-columns-repeated="2"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Jean Papitas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lite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he Chuckster</text:p>
          </table:table-cell>
          <table:table-cell office:value-type="string">
            <text:p>10 - 8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bat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Navé</text:p>
          </table:table-cell>
          <table:table-cell office:value-type="string">
            <text:p>10 - 6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dera</text:p>
          </table:table-cell>
          <table:table-cell office:value-type="string">
            <text:p>6 - 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urehyper</text:p>
          </table:table-cell>
          <table:table-cell office:value-type="string">
            <text:p>4 - 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laine</text:p>
          </table:table-cell>
          <table:table-cell office:value-type="string">
            <text:p>5 - 6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nta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DQ05</text:p>
          </table:table-cell>
          <table:table-cell office:value-type="string">
            <text:p>6 - 6</text:p>
          </table:table-cell>
          <table:table-cell table:number-columns-repeated="2"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ustSeek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onin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c_tweekin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acket</text:p>
          </table:table-cell>
          <table:table-cell office:value-type="string">
            <text:p>1 - 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Hiddekel</text:p>
          </table:table-cell>
          <table:table-cell office:value-type="string">
            <text:p>11 - 6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ark4orce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lack Lemonade</text:p>
          </table:table-cell>
          <table:table-cell office:value-type="string">
            <text:p>12 - 8</text:p>
          </table:table-cell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iku</text:p>
          </table:table-cell>
          <table:table-cell office:value-type="string">
            <text:p>9 - 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ticccy</text:p>
          </table:table-cell>
          <table:table-cell office:value-type="string">
            <text:p>4 - 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00MBA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aClg0d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inger</text:p>
          </table:table-cell>
          <table:table-cell office:value-type="string">
            <text:p>7 - 6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inimaxify</text:p>
          </table:table-cell>
          <table:table-cell office:value-type="string">
            <text:p>5 - 4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sysilex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ispanic! at the Disco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nzana</text:p>
          </table:table-cell>
          <table:table-cell office:value-type="string">
            <text:p>15 - 6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omingo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edPik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jnikhazy</text:p>
          </table:table-cell>
          <table:table-cell office:value-type="string">
            <text:p>3 - 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ri</text:p>
          </table:table-cell>
          <table:table-cell office:value-type="string">
            <text:p>6 - 2</text:p>
          </table:table-cell>
          <table:table-cell office:value-type="string">
            <text:p>6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undayGary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hitKho</text:p>
          </table:table-cell>
          <table:table-cell office:value-type="string">
            <text:p>3 - 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ryvate Pigeon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ignews.co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arlJT</text:p>
          </table:table-cell>
          <table:table-cell office:value-type="string">
            <text:p>6 - 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reshness</text:p>
          </table:table-cell>
          <table:table-cell office:value-type="string">
            <text:p>2 - 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OOM!</text:p>
          </table:table-cell>
          <table:table-cell office:value-type="string">
            <text:p>3 - 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qz</text:p>
          </table:table-cell>
          <table:table-cell office:value-type="string">
            <text:p>5 - 6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ivan the Amnesty</text:p>
          </table:table-cell>
          <table:table-cell office:value-type="string">
            <text:p>8 - 4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urtles</text:p>
          </table:table-cell>
          <table:table-cell office:value-type="string">
            <text:p>6 - 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arol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reybush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ommySN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razySwift</text:p>
          </table:table-cell>
          <table:table-cell office:value-type="string">
            <text:p>0 - 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usteezy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READ</text:p>
          </table:table-cell>
          <table:table-cell office:value-type="string">
            <text:p>0 - 5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timmyTurner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anchos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Kakarot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uffysupreme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azywazy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erk</text:p>
          </table:table-cell>
          <table:table-cell office:value-type="string">
            <text:p>8 - 6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AOS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andwich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uperStatic</text:p>
          </table:table-cell>
          <table:table-cell office:value-type="string">
            <text:p>5 - 4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WantingSkate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limBubbles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Nightmare Fredbear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Gameboyfreshy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acky</text:p>
          </table:table-cell>
          <table:table-cell office:value-type="string">
            <text:p>4 - 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KRilL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piderboy1327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eiryuSDVX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ElMexicano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ilkboy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ord Farquaad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r. J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harz</text:p>
          </table:table-cell>
          <table:table-cell office:value-type="string">
            <text:p>1 - 1</text:p>
          </table:table-cell>
          <table:table-cell table:number-columns-repeated="3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amashi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adioActiv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eone_Ace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Keegore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law</text:p>
          </table:table-cell>
          <table:table-cell office:value-type="string">
            <text:p>0 - 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ario Circuit 3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ightningCam</text:p>
          </table:table-cell>
          <table:table-cell office:value-type="string">
            <text:p>9 - 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ogemon</text:p>
          </table:table-cell>
          <table:table-cell office:value-type="string">
            <text:p>6 - 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mar3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arlito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Yukoa</text:p>
          </table:table-cell>
          <table:table-cell office:value-type="string">
            <text:p>2 - 2</text:p>
          </table:table-cell>
          <table:table-cell table:number-columns-repeated="3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MoC</text:p>
          </table:table-cell>
          <table:table-cell office:value-type="string">
            <text:p>6 - 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ackie Chun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Yasmine22!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ingu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Woofie87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ternalBran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ewiby (Entropy)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0kujin</text:p>
          </table:table-cell>
          <table:table-cell office:value-type="string">
            <text:p>0 - 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owgun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nKaos</text:p>
          </table:table-cell>
          <table:table-cell office:value-type="string">
            <text:p>6 - 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ori</text:p>
          </table:table-cell>
          <table:table-cell office:value-type="string">
            <text:p>9 - 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pachesavage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piker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abby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cruffie:))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tubbaloo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huckFug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NIMROD69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reatSpence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irtyDeli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ranknbean</text:p>
          </table:table-cell>
          <table:table-cell office:value-type="string">
            <text:p>2 - 2</text:p>
          </table:table-cell>
          <table:table-cell table:number-columns-repeated="3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ITTR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yzakyn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Whyit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hicken Parm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unktastic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uff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ude2steezy</text:p>
          </table:table-cell>
          <table:table-cell office:value-type="string">
            <text:p>0 - 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uckMark</text:p>
          </table:table-cell>
          <table:table-cell office:value-type="string">
            <text:p>3 - 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edeemed Schrader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NFBJacob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itrobone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rofessor E. Gyatt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07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Notorious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fork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immyCaldero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reenvenom20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ark Link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12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onczzz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rhkma MuddyKipz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uayo.sv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onaldX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lreyec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eefCalculator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wonny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WiFi warrior</text:p>
          </table:table-cell>
          <table:table-cell office:value-type="string">
            <text:p>5 - 2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amdne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hvggernaut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onaldo Goat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hronicle2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ball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quish</text:p>
          </table:table-cell>
          <table:table-cell office:value-type="string">
            <text:p>6 - 2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nbien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oisesito</text:p>
          </table:table-cell>
          <table:table-cell office:value-type="string">
            <text:p>1 - 1</text:p>
          </table:table-cell>
          <table:table-cell table:number-columns-repeated="3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pweber4</text:p>
          </table:table-cell>
          <table:table-cell office:value-type="string">
            <text:p>1 - 1</text:p>
          </table:table-cell>
          <table:table-cell table:number-columns-repeated="3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redfire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ghybrid</text:p>
          </table:table-cell>
          <table:table-cell office:value-type="string">
            <text:p>1 - 1</text:p>
          </table:table-cell>
          <table:table-cell table:number-columns-repeated="3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allenAries6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idanbobaidan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Xavi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thius</text:p>
          </table:table-cell>
          <table:table-cell office:value-type="string">
            <text:p>0 - 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vipertoo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rantMA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apis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hat dawg</text:p>
          </table:table-cell>
          <table:table-cell office:value-type="string">
            <text:p>0 - 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av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Krabz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urbo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Zetsubo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alestine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uttley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Mxfia</text:p>
          </table:table-cell>
          <table:table-cell office:value-type="string">
            <text:p>4 - 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ATO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eticent</text:p>
          </table:table-cell>
          <table:table-cell office:value-type="string">
            <text:p>4 - 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drizz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AIGURREN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az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re05</text:p>
          </table:table-cell>
          <table:table-cell office:value-type="string">
            <text:p>1 - 1</text:p>
          </table:table-cell>
          <table:table-cell table:number-columns-repeated="3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GoGo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YoungSanta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hibe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urtleDerby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imicx18</text:p>
          </table:table-cell>
          <table:table-cell office:value-type="string">
            <text:p>0 - 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dpik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Áçé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ig</text:p>
          </table:table-cell>
          <table:table-cell office:value-type="string">
            <text:p>1 - 1</text:p>
          </table:table-cell>
          <table:table-cell table:number-columns-repeated="3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b</text:p>
          </table:table-cell>
          <table:table-cell office:value-type="string">
            <text:p>0 - 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taliangamer325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ilzach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inclair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eo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owerstar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adou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oemiglazer67</text:p>
          </table:table-cell>
          <table:table-cell office:value-type="string">
            <text:p>7 - 2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ocon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SDEEZNUTS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ortals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anraj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Hairlineslayer54</text:p>
          </table:table-cell>
          <table:table-cell office:value-type="string">
            <text:p>1 - 1</text:p>
          </table:table-cell>
          <table:table-cell table:number-columns-repeated="3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unar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ocks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randpa</text:p>
          </table:table-cell>
          <table:table-cell office:value-type="string">
            <text:p>0 - 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udy568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olt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ommonerscoffee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xeter</text:p>
          </table:table-cell>
          <table:table-cell office:value-type="string">
            <text:p>1 - 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JonConBoi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ezzi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inu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uff</text:p>
          </table:table-cell>
          <table:table-cell office:value-type="string">
            <text:p>0 - 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ngelStatue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edici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Zongo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agOfChips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itchell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ag_Spike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eel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less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PH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r_Trollmaster7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ucky</text:p>
          </table:table-cell>
          <table:table-cell office:value-type="string">
            <text:p>5 - 2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D</text:p>
          </table:table-cell>
          <table:table-cell office:value-type="string">
            <text:p>4 - 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epNep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 table:number-rows-repeated="10482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ltimate-singles Match Records" table:style-name="ta2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6" table:number-columns-repeated="1021" table:default-cell-style-name="Excel_20_Built-in_20_Normal"/>
        <table:table-row table:style-name="ro1">
          <table:table-cell office:value-type="string">
            <text:p>ultimate-singles</text:p>
          </table:table-cell>
          <table:table-cell table:number-columns-repeated="1023"/>
        </table:table-row>
        <table:table-row table:style-name="ro1">
          <table:table-cell office:value-type="string">
            <text:p>Competitor</text:p>
          </table:table-cell>
          <table:table-cell office:value-type="string">
            <text:p>Compiled Record</text:p>
          </table:table-cell>
          <table:table-cell office:value-type="string">
            <text:p>Wins</text:p>
          </table:table-cell>
          <table:table-cell office:value-type="string">
            <text:p>Losses</text:p>
          </table:table-cell>
          <table:table-cell office:value-type="string">
            <text:p>DQs</text:p>
          </table:table-cell>
          <table:table-cell table:number-columns-repeated="1019"/>
        </table:table-row>
        <table:table-row table:style-name="ro1">
          <table:table-cell office:value-type="string">
            <text:p>JediSmash</text:p>
          </table:table-cell>
          <table:table-cell office:value-type="string">
            <text:p>8 - 22</text:p>
          </table:table-cell>
          <table:table-cell office:value-type="string">
            <text:p>8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cuffed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Zorrin</text:p>
          </table:table-cell>
          <table:table-cell office:value-type="string">
            <text:p>20 - 18</text:p>
          </table:table-cell>
          <table:table-cell office:value-type="string">
            <text:p>2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OwiePowie69</text:p>
          </table:table-cell>
          <table:table-cell office:value-type="string">
            <text:p>0 - 8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hez</text:p>
          </table:table-cell>
          <table:table-cell office:value-type="string">
            <text:p>23 - 26</text:p>
          </table:table-cell>
          <table:table-cell office:value-type="string">
            <text:p>23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edemption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r-Huge</text:p>
          </table:table-cell>
          <table:table-cell office:value-type="string">
            <text:p>8 - 10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KurryRose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28 - 18</text:p>
          </table:table-cell>
          <table:table-cell office:value-type="string">
            <text:p>28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ollywood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acen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Rec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JoeysMemeTeam</text:p>
          </table:table-cell>
          <table:table-cell office:value-type="string">
            <text:p>4 - 4</text:p>
          </table:table-cell>
          <table:table-cell table:number-columns-repeated="2"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entPain</text:p>
          </table:table-cell>
          <table:table-cell office:value-type="string">
            <text:p>0 - 8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quilliam Afton</text:p>
          </table:table-cell>
          <table:table-cell office:value-type="string">
            <text:p>4 - 5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onegg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iam</text:p>
          </table:table-cell>
          <table:table-cell office:value-type="string">
            <text:p>6 - 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XIX</text:p>
          </table:table-cell>
          <table:table-cell office:value-type="string">
            <text:p>0 - 12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Zomba</text:p>
          </table:table-cell>
          <table:table-cell office:value-type="string">
            <text:p>17 - 5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Fonica</text:p>
          </table:table-cell>
          <table:table-cell office:value-type="string">
            <text:p>8 - 4</text:p>
          </table:table-cell>
          <table:table-cell office:value-type="string">
            <text:p>8</text:p>
          </table:table-cell>
          <table:table-cell table:number-columns-repeated="2"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Plummet</text:p>
          </table:table-cell>
          <table:table-cell office:value-type="string">
            <text:p>32 - 23</text:p>
          </table:table-cell>
          <table:table-cell office:value-type="string">
            <text:p>32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enikki</text:p>
          </table:table-cell>
          <table:table-cell office:value-type="string">
            <text:p>31 - 22</text:p>
          </table:table-cell>
          <table:table-cell office:value-type="string">
            <text:p>31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reezy 400</text:p>
          </table:table-cell>
          <table:table-cell office:value-type="string">
            <text:p>19 - 20</text:p>
          </table:table-cell>
          <table:table-cell office:value-type="string">
            <text:p>19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Kiki</text:p>
          </table:table-cell>
          <table:table-cell office:value-type="string">
            <text:p>6 - 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pam no jutsu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Octo</text:p>
          </table:table-cell>
          <table:table-cell office:value-type="string">
            <text:p>7 - 9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Olsen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31 - 27</text:p>
          </table:table-cell>
          <table:table-cell office:value-type="string">
            <text:p>31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hiro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27 - 22</text:p>
          </table:table-cell>
          <table:table-cell office:value-type="string">
            <text:p>27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ev7x</text:p>
          </table:table-cell>
          <table:table-cell office:value-type="string">
            <text:p>8 - 19</text:p>
          </table:table-cell>
          <table:table-cell office:value-type="string">
            <text:p>8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endragon</text:p>
          </table:table-cell>
          <table:table-cell office:value-type="string">
            <text:p>15 - 17</text:p>
          </table:table-cell>
          <table:table-cell office:value-type="string">
            <text:p>15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yamaokai</text:p>
          </table:table-cell>
          <table:table-cell office:value-type="string">
            <text:p>3 - 8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hunning</text:p>
          </table:table-cell>
          <table:table-cell office:value-type="string">
            <text:p>2 - 5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JG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ayo</text:p>
          </table:table-cell>
          <table:table-cell office:value-type="string">
            <text:p>6 - 5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alaxia</text:p>
          </table:table-cell>
          <table:table-cell office:value-type="string">
            <text:p>0 - 8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rNubs</text:p>
          </table:table-cell>
          <table:table-cell office:value-type="string">
            <text:p>23 - 26</text:p>
          </table:table-cell>
          <table:table-cell office:value-type="string">
            <text:p>23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ane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23 - 20</text:p>
          </table:table-cell>
          <table:table-cell office:value-type="string">
            <text:p>23</text:p>
          </table:table-cell>
          <table:table-cell office:value-type="string">
            <text:p>20</text:p>
          </table:table-cell>
          <table:table-cell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Czar</text:p>
          </table:table-cell>
          <table:table-cell office:value-type="string">
            <text:p>1 - 8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90 - 33</text:p>
          </table:table-cell>
          <table:table-cell office:value-type="string">
            <text:p>90</text:p>
          </table:table-cell>
          <table:table-cell office:value-type="string">
            <text:p>33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31 - 23</text:p>
          </table:table-cell>
          <table:table-cell office:value-type="string">
            <text:p>31</text:p>
          </table:table-cell>
          <table:table-cell office:value-type="string">
            <text:p>23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hand</text:p>
          </table:table-cell>
          <table:table-cell office:value-type="string">
            <text:p>34 - 28</text:p>
          </table:table-cell>
          <table:table-cell office:value-type="string">
            <text:p>34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UNSLINGING GATOS</text:p>
          </table:table-cell>
          <table:table-cell office:value-type="string">
            <text:p>6 - 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Newo</text:p>
          </table:table-cell>
          <table:table-cell office:value-type="string">
            <text:p>41 - 28</text:p>
          </table:table-cell>
          <table:table-cell office:value-type="string">
            <text:p>41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30 - 23</text:p>
          </table:table-cell>
          <table:table-cell office:value-type="string">
            <text:p>30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hpstks</text:p>
          </table:table-cell>
          <table:table-cell office:value-type="string">
            <text:p>23 - 14</text:p>
          </table:table-cell>
          <table:table-cell office:value-type="string">
            <text:p>23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zesp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Zaniel</text:p>
          </table:table-cell>
          <table:table-cell office:value-type="string">
            <text:p>4 - 4</text:p>
          </table:table-cell>
          <table:table-cell table:number-columns-repeated="2"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oan ling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ynvy</text:p>
          </table:table-cell>
          <table:table-cell office:value-type="string">
            <text:p>1 - 12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Wiccan</text:p>
          </table:table-cell>
          <table:table-cell office:value-type="string">
            <text:p>23 - 16</text:p>
          </table:table-cell>
          <table:table-cell office:value-type="string">
            <text:p>23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liastar</text:p>
          </table:table-cell>
          <table:table-cell office:value-type="string">
            <text:p>4 - 8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aibaman</text:p>
          </table:table-cell>
          <table:table-cell office:value-type="string">
            <text:p>2 - 8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econd Floor Basement</text:p>
          </table:table-cell>
          <table:table-cell office:value-type="string">
            <text:p>16 - 9</text:p>
          </table:table-cell>
          <table:table-cell office:value-type="string">
            <text:p>16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aptainLED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WGF</text:p>
          </table:table-cell>
          <table:table-cell office:value-type="string">
            <text:p>6 - 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neakers O'Toole</text:p>
          </table:table-cell>
          <table:table-cell office:value-type="string">
            <text:p>1 - 12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owlin</text:p>
          </table:table-cell>
          <table:table-cell office:value-type="string">
            <text:p>8 - 5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chef</text:p>
          </table:table-cell>
          <table:table-cell office:value-type="string">
            <text:p>0 - 8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ust_A_Tarrasque</text:p>
          </table:table-cell>
          <table:table-cell office:value-type="string">
            <text:p>6 - 12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iRT</text:p>
          </table:table-cell>
          <table:table-cell office:value-type="string">
            <text:p>0 - 8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uno</text:p>
          </table:table-cell>
          <table:table-cell office:value-type="string">
            <text:p>23 - 20</text:p>
          </table:table-cell>
          <table:table-cell office:value-type="string">
            <text:p>23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_Successor</text:p>
          </table:table-cell>
          <table:table-cell office:value-type="string">
            <text:p>5 - 12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86 - 42</text:p>
          </table:table-cell>
          <table:table-cell office:value-type="string">
            <text:p>86</text:p>
          </table:table-cell>
          <table:table-cell office:value-type="string">
            <text:p>4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y Dad</text:p>
          </table:table-cell>
          <table:table-cell office:value-type="string">
            <text:p>18 - 21</text:p>
          </table:table-cell>
          <table:table-cell office:value-type="string">
            <text:p>18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Funny</text:p>
          </table:table-cell>
          <table:table-cell office:value-type="string">
            <text:p>46 - 28</text:p>
          </table:table-cell>
          <table:table-cell office:value-type="string">
            <text:p>46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43 - 31</text:p>
          </table:table-cell>
          <table:table-cell office:value-type="string">
            <text:p>43</text:p>
          </table:table-cell>
          <table:table-cell office:value-type="string">
            <text:p>31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haine</text:p>
          </table:table-cell>
          <table:table-cell office:value-type="string">
            <text:p>62 - 37</text:p>
          </table:table-cell>
          <table:table-cell office:value-type="string">
            <text:p>62</text:p>
          </table:table-cell>
          <table:table-cell office:value-type="string">
            <text:p>3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ucida</text:p>
          </table:table-cell>
          <table:table-cell office:value-type="string">
            <text:p>16 - 14</text:p>
          </table:table-cell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Koloax</text:p>
          </table:table-cell>
          <table:table-cell office:value-type="string">
            <text:p>34 - 21</text:p>
          </table:table-cell>
          <table:table-cell office:value-type="string">
            <text:p>34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omehowNerdy</text:p>
          </table:table-cell>
          <table:table-cell office:value-type="string">
            <text:p>4 - 5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yeiscool</text:p>
          </table:table-cell>
          <table:table-cell office:value-type="string">
            <text:p>2 - 12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3M1X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hezFarach001</text:p>
          </table:table-cell>
          <table:table-cell office:value-type="string">
            <text:p>15 - 14</text:p>
          </table:table-cell>
          <table:table-cell office:value-type="string">
            <text:p>15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na</text:p>
          </table:table-cell>
          <table:table-cell office:value-type="string">
            <text:p>1 - 14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Namesskyy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api</text:p>
          </table:table-cell>
          <table:table-cell office:value-type="string">
            <text:p>4 - 9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NotHbox</text:p>
          </table:table-cell>
          <table:table-cell office:value-type="string">
            <text:p>29 - 21</text:p>
          </table:table-cell>
          <table:table-cell office:value-type="string">
            <text:p>29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World Jade Center</text:p>
          </table:table-cell>
          <table:table-cell office:value-type="string">
            <text:p>4 - 13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oc Shock</text:p>
          </table:table-cell>
          <table:table-cell office:value-type="string">
            <text:p>7 - 13</text:p>
          </table:table-cell>
          <table:table-cell office:value-type="string">
            <text:p>7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GoldenDark</text:p>
          </table:table-cell>
          <table:table-cell office:value-type="string">
            <text:p>2 - 8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40 - 30</text:p>
          </table:table-cell>
          <table:table-cell office:value-type="string">
            <text:p>40</text:p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altstorm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24 - 21</text:p>
          </table:table-cell>
          <table:table-cell office:value-type="string">
            <text:p>24</text:p>
          </table:table-cell>
          <table:table-cell office:value-type="string">
            <text:p>21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rincessPopkorn</text:p>
          </table:table-cell>
          <table:table-cell office:value-type="string">
            <text:p>1 - 1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Kryon</text:p>
          </table:table-cell>
          <table:table-cell office:value-type="string">
            <text:p>10 - 14</text:p>
          </table:table-cell>
          <table:table-cell office:value-type="string">
            <text:p>1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erph</text:p>
          </table:table-cell>
          <table:table-cell office:value-type="string">
            <text:p>10 - 12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Karu!</text:p>
          </table:table-cell>
          <table:table-cell office:value-type="string">
            <text:p>27 - 13</text:p>
          </table:table-cell>
          <table:table-cell office:value-type="string">
            <text:p>27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26 - 28</text:p>
          </table:table-cell>
          <table:table-cell office:value-type="string">
            <text:p>26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enji</text:p>
          </table:table-cell>
          <table:table-cell office:value-type="string">
            <text:p>48 - 30</text:p>
          </table:table-cell>
          <table:table-cell office:value-type="string">
            <text:p>48</text:p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eal King Barbaros</text:p>
          </table:table-cell>
          <table:table-cell office:value-type="string">
            <text:p>22 - 15</text:p>
          </table:table-cell>
          <table:table-cell office:value-type="string">
            <text:p>22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oblin</text:p>
          </table:table-cell>
          <table:table-cell office:value-type="string">
            <text:p>13 - 7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oobii</text:p>
          </table:table-cell>
          <table:table-cell office:value-type="string">
            <text:p>23 - 25</text:p>
          </table:table-cell>
          <table:table-cell office:value-type="string">
            <text:p>23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42 - 23</text:p>
          </table:table-cell>
          <table:table-cell office:value-type="string">
            <text:p>42</text:p>
          </table:table-cell>
          <table:table-cell office:value-type="string">
            <text:p>23</text:p>
          </table:table-cell>
          <table:table-cell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fiend</text:p>
          </table:table-cell>
          <table:table-cell office:value-type="string">
            <text:p>23 - 21</text:p>
          </table:table-cell>
          <table:table-cell office:value-type="string">
            <text:p>23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lowpez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Quelity</text:p>
          </table:table-cell>
          <table:table-cell office:value-type="string">
            <text:p>6 - 5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roto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OG Kid</text:p>
          </table:table-cell>
          <table:table-cell office:value-type="string">
            <text:p>6 - 5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hatOneGuy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-K SiN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zLu</text:p>
          </table:table-cell>
          <table:table-cell office:value-type="string">
            <text:p>3 - 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SAM</text:p>
          </table:table-cell>
          <table:table-cell office:value-type="string">
            <text:p>24 - 12</text:p>
          </table:table-cell>
          <table:table-cell office:value-type="string">
            <text:p>24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ainus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oad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xl</text:p>
          </table:table-cell>
          <table:table-cell office:value-type="string">
            <text:p>4 - 4</text:p>
          </table:table-cell>
          <table:table-cell table:number-columns-repeated="2"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L Pingu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prskreen</text:p>
          </table:table-cell>
          <table:table-cell office:value-type="string">
            <text:p>4 - 8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TheMan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nap</text:p>
          </table:table-cell>
          <table:table-cell office:value-type="string">
            <text:p>15 - 13</text:p>
          </table:table-cell>
          <table:table-cell office:value-type="string">
            <text:p>15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Floppy_duck049</text:p>
          </table:table-cell>
          <table:table-cell office:value-type="string">
            <text:p>0 - 8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uoca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oormatt</text:p>
          </table:table-cell>
          <table:table-cell office:value-type="string">
            <text:p>10 - 13</text:p>
          </table:table-cell>
          <table:table-cell office:value-type="string">
            <text:p>1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Fapple</text:p>
          </table:table-cell>
          <table:table-cell office:value-type="string">
            <text:p>2 - 13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tepKnightUp</text:p>
          </table:table-cell>
          <table:table-cell office:value-type="string">
            <text:p>8 - 16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elo.plays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ondon</text:p>
          </table:table-cell>
          <table:table-cell office:value-type="string">
            <text:p>7 - 5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Kobe</text:p>
          </table:table-cell>
          <table:table-cell office:value-type="string">
            <text:p>43 - 17</text:p>
          </table:table-cell>
          <table:table-cell office:value-type="string">
            <text:p>43</text:p>
          </table:table-cell>
          <table:table-cell office:value-type="string">
            <text:p>17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ellonian</text:p>
          </table:table-cell>
          <table:table-cell office:value-type="string">
            <text:p>10 - 13</text:p>
          </table:table-cell>
          <table:table-cell office:value-type="string">
            <text:p>1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litz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r.Feeny</text:p>
          </table:table-cell>
          <table:table-cell office:value-type="string">
            <text:p>2 - 8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IRUSH</text:p>
          </table:table-cell>
          <table:table-cell office:value-type="string">
            <text:p>5 - 8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yperLuvsGod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ooBell</text:p>
          </table:table-cell>
          <table:table-cell office:value-type="string">
            <text:p>8 - 16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Narwhal</text:p>
          </table:table-cell>
          <table:table-cell office:value-type="string">
            <text:p>4 - 4</text:p>
          </table:table-cell>
          <table:table-cell table:number-columns-repeated="2"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nthzeny</text:p>
          </table:table-cell>
          <table:table-cell office:value-type="string">
            <text:p>14 - 10</text:p>
          </table:table-cell>
          <table:table-cell office:value-type="string">
            <text:p>14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tilios</text:p>
          </table:table-cell>
          <table:table-cell office:value-type="string">
            <text:p>10 - 9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M</text:p>
          </table:table-cell>
          <table:table-cell office:value-type="string">
            <text:p>23 - 10</text:p>
          </table:table-cell>
          <table:table-cell office:value-type="string">
            <text:p>23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Zarberian</text:p>
          </table:table-cell>
          <table:table-cell office:value-type="string">
            <text:p>8 - 8</text:p>
          </table:table-cell>
          <table:table-cell table:number-columns-repeated="2"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essQuik</text:p>
          </table:table-cell>
          <table:table-cell office:value-type="string">
            <text:p>8 - 4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UpChuck</text:p>
          </table:table-cell>
          <table:table-cell office:value-type="string">
            <text:p>9 - 9</text:p>
          </table:table-cell>
          <table:table-cell table:number-columns-repeated="2" office:value-type="string">
            <text:p>9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picywingz11</text:p>
          </table:table-cell>
          <table:table-cell office:value-type="string">
            <text:p>7 - 12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wsmsun</text:p>
          </table:table-cell>
          <table:table-cell office:value-type="string">
            <text:p>6 - 5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!Mama_Mia!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ob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lean</text:p>
          </table:table-cell>
          <table:table-cell office:value-type="string">
            <text:p>12 - 5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hnissugah</text:p>
          </table:table-cell>
          <table:table-cell office:value-type="string">
            <text:p>0 - 12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tarZ</text:p>
          </table:table-cell>
          <table:table-cell office:value-type="string">
            <text:p>8 - 5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27 - 22</text:p>
          </table:table-cell>
          <table:table-cell office:value-type="string">
            <text:p>27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Oki</text:p>
          </table:table-cell>
          <table:table-cell office:value-type="string">
            <text:p>35 - 22</text:p>
          </table:table-cell>
          <table:table-cell office:value-type="string">
            <text:p>35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leSpecter</text:p>
          </table:table-cell>
          <table:table-cell office:value-type="string">
            <text:p>7 - 9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32 - 21</text:p>
          </table:table-cell>
          <table:table-cell office:value-type="string">
            <text:p>32</text:p>
          </table:table-cell>
          <table:table-cell office:value-type="string">
            <text:p>21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Aaron</text:p>
          </table:table-cell>
          <table:table-cell office:value-type="string">
            <text:p>15 - 7</text:p>
          </table:table-cell>
          <table:table-cell office:value-type="string">
            <text:p>15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heckmate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Franco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GK</text:p>
          </table:table-cell>
          <table:table-cell office:value-type="string">
            <text:p>8 - 9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OTO_PINK</text:p>
          </table:table-cell>
          <table:table-cell office:value-type="string">
            <text:p>4 - 5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Yunaka</text:p>
          </table:table-cell>
          <table:table-cell office:value-type="string">
            <text:p>14 - 9</text:p>
          </table:table-cell>
          <table:table-cell office:value-type="string">
            <text:p>14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ominator</text:p>
          </table:table-cell>
          <table:table-cell office:value-type="string">
            <text:p>36 - 9</text:p>
          </table:table-cell>
          <table:table-cell office:value-type="string">
            <text:p>36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unic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0g3</text:p>
          </table:table-cell>
          <table:table-cell office:value-type="string">
            <text:p>17 - 10</text:p>
          </table:table-cell>
          <table:table-cell office:value-type="string">
            <text:p>17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Grymlynn</text:p>
          </table:table-cell>
          <table:table-cell office:value-type="string">
            <text:p>21 - 16</text:p>
          </table:table-cell>
          <table:table-cell office:value-type="string">
            <text:p>2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. Phantm</text:p>
          </table:table-cell>
          <table:table-cell office:value-type="string">
            <text:p>24 - 12</text:p>
          </table:table-cell>
          <table:table-cell office:value-type="string">
            <text:p>24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_Slam</text:p>
          </table:table-cell>
          <table:table-cell office:value-type="string">
            <text:p>4 - 5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hawnbd3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yntax</text:p>
          </table:table-cell>
          <table:table-cell office:value-type="string">
            <text:p>5 - 9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Jean Papitas</text:p>
          </table:table-cell>
          <table:table-cell office:value-type="string">
            <text:p>4 - 5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lite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he Chuckster</text:p>
          </table:table-cell>
          <table:table-cell office:value-type="string">
            <text:p>20 - 18</text:p>
          </table:table-cell>
          <table:table-cell office:value-type="string">
            <text:p>2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bat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Navé</text:p>
          </table:table-cell>
          <table:table-cell office:value-type="string">
            <text:p>20 - 14</text:p>
          </table:table-cell>
          <table:table-cell office:value-type="string">
            <text:p>2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dera</text:p>
          </table:table-cell>
          <table:table-cell office:value-type="string">
            <text:p>16 - 12</text:p>
          </table:table-cell>
          <table:table-cell office:value-type="string">
            <text:p>16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urehyper</text:p>
          </table:table-cell>
          <table:table-cell office:value-type="string">
            <text:p>8 - 6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laine</text:p>
          </table:table-cell>
          <table:table-cell office:value-type="string">
            <text:p>11 - 13</text:p>
          </table:table-cell>
          <table:table-cell office:value-type="string">
            <text:p>1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nta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DQ05</text:p>
          </table:table-cell>
          <table:table-cell office:value-type="string">
            <text:p>13 - 12</text:p>
          </table:table-cell>
          <table:table-cell office:value-type="string">
            <text:p>13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ustSeek</text:p>
          </table:table-cell>
          <table:table-cell office:value-type="string">
            <text:p>2 - 5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onin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c_tweekin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acket</text:p>
          </table:table-cell>
          <table:table-cell office:value-type="string">
            <text:p>5 - 6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Hiddekel</text:p>
          </table:table-cell>
          <table:table-cell office:value-type="string">
            <text:p>25 - 13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ark4orce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lack Lemonade</text:p>
          </table:table-cell>
          <table:table-cell office:value-type="string">
            <text:p>27 - 20</text:p>
          </table:table-cell>
          <table:table-cell office:value-type="string">
            <text:p>27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iku</text:p>
          </table:table-cell>
          <table:table-cell office:value-type="string">
            <text:p>20 - 11</text:p>
          </table:table-cell>
          <table:table-cell office:value-type="string">
            <text:p>2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ticccy</text:p>
          </table:table-cell>
          <table:table-cell office:value-type="string">
            <text:p>9 - 7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00MBA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aClg0d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inger</text:p>
          </table:table-cell>
          <table:table-cell office:value-type="string">
            <text:p>16 - 13</text:p>
          </table:table-cell>
          <table:table-cell office:value-type="string">
            <text:p>16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inimaxify</text:p>
          </table:table-cell>
          <table:table-cell office:value-type="string">
            <text:p>11 - 8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sysilex</text:p>
          </table:table-cell>
          <table:table-cell office:value-type="string">
            <text:p>8 - 5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ispanic! at the Disco</text:p>
          </table:table-cell>
          <table:table-cell office:value-type="string">
            <text:p>7 - 4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nzana</text:p>
          </table:table-cell>
          <table:table-cell office:value-type="string">
            <text:p>34 - 18</text:p>
          </table:table-cell>
          <table:table-cell office:value-type="string">
            <text:p>34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omingo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edPik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jnikhazy</text:p>
          </table:table-cell>
          <table:table-cell office:value-type="string">
            <text:p>8 - 8</text:p>
          </table:table-cell>
          <table:table-cell table:number-columns-repeated="2"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ri</text:p>
          </table:table-cell>
          <table:table-cell office:value-type="string">
            <text:p>17 - 6</text:p>
          </table:table-cell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undayGary</text:p>
          </table:table-cell>
          <table:table-cell office:value-type="string">
            <text:p>0 - 8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hitKho</text:p>
          </table:table-cell>
          <table:table-cell office:value-type="string">
            <text:p>6 - 9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ryvate Pigeon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ignews.co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arlJT</text:p>
          </table:table-cell>
          <table:table-cell office:value-type="string">
            <text:p>13 - 8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reshness</text:p>
          </table:table-cell>
          <table:table-cell office:value-type="string">
            <text:p>5 - 6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OOM!</text:p>
          </table:table-cell>
          <table:table-cell office:value-type="string">
            <text:p>7 - 9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qz</text:p>
          </table:table-cell>
          <table:table-cell office:value-type="string">
            <text:p>12 - 14</text:p>
          </table:table-cell>
          <table:table-cell office:value-type="string">
            <text:p>12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ivan the Amnesty</text:p>
          </table:table-cell>
          <table:table-cell office:value-type="string">
            <text:p>18 - 11</text:p>
          </table:table-cell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urtles</text:p>
          </table:table-cell>
          <table:table-cell office:value-type="string">
            <text:p>14 - 11</text:p>
          </table:table-cell>
          <table:table-cell office:value-type="string">
            <text:p>14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arol</text:p>
          </table:table-cell>
          <table:table-cell office:value-type="string">
            <text:p>0 - 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reybush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ommySN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razySwift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usteezy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READ</text:p>
          </table:table-cell>
          <table:table-cell office:value-type="string">
            <text:p>1 - 1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timmyTurner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anchos</text:p>
          </table:table-cell>
          <table:table-cell office:value-type="string">
            <text:p>2 - 5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Kakarot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uffysupreme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azywazy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erk</text:p>
          </table:table-cell>
          <table:table-cell office:value-type="string">
            <text:p>19 - 13</text:p>
          </table:table-cell>
          <table:table-cell office:value-type="string">
            <text:p>19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AOS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andwich</text:p>
          </table:table-cell>
          <table:table-cell office:value-type="string">
            <text:p>4 - 5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uperStatic</text:p>
          </table:table-cell>
          <table:table-cell office:value-type="string">
            <text:p>12 - 10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WantingSkate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limBubbles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Nightmare Fredbear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Gameboyfreshy</text:p>
          </table:table-cell>
          <table:table-cell office:value-type="string">
            <text:p>1 - 8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acky</text:p>
          </table:table-cell>
          <table:table-cell office:value-type="string">
            <text:p>8 - 7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KRilL</text:p>
          </table:table-cell>
          <table:table-cell office:value-type="string">
            <text:p>4 - 4</text:p>
          </table:table-cell>
          <table:table-cell table:number-columns-repeated="2"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piderboy1327</text:p>
          </table:table-cell>
          <table:table-cell office:value-type="string">
            <text:p>0 - 8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eiryuSDVX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ElMexicano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ilkboy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ord Farquaad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r. J</text:p>
          </table:table-cell>
          <table:table-cell office:value-type="string">
            <text:p>4 - 8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harz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amashi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adioActiv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eone_Ace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Keegore</text:p>
          </table:table-cell>
          <table:table-cell office:value-type="string">
            <text:p>6 - 5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law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ario Circuit 3</text:p>
          </table:table-cell>
          <table:table-cell office:value-type="string">
            <text:p>5 - 10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ightningCam</text:p>
          </table:table-cell>
          <table:table-cell office:value-type="string">
            <text:p>23 - 11</text:p>
          </table:table-cell>
          <table:table-cell office:value-type="string">
            <text:p>23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ogemon</text:p>
          </table:table-cell>
          <table:table-cell office:value-type="string">
            <text:p>13 - 9</text:p>
          </table:table-cell>
          <table:table-cell office:value-type="string">
            <text:p>13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mar3</text:p>
          </table:table-cell>
          <table:table-cell office:value-type="string">
            <text:p>0 - 8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arlito</text:p>
          </table:table-cell>
          <table:table-cell office:value-type="string">
            <text:p>3 - 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Yukoa</text:p>
          </table:table-cell>
          <table:table-cell office:value-type="string">
            <text:p>4 - 4</text:p>
          </table:table-cell>
          <table:table-cell table:number-columns-repeated="2" office:value-type="string">
            <text:p>4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MoC</text:p>
          </table:table-cell>
          <table:table-cell office:value-type="string">
            <text:p>14 - 9</text:p>
          </table:table-cell>
          <table:table-cell office:value-type="string">
            <text:p>14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ackie Chun</text:p>
          </table:table-cell>
          <table:table-cell office:value-type="string">
            <text:p>4 - 6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Yasmine22!</text:p>
          </table:table-cell>
          <table:table-cell office:value-type="string">
            <text:p>6 - 8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ingu</text:p>
          </table:table-cell>
          <table:table-cell office:value-type="string">
            <text:p>2 - 9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Woofie87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ternalBran</text:p>
          </table:table-cell>
          <table:table-cell office:value-type="string">
            <text:p>2 - 5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ewiby (Entropy)</text:p>
          </table:table-cell>
          <table:table-cell office:value-type="string">
            <text:p>7 - 8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0kujin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owgun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nKaos</text:p>
          </table:table-cell>
          <table:table-cell office:value-type="string">
            <text:p>12 - 9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ori</text:p>
          </table:table-cell>
          <table:table-cell office:value-type="string">
            <text:p>21 - 9</text:p>
          </table:table-cell>
          <table:table-cell office:value-type="string">
            <text:p>2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pachesavage</text:p>
          </table:table-cell>
          <table:table-cell office:value-type="string">
            <text:p>0 - 8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piker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abby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cruffie:))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tubbaloo</text:p>
          </table:table-cell>
          <table:table-cell office:value-type="string">
            <text:p>0 - 8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huckFug</text:p>
          </table:table-cell>
          <table:table-cell office:value-type="string">
            <text:p>7 - 4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NIMROD69</text:p>
          </table:table-cell>
          <table:table-cell office:value-type="string">
            <text:p>2 - 8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reatSpence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irtyDeli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ranknbean</text:p>
          </table:table-cell>
          <table:table-cell office:value-type="string">
            <text:p>5 - 4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ITTR</text:p>
          </table:table-cell>
          <table:table-cell office:value-type="string">
            <text:p>4 - 4</text:p>
          </table:table-cell>
          <table:table-cell table:number-columns-repeated="2"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yzakyn</text:p>
          </table:table-cell>
          <table:table-cell office:value-type="string">
            <text:p>3 - 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Whyit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hicken Parm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unktastic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uff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ude2steezy</text:p>
          </table:table-cell>
          <table:table-cell office:value-type="string">
            <text:p>0 - 6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uckMark</text:p>
          </table:table-cell>
          <table:table-cell office:value-type="string">
            <text:p>6 - 8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edeemed Schrader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NFBJacob</text:p>
          </table:table-cell>
          <table:table-cell office:value-type="string">
            <text:p>5 - 9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itrobone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rofessor E. Gyatt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07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Notorious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fork</text:p>
          </table:table-cell>
          <table:table-cell office:value-type="string">
            <text:p>4 - 4</text:p>
          </table:table-cell>
          <table:table-cell table:number-columns-repeated="2"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immyCaldero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reenvenom20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ark Link</text:p>
          </table:table-cell>
          <table:table-cell office:value-type="string">
            <text:p>6 - 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12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onczzz</text:p>
          </table:table-cell>
          <table:table-cell office:value-type="string">
            <text:p>4 - 5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rhkma MuddyKipz</text:p>
          </table:table-cell>
          <table:table-cell office:value-type="string">
            <text:p>3 - 5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uayo.sv</text:p>
          </table:table-cell>
          <table:table-cell office:value-type="string">
            <text:p>3 - 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onaldX</text:p>
          </table:table-cell>
          <table:table-cell office:value-type="string">
            <text:p>4 - 5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lreyec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eefCalculator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wonny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WiFi warrior</text:p>
          </table:table-cell>
          <table:table-cell office:value-type="string">
            <text:p>12 - 5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amdne</text:p>
          </table:table-cell>
          <table:table-cell office:value-type="string">
            <text:p>2 - 5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hvggernaut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onaldo Goat</text:p>
          </table:table-cell>
          <table:table-cell office:value-type="string">
            <text:p>3 - 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hronicle2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ball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quish</text:p>
          </table:table-cell>
          <table:table-cell office:value-type="string">
            <text:p>12 - 6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nbien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oisesito</text:p>
          </table:table-cell>
          <table:table-cell office:value-type="string">
            <text:p>2 - 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pweber4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redfire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ghybrid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allenAries6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idanbobaidan</text:p>
          </table:table-cell>
          <table:table-cell office:value-type="string">
            <text:p>6 - 5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Xavi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thius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vipertoo</text:p>
          </table:table-cell>
          <table:table-cell office:value-type="string">
            <text:p>4 - 5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rantMA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apis</text:p>
          </table:table-cell>
          <table:table-cell office:value-type="string">
            <text:p>3 - 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hat dawg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av</text:p>
          </table:table-cell>
          <table:table-cell office:value-type="string">
            <text:p>6 - 5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Krabz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urbo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Zetsubo</text:p>
          </table:table-cell>
          <table:table-cell office:value-type="string">
            <text:p>7 - 5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alestine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uttley</text:p>
          </table:table-cell>
          <table:table-cell office:value-type="string">
            <text:p>4 - 4</text:p>
          </table:table-cell>
          <table:table-cell table:number-columns-repeated="2"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Mxfia</text:p>
          </table:table-cell>
          <table:table-cell office:value-type="string">
            <text:p>9 - 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ATO</text:p>
          </table:table-cell>
          <table:table-cell office:value-type="string">
            <text:p>4 - 5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eticent</text:p>
          </table:table-cell>
          <table:table-cell office:value-type="string">
            <text:p>9 - 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drizz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AIGURREN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az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re05</text:p>
          </table:table-cell>
          <table:table-cell office:value-type="string">
            <text:p>2 - 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GoGo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YoungSanta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hibe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urtleDerby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imicx18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dpik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Áçé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ig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b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taliangamer325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ilzach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inclair</text:p>
          </table:table-cell>
          <table:table-cell office:value-type="string">
            <text:p>5 - 4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eo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owerstar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adou</text:p>
          </table:table-cell>
          <table:table-cell office:value-type="string">
            <text:p>4 - 4</text:p>
          </table:table-cell>
          <table:table-cell table:number-columns-repeated="2"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oemiglazer67</text:p>
          </table:table-cell>
          <table:table-cell office:value-type="string">
            <text:p>18 - 9</text:p>
          </table:table-cell>
          <table:table-cell office:value-type="string">
            <text:p>18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ocon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SDEEZNUTS</text:p>
          </table:table-cell>
          <table:table-cell office:value-type="string">
            <text:p>2 - 5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ortals</text:p>
          </table:table-cell>
          <table:table-cell office:value-type="string">
            <text:p>5 - 4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anraj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Hairlineslayer54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unar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ocks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randpa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udy568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olt</text:p>
          </table:table-cell>
          <table:table-cell office:value-type="string">
            <text:p>5 - 4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ommonerscoffee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xeter</text:p>
          </table:table-cell>
          <table:table-cell office:value-type="string">
            <text:p>2 - 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JonConBoi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ezzi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inu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uff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ngelStatue</text:p>
          </table:table-cell>
          <table:table-cell office:value-type="string">
            <text:p>4 - 4</text:p>
          </table:table-cell>
          <table:table-cell table:number-columns-repeated="2"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edici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Zongo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agOfChips</text:p>
          </table:table-cell>
          <table:table-cell office:value-type="string">
            <text:p>6 - 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itchell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ag_Spike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eel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less</text:p>
          </table:table-cell>
          <table:table-cell office:value-type="string">
            <text:p>7 - 6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PH</text:p>
          </table:table-cell>
          <table:table-cell office:value-type="string">
            <text:p>6 - 6</text:p>
          </table:table-cell>
          <table:table-cell table:number-columns-repeated="2"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r_Trollmaster7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ucky</text:p>
          </table:table-cell>
          <table:table-cell office:value-type="string">
            <text:p>10 - 4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D</text:p>
          </table:table-cell>
          <table:table-cell office:value-type="string">
            <text:p>8 - 5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epNep</text:p>
          </table:table-cell>
          <table:table-cell office:value-type="string">
            <text:p>4 - 5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 table:number-rows-repeated="10482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lee-singles Set Records" table:style-name="ta3" table:print="false">
        <office:forms form:automatic-focus="false" form:apply-design-mode="false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6" table:number-columns-repeated="1022" table:default-cell-style-name="Excel_20_Built-in_20_Normal"/>
        <table:table-row table:style-name="ro1">
          <table:table-cell office:value-type="string">
            <text:p>melee-singles</text:p>
          </table:table-cell>
          <table:table-cell table:number-columns-repeated="1023"/>
        </table:table-row>
        <table:table-row table:style-name="ro1">
          <table:table-cell office:value-type="string">
            <text:p>Competitor</text:p>
          </table:table-cell>
          <table:table-cell office:value-type="string">
            <text:p>Compiled Record</text:p>
          </table:table-cell>
          <table:table-cell office:value-type="string">
            <text:p>Wins</text:p>
          </table:table-cell>
          <table:table-cell office:value-type="string">
            <text:p>Losses</text:p>
          </table:table-cell>
          <table:table-cell office:value-type="string">
            <text:p>DQs</text:p>
          </table:table-cell>
          <table:table-cell table:number-columns-repeated="1019"/>
        </table:table-row>
        <table:table-row table:style-name="ro1">
          <table:table-cell office:value-type="string">
            <text:p>Olsen</text:p>
          </table:table-cell>
          <table:table-cell office:value-type="string">
            <text:p>4 - 4</text:p>
          </table:table-cell>
          <table:table-cell table:number-columns-repeated="2"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28 - 4</text:p>
          </table:table-cell>
          <table:table-cell office:value-type="string">
            <text:p>28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Frardvark</text:p>
          </table:table-cell>
          <table:table-cell office:value-type="string">
            <text:p>0 - 6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rokenyew</text:p>
          </table:table-cell>
          <table:table-cell office:value-type="string">
            <text:p>16 - 10</text:p>
          </table:table-cell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ovian</text:p>
          </table:table-cell>
          <table:table-cell office:value-type="string">
            <text:p>2 - 10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Yeti</text:p>
          </table:table-cell>
          <table:table-cell office:value-type="string">
            <text:p>12 - 10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api</text:p>
          </table:table-cell>
          <table:table-cell office:value-type="string">
            <text:p>3 - 6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ahtzu</text:p>
          </table:table-cell>
          <table:table-cell office:value-type="string">
            <text:p>11 - 6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lowpez</text:p>
          </table:table-cell>
          <table:table-cell office:value-type="string">
            <text:p>13 - 8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Ricky6</text:p>
          </table:table-cell>
          <table:table-cell office:value-type="string">
            <text:p>8 - 6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Quelity</text:p>
          </table:table-cell>
          <table:table-cell office:value-type="string">
            <text:p>1 - 1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19 - 10</text:p>
          </table:table-cell>
          <table:table-cell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gags</text:p>
          </table:table-cell>
          <table:table-cell office:value-type="string">
            <text:p>0 - 1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12 - 8</text:p>
          </table:table-cell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grabs</text:p>
          </table:table-cell>
          <table:table-cell office:value-type="string">
            <text:p>2 - 8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roto</text:p>
          </table:table-cell>
          <table:table-cell office:value-type="string">
            <text:p>8 - 10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rc</text:p>
          </table:table-cell>
          <table:table-cell office:value-type="string">
            <text:p>3 - 8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King Momo</text:p>
          </table:table-cell>
          <table:table-cell office:value-type="string">
            <text:p>12 - 6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NotTony</text:p>
          </table:table-cell>
          <table:table-cell office:value-type="string">
            <text:p>1 - 1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enny</text:p>
          </table:table-cell>
          <table:table-cell office:value-type="string">
            <text:p>2 - 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okusuii</text:p>
          </table:table-cell>
          <table:table-cell office:value-type="string">
            <text:p>0 - 6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owie</text:p>
          </table:table-cell>
          <table:table-cell office:value-type="string">
            <text:p>11 - 10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loak</text:p>
          </table:table-cell>
          <table:table-cell office:value-type="string">
            <text:p>0 - 6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OG Kid</text:p>
          </table:table-cell>
          <table:table-cell office:value-type="string">
            <text:p>16 - 10</text:p>
          </table:table-cell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hatOneGuy</text:p>
          </table:table-cell>
          <table:table-cell office:value-type="string">
            <text:p>0 - 8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andBag</text:p>
          </table:table-cell>
          <table:table-cell office:value-type="string">
            <text:p>10 - 10</text:p>
          </table:table-cell>
          <table:table-cell table:number-columns-repeated="2"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Sh4rky</text:p>
          </table:table-cell>
          <table:table-cell office:value-type="string">
            <text:p>1 - 1</text:p>
          </table:table-cell>
          <table:table-cell table:number-columns-repeated="2" office:value-type="string">
            <text:p>1</text:p>
          </table:table-cell>
          <table:table-cell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Krudo</text:p>
          </table:table-cell>
          <table:table-cell office:value-type="string">
            <text:p>20 - 6</text:p>
          </table:table-cell>
          <table:table-cell office:value-type="string">
            <text:p>2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anda</text:p>
          </table:table-cell>
          <table:table-cell office:value-type="string">
            <text:p>21 - 10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wiftspank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himelec Velez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braham</text:p>
          </table:table-cell>
          <table:table-cell office:value-type="string">
            <text:p>6 - 6</text:p>
          </table:table-cell>
          <table:table-cell table:number-columns-repeated="2" office:value-type="string">
            <text:p>6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itan</text:p>
          </table:table-cell>
          <table:table-cell office:value-type="string">
            <text:p>3 - 6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hat0neguy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ntner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-K SiN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table:number-columns-repeated="2"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Litt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ed.</text:p>
          </table:table-cell>
          <table:table-cell office:value-type="string">
            <text:p>4 - 8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zLu</text:p>
          </table:table-cell>
          <table:table-cell office:value-type="string">
            <text:p>11 - 8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eele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Komodo</text:p>
          </table:table-cell>
          <table:table-cell office:value-type="string">
            <text:p>14 - 8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Chu</text:p>
          </table:table-cell>
          <table:table-cell office:value-type="string">
            <text:p>4 - 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SAM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ungry Pigeon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falco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neakywill</text:p>
          </table:table-cell>
          <table:table-cell office:value-type="string">
            <text:p>8 - 6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Kip</text:p>
          </table:table-cell>
          <table:table-cell office:value-type="string">
            <text:p>5 - 6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ape</text:p>
          </table:table-cell>
          <table:table-cell office:value-type="string">
            <text:p>6 - 6</text:p>
          </table:table-cell>
          <table:table-cell table:number-columns-repeated="2"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Yho!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Kuya</text:p>
          </table:table-cell>
          <table:table-cell office:value-type="string">
            <text:p>4 - 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ars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20xQuest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entinel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aron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extbook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240p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tylish thug slayer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A1.exe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obateatime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itmasterswag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heckmate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appuccino</text:p>
          </table:table-cell>
          <table:table-cell office:value-type="string">
            <text:p>7 - 4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uhline</text:p>
          </table:table-cell>
          <table:table-cell office:value-type="string">
            <text:p>3 - 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quilateral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ace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Wizzrobe</text:p>
          </table:table-cell>
          <table:table-cell office:value-type="string">
            <text:p>13 - 3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Franco</text:p>
          </table:table-cell>
          <table:table-cell office:value-type="string">
            <text:p>8 - 6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avé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asterqz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Hazywazy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an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ustopher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Hordan</text:p>
          </table:table-cell>
          <table:table-cell office:value-type="string">
            <text:p>6 - 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iphone on 2% since 2018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ancake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acktheragingbull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aggu</text:p>
          </table:table-cell>
          <table:table-cell office:value-type="string">
            <text:p>3 - 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Isosceles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OncomingTraffic</text:p>
          </table:table-cell>
          <table:table-cell office:value-type="string">
            <text:p>5 - 4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hichi Pumpa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Forrest</text:p>
          </table:table-cell>
          <table:table-cell office:value-type="string">
            <text:p>5 - 2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rofanity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ackie Chun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pikeGod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oy Juan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ag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ada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arty animal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Wild Bill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igh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ESTIKYLE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aby Carrot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Kairos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Vision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rndy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ardon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yungxgucci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Whif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quattingxBear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amV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DMJ</text:p>
          </table:table-cell>
          <table:table-cell office:value-type="string">
            <text:p>3 - 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oup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xaninmyfaygo666</text:p>
          </table:table-cell>
          <table:table-cell office:value-type="string">
            <text:p>1 - 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alberd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Klondike64</text:p>
          </table:table-cell>
          <table:table-cell office:value-type="string">
            <text:p>0 - 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lwaysinsync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onn Man</text:p>
          </table:table-cell>
          <table:table-cell office:value-type="string">
            <text:p>2 - 2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lee-singles Match Records" table:style-name="ta4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6" table:number-columns-repeated="1022" table:default-cell-style-name="Excel_20_Built-in_20_Normal"/>
        <table:table-row table:style-name="ro1">
          <table:table-cell office:value-type="string">
            <text:p>melee-singles</text:p>
          </table:table-cell>
          <table:table-cell table:number-columns-repeated="1023"/>
        </table:table-row>
        <table:table-row table:style-name="ro1">
          <table:table-cell office:value-type="string">
            <text:p>Competitor</text:p>
          </table:table-cell>
          <table:table-cell office:value-type="string">
            <text:p>Compiled Record</text:p>
          </table:table-cell>
          <table:table-cell office:value-type="string">
            <text:p>Wins</text:p>
          </table:table-cell>
          <table:table-cell office:value-type="string">
            <text:p>Losses</text:p>
          </table:table-cell>
          <table:table-cell office:value-type="string">
            <text:p>DQs</text:p>
          </table:table-cell>
          <table:table-cell table:number-columns-repeated="1019"/>
        </table:table-row>
        <table:table-row table:style-name="ro1">
          <table:table-cell office:value-type="string">
            <text:p>Olsen</text:p>
          </table:table-cell>
          <table:table-cell office:value-type="string">
            <text:p>12 - 12</text:p>
          </table:table-cell>
          <table:table-cell table:number-columns-repeated="2"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85 - 24</text:p>
          </table:table-cell>
          <table:table-cell office:value-type="string">
            <text:p>85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Frardvark</text:p>
          </table:table-cell>
          <table:table-cell office:value-type="string">
            <text:p>3 - 17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rokenyew</text:p>
          </table:table-cell>
          <table:table-cell office:value-type="string">
            <text:p>53 - 37</text:p>
          </table:table-cell>
          <table:table-cell office:value-type="string">
            <text:p>53</text:p>
          </table:table-cell>
          <table:table-cell office:value-type="string">
            <text:p>3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ovian</text:p>
          </table:table-cell>
          <table:table-cell office:value-type="string">
            <text:p>8 - 28</text:p>
          </table:table-cell>
          <table:table-cell office:value-type="string">
            <text:p>8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Yeti</text:p>
          </table:table-cell>
          <table:table-cell office:value-type="string">
            <text:p>42 - 35</text:p>
          </table:table-cell>
          <table:table-cell office:value-type="string">
            <text:p>42</text:p>
          </table:table-cell>
          <table:table-cell office:value-type="string">
            <text:p>3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api</text:p>
          </table:table-cell>
          <table:table-cell office:value-type="string">
            <text:p>11 - 20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ahtzu</text:p>
          </table:table-cell>
          <table:table-cell office:value-type="string">
            <text:p>40 - 25</text:p>
          </table:table-cell>
          <table:table-cell office:value-type="string">
            <text:p>40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lowpez</text:p>
          </table:table-cell>
          <table:table-cell office:value-type="string">
            <text:p>44 - 33</text:p>
          </table:table-cell>
          <table:table-cell office:value-type="string">
            <text:p>44</text:p>
          </table:table-cell>
          <table:table-cell office:value-type="string">
            <text:p>33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Ricky6</text:p>
          </table:table-cell>
          <table:table-cell office:value-type="string">
            <text:p>27 - 19</text:p>
          </table:table-cell>
          <table:table-cell office:value-type="string">
            <text:p>27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Quelity</text:p>
          </table:table-cell>
          <table:table-cell office:value-type="string">
            <text:p>7 - 28</text:p>
          </table:table-cell>
          <table:table-cell office:value-type="string">
            <text:p>7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66 - 42</text:p>
          </table:table-cell>
          <table:table-cell office:value-type="string">
            <text:p>66</text:p>
          </table:table-cell>
          <table:table-cell office:value-type="string">
            <text:p>4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gags</text:p>
          </table:table-cell>
          <table:table-cell office:value-type="string">
            <text:p>3 - 27</text:p>
          </table:table-cell>
          <table:table-cell office:value-type="string">
            <text:p>3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37 - 27</text:p>
          </table:table-cell>
          <table:table-cell office:value-type="string">
            <text:p>37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grabs</text:p>
          </table:table-cell>
          <table:table-cell office:value-type="string">
            <text:p>9 - 25</text:p>
          </table:table-cell>
          <table:table-cell office:value-type="string">
            <text:p>9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roto</text:p>
          </table:table-cell>
          <table:table-cell office:value-type="string">
            <text:p>25 - 30</text:p>
          </table:table-cell>
          <table:table-cell office:value-type="string">
            <text:p>25</text:p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rc</text:p>
          </table:table-cell>
          <table:table-cell office:value-type="string">
            <text:p>8 - 24</text:p>
          </table:table-cell>
          <table:table-cell office:value-type="string">
            <text:p>8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King Momo</text:p>
          </table:table-cell>
          <table:table-cell office:value-type="string">
            <text:p>38 - 26</text:p>
          </table:table-cell>
          <table:table-cell office:value-type="string">
            <text:p>38</text:p>
          </table:table-cell>
          <table:table-cell office:value-type="string">
            <text:p>26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NotTony</text:p>
          </table:table-cell>
          <table:table-cell office:value-type="string">
            <text:p>3 - 28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enny</text:p>
          </table:table-cell>
          <table:table-cell office:value-type="string">
            <text:p>6 - 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okusuii</text:p>
          </table:table-cell>
          <table:table-cell office:value-type="string">
            <text:p>1 - 17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owie</text:p>
          </table:table-cell>
          <table:table-cell office:value-type="string">
            <text:p>33 - 31</text:p>
          </table:table-cell>
          <table:table-cell office:value-type="string">
            <text:p>33</text:p>
          </table:table-cell>
          <table:table-cell office:value-type="string">
            <text:p>31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loak</text:p>
          </table:table-cell>
          <table:table-cell office:value-type="string">
            <text:p>2 - 17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OG Kid</text:p>
          </table:table-cell>
          <table:table-cell office:value-type="string">
            <text:p>59 - 36</text:p>
          </table:table-cell>
          <table:table-cell office:value-type="string">
            <text:p>59</text:p>
          </table:table-cell>
          <table:table-cell office:value-type="string">
            <text:p>3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hatOneGuy</text:p>
          </table:table-cell>
          <table:table-cell office:value-type="string">
            <text:p>1 - 2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andBag</text:p>
          </table:table-cell>
          <table:table-cell office:value-type="string">
            <text:p>32 - 35</text:p>
          </table:table-cell>
          <table:table-cell office:value-type="string">
            <text:p>32</text:p>
          </table:table-cell>
          <table:table-cell office:value-type="string">
            <text:p>3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Sh4rky</text:p>
          </table:table-cell>
          <table:table-cell office:value-type="string">
            <text:p>3 - 3</text:p>
          </table:table-cell>
          <table:table-cell table:number-columns-repeated="3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Krudo</text:p>
          </table:table-cell>
          <table:table-cell office:value-type="string">
            <text:p>66 - 27</text:p>
          </table:table-cell>
          <table:table-cell office:value-type="string">
            <text:p>66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anda</text:p>
          </table:table-cell>
          <table:table-cell office:value-type="string">
            <text:p>70 - 50</text:p>
          </table:table-cell>
          <table:table-cell office:value-type="string">
            <text:p>70</text:p>
          </table:table-cell>
          <table:table-cell office:value-type="string">
            <text:p>5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wiftspank</text:p>
          </table:table-cell>
          <table:table-cell office:value-type="string">
            <text:p>0 - 6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himelec Velez</text:p>
          </table:table-cell>
          <table:table-cell office:value-type="string">
            <text:p>3 - 8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braham</text:p>
          </table:table-cell>
          <table:table-cell office:value-type="string">
            <text:p>21 - 18</text:p>
          </table:table-cell>
          <table:table-cell office:value-type="string">
            <text:p>21</text:p>
          </table:table-cell>
          <table:table-cell office:value-type="string">
            <text:p>18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itan</text:p>
          </table:table-cell>
          <table:table-cell office:value-type="string">
            <text:p>8 - 16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hat0neguy</text:p>
          </table:table-cell>
          <table:table-cell office:value-type="string">
            <text:p>0 - 6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ntner</text:p>
          </table:table-cell>
          <table:table-cell office:value-type="string">
            <text:p>0 - 6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-K SiN</text:p>
          </table:table-cell>
          <table:table-cell office:value-type="string">
            <text:p>0 - 9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Litt</text:p>
          </table:table-cell>
          <table:table-cell office:value-type="string">
            <text:p>4 - 6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ed.</text:p>
          </table:table-cell>
          <table:table-cell office:value-type="string">
            <text:p>14 - 23</text:p>
          </table:table-cell>
          <table:table-cell office:value-type="string">
            <text:p>14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zLu</text:p>
          </table:table-cell>
          <table:table-cell office:value-type="string">
            <text:p>36 - 26</text:p>
          </table:table-cell>
          <table:table-cell office:value-type="string">
            <text:p>36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eele</text:p>
          </table:table-cell>
          <table:table-cell office:value-type="string">
            <text:p>7 - 6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Komodo</text:p>
          </table:table-cell>
          <table:table-cell office:value-type="string">
            <text:p>50 - 28</text:p>
          </table:table-cell>
          <table:table-cell office:value-type="string">
            <text:p>50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Chu</text:p>
          </table:table-cell>
          <table:table-cell office:value-type="string">
            <text:p>16 - 7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SAM</text:p>
          </table:table-cell>
          <table:table-cell office:value-type="string">
            <text:p>4 - 8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ungry Pigeon</text:p>
          </table:table-cell>
          <table:table-cell office:value-type="string">
            <text:p>8 - 6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falco</text:p>
          </table:table-cell>
          <table:table-cell office:value-type="string">
            <text:p>3 - 6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neakywill</text:p>
          </table:table-cell>
          <table:table-cell office:value-type="string">
            <text:p>28 - 25</text:p>
          </table:table-cell>
          <table:table-cell office:value-type="string">
            <text:p>28</text:p>
          </table:table-cell>
          <table:table-cell office:value-type="string">
            <text:p>25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Kip</text:p>
          </table:table-cell>
          <table:table-cell office:value-type="string">
            <text:p>15 - 18</text:p>
          </table:table-cell>
          <table:table-cell office:value-type="string">
            <text:p>15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ape</text:p>
          </table:table-cell>
          <table:table-cell office:value-type="string">
            <text:p>20 - 19</text:p>
          </table:table-cell>
          <table:table-cell office:value-type="string">
            <text:p>2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1 - 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Yho!</text:p>
          </table:table-cell>
          <table:table-cell office:value-type="string">
            <text:p>6 - 9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Kuya</text:p>
          </table:table-cell>
          <table:table-cell office:value-type="string">
            <text:p>13 - 10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ars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20xQuest</text:p>
          </table:table-cell>
          <table:table-cell office:value-type="string">
            <text:p>11 - 6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entinel</text:p>
          </table:table-cell>
          <table:table-cell office:value-type="string">
            <text:p>2 - 5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aron</text:p>
          </table:table-cell>
          <table:table-cell office:value-type="string">
            <text:p>9 - 7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extbook</text:p>
          </table:table-cell>
          <table:table-cell office:value-type="string">
            <text:p>0 - 5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240p</text:p>
          </table:table-cell>
          <table:table-cell office:value-type="string">
            <text:p>4 - 6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tylish thug slayer</text:p>
          </table:table-cell>
          <table:table-cell office:value-type="string">
            <text:p>3 - 6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A1.exe</text:p>
          </table:table-cell>
          <table:table-cell office:value-type="string">
            <text:p>5 - 6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obateatime</text:p>
          </table:table-cell>
          <table:table-cell office:value-type="string">
            <text:p>6 - 12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itmasterswag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heckmate</text:p>
          </table:table-cell>
          <table:table-cell office:value-type="string">
            <text:p>3 - 6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appuccino</text:p>
          </table:table-cell>
          <table:table-cell office:value-type="string">
            <text:p>20 - 12</text:p>
          </table:table-cell>
          <table:table-cell office:value-type="string">
            <text:p>2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uhline</text:p>
          </table:table-cell>
          <table:table-cell office:value-type="string">
            <text:p>9 - 13</text:p>
          </table:table-cell>
          <table:table-cell office:value-type="string">
            <text:p>9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quilateral</text:p>
          </table:table-cell>
          <table:table-cell office:value-type="string">
            <text:p>12 - 6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ace</text:p>
          </table:table-cell>
          <table:table-cell office:value-type="string">
            <text:p>10 - 10</text:p>
          </table:table-cell>
          <table:table-cell table:number-columns-repeated="2"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Wizzrobe</text:p>
          </table:table-cell>
          <table:table-cell office:value-type="string">
            <text:p>42 - 17</text:p>
          </table:table-cell>
          <table:table-cell office:value-type="string">
            <text:p>42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Franco</text:p>
          </table:table-cell>
          <table:table-cell office:value-type="string">
            <text:p>25 - 26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avé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asterqz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Hazywazy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an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ustopher</text:p>
          </table:table-cell>
          <table:table-cell office:value-type="string">
            <text:p>6 - 5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Hordan</text:p>
          </table:table-cell>
          <table:table-cell office:value-type="string">
            <text:p>15 - 12</text:p>
          </table:table-cell>
          <table:table-cell office:value-type="string">
            <text:p>15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iphone on 2% since 2018</text:p>
          </table:table-cell>
          <table:table-cell office:value-type="string">
            <text:p>0 - 1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ancake</text:p>
          </table:table-cell>
          <table:table-cell office:value-type="string">
            <text:p>0 - 6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acktheragingbull</text:p>
          </table:table-cell>
          <table:table-cell office:value-type="string">
            <text:p>0 - 1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aggu</text:p>
          </table:table-cell>
          <table:table-cell office:value-type="string">
            <text:p>11 - 11</text:p>
          </table:table-cell>
          <table:table-cell table:number-columns-repeated="2" office:value-type="string">
            <text:p>11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Isosceles</text:p>
          </table:table-cell>
          <table:table-cell office:value-type="string">
            <text:p>6 - 7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OncomingTraffic</text:p>
          </table:table-cell>
          <table:table-cell office:value-type="string">
            <text:p>15 - 11</text:p>
          </table:table-cell>
          <table:table-cell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hichi Pumpa</text:p>
          </table:table-cell>
          <table:table-cell office:value-type="string">
            <text:p>0 - 6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Forrest</text:p>
          </table:table-cell>
          <table:table-cell office:value-type="string">
            <text:p>16 - 11</text:p>
          </table:table-cell>
          <table:table-cell office:value-type="string">
            <text:p>16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rofanity</text:p>
          </table:table-cell>
          <table:table-cell office:value-type="string">
            <text:p>11 - 7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ackie Chun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pikeGod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oy Juan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ag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ada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arty animal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Wild Bill</text:p>
          </table:table-cell>
          <table:table-cell office:value-type="string">
            <text:p>8 - 7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igh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ESTIKYLE</text:p>
          </table:table-cell>
          <table:table-cell office:value-type="string">
            <text:p>3 - 5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aby Carrot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Kairos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Vision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rndy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ardon</text:p>
          </table:table-cell>
          <table:table-cell office:value-type="string">
            <text:p>7 - 7</text:p>
          </table:table-cell>
          <table:table-cell table:number-columns-repeated="2" office:value-type="string">
            <text:p>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yungxgucci</text:p>
          </table:table-cell>
          <table:table-cell office:value-type="string">
            <text:p>3 - 5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Whif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quattingxBear</text:p>
          </table:table-cell>
          <table:table-cell office:value-type="string">
            <text:p>2 - 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amV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DMJ</text:p>
          </table:table-cell>
          <table:table-cell office:value-type="string">
            <text:p>8 - 7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oup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xaninmyfaygo666</text:p>
          </table:table-cell>
          <table:table-cell office:value-type="string">
            <text:p>3 - 6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Halberd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Klondike64</text:p>
          </table:table-cell>
          <table:table-cell office:value-type="string">
            <text:p>0 - 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lwaysinsync</text:p>
          </table:table-cell>
          <table:table-cell office:value-type="string">
            <text:p>0 - 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onn Man</text:p>
          </table:table-cell>
          <table:table-cell office:value-type="string">
            <text:p>4 - 4</text:p>
          </table:table-cell>
          <table:table-cell table:number-columns-repeated="2" office:value-type="string">
            <text:p>4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urnament 1" table:style-name="ta5" table:print="false">
        <office:forms form:automatic-focus="false" form:apply-design-mode="false"/>
        <table:table-column table:style-name="co12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Attendees List</text:p>
          </table:table-cell>
          <table:table-cell table:number-columns-repeated="1019"/>
        </table:table-row>
        <table:table-row table:style-name="ro1">
          <table:table-cell office:value-type="string">
            <text:p>JediSmash</text:p>
          </table:table-cell>
          <table:table-cell office:value-type="string">
            <text:p>(4, 2, 8, 4, 0)</text:p>
          </table:table-cell>
          <table:table-cell office:value-type="string">
            <text:p>Olsen</text:p>
          </table:table-cell>
          <table:table-cell office:value-type="string">
            <text:p>(4, 2, 12, 6, 0)</text:p>
          </table:table-cell>
          <table:table-cell office:value-type="string">
            <text:p>JediSmash</text:p>
          </table:table-cell>
          <table:table-cell table:number-columns-repeated="1019"/>
        </table:table-row>
        <table:table-row table:style-name="ro1">
          <table:table-cell office:value-type="string">
            <text:p>Scuffed</text:p>
          </table:table-cell>
          <table:table-cell office:value-type="string">
            <text:p>(2, 0, 4, 0, 0)</text:p>
          </table:table-cell>
          <table:table-cell office:value-type="string">
            <text:p>Frardvark</text:p>
          </table:table-cell>
          <table:table-cell office:value-type="string">
            <text:p>(2, 0, 6, 0, 0)</text:p>
          </table:table-cell>
          <table:table-cell office:value-type="string">
            <text:p>Scuffed</text:p>
          </table:table-cell>
          <table:table-cell table:number-columns-repeated="1019"/>
        </table:table-row>
        <table:table-row table:style-name="ro1">
          <table:table-cell office:value-type="string">
            <text:p>Zorrin</text:p>
          </table:table-cell>
          <table:table-cell office:value-type="string">
            <text:p>(5, 3, 12, 7, 0)</text:p>
          </table:table-cell>
          <table:table-cell office:value-type="string">
            <text:p>brokenyew</text:p>
          </table:table-cell>
          <table:table-cell office:value-type="string">
            <text:p>(6, 4, 23, 13, 0)</text:p>
          </table:table-cell>
          <table:table-cell office:value-type="string">
            <text:p>Zorrin</text:p>
          </table:table-cell>
          <table:table-cell table:number-columns-repeated="1019"/>
        </table:table-row>
        <table:table-row table:style-name="ro1">
          <table:table-cell office:value-type="string">
            <text:p>OwiePowie69</text:p>
          </table:table-cell>
          <table:table-cell office:value-type="string">
            <text:p>(0, 0, 0, 0, 2)</text:p>
          </table:table-cell>
          <table:table-cell office:value-type="string">
            <text:p>Jovian</text:p>
          </table:table-cell>
          <table:table-cell office:value-type="string">
            <text:p>(2, 0, 7, 1, 0)</text:p>
          </table:table-cell>
          <table:table-cell office:value-type="string">
            <text:p>OwiePowie69</text:p>
          </table:table-cell>
          <table:table-cell table:number-columns-repeated="1019"/>
        </table:table-row>
        <table:table-row table:style-name="ro1">
          <table:table-cell office:value-type="string">
            <text:p>Chez</text:p>
          </table:table-cell>
          <table:table-cell office:value-type="string">
            <text:p>(5, 3, 10, 6, 0)</text:p>
          </table:table-cell>
          <table:table-cell office:value-type="string">
            <text:p>Yeti</text:p>
          </table:table-cell>
          <table:table-cell office:value-type="string">
            <text:p>(5, 3, 17, 11, 0)</text:p>
          </table:table-cell>
          <table:table-cell office:value-type="string">
            <text:p>Chez</text:p>
          </table:table-cell>
          <table:table-cell table:number-columns-repeated="1019"/>
        </table:table-row>
        <table:table-row table:style-name="ro1">
          <table:table-cell office:value-type="string">
            <text:p>Redemption</text:p>
          </table:table-cell>
          <table:table-cell office:value-type="string">
            <text:p>(2, 0, 4, 0, 0)</text:p>
          </table:table-cell>
          <table:table-cell office:value-type="string">
            <text:p>Lapi</text:p>
          </table:table-cell>
          <table:table-cell office:value-type="string">
            <text:p>(3, 1, 11, 3, 0)</text:p>
          </table:table-cell>
          <table:table-cell office:value-type="string">
            <text:p>Redemption</text:p>
          </table:table-cell>
          <table:table-cell table:number-columns-repeated="1019"/>
        </table:table-row>
        <table:table-row table:style-name="ro1">
          <table:table-cell office:value-type="string">
            <text:p>Sr-Huge</text:p>
          </table:table-cell>
          <table:table-cell office:value-type="string">
            <text:p>(3, 1, 7, 2, 0)</text:p>
          </table:table-cell>
          <table:table-cell office:value-type="string">
            <text:p>Gahtzu</text:p>
          </table:table-cell>
          <table:table-cell office:value-type="string">
            <text:p>(4, 2, 16, 9, 0)</text:p>
          </table:table-cell>
          <table:table-cell office:value-type="string">
            <text:p>Sr-Huge</text:p>
          </table:table-cell>
          <table:table-cell table:number-columns-repeated="1019"/>
        </table:table-row>
        <table:table-row table:style-name="ro1">
          <table:table-cell office:value-type="string">
            <text:p>KurryRose</text:p>
          </table:table-cell>
          <table:table-cell office:value-type="string">
            <text:p>(0, 0, 0, 0, 2)</text:p>
          </table:table-cell>
          <table:table-cell office:value-type="string">
            <text:p>Slowpez</text:p>
          </table:table-cell>
          <table:table-cell office:value-type="string">
            <text:p>(0, 0, 0, 0, 2)</text:p>
          </table:table-cell>
          <table:table-cell office:value-type="string">
            <text:p>KurryRose</text:p>
          </table:table-cell>
          <table:table-cell table:number-columns-repeated="1019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6, 4, 13, 9, 0)</text:p>
          </table:table-cell>
          <table:table-cell office:value-type="string">
            <text:p>Ricky6</text:p>
          </table:table-cell>
          <table:table-cell office:value-type="string">
            <text:p>(5, 3, 15, 9, 0)</text:p>
          </table:table-cell>
          <table:table-cell office:value-type="string">
            <text:p>Vinny, The Lick</text:p>
          </table:table-cell>
          <table:table-cell table:number-columns-repeated="1019"/>
        </table:table-row>
        <table:table-row table:style-name="ro1">
          <table:table-cell office:value-type="string">
            <text:p>Hollywood</text:p>
          </table:table-cell>
          <table:table-cell office:value-type="string">
            <text:p>(2, 0, 4, 0, 0)</text:p>
          </table:table-cell>
          <table:table-cell office:value-type="string">
            <text:p>Quelity</text:p>
          </table:table-cell>
          <table:table-cell office:value-type="string">
            <text:p>(2, 0, 7, 1, 0)</text:p>
          </table:table-cell>
          <table:table-cell office:value-type="string">
            <text:p>Hollywood</text:p>
          </table:table-cell>
          <table:table-cell table:number-columns-repeated="1019"/>
        </table:table-row>
        <table:table-row table:style-name="ro1">
          <table:table-cell office:value-type="string">
            <text:p>Jacen</text:p>
          </table:table-cell>
          <table:table-cell office:value-type="string">
            <text:p>(0, 0, 0, 0, 2)</text:p>
          </table:table-cell>
          <table:table-cell office:value-type="string">
            <text:p>Captain G</text:p>
          </table:table-cell>
          <table:table-cell office:value-type="string">
            <text:p>(5, 3, 19, 12, 0)</text:p>
          </table:table-cell>
          <table:table-cell office:value-type="string">
            <text:p>Jacen</text:p>
          </table:table-cell>
          <table:table-cell table:number-columns-repeated="1019"/>
        </table:table-row>
        <table:table-row table:style-name="ro1">
          <table:table-cell office:value-type="string">
            <text:p>Rec</text:p>
          </table:table-cell>
          <table:table-cell office:value-type="string">
            <text:p>(0, 0, 0, 0, 2)</text:p>
          </table:table-cell>
          <table:table-cell office:value-type="string">
            <text:p>tgags</text:p>
          </table:table-cell>
          <table:table-cell office:value-type="string">
            <text:p>(2, 0, 6, 0, 0)</text:p>
          </table:table-cell>
          <table:table-cell office:value-type="string">
            <text:p>Rec</text:p>
          </table:table-cell>
          <table:table-cell table:number-columns-repeated="1019"/>
        </table:table-row>
        <table:table-row table:style-name="ro1">
          <table:table-cell office:value-type="string">
            <text:p>JoeysMemeTeam</text:p>
          </table:table-cell>
          <table:table-cell office:value-type="string">
            <text:p>(4, 2, 8, 4, 0)</text:p>
          </table:table-cell>
          <table:table-cell office:value-type="string">
            <text:p>Hod Strat</text:p>
          </table:table-cell>
          <table:table-cell office:value-type="string">
            <text:p>(4, 2, 12, 6, 0)</text:p>
          </table:table-cell>
          <table:table-cell office:value-type="string">
            <text:p>JoeysMemeTeam</text:p>
          </table:table-cell>
          <table:table-cell table:number-columns-repeated="1019"/>
        </table:table-row>
        <table:table-row table:style-name="ro1">
          <table:table-cell office:value-type="string">
            <text:p>SentPain</text:p>
          </table:table-cell>
          <table:table-cell office:value-type="string">
            <text:p>(2, 0, 4, 0, 0)</text:p>
          </table:table-cell>
          <table:table-cell office:value-type="string">
            <text:p>CCgrabs</text:p>
          </table:table-cell>
          <table:table-cell office:value-type="string">
            <text:p>(3, 1, 10, 4, 0)</text:p>
          </table:table-cell>
          <table:table-cell office:value-type="string">
            <text:p>SentPain</text:p>
          </table:table-cell>
          <table:table-cell table:number-columns-repeated="1019"/>
        </table:table-row>
        <table:table-row table:style-name="ro1">
          <table:table-cell office:value-type="string">
            <text:p>Squilliam Afton</text:p>
          </table:table-cell>
          <table:table-cell office:value-type="string">
            <text:p>(4, 2, 9, 4, 0)</text:p>
          </table:table-cell>
          <table:table-cell office:value-type="string">
            <text:p>Proto</text:p>
          </table:table-cell>
          <table:table-cell office:value-type="string">
            <text:p>(4, 2, 13, 6, 0)</text:p>
          </table:table-cell>
          <table:table-cell office:value-type="string">
            <text:p>Squilliam Afton</text:p>
          </table:table-cell>
          <table:table-cell table:number-columns-repeated="1019"/>
        </table:table-row>
        <table:table-row table:style-name="ro1">
          <table:table-cell office:value-type="string">
            <text:p>Donegg</text:p>
          </table:table-cell>
          <table:table-cell office:value-type="string">
            <text:p>(2, 0, 5, 1, 0)</text:p>
          </table:table-cell>
          <table:table-cell office:value-type="string">
            <text:p>drc</text:p>
          </table:table-cell>
          <table:table-cell office:value-type="string">
            <text:p>(2, 0, 6, 0, 0)</text:p>
          </table:table-cell>
          <table:table-cell office:value-type="string">
            <text:p>Donegg</text:p>
          </table:table-cell>
          <table:table-cell table:number-columns-repeated="1019"/>
        </table:table-row>
        <table:table-row table:style-name="ro1">
          <table:table-cell office:value-type="string">
            <text:p>Diam</text:p>
          </table:table-cell>
          <table:table-cell office:value-type="string">
            <text:p>(5, 3, 10, 6, 0)</text:p>
          </table:table-cell>
          <table:table-cell office:value-type="string">
            <text:p>King Momo</text:p>
          </table:table-cell>
          <table:table-cell office:value-type="string">
            <text:p>(7, 5, 24, 15, 0)</text:p>
          </table:table-cell>
          <table:table-cell office:value-type="string">
            <text:p>Diam</text:p>
          </table:table-cell>
          <table:table-cell table:number-columns-repeated="1019"/>
        </table:table-row>
        <table:table-row table:style-name="ro1">
          <table:table-cell office:value-type="string">
            <text:p>LXIX</text:p>
          </table:table-cell>
          <table:table-cell office:value-type="string">
            <text:p>(2, 0, 4, 0, 0)</text:p>
          </table:table-cell>
          <table:table-cell office:value-type="string">
            <text:p>NotTony</text:p>
          </table:table-cell>
          <table:table-cell office:value-type="string">
            <text:p>(3, 1, 10, 3, 0)</text:p>
          </table:table-cell>
          <table:table-cell office:value-type="string">
            <text:p>LXIX</text:p>
          </table:table-cell>
          <table:table-cell table:number-columns-repeated="1019"/>
        </table:table-row>
        <table:table-row table:style-name="ro1">
          <table:table-cell office:value-type="string">
            <text:p>Zomba</text:p>
          </table:table-cell>
          <table:table-cell office:value-type="string">
            <text:p>(7, 7, 22, 17, 0)</text:p>
          </table:table-cell>
          <table:table-cell office:value-type="string">
            <text:p>Benny</text:p>
          </table:table-cell>
          <table:table-cell office:value-type="string">
            <text:p>(3, 2, 10, 6, 1)</text:p>
          </table:table-cell>
          <table:table-cell office:value-type="string">
            <text:p>Zomba</text:p>
          </table:table-cell>
          <table:table-cell table:number-columns-repeated="1019"/>
        </table:table-row>
        <table:table-row table:style-name="ro1">
          <table:table-cell office:value-type="string">
            <text:p>Fonica</text:p>
          </table:table-cell>
          <table:table-cell office:value-type="string">
            <text:p>(5, 3, 12, 8, 0)</text:p>
          </table:table-cell>
          <table:table-cell office:value-type="string">
            <text:p>okusuii</text:p>
          </table:table-cell>
          <table:table-cell office:value-type="string">
            <text:p>(2, 0, 7, 1, 0)</text:p>
          </table:table-cell>
          <table:table-cell office:value-type="string">
            <text:p>Fonica</text:p>
          </table:table-cell>
          <table:table-cell table:number-columns-repeated="1019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4, 2, 10, 5, 0)</text:p>
          </table:table-cell>
          <table:table-cell office:value-type="string">
            <text:p>Howie</text:p>
          </table:table-cell>
          <table:table-cell office:value-type="string">
            <text:p>(4, 2, 13, 7, 0)</text:p>
          </table:table-cell>
          <table:table-cell office:value-type="string">
            <text:p>Plummet</text:p>
          </table:table-cell>
          <table:table-cell table:number-columns-repeated="1019"/>
        </table:table-row>
        <table:table-row table:style-name="ro1">
          <table:table-cell office:value-type="string">
            <text:p>Venikki</text:p>
          </table:table-cell>
          <table:table-cell office:value-type="string">
            <text:p>(3, 1, 7, 3, 0)</text:p>
          </table:table-cell>
          <table:table-cell office:value-type="string">
            <text:p>Cloak</text:p>
          </table:table-cell>
          <table:table-cell office:value-type="string">
            <text:p>(2, 0, 6, 0, 0)</text:p>
          </table:table-cell>
          <table:table-cell office:value-type="string">
            <text:p>Venikki</text:p>
          </table:table-cell>
          <table:table-cell table:number-columns-repeated="1019"/>
        </table:table-row>
        <table:table-row table:style-name="ro1">
          <table:table-cell office:value-type="string">
            <text:p>Breezy 400</text:p>
          </table:table-cell>
          <table:table-cell office:value-type="string">
            <text:p>(4, 2, 10, 5, 0)</text:p>
          </table:table-cell>
          <table:table-cell office:value-type="string">
            <text:p>OG Kid</text:p>
          </table:table-cell>
          <table:table-cell office:value-type="string">
            <text:p>(5, 3, 17, 11, 0)</text:p>
          </table:table-cell>
          <table:table-cell office:value-type="string">
            <text:p>Breezy 400</text:p>
          </table:table-cell>
          <table:table-cell table:number-columns-repeated="1019"/>
        </table:table-row>
        <table:table-row table:style-name="ro1">
          <table:table-cell office:value-type="string">
            <text:p>Kiki</text:p>
          </table:table-cell>
          <table:table-cell office:value-type="string">
            <text:p>(5, 3, 10, 6, 0)</text:p>
          </table:table-cell>
          <table:table-cell office:value-type="string">
            <text:p>ThatOneGuy</text:p>
          </table:table-cell>
          <table:table-cell office:value-type="string">
            <text:p>(2, 0, 6, 0, 0)</text:p>
          </table:table-cell>
          <table:table-cell office:value-type="string">
            <text:p>Kiki</text:p>
          </table:table-cell>
          <table:table-cell table:number-columns-repeated="1019"/>
        </table:table-row>
        <table:table-row table:style-name="ro1">
          <table:table-cell office:value-type="string">
            <text:p>Spam no jutsu</text:p>
          </table:table-cell>
          <table:table-cell office:value-type="string">
            <text:p>(3, 1, 6, 2, 0)</text:p>
          </table:table-cell>
          <table:table-cell office:value-type="string">
            <text:p>SandBag</text:p>
          </table:table-cell>
          <table:table-cell office:value-type="string">
            <text:p>(4, 2, 13, 7, 0)</text:p>
          </table:table-cell>
          <table:table-cell office:value-type="string">
            <text:p>Spam no jutsu</text:p>
          </table:table-cell>
          <table:table-cell table:number-columns-repeated="1019"/>
        </table:table-row>
        <table:table-row table:style-name="ro1">
          <table:table-cell office:value-type="string">
            <text:p>Octo</text:p>
          </table:table-cell>
          <table:table-cell office:value-type="string">
            <text:p>(4, 2, 10, 5, 0)</text:p>
          </table:table-cell>
          <table:table-cell office:value-type="string">
            <text:p>pSh4rky</text:p>
          </table:table-cell>
          <table:table-cell office:value-type="string">
            <text:p>(2, 1, 6, 3, 1)</text:p>
          </table:table-cell>
          <table:table-cell office:value-type="string">
            <text:p>Octo</text:p>
          </table:table-cell>
          <table:table-cell table:number-columns-repeated="1019"/>
        </table:table-row>
        <table:table-row table:style-name="ro1">
          <table:table-cell office:value-type="string">
            <text:p>Olsen</text:p>
          </table:table-cell>
          <table:table-cell office:value-type="string">
            <text:p>(2, 0, 4, 0, 0)</text:p>
          </table:table-cell>
          <table:table-cell office:value-type="string">
            <text:p>Hungrybox</text:p>
          </table:table-cell>
          <table:table-cell office:value-type="string">
            <text:p>(5, 5, 16, 15, 0)</text:p>
          </table:table-cell>
          <table:table-cell office:value-type="string">
            <text:p>Olsen</text:p>
          </table:table-cell>
          <table:table-cell table:number-columns-repeated="1019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4, 2, 10, 5, 0)</text:p>
          </table:table-cell>
          <table:table-cell office:value-type="string">
            <text:p>Krudo</text:p>
          </table:table-cell>
          <table:table-cell office:value-type="string">
            <text:p>(7, 5, 23, 16, 0)</text:p>
          </table:table-cell>
          <table:table-cell office:value-type="string">
            <text:p>Twilight</text:p>
          </table:table-cell>
          <table:table-cell table:number-columns-repeated="1019"/>
        </table:table-row>
        <table:table-row table:style-name="ro1">
          <table:table-cell office:value-type="string">
            <text:p>Shiro</text:p>
          </table:table-cell>
          <table:table-cell office:value-type="string">
            <text:p>(2, 0, 4, 0, 0)</text:p>
          </table:table-cell>
          <table:table-cell office:value-type="string">
            <text:p>Panda</text:p>
          </table:table-cell>
          <table:table-cell office:value-type="string">
            <text:p>(5, 3, 17, 9, 0)</text:p>
          </table:table-cell>
          <table:table-cell office:value-type="string">
            <text:p>Shiro</text:p>
          </table:table-cell>
          <table:table-cell table:number-columns-repeated="1019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5, 3, 10, 6, 0)</text:p>
          </table:table-cell>
          <table:table-cell table:number-columns-repeated="2"/>
          <table:table-cell office:value-type="string">
            <text:p>DarthCJ8</text:p>
          </table:table-cell>
          <table:table-cell table:number-columns-repeated="1019"/>
        </table:table-row>
        <table:table-row table:style-name="ro1">
          <table:table-cell office:value-type="string">
            <text:p>sev7x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sev7x</text:p>
          </table:table-cell>
          <table:table-cell table:number-columns-repeated="1019"/>
        </table:table-row>
        <table:table-row table:style-name="ro1">
          <table:table-cell office:value-type="string">
            <text:p>Pendragon</text:p>
          </table:table-cell>
          <table:table-cell office:value-type="string">
            <text:p>(3, 1, 6, 2, 0)</text:p>
          </table:table-cell>
          <table:table-cell table:number-columns-repeated="2"/>
          <table:table-cell office:value-type="string">
            <text:p>Pendragon</text:p>
          </table:table-cell>
          <table:table-cell table:number-columns-repeated="1019"/>
        </table:table-row>
        <table:table-row table:style-name="ro1">
          <table:table-cell office:value-type="string">
            <text:p>yamaokai</text:p>
          </table:table-cell>
          <table:table-cell office:value-type="string">
            <text:p>(2, 0, 5, 1, 0)</text:p>
          </table:table-cell>
          <table:table-cell table:number-columns-repeated="2"/>
          <table:table-cell office:value-type="string">
            <text:p>yamaokai</text:p>
          </table:table-cell>
          <table:table-cell table:number-columns-repeated="1019"/>
        </table:table-row>
        <table:table-row table:style-name="ro1">
          <table:table-cell office:value-type="string">
            <text:p>Shunning</text:p>
          </table:table-cell>
          <table:table-cell office:value-type="string">
            <text:p>(3, 1, 7, 2, 0)</text:p>
          </table:table-cell>
          <table:table-cell table:number-columns-repeated="2"/>
          <table:table-cell office:value-type="string">
            <text:p>Shunning</text:p>
          </table:table-cell>
          <table:table-cell table:number-columns-repeated="1019"/>
        </table:table-row>
        <table:table-row table:style-name="ro1">
          <table:table-cell office:value-type="string">
            <text:p>AJG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AJG</text:p>
          </table:table-cell>
          <table:table-cell table:number-columns-repeated="1019"/>
        </table:table-row>
        <table:table-row table:style-name="ro1">
          <table:table-cell office:value-type="string">
            <text:p>Mayo</text:p>
          </table:table-cell>
          <table:table-cell office:value-type="string">
            <text:p>(4, 2, 11, 6, 0)</text:p>
          </table:table-cell>
          <table:table-cell table:number-columns-repeated="2"/>
          <table:table-cell office:value-type="string">
            <text:p>Mayo</text:p>
          </table:table-cell>
          <table:table-cell table:number-columns-repeated="1019"/>
        </table:table-row>
        <table:table-row table:style-name="ro1">
          <table:table-cell office:value-type="string">
            <text:p>Galaxia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Galaxia</text:p>
          </table:table-cell>
          <table:table-cell table:number-columns-repeated="1019"/>
        </table:table-row>
        <table:table-row table:style-name="ro1">
          <table:table-cell office:value-type="string">
            <text:p>MrNubs</text:p>
          </table:table-cell>
          <table:table-cell office:value-type="string">
            <text:p>(5, 3, 10, 6, 0)</text:p>
          </table:table-cell>
          <table:table-cell table:number-columns-repeated="2"/>
          <table:table-cell office:value-type="string">
            <text:p>MrNubs</text:p>
          </table:table-cell>
          <table:table-cell table:number-columns-repeated="1019"/>
        </table:table-row>
        <table:table-row table:style-name="ro1">
          <table:table-cell office:value-type="string">
            <text:p>Dane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Dane</text:p>
          </table:table-cell>
          <table:table-cell table:number-columns-repeated="1019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(4, 2, 8, 4, 0)</text:p>
          </table:table-cell>
          <table:table-cell table:number-columns-repeated="2"/>
          <table:table-cell office:value-type="string">
            <text:p>SamersonT</text:p>
          </table:table-cell>
          <table:table-cell table:number-columns-repeated="1019"/>
        </table:table-row>
        <table:table-row table:style-name="ro1">
          <table:table-cell office:value-type="string">
            <text:p>Czar</text:p>
          </table:table-cell>
          <table:table-cell office:value-type="string">
            <text:p>(2, 0, 5, 1, 0)</text:p>
          </table:table-cell>
          <table:table-cell table:number-columns-repeated="2"/>
          <table:table-cell office:value-type="string">
            <text:p>Czar</text:p>
          </table:table-cell>
          <table:table-cell table:number-columns-repeated="1019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7, 5, 21, 14, 0)</text:p>
          </table:table-cell>
          <table:table-cell table:number-columns-repeated="2"/>
          <table:table-cell office:value-type="string">
            <text:p>BeastModePaul</text:p>
          </table:table-cell>
          <table:table-cell table:number-columns-repeated="1019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6, 4, 15, 9, 0)</text:p>
          </table:table-cell>
          <table:table-cell table:number-columns-repeated="2"/>
          <table:table-cell office:value-type="string">
            <text:p>Hungrybox</text:p>
          </table:table-cell>
          <table:table-cell table:number-columns-repeated="1019"/>
        </table:table-row>
        <table:table-row table:style-name="ro1">
          <table:table-cell office:value-type="string">
            <text:p>Bhand</text:p>
          </table:table-cell>
          <table:table-cell office:value-type="string">
            <text:p>(5, 3, 11, 6, 0)</text:p>
          </table:table-cell>
          <table:table-cell table:number-columns-repeated="2"/>
          <table:table-cell office:value-type="string">
            <text:p>Bhand</text:p>
          </table:table-cell>
          <table:table-cell table:number-columns-repeated="1019"/>
        </table:table-row>
        <table:table-row table:style-name="ro1">
          <table:table-cell office:value-type="string">
            <text:p>GUNSLINGING GATOS</text:p>
          </table:table-cell>
          <table:table-cell office:value-type="string">
            <text:p>(5, 3, 10, 6, 0)</text:p>
          </table:table-cell>
          <table:table-cell table:number-columns-repeated="2"/>
          <table:table-cell office:value-type="string">
            <text:p>GUNSLINGING GATOS</text:p>
          </table:table-cell>
          <table:table-cell table:number-columns-repeated="1019"/>
        </table:table-row>
        <table:table-row table:style-name="ro1">
          <table:table-cell office:value-type="string">
            <text:p>Newo</text:p>
          </table:table-cell>
          <table:table-cell office:value-type="string">
            <text:p>(6, 4, 17, 10, 0)</text:p>
          </table:table-cell>
          <table:table-cell table:number-columns-repeated="2"/>
          <table:table-cell office:value-type="string">
            <text:p>Newo</text:p>
          </table:table-cell>
          <table:table-cell table:number-columns-repeated="1019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(5, 3, 13, 8, 0)</text:p>
          </table:table-cell>
          <table:table-cell table:number-columns-repeated="2"/>
          <table:table-cell office:value-type="string">
            <text:p>Dingodile</text:p>
          </table:table-cell>
          <table:table-cell table:number-columns-repeated="1019"/>
        </table:table-row>
        <table:table-row table:style-name="ro1">
          <table:table-cell office:value-type="string">
            <text:p>chpstks</text:p>
          </table:table-cell>
          <table:table-cell office:value-type="string">
            <text:p>(4, 2, 10, 6, 0)</text:p>
          </table:table-cell>
          <table:table-cell table:number-columns-repeated="2"/>
          <table:table-cell office:value-type="string">
            <text:p>chpstks</text:p>
          </table:table-cell>
          <table:table-cell table:number-columns-repeated="1019"/>
        </table:table-row>
        <table:table-row table:style-name="ro1">
          <table:table-cell office:value-type="string">
            <text:p>zesp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zesp</text:p>
          </table:table-cell>
          <table:table-cell table:number-columns-repeated="1019"/>
        </table:table-row>
        <table:table-row table:style-name="ro1">
          <table:table-cell office:value-type="string">
            <text:p>Zaniel</text:p>
          </table:table-cell>
          <table:table-cell office:value-type="string">
            <text:p>(4, 2, 8, 4, 0)</text:p>
          </table:table-cell>
          <table:table-cell table:number-columns-repeated="2"/>
          <table:table-cell office:value-type="string">
            <text:p>Zaniel</text:p>
          </table:table-cell>
          <table:table-cell table:number-columns-repeated="1019"/>
        </table:table-row>
        <table:table-row table:style-name="ro1">
          <table:table-cell office:value-type="string">
            <text:p>roan ling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roan ling</text:p>
          </table:table-cell>
          <table:table-cell table:number-columns-repeated="1019"/>
        </table:table-row>
        <table:table-row table:style-name="ro1">
          <table:table-cell office:value-type="string">
            <text:p>Synvy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Synvy</text:p>
          </table:table-cell>
          <table:table-cell table:number-columns-repeated="1019"/>
        </table:table-row>
        <table:table-row table:style-name="ro1">
          <table:table-cell office:value-type="string">
            <text:p>Wiccan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Wiccan</text:p>
          </table:table-cell>
          <table:table-cell table:number-columns-repeated="1019"/>
        </table:table-row>
        <table:table-row table:style-name="ro1">
          <table:table-cell office:value-type="string">
            <text:p>Eliastar</text:p>
          </table:table-cell>
          <table:table-cell office:value-type="string">
            <text:p>(4, 2, 8, 4, 0)</text:p>
          </table:table-cell>
          <table:table-cell table:number-columns-repeated="2"/>
          <table:table-cell office:value-type="string">
            <text:p>Eliastar</text:p>
          </table:table-cell>
          <table:table-cell table:number-columns-repeated="1019"/>
        </table:table-row>
        <table:table-row table:style-name="ro1">
          <table:table-cell office:value-type="string">
            <text:p>saibaman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saibaman</text:p>
          </table:table-cell>
          <table:table-cell table:number-columns-repeated="1019"/>
        </table:table-row>
        <table:table-row table:style-name="ro1">
          <table:table-cell office:value-type="string">
            <text:p>Second Floor Basement</text:p>
          </table:table-cell>
          <table:table-cell office:value-type="string">
            <text:p>(5, 3, 11, 7, 0)</text:p>
          </table:table-cell>
          <table:table-cell table:number-columns-repeated="2"/>
          <table:table-cell office:value-type="string">
            <text:p>Second Floor Basement</text:p>
          </table:table-cell>
          <table:table-cell table:number-columns-repeated="1019"/>
        </table:table-row>
        <table:table-row table:style-name="ro1">
          <table:table-cell office:value-type="string">
            <text:p>captainLED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captainLED</text:p>
          </table:table-cell>
          <table:table-cell table:number-columns-repeated="1019"/>
        </table:table-row>
        <table:table-row table:style-name="ro1">
          <table:table-cell office:value-type="string">
            <text:p>EWGF</text:p>
          </table:table-cell>
          <table:table-cell office:value-type="string">
            <text:p>(5, 3, 10, 6, 0)</text:p>
          </table:table-cell>
          <table:table-cell table:number-columns-repeated="2"/>
          <table:table-cell office:value-type="string">
            <text:p>EWGF</text:p>
          </table:table-cell>
          <table:table-cell table:number-columns-repeated="1019"/>
        </table:table-row>
        <table:table-row table:style-name="ro1">
          <table:table-cell office:value-type="string">
            <text:p>Sneakers O'Toole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Sneakers O'Toole</text:p>
          </table:table-cell>
          <table:table-cell table:number-columns-repeated="1019"/>
        </table:table-row>
        <table:table-row table:style-name="ro1">
          <table:table-cell office:value-type="string">
            <text:p>Bowlin</text:p>
          </table:table-cell>
          <table:table-cell office:value-type="string">
            <text:p>(6, 4, 13, 8, 0)</text:p>
          </table:table-cell>
          <table:table-cell table:number-columns-repeated="2"/>
          <table:table-cell office:value-type="string">
            <text:p>Bowlin</text:p>
          </table:table-cell>
          <table:table-cell table:number-columns-repeated="1019"/>
        </table:table-row>
        <table:table-row table:style-name="ro1">
          <table:table-cell office:value-type="string">
            <text:p>Schef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Schef</text:p>
          </table:table-cell>
          <table:table-cell table:number-columns-repeated="1019"/>
        </table:table-row>
        <table:table-row table:style-name="ro1">
          <table:table-cell office:value-type="string">
            <text:p>Just_A_Tarrasque</text:p>
          </table:table-cell>
          <table:table-cell office:value-type="string">
            <text:p>(3, 1, 7, 3, 0)</text:p>
          </table:table-cell>
          <table:table-cell table:number-columns-repeated="2"/>
          <table:table-cell office:value-type="string">
            <text:p>Just_A_Tarrasque</text:p>
          </table:table-cell>
          <table:table-cell table:number-columns-repeated="1019"/>
        </table:table-row>
        <table:table-row table:style-name="ro1">
          <table:table-cell office:value-type="string">
            <text:p>DiRT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1019"/>
        </table:table-row>
        <table:table-row table:style-name="ro1">
          <table:table-cell office:value-type="string">
            <text:p>juno</text:p>
          </table:table-cell>
          <table:table-cell office:value-type="string">
            <text:p>(5, 3, 13, 7, 0)</text:p>
          </table:table-cell>
          <table:table-cell table:number-columns-repeated="2"/>
          <table:table-cell office:value-type="string">
            <text:p>juno</text:p>
          </table:table-cell>
          <table:table-cell table:number-columns-repeated="1019"/>
        </table:table-row>
        <table:table-row table:style-name="ro1">
          <table:table-cell office:value-type="string">
            <text:p>a_Successor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a_Successor</text:p>
          </table:table-cell>
          <table:table-cell table:number-columns-repeated="1019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9, 7, 27, 19, 0)</text:p>
          </table:table-cell>
          <table:table-cell table:number-columns-repeated="2"/>
          <table:table-cell office:value-type="string">
            <text:p>Epic_Gabriel</text:p>
          </table:table-cell>
          <table:table-cell table:number-columns-repeated="1019"/>
        </table:table-row>
        <table:table-row table:style-name="ro1">
          <table:table-cell office:value-type="string">
            <text:p>My Dad</text:p>
          </table:table-cell>
          <table:table-cell office:value-type="string">
            <text:p>(3, 1, 6, 2, 0)</text:p>
          </table:table-cell>
          <table:table-cell table:number-columns-repeated="2"/>
          <table:table-cell office:value-type="string">
            <text:p>My Dad</text:p>
          </table:table-cell>
          <table:table-cell table:number-columns-repeated="1019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6, 4, 16, 10, 0)</text:p>
          </table:table-cell>
          <table:table-cell table:number-columns-repeated="2"/>
          <table:table-cell office:value-type="string">
            <text:p>McFunny</text:p>
          </table:table-cell>
          <table:table-cell table:number-columns-repeated="1019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6, 4, 15, 8, 0)</text:p>
          </table:table-cell>
          <table:table-cell table:number-columns-repeated="2"/>
          <table:table-cell office:value-type="string">
            <text:p>Squishy~</text:p>
          </table:table-cell>
          <table:table-cell table:number-columns-repeated="1019"/>
        </table:table-row>
        <table:table-row table:style-name="ro1">
          <table:table-cell office:value-type="string">
            <text:p>Shaine</text:p>
          </table:table-cell>
          <table:table-cell office:value-type="string">
            <text:p>(7, 5, 19, 12, 0)</text:p>
          </table:table-cell>
          <table:table-cell table:number-columns-repeated="2"/>
          <table:table-cell office:value-type="string">
            <text:p>Shaine</text:p>
          </table:table-cell>
          <table:table-cell table:number-columns-repeated="1019"/>
        </table:table-row>
        <table:table-row table:style-name="ro1">
          <table:table-cell office:value-type="string">
            <text:p>lucida</text:p>
          </table:table-cell>
          <table:table-cell office:value-type="string">
            <text:p>(3, 1, 6, 2, 0)</text:p>
          </table:table-cell>
          <table:table-cell table:number-columns-repeated="2"/>
          <table:table-cell office:value-type="string">
            <text:p>lucida</text:p>
          </table:table-cell>
          <table:table-cell table:number-columns-repeated="1019"/>
        </table:table-row>
        <table:table-row table:style-name="ro1">
          <table:table-cell office:value-type="string">
            <text:p>Koloax</text:p>
          </table:table-cell>
          <table:table-cell office:value-type="string">
            <text:p>(5, 3, 11, 7, 0)</text:p>
          </table:table-cell>
          <table:table-cell table:number-columns-repeated="2"/>
          <table:table-cell office:value-type="string">
            <text:p>Koloax</text:p>
          </table:table-cell>
          <table:table-cell table:number-columns-repeated="1019"/>
        </table:table-row>
        <table:table-row table:style-name="ro1">
          <table:table-cell office:value-type="string">
            <text:p>SomehowNerdy</text:p>
          </table:table-cell>
          <table:table-cell office:value-type="string">
            <text:p>(3, 1, 9, 4, 0)</text:p>
          </table:table-cell>
          <table:table-cell table:number-columns-repeated="2"/>
          <table:table-cell office:value-type="string">
            <text:p>SomehowNerdy</text:p>
          </table:table-cell>
          <table:table-cell table:number-columns-repeated="1019"/>
        </table:table-row>
        <table:table-row table:style-name="ro1">
          <table:table-cell office:value-type="string">
            <text:p>Ryeiscool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Ryeiscool</text:p>
          </table:table-cell>
          <table:table-cell table:number-columns-repeated="1019"/>
        </table:table-row>
        <table:table-row table:style-name="ro1">
          <table:table-cell office:value-type="string">
            <text:p>R3M1X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R3M1X</text:p>
          </table:table-cell>
          <table:table-cell table:number-columns-repeated="1019"/>
        </table:table-row>
        <table:table-row table:style-name="ro1">
          <table:table-cell office:value-type="string">
            <text:p>ChezFarach001</text:p>
          </table:table-cell>
          <table:table-cell office:value-type="string">
            <text:p>(4, 2, 8, 4, 0)</text:p>
          </table:table-cell>
          <table:table-cell table:number-columns-repeated="2"/>
          <table:table-cell office:value-type="string">
            <text:p>ChezFarach001</text:p>
          </table:table-cell>
          <table:table-cell table:number-columns-repeated="1019"/>
        </table:table-row>
        <table:table-row table:style-name="ro1">
          <table:table-cell office:value-type="string">
            <text:p>Mana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Mana</text:p>
          </table:table-cell>
          <table:table-cell table:number-columns-repeated="1019"/>
        </table:table-row>
        <table:table-row table:style-name="ro1">
          <table:table-cell office:value-type="string">
            <text:p>Namesskyy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Namesskyy</text:p>
          </table:table-cell>
          <table:table-cell table:number-columns-repeated="1019"/>
        </table:table-row>
        <table:table-row table:style-name="ro1">
          <table:table-cell office:value-type="string">
            <text:p>Papi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Papi</text:p>
          </table:table-cell>
          <table:table-cell table:number-columns-repeated="1019"/>
        </table:table-row>
        <table:table-row table:style-name="ro1">
          <table:table-cell office:value-type="string">
            <text:p>NotHbox</text:p>
          </table:table-cell>
          <table:table-cell office:value-type="string">
            <text:p>(5, 3, 11, 6, 0)</text:p>
          </table:table-cell>
          <table:table-cell table:number-columns-repeated="2"/>
          <table:table-cell office:value-type="string">
            <text:p>NotHbox</text:p>
          </table:table-cell>
          <table:table-cell table:number-columns-repeated="1019"/>
        </table:table-row>
        <table:table-row table:style-name="ro1">
          <table:table-cell office:value-type="string">
            <text:p>World Jade Center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World Jade Center</text:p>
          </table:table-cell>
          <table:table-cell table:number-columns-repeated="1019"/>
        </table:table-row>
        <table:table-row table:style-name="ro1">
          <table:table-cell office:value-type="string">
            <text:p>Doc Shock</text:p>
          </table:table-cell>
          <table:table-cell office:value-type="string">
            <text:p>(4, 2, 8, 4, 0)</text:p>
          </table:table-cell>
          <table:table-cell table:number-columns-repeated="2"/>
          <table:table-cell office:value-type="string">
            <text:p>Doc Shock</text:p>
          </table:table-cell>
          <table:table-cell table:number-columns-repeated="1019"/>
        </table:table-row>
        <table:table-row table:style-name="ro1">
          <table:table-cell office:value-type="string">
            <text:p>GoldenDark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GoldenDark</text:p>
          </table:table-cell>
          <table:table-cell table:number-columns-repeated="1019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5, 3, 12, 8, 0)</text:p>
          </table:table-cell>
          <table:table-cell table:number-columns-repeated="2"/>
          <table:table-cell office:value-type="string">
            <text:p>HaydenEatsShrimp</text:p>
          </table:table-cell>
          <table:table-cell table:number-columns-repeated="1019"/>
        </table:table-row>
        <table:table-row table:style-name="ro1">
          <table:table-cell office:value-type="string">
            <text:p>Saltstorm</text:p>
          </table:table-cell>
          <table:table-cell office:value-type="string">
            <text:p>(2, 0, 5, 1, 0)</text:p>
          </table:table-cell>
          <table:table-cell table:number-columns-repeated="2"/>
          <table:table-cell office:value-type="string">
            <text:p>Saltstorm</text:p>
          </table:table-cell>
          <table:table-cell table:number-columns-repeated="1019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3, 1, 6, 2, 0)</text:p>
          </table:table-cell>
          <table:table-cell table:number-columns-repeated="2"/>
          <table:table-cell office:value-type="string">
            <text:p>Chavalava</text:p>
          </table:table-cell>
          <table:table-cell table:number-columns-repeated="1019"/>
        </table:table-row>
        <table:table-row table:style-name="ro1">
          <table:table-cell office:value-type="string">
            <text:p>PrincessPopkorn</text:p>
          </table:table-cell>
          <table:table-cell office:value-type="string">
            <text:p>(1, 0, 2, 0, 1)</text:p>
          </table:table-cell>
          <table:table-cell table:number-columns-repeated="2"/>
          <table:table-cell office:value-type="string">
            <text:p>PrincessPopkorn</text:p>
          </table:table-cell>
          <table:table-cell table:number-columns-repeated="1019"/>
        </table:table-row>
        <table:table-row table:style-name="ro1">
          <table:table-cell office:value-type="string">
            <text:p>Kryon</text:p>
          </table:table-cell>
          <table:table-cell office:value-type="string">
            <text:p>(4, 2, 9, 4, 0)</text:p>
          </table:table-cell>
          <table:table-cell table:number-columns-repeated="2"/>
          <table:table-cell office:value-type="string">
            <text:p>Kryon</text:p>
          </table:table-cell>
          <table:table-cell table:number-columns-repeated="1019"/>
        </table:table-row>
        <table:table-row table:style-name="ro1">
          <table:table-cell office:value-type="string">
            <text:p>Serph</text:p>
          </table:table-cell>
          <table:table-cell office:value-type="string">
            <text:p>(4, 2, 9, 5, 0)</text:p>
          </table:table-cell>
          <table:table-cell table:number-columns-repeated="2"/>
          <table:table-cell office:value-type="string">
            <text:p>Serph</text:p>
          </table:table-cell>
          <table:table-cell table:number-columns-repeated="1019"/>
        </table:table-row>
        <table:table-row table:style-name="ro1">
          <table:table-cell office:value-type="string">
            <text:p>Karu!</text:p>
          </table:table-cell>
          <table:table-cell office:value-type="string">
            <text:p>(7, 5, 18, 12, 0)</text:p>
          </table:table-cell>
          <table:table-cell table:number-columns-repeated="2"/>
          <table:table-cell office:value-type="string">
            <text:p>Karu!</text:p>
          </table:table-cell>
          <table:table-cell table:number-columns-repeated="1019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3, 1, 6, 2, 0)</text:p>
          </table:table-cell>
          <table:table-cell table:number-columns-repeated="2"/>
          <table:table-cell office:value-type="string">
            <text:p>xXx_PeterGokuGriffin_xXx</text:p>
          </table:table-cell>
          <table:table-cell table:number-columns-repeated="1019"/>
        </table:table-row>
        <table:table-row table:style-name="ro1">
          <table:table-cell office:value-type="string">
            <text:p>Benji</text:p>
          </table:table-cell>
          <table:table-cell office:value-type="string">
            <text:p>(8, 6, 23, 13, 0)</text:p>
          </table:table-cell>
          <table:table-cell table:number-columns-repeated="2"/>
          <table:table-cell office:value-type="string">
            <text:p>Benji</text:p>
          </table:table-cell>
          <table:table-cell table:number-columns-repeated="1019"/>
        </table:table-row>
        <table:table-row table:style-name="ro1">
          <table:table-cell office:value-type="string">
            <text:p>Seal King Barbaros</text:p>
          </table:table-cell>
          <table:table-cell office:value-type="string">
            <text:p>(5, 3, 11, 7, 0)</text:p>
          </table:table-cell>
          <table:table-cell table:number-columns-repeated="2"/>
          <table:table-cell office:value-type="string">
            <text:p>Seal King Barbaros</text:p>
          </table:table-cell>
          <table:table-cell table:number-columns-repeated="1019"/>
        </table:table-row>
        <table:table-row table:style-name="ro1">
          <table:table-cell office:value-type="string">
            <text:p>Goblin</text:p>
          </table:table-cell>
          <table:table-cell office:value-type="string">
            <text:p>(8, 6, 20, 13, 0)</text:p>
          </table:table-cell>
          <table:table-cell table:number-columns-repeated="2"/>
          <table:table-cell office:value-type="string">
            <text:p>Goblin</text:p>
          </table:table-cell>
          <table:table-cell table:number-columns-repeated="1019"/>
        </table:table-row>
        <table:table-row table:style-name="ro1">
          <table:table-cell office:value-type="string">
            <text:p>poobii</text:p>
          </table:table-cell>
          <table:table-cell office:value-type="string">
            <text:p>(5, 3, 13, 7, 0)</text:p>
          </table:table-cell>
          <table:table-cell table:number-columns-repeated="2"/>
          <table:table-cell office:value-type="string">
            <text:p>poobii</text:p>
          </table:table-cell>
          <table:table-cell table:number-columns-repeated="1019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5, 3, 11, 7, 0)</text:p>
          </table:table-cell>
          <table:table-cell table:number-columns-repeated="2"/>
          <table:table-cell office:value-type="string">
            <text:p>WonderBread</text:p>
          </table:table-cell>
          <table:table-cell table:number-columns-repeated="1019"/>
        </table:table-row>
        <table:table-row table:style-name="ro1">
          <table:table-cell office:value-type="string">
            <text:p>fiend</text:p>
          </table:table-cell>
          <table:table-cell office:value-type="string">
            <text:p>(4, 2, 9, 5, 0)</text:p>
          </table:table-cell>
          <table:table-cell table:number-columns-repeated="2"/>
          <table:table-cell office:value-type="string">
            <text:p>fien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rardvar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rokenyew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Jovia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et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Lap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ahtzu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lowpez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Ricky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Quelit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aptain 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gag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od Stra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Cgrab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rot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rc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King Mom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tTon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enn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kusui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owi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loa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G Ki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hatOneGu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andBa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Sh4rk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Krud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anda</text:p>
          </table:table-cell>
          <table:table-cell table:number-columns-repeated="1019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urnament 2" table:style-name="ta6" table:print="false">
        <office:forms form:automatic-focus="false" form:apply-design-mode="false"/>
        <table:table-column table:style-name="co6" table:number-columns-repeated="1024" table:default-cell-style-name="Excel_20_Built-in_20_Normal"/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Attendees List</text:p>
          </table:table-cell>
          <table:table-cell table:number-columns-repeated="1019"/>
        </table:table-row>
        <table:table-row table:style-name="ro1">
          <table:table-cell office:value-type="string">
            <text:p>CCgrabs</text:p>
          </table:table-cell>
          <table:table-cell office:value-type="string">
            <text:p>(3, 1, 11, 3, 0)</text:p>
          </table:table-cell>
          <table:table-cell office:value-type="string">
            <text:p>Painus</text:p>
          </table:table-cell>
          <table:table-cell office:value-type="string">
            <text:p>(2, 1, 4, 2, 1)</text:p>
          </table:table-cell>
          <table:table-cell office:value-type="string">
            <text:p>CCgrabs</text:p>
          </table:table-cell>
          <table:table-cell table:number-columns-repeated="1019"/>
        </table:table-row>
        <table:table-row table:style-name="ro1">
          <table:table-cell office:value-type="string">
            <text:p>tgags</text:p>
          </table:table-cell>
          <table:table-cell office:value-type="string">
            <text:p>(2, 0, 8, 2, 0)</text:p>
          </table:table-cell>
          <table:table-cell office:value-type="string">
            <text:p>Road</text:p>
          </table:table-cell>
          <table:table-cell office:value-type="string">
            <text:p>(2, 0, 4, 0, 0)</text:p>
          </table:table-cell>
          <table:table-cell office:value-type="string">
            <text:p>tgags</text:p>
          </table:table-cell>
          <table:table-cell table:number-columns-repeated="1019"/>
        </table:table-row>
        <table:table-row table:style-name="ro1">
          <table:table-cell office:value-type="string">
            <text:p>Proto</text:p>
          </table:table-cell>
          <table:table-cell office:value-type="string">
            <text:p>(4, 2, 12, 6, 0)</text:p>
          </table:table-cell>
          <table:table-cell office:value-type="string">
            <text:p>Axl</text:p>
          </table:table-cell>
          <table:table-cell office:value-type="string">
            <text:p>(4, 2, 8, 4, 0)</text:p>
          </table:table-cell>
          <table:table-cell office:value-type="string">
            <text:p>Proto</text:p>
          </table:table-cell>
          <table:table-cell table:number-columns-repeated="1019"/>
        </table:table-row>
        <table:table-row table:style-name="ro1">
          <table:table-cell office:value-type="string">
            <text:p>Swiftspank</text:p>
          </table:table-cell>
          <table:table-cell office:value-type="string">
            <text:p>(2, 0, 6, 0, 0)</text:p>
          </table:table-cell>
          <table:table-cell office:value-type="string">
            <text:p>Galaxia</text:p>
          </table:table-cell>
          <table:table-cell office:value-type="string">
            <text:p>(2, 0, 4, 0, 0)</text:p>
          </table:table-cell>
          <table:table-cell office:value-type="string">
            <text:p>Swiftspank</text:p>
          </table:table-cell>
          <table:table-cell table:number-columns-repeated="1019"/>
        </table:table-row>
        <table:table-row table:style-name="ro1">
          <table:table-cell office:value-type="string">
            <text:p>Ahimelec Velez</text:p>
          </table:table-cell>
          <table:table-cell office:value-type="string">
            <text:p>(3, 1, 11, 3, 0)</text:p>
          </table:table-cell>
          <table:table-cell office:value-type="string">
            <text:p>EL Pingu</text:p>
          </table:table-cell>
          <table:table-cell office:value-type="string">
            <text:p>(2, 0, 4, 0, 0)</text:p>
          </table:table-cell>
          <table:table-cell office:value-type="string">
            <text:p>Ahimelec Velez</text:p>
          </table:table-cell>
          <table:table-cell table:number-columns-repeated="1019"/>
        </table:table-row>
        <table:table-row table:style-name="ro1">
          <table:table-cell office:value-type="string">
            <text:p>Abraham</text:p>
          </table:table-cell>
          <table:table-cell office:value-type="string">
            <text:p>(4, 2, 15, 9, 0)</text:p>
          </table:table-cell>
          <table:table-cell office:value-type="string">
            <text:p>Viprskreen</text:p>
          </table:table-cell>
          <table:table-cell office:value-type="string">
            <text:p>(0, 0, 0, 0, 2)</text:p>
          </table:table-cell>
          <table:table-cell office:value-type="string">
            <text:p>Abraham</text:p>
          </table:table-cell>
          <table:table-cell table:number-columns-repeated="1019"/>
        </table:table-row>
        <table:table-row table:style-name="ro1">
          <table:table-cell office:value-type="string">
            <text:p>Quelity</text:p>
          </table:table-cell>
          <table:table-cell office:value-type="string">
            <text:p>(3, 1, 9, 3, 0)</text:p>
          </table:table-cell>
          <table:table-cell office:value-type="string">
            <text:p>Sneakers O'Toole</text:p>
          </table:table-cell>
          <table:table-cell office:value-type="string">
            <text:p>(2, 0, 4, 0, 0)</text:p>
          </table:table-cell>
          <table:table-cell office:value-type="string">
            <text:p>Quelity</text:p>
          </table:table-cell>
          <table:table-cell table:number-columns-repeated="1019"/>
        </table:table-row>
        <table:table-row table:style-name="ro1">
          <table:table-cell office:value-type="string">
            <text:p>NotTony</text:p>
          </table:table-cell>
          <table:table-cell office:value-type="string">
            <text:p>(2, 0, 6, 0, 0)</text:p>
          </table:table-cell>
          <table:table-cell office:value-type="string">
            <text:p>DTheMan</text:p>
          </table:table-cell>
          <table:table-cell office:value-type="string">
            <text:p>(0, 0, 0, 0, 2)</text:p>
          </table:table-cell>
          <table:table-cell office:value-type="string">
            <text:p>NotTony</text:p>
          </table:table-cell>
          <table:table-cell table:number-columns-repeated="1019"/>
        </table:table-row>
        <table:table-row table:style-name="ro1">
          <table:table-cell office:value-type="string">
            <text:p>Titan</text:p>
          </table:table-cell>
          <table:table-cell office:value-type="string">
            <text:p>(3, 1, 9, 3, 0)</text:p>
          </table:table-cell>
          <table:table-cell office:value-type="string">
            <text:p>sev7x</text:p>
          </table:table-cell>
          <table:table-cell office:value-type="string">
            <text:p>(3, 1, 6, 2, 0)</text:p>
          </table:table-cell>
          <table:table-cell office:value-type="string">
            <text:p>Titan</text:p>
          </table:table-cell>
          <table:table-cell table:number-columns-repeated="1019"/>
        </table:table-row>
        <table:table-row table:style-name="ro1">
          <table:table-cell office:value-type="string">
            <text:p>that0neguy</text:p>
          </table:table-cell>
          <table:table-cell office:value-type="string">
            <text:p>(2, 0, 6, 0, 0)</text:p>
          </table:table-cell>
          <table:table-cell office:value-type="string">
            <text:p>Czar</text:p>
          </table:table-cell>
          <table:table-cell office:value-type="string">
            <text:p>(2, 0, 4, 0, 0)</text:p>
          </table:table-cell>
          <table:table-cell office:value-type="string">
            <text:p>that0neguy</text:p>
          </table:table-cell>
          <table:table-cell table:number-columns-repeated="1019"/>
        </table:table-row>
        <table:table-row table:style-name="ro1">
          <table:table-cell office:value-type="string">
            <text:p>Jovian</text:p>
          </table:table-cell>
          <table:table-cell office:value-type="string">
            <text:p>(2, 0, 6, 0, 0)</text:p>
          </table:table-cell>
          <table:table-cell office:value-type="string">
            <text:p>Epic_Gabriel</text:p>
          </table:table-cell>
          <table:table-cell office:value-type="string">
            <text:p>(7, 5, 17, 12, 0)</text:p>
          </table:table-cell>
          <table:table-cell office:value-type="string">
            <text:p>Jovian</text:p>
          </table:table-cell>
          <table:table-cell table:number-columns-repeated="1019"/>
        </table:table-row>
        <table:table-row table:style-name="ro1">
          <table:table-cell office:value-type="string">
            <text:p>pSh4rky</text:p>
          </table:table-cell>
          <table:table-cell office:value-type="string">
            <text:p>(0, 0, 0, 0, 2)</text:p>
          </table:table-cell>
          <table:table-cell office:value-type="string">
            <text:p>ChezFarach001</text:p>
          </table:table-cell>
          <table:table-cell office:value-type="string">
            <text:p>(3, 1, 8, 3, 0)</text:p>
          </table:table-cell>
          <table:table-cell office:value-type="string">
            <text:p>pSh4rky</text:p>
          </table:table-cell>
          <table:table-cell table:number-columns-repeated="1019"/>
        </table:table-row>
        <table:table-row table:style-name="ro1">
          <table:table-cell office:value-type="string">
            <text:p>Olsen</text:p>
          </table:table-cell>
          <table:table-cell office:value-type="string">
            <text:p>(4, 2, 12, 6, 0)</text:p>
          </table:table-cell>
          <table:table-cell office:value-type="string">
            <text:p>Wiccan</text:p>
          </table:table-cell>
          <table:table-cell office:value-type="string">
            <text:p>(3, 1, 7, 3, 0)</text:p>
          </table:table-cell>
          <table:table-cell office:value-type="string">
            <text:p>Olsen</text:p>
          </table:table-cell>
          <table:table-cell table:number-columns-repeated="1019"/>
        </table:table-row>
        <table:table-row table:style-name="ro1">
          <table:table-cell office:value-type="string">
            <text:p>Vintner</text:p>
          </table:table-cell>
          <table:table-cell office:value-type="string">
            <text:p>(2, 0, 6, 0, 0)</text:p>
          </table:table-cell>
          <table:table-cell office:value-type="string">
            <text:p>Plummet</text:p>
          </table:table-cell>
          <table:table-cell office:value-type="string">
            <text:p>(5, 3, 10, 6, 0)</text:p>
          </table:table-cell>
          <table:table-cell office:value-type="string">
            <text:p>Vintner</text:p>
          </table:table-cell>
          <table:table-cell table:number-columns-repeated="1019"/>
        </table:table-row>
        <table:table-row table:style-name="ro1">
          <table:table-cell office:value-type="string">
            <text:p>okusuii</text:p>
          </table:table-cell>
          <table:table-cell office:value-type="string">
            <text:p>(2, 0, 6, 0, 0)</text:p>
          </table:table-cell>
          <table:table-cell office:value-type="string">
            <text:p>fiend</text:p>
          </table:table-cell>
          <table:table-cell office:value-type="string">
            <text:p>(5, 3, 10, 6, 0)</text:p>
          </table:table-cell>
          <table:table-cell office:value-type="string">
            <text:p>okusuii</text:p>
          </table:table-cell>
          <table:table-cell table:number-columns-repeated="1019"/>
        </table:table-row>
        <table:table-row table:style-name="ro1">
          <table:table-cell office:value-type="string">
            <text:p>A-K SiN</text:p>
          </table:table-cell>
          <table:table-cell office:value-type="string">
            <text:p>(0, 0, 0, 0, 2)</text:p>
          </table:table-cell>
          <table:table-cell office:value-type="string">
            <text:p>Newo</text:p>
          </table:table-cell>
          <table:table-cell office:value-type="string">
            <text:p>(7, 5, 20, 11, 0)</text:p>
          </table:table-cell>
          <table:table-cell office:value-type="string">
            <text:p>A-K SiN</text:p>
          </table:table-cell>
          <table:table-cell table:number-columns-repeated="1019"/>
        </table:table-row>
        <table:table-row table:style-name="ro1">
          <table:table-cell office:value-type="string">
            <text:p>Litt</text:p>
          </table:table-cell>
          <table:table-cell office:value-type="string">
            <text:p>(3, 1, 10, 4, 0)</text:p>
          </table:table-cell>
          <table:table-cell office:value-type="string">
            <text:p>HaydenEatsShrimp</text:p>
          </table:table-cell>
          <table:table-cell office:value-type="string">
            <text:p>(5, 3, 12, 7, 0)</text:p>
          </table:table-cell>
          <table:table-cell office:value-type="string">
            <text:p>Litt</text:p>
          </table:table-cell>
          <table:table-cell table:number-columns-repeated="1019"/>
        </table:table-row>
        <table:table-row table:style-name="ro1">
          <table:table-cell office:value-type="string">
            <text:p>ted.</text:p>
          </table:table-cell>
          <table:table-cell office:value-type="string">
            <text:p>(3, 1, 11, 5, 0)</text:p>
          </table:table-cell>
          <table:table-cell office:value-type="string">
            <text:p>Sr-Huge</text:p>
          </table:table-cell>
          <table:table-cell office:value-type="string">
            <text:p>(5, 3, 11, 6, 0)</text:p>
          </table:table-cell>
          <table:table-cell office:value-type="string">
            <text:p>ted.</text:p>
          </table:table-cell>
          <table:table-cell table:number-columns-repeated="1019"/>
        </table:table-row>
        <table:table-row table:style-name="ro1">
          <table:table-cell office:value-type="string">
            <text:p>Krudo</text:p>
          </table:table-cell>
          <table:table-cell office:value-type="string">
            <text:p>(7, 5, 26, 16, 0)</text:p>
          </table:table-cell>
          <table:table-cell office:value-type="string">
            <text:p>Koloax</text:p>
          </table:table-cell>
          <table:table-cell office:value-type="string">
            <text:p>(8, 6, 20, 14, 0)</text:p>
          </table:table-cell>
          <table:table-cell office:value-type="string">
            <text:p>Krudo</text:p>
          </table:table-cell>
          <table:table-cell table:number-columns-repeated="1019"/>
        </table:table-row>
        <table:table-row table:style-name="ro1">
          <table:table-cell office:value-type="string">
            <text:p>AzLu</text:p>
          </table:table-cell>
          <table:table-cell office:value-type="string">
            <text:p>(3, 1, 11, 5, 0)</text:p>
          </table:table-cell>
          <table:table-cell office:value-type="string">
            <text:p>My Dad</text:p>
          </table:table-cell>
          <table:table-cell office:value-type="string">
            <text:p>(4, 2, 10, 6, 0)</text:p>
          </table:table-cell>
          <table:table-cell office:value-type="string">
            <text:p>AzLu</text:p>
          </table:table-cell>
          <table:table-cell table:number-columns-repeated="1019"/>
        </table:table-row>
        <table:table-row table:style-name="ro1">
          <table:table-cell office:value-type="string">
            <text:p>Peele</text:p>
          </table:table-cell>
          <table:table-cell office:value-type="string">
            <text:p>(0, 0, 0, 0, 2)</text:p>
          </table:table-cell>
          <table:table-cell office:value-type="string">
            <text:p>nap</text:p>
          </table:table-cell>
          <table:table-cell office:value-type="string">
            <text:p>(4, 2, 8, 4, 0)</text:p>
          </table:table-cell>
          <table:table-cell office:value-type="string">
            <text:p>Peele</text:p>
          </table:table-cell>
          <table:table-cell table:number-columns-repeated="1019"/>
        </table:table-row>
        <table:table-row table:style-name="ro1">
          <table:table-cell office:value-type="string">
            <text:p>Komodo</text:p>
          </table:table-cell>
          <table:table-cell office:value-type="string">
            <text:p>(7, 5, 25, 17, 0)</text:p>
          </table:table-cell>
          <table:table-cell office:value-type="string">
            <text:p>Floppy_duck049</text:p>
          </table:table-cell>
          <table:table-cell office:value-type="string">
            <text:p>(2, 0, 4, 0, 0)</text:p>
          </table:table-cell>
          <table:table-cell office:value-type="string">
            <text:p>Komodo</text:p>
          </table:table-cell>
          <table:table-cell table:number-columns-repeated="1019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6, 4, 27, 15, 0)</text:p>
          </table:table-cell>
          <table:table-cell office:value-type="string">
            <text:p>nuoca</text:p>
          </table:table-cell>
          <table:table-cell office:value-type="string">
            <text:p>(0, 0, 0, 0, 2)</text:p>
          </table:table-cell>
          <table:table-cell office:value-type="string">
            <text:p>Captain G</text:p>
          </table:table-cell>
          <table:table-cell table:number-columns-repeated="1019"/>
        </table:table-row>
        <table:table-row table:style-name="ro1">
          <table:table-cell office:value-type="string">
            <text:p>JChu</text:p>
          </table:table-cell>
          <table:table-cell office:value-type="string">
            <text:p>(6, 4, 23, 16, 0)</text:p>
          </table:table-cell>
          <table:table-cell office:value-type="string">
            <text:p>Doormatt</text:p>
          </table:table-cell>
          <table:table-cell office:value-type="string">
            <text:p>(3, 1, 6, 2, 0)</text:p>
          </table:table-cell>
          <table:table-cell office:value-type="string">
            <text:p>JChu</text:p>
          </table:table-cell>
          <table:table-cell table:number-columns-repeated="1019"/>
        </table:table-row>
        <table:table-row table:style-name="ro1">
          <table:table-cell office:value-type="string">
            <text:p>Yeti</text:p>
          </table:table-cell>
          <table:table-cell office:value-type="string">
            <text:p>(4, 2, 15, 8, 0)</text:p>
          </table:table-cell>
          <table:table-cell office:value-type="string">
            <text:p>Fapple</text:p>
          </table:table-cell>
          <table:table-cell office:value-type="string">
            <text:p>(2, 0, 4, 0, 0)</text:p>
          </table:table-cell>
          <table:table-cell office:value-type="string">
            <text:p>Yeti</text:p>
          </table:table-cell>
          <table:table-cell table:number-columns-repeated="1019"/>
        </table:table-row>
        <table:table-row table:style-name="ro1">
          <table:table-cell office:value-type="string">
            <text:p>Howie</text:p>
          </table:table-cell>
          <table:table-cell office:value-type="string">
            <text:p>(4, 2, 12, 6, 0)</text:p>
          </table:table-cell>
          <table:table-cell office:value-type="string">
            <text:p>Vinny, The Lick</text:p>
          </table:table-cell>
          <table:table-cell office:value-type="string">
            <text:p>(7, 5, 14, 10, 0)</text:p>
          </table:table-cell>
          <table:table-cell office:value-type="string">
            <text:p>Howie</text:p>
          </table:table-cell>
          <table:table-cell table:number-columns-repeated="1019"/>
        </table:table-row>
        <table:table-row table:style-name="ro1">
          <table:table-cell office:value-type="string">
            <text:p>OG Kid</text:p>
          </table:table-cell>
          <table:table-cell office:value-type="string">
            <text:p>(4, 2, 15, 9, 0)</text:p>
          </table:table-cell>
          <table:table-cell office:value-type="string">
            <text:p>Synvy</text:p>
          </table:table-cell>
          <table:table-cell office:value-type="string">
            <text:p>(2, 0, 4, 0, 0)</text:p>
          </table:table-cell>
          <table:table-cell office:value-type="string">
            <text:p>OG Kid</text:p>
          </table:table-cell>
          <table:table-cell table:number-columns-repeated="1019"/>
        </table:table-row>
        <table:table-row table:style-name="ro1">
          <table:table-cell office:value-type="string">
            <text:p>ESAM</text:p>
          </table:table-cell>
          <table:table-cell office:value-type="string">
            <text:p>(3, 1, 12, 4, 0)</text:p>
          </table:table-cell>
          <table:table-cell office:value-type="string">
            <text:p>StepKnightUp</text:p>
          </table:table-cell>
          <table:table-cell office:value-type="string">
            <text:p>(4, 2, 9, 5, 0)</text:p>
          </table:table-cell>
          <table:table-cell office:value-type="string">
            <text:p>ESAM</text:p>
          </table:table-cell>
          <table:table-cell table:number-columns-repeated="1019"/>
        </table:table-row>
        <table:table-row table:style-name="ro1">
          <table:table-cell office:value-type="string">
            <text:p>Ricky6</text:p>
          </table:table-cell>
          <table:table-cell office:value-type="string">
            <text:p>(4, 2, 15, 8, 0)</text:p>
          </table:table-cell>
          <table:table-cell office:value-type="string">
            <text:p>aelo.plays</text:p>
          </table:table-cell>
          <table:table-cell office:value-type="string">
            <text:p>(2, 0, 4, 0, 0)</text:p>
          </table:table-cell>
          <table:table-cell office:value-type="string">
            <text:p>Ricky6</text:p>
          </table:table-cell>
          <table:table-cell table:number-columns-repeated="1019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6, 6, 19, 18, 0)</text:p>
          </table:table-cell>
          <table:table-cell office:value-type="string">
            <text:p>JediSmash</text:p>
          </table:table-cell>
          <table:table-cell office:value-type="string">
            <text:p>(3, 1, 7, 2, 0)</text:p>
          </table:table-cell>
          <table:table-cell office:value-type="string">
            <text:p>Hungrybox</text:p>
          </table:table-cell>
          <table:table-cell table:number-columns-repeated="1019"/>
        </table:table-row>
        <table:table-row table:style-name="ro1">
          <table:table-cell office:value-type="string">
            <text:p>SandBag</text:p>
          </table:table-cell>
          <table:table-cell office:value-type="string">
            <text:p>(4, 2, 16, 6, 0)</text:p>
          </table:table-cell>
          <table:table-cell office:value-type="string">
            <text:p>Rondon</text:p>
          </table:table-cell>
          <table:table-cell office:value-type="string">
            <text:p>(5, 3, 12, 7, 0)</text:p>
          </table:table-cell>
          <table:table-cell office:value-type="string">
            <text:p>SandBag</text:p>
          </table:table-cell>
          <table:table-cell table:number-columns-repeated="1019"/>
        </table:table-row>
        <table:table-row table:style-name="ro1">
          <table:table-cell office:value-type="string">
            <text:p>Hungry Pigeon</text:p>
          </table:table-cell>
          <table:table-cell office:value-type="string">
            <text:p>(4, 2, 14, 8, 0)</text:p>
          </table:table-cell>
          <table:table-cell office:value-type="string">
            <text:p>Kobe</text:p>
          </table:table-cell>
          <table:table-cell office:value-type="string">
            <text:p>(7, 5, 22, 15, 0)</text:p>
          </table:table-cell>
          <table:table-cell office:value-type="string">
            <text:p>Hungry Pigeon</text:p>
          </table:table-cell>
          <table:table-cell table:number-columns-repeated="1019"/>
        </table:table-row>
        <table:table-row table:style-name="ro1">
          <table:table-cell office:value-type="string">
            <text:p>Gahtzu</text:p>
          </table:table-cell>
          <table:table-cell office:value-type="string">
            <text:p>(6, 4, 24, 16, 0)</text:p>
          </table:table-cell>
          <table:table-cell office:value-type="string">
            <text:p>Twilight</text:p>
          </table:table-cell>
          <table:table-cell office:value-type="string">
            <text:p>(3, 1, 7, 3, 0)</text:p>
          </table:table-cell>
          <table:table-cell office:value-type="string">
            <text:p>Gahtzu</text:p>
          </table:table-cell>
          <table:table-cell table:number-columns-repeated="1019"/>
        </table:table-row>
        <table:table-row table:style-name="ro1">
          <table:table-cell office:value-type="string">
            <text:p>brokenyew</text:p>
          </table:table-cell>
          <table:table-cell office:value-type="string">
            <text:p>(5, 3, 17, 9, 0)</text:p>
          </table:table-cell>
          <table:table-cell office:value-type="string">
            <text:p>Papi</text:p>
          </table:table-cell>
          <table:table-cell office:value-type="string">
            <text:p>(2, 0, 4, 0, 0)</text:p>
          </table:table-cell>
          <table:table-cell office:value-type="string">
            <text:p>brokenyew</text:p>
          </table:table-cell>
          <table:table-cell table:number-columns-repeated="1019"/>
        </table:table-row>
        <table:table-row table:style-name="ro1">
          <table:table-cell office:value-type="string">
            <text:p>Jfalco</text:p>
          </table:table-cell>
          <table:table-cell office:value-type="string">
            <text:p>(3, 1, 9, 3, 0)</text:p>
          </table:table-cell>
          <table:table-cell office:value-type="string">
            <text:p>Seal King Barbaros</text:p>
          </table:table-cell>
          <table:table-cell office:value-type="string">
            <text:p>(7, 5, 17, 10, 0)</text:p>
          </table:table-cell>
          <table:table-cell office:value-type="string">
            <text:p>Jfalco</text:p>
          </table:table-cell>
          <table:table-cell table:number-columns-repeated="1019"/>
        </table:table-row>
        <table:table-row table:style-name="ro1">
          <table:table-cell office:value-type="string">
            <text:p>Panda</text:p>
          </table:table-cell>
          <table:table-cell office:value-type="string">
            <text:p>(7, 5, 28, 15, 0)</text:p>
          </table:table-cell>
          <table:table-cell office:value-type="string">
            <text:p>Hungrybox</text:p>
          </table:table-cell>
          <table:table-cell office:value-type="string">
            <text:p>(7, 5, 18, 10, 0)</text:p>
          </table:table-cell>
          <table:table-cell office:value-type="string">
            <text:p>Panda</text:p>
          </table:table-cell>
          <table:table-cell table:number-columns-repeated="1019"/>
        </table:table-row>
        <table:table-row table:style-name="ro1">
          <table:table-cell office:value-type="string">
            <text:p>Sneakywill</text:p>
          </table:table-cell>
          <table:table-cell office:value-type="string">
            <text:p>(5, 3, 21, 13, 0)</text:p>
          </table:table-cell>
          <table:table-cell office:value-type="string">
            <text:p>Venikki</text:p>
          </table:table-cell>
          <table:table-cell office:value-type="string">
            <text:p>(4, 2, 11, 6, 0)</text:p>
          </table:table-cell>
          <table:table-cell office:value-type="string">
            <text:p>Sneakywill</text:p>
          </table:table-cell>
          <table:table-cell table:number-columns-repeated="1019"/>
        </table:table-row>
        <table:table-row table:style-name="ro1">
          <table:table-cell office:value-type="string">
            <text:p>Kip</text:p>
          </table:table-cell>
          <table:table-cell office:value-type="string">
            <text:p>(3, 1, 11, 5, 0)</text:p>
          </table:table-cell>
          <table:table-cell office:value-type="string">
            <text:p>MrNubs</text:p>
          </table:table-cell>
          <table:table-cell office:value-type="string">
            <text:p>(3, 1, 9, 4, 0)</text:p>
          </table:table-cell>
          <table:table-cell office:value-type="string">
            <text:p>Kip</text:p>
          </table:table-cell>
          <table:table-cell table:number-columns-repeated="1019"/>
        </table:table-row>
        <table:table-row table:style-name="ro1">
          <table:table-cell office:value-type="string">
            <text:p>King Momo</text:p>
          </table:table-cell>
          <table:table-cell office:value-type="string">
            <text:p>(4, 2, 14, 8, 0)</text:p>
          </table:table-cell>
          <table:table-cell office:value-type="string">
            <text:p>juno</text:p>
          </table:table-cell>
          <table:table-cell office:value-type="string">
            <text:p>(5, 3, 14, 8, 0)</text:p>
          </table:table-cell>
          <table:table-cell office:value-type="string">
            <text:p>King Momo</text:p>
          </table:table-cell>
          <table:table-cell table:number-columns-repeated="1019"/>
        </table:table-row>
        <table:table-row table:style-name="ro1">
          <table:table-cell office:value-type="string">
            <text:p>Jape</text:p>
          </table:table-cell>
          <table:table-cell office:value-type="string">
            <text:p>(3, 1, 11, 4, 0)</text:p>
          </table:table-cell>
          <table:table-cell office:value-type="string">
            <text:p>WonderBread</text:p>
          </table:table-cell>
          <table:table-cell office:value-type="string">
            <text:p>(5, 3, 11, 6, 0)</text:p>
          </table:table-cell>
          <table:table-cell office:value-type="string">
            <text:p>Jape</text:p>
          </table:table-cell>
          <table:table-cell table:number-columns-repeated="1019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6, 4, 23, 13, 0)</text:p>
          </table:table-cell>
          <table:table-cell office:value-type="string">
            <text:p>Pellonian</text:p>
          </table:table-cell>
          <table:table-cell office:value-type="string">
            <text:p>(3, 1, 6, 2, 0)</text:p>
          </table:table-cell>
          <table:table-cell office:value-type="string">
            <text:p>Slowpez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endragon</text:p>
          </table:table-cell>
          <table:table-cell office:value-type="string">
            <text:p>(3, 1, 7, 3, 0)</text:p>
          </table:table-cell>
          <table:table-cell office:value-type="string">
            <text:p>Painu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aibaman</text:p>
          </table:table-cell>
          <table:table-cell office:value-type="string">
            <text:p>(3, 1, 6, 2, 0)</text:p>
          </table:table-cell>
          <table:table-cell office:value-type="string">
            <text:p>Roa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litz</text:p>
          </table:table-cell>
          <table:table-cell office:value-type="string">
            <text:p>(2, 0, 4, 0, 0)</text:p>
          </table:table-cell>
          <table:table-cell office:value-type="string">
            <text:p>Ax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havalava</text:p>
          </table:table-cell>
          <table:table-cell office:value-type="string">
            <text:p>(3, 1, 6, 2, 0)</text:p>
          </table:table-cell>
          <table:table-cell office:value-type="string">
            <text:p>Galaxi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XIX</text:p>
          </table:table-cell>
          <table:table-cell office:value-type="string">
            <text:p>(2, 0, 4, 0, 0)</text:p>
          </table:table-cell>
          <table:table-cell office:value-type="string">
            <text:p>EL Pingu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cond Floor Basement</text:p>
          </table:table-cell>
          <table:table-cell office:value-type="string">
            <text:p>(6, 4, 14, 9, 0)</text:p>
          </table:table-cell>
          <table:table-cell office:value-type="string">
            <text:p>Viprsk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r.Feeny</text:p>
          </table:table-cell>
          <table:table-cell office:value-type="string">
            <text:p>(3, 1, 6, 2, 0)</text:p>
          </table:table-cell>
          <table:table-cell office:value-type="string">
            <text:p>Sneakers O'Too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cto</text:p>
          </table:table-cell>
          <table:table-cell office:value-type="string">
            <text:p>(3, 1, 6, 2, 0)</text:p>
          </table:table-cell>
          <table:table-cell office:value-type="string">
            <text:p>DTheMa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IRUSH</text:p>
          </table:table-cell>
          <table:table-cell office:value-type="string">
            <text:p>(2, 0, 4, 0, 0)</text:p>
          </table:table-cell>
          <table:table-cell office:value-type="string">
            <text:p>sev7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yperLuvsGod</text:p>
          </table:table-cell>
          <table:table-cell office:value-type="string">
            <text:p>(2, 0, 4, 0, 0)</text:p>
          </table:table-cell>
          <table:table-cell office:value-type="string">
            <text:p>Cz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oBell</text:p>
          </table:table-cell>
          <table:table-cell office:value-type="string">
            <text:p>(0, 0, 0, 0, 2)</text:p>
          </table:table-cell>
          <table:table-cell office:value-type="string">
            <text:p>Epic_Gabrie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SAM</text:p>
          </table:table-cell>
          <table:table-cell office:value-type="string">
            <text:p>(5, 3, 12, 8, 0)</text:p>
          </table:table-cell>
          <table:table-cell office:value-type="string">
            <text:p>ChezFarach0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quishy~</text:p>
          </table:table-cell>
          <table:table-cell office:value-type="string">
            <text:p>(5, 3, 11, 6, 0)</text:p>
          </table:table-cell>
          <table:table-cell office:value-type="string">
            <text:p>Wicca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Narwhal</text:p>
          </table:table-cell>
          <table:table-cell office:value-type="string">
            <text:p>(3, 1, 8, 4, 0)</text:p>
          </table:table-cell>
          <table:table-cell office:value-type="string">
            <text:p>Plumme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Anthzeny</text:p>
          </table:table-cell>
          <table:table-cell office:value-type="string">
            <text:p>(4, 2, 9, 5, 0)</text:p>
          </table:table-cell>
          <table:table-cell office:value-type="string">
            <text:p>fie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tilios</text:p>
          </table:table-cell>
          <table:table-cell office:value-type="string">
            <text:p>(3, 1, 7, 3, 0)</text:p>
          </table:table-cell>
          <table:table-cell office:value-type="string">
            <text:p>New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DM</text:p>
          </table:table-cell>
          <table:table-cell office:value-type="string">
            <text:p>(10, 8, 33, 23, 0)</text:p>
          </table:table-cell>
          <table:table-cell office:value-type="string">
            <text:p>HaydenEatsShrim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Zarberian</text:p>
          </table:table-cell>
          <table:table-cell office:value-type="string">
            <text:p>(6, 4, 16, 8, 0)</text:p>
          </table:table-cell>
          <table:table-cell office:value-type="string">
            <text:p>Sr-Hu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NotHbox</text:p>
          </table:table-cell>
          <table:table-cell office:value-type="string">
            <text:p>(4, 2, 9, 5, 0)</text:p>
          </table:table-cell>
          <table:table-cell office:value-type="string">
            <text:p>Koloa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NessQuik</text:p>
          </table:table-cell>
          <table:table-cell office:value-type="string">
            <text:p>(6, 4, 12, 8, 0)</text:p>
          </table:table-cell>
          <table:table-cell office:value-type="string">
            <text:p>My Da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oobii</text:p>
          </table:table-cell>
          <table:table-cell office:value-type="string">
            <text:p>(3, 1, 7, 3, 0)</text:p>
          </table:table-cell>
          <table:table-cell office:value-type="string">
            <text:p>na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xXx_PeterGokuGriffin_xXx</text:p>
          </table:table-cell>
          <table:table-cell office:value-type="string">
            <text:p>(5, 3, 11, 6, 0)</text:p>
          </table:table-cell>
          <table:table-cell office:value-type="string">
            <text:p>Floppy_duck04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UpChuck</text:p>
          </table:table-cell>
          <table:table-cell office:value-type="string">
            <text:p>(4, 2, 9, 5, 0)</text:p>
          </table:table-cell>
          <table:table-cell office:value-type="string">
            <text:p>nuoc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DiRT</text:p>
          </table:table-cell>
          <table:table-cell office:value-type="string">
            <text:p>(2, 0, 4, 0, 0)</text:p>
          </table:table-cell>
          <table:table-cell office:value-type="string">
            <text:p>Doormat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picywingz11</text:p>
          </table:table-cell>
          <table:table-cell office:value-type="string">
            <text:p>(3, 1, 6, 2, 0)</text:p>
          </table:table-cell>
          <table:table-cell office:value-type="string">
            <text:p>Fapp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tPain</text:p>
          </table:table-cell>
          <table:table-cell office:value-type="string">
            <text:p>(0, 0, 0, 0, 2)</text:p>
          </table:table-cell>
          <table:table-cell office:value-type="string">
            <text:p>Vinny, The Li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yamaokai</text:p>
          </table:table-cell>
          <table:table-cell office:value-type="string">
            <text:p>(3, 1, 6, 2, 0)</text:p>
          </table:table-cell>
          <table:table-cell office:value-type="string">
            <text:p>Synv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na</text:p>
          </table:table-cell>
          <table:table-cell office:value-type="string">
            <text:p>(2, 0, 4, 0, 0)</text:p>
          </table:table-cell>
          <table:table-cell office:value-type="string">
            <text:p>StepKnightU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Awsmsun</text:p>
          </table:table-cell>
          <table:table-cell office:value-type="string">
            <text:p>(5, 3, 11, 6, 0)</text:p>
          </table:table-cell>
          <table:table-cell office:value-type="string">
            <text:p>aelo.play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yeiscool</text:p>
          </table:table-cell>
          <table:table-cell office:value-type="string">
            <text:p>(3, 1, 6, 2, 0)</text:p>
          </table:table-cell>
          <table:table-cell office:value-type="string">
            <text:p>JediSmas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!Mama_Mia!</text:p>
          </table:table-cell>
          <table:table-cell office:value-type="string">
            <text:p>(3, 1, 6, 2, 0)</text:p>
          </table:table-cell>
          <table:table-cell office:value-type="string">
            <text:p>Rond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ob</text:p>
          </table:table-cell>
          <table:table-cell office:value-type="string">
            <text:p>(2, 0, 4, 0, 0)</text:p>
          </table:table-cell>
          <table:table-cell office:value-type="string">
            <text:p>Kob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ean</text:p>
          </table:table-cell>
          <table:table-cell office:value-type="string">
            <text:p>(7, 5, 17, 12, 0)</text:p>
          </table:table-cell>
          <table:table-cell office:value-type="string">
            <text:p>Twiligh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hnissugah</text:p>
          </table:table-cell>
          <table:table-cell office:value-type="string">
            <text:p>(2, 0, 4, 0, 0)</text:p>
          </table:table-cell>
          <table:table-cell office:value-type="string">
            <text:p>Pap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tarZ</text:p>
          </table:table-cell>
          <table:table-cell office:value-type="string">
            <text:p>(6, 4, 13, 8, 0)</text:p>
          </table:table-cell>
          <table:table-cell office:value-type="string">
            <text:p>Seal King Barbaro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uMiSaDi</text:p>
          </table:table-cell>
          <table:table-cell office:value-type="string">
            <text:p>(3, 1, 8, 3, 0)</text:p>
          </table:table-cell>
          <table:table-cell office:value-type="string">
            <text:p>Venikk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ki</text:p>
          </table:table-cell>
          <table:table-cell office:value-type="string">
            <text:p>(7, 5, 19, 12, 0)</text:p>
          </table:table-cell>
          <table:table-cell office:value-type="string">
            <text:p>MrNub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hand</text:p>
          </table:table-cell>
          <table:table-cell office:value-type="string">
            <text:p>(4, 2, 8, 4, 0)</text:p>
          </table:table-cell>
          <table:table-cell office:value-type="string">
            <text:p>jun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DarthCJ8</text:p>
          </table:table-cell>
          <table:table-cell office:value-type="string">
            <text:p>(4, 2, 9, 5, 0)</text:p>
          </table:table-cell>
          <table:table-cell office:value-type="string">
            <text:p>WonderBrea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haine</text:p>
          </table:table-cell>
          <table:table-cell office:value-type="string">
            <text:p>(8, 7, 25, 18, 0)</text:p>
          </table:table-cell>
          <table:table-cell office:value-type="string">
            <text:p>Pellonia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hez</text:p>
          </table:table-cell>
          <table:table-cell office:value-type="string">
            <text:p>(2, 0, 5, 1, 0)</text:p>
          </table:table-cell>
          <table:table-cell office:value-type="string">
            <text:p>Pendrag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VileSpecter</text:p>
          </table:table-cell>
          <table:table-cell office:value-type="string">
            <text:p>(0, 0, 0, 0, 2)</text:p>
          </table:table-cell>
          <table:table-cell office:value-type="string">
            <text:p>saibama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trobics</text:p>
          </table:table-cell>
          <table:table-cell office:value-type="string">
            <text:p>(0, 0, 0, 0, 2)</text:p>
          </table:table-cell>
          <table:table-cell office:value-type="string">
            <text:p>Blitz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amersonT</text:p>
          </table:table-cell>
          <table:table-cell office:value-type="string">
            <text:p>(4, 2, 10, 5, 0)</text:p>
          </table:table-cell>
          <table:table-cell office:value-type="string">
            <text:p>Chavalav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LX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Floor Basem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Mr.Feen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ct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RU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yperLuvsGo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ooBel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quishy~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arwh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Anthzen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tilio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M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arberia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tH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essQui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oobi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xXx_PeterGokuGriffin_xX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pChu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iR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picywingz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ntP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maoka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Man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Awsmsu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Ryeiscoo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!Mama_Mia!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Rob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lea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hnissuga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tarZ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LuMiSaD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k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han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rthCJ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hain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hez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VileSpect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trobic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amersonT</text:p>
          </table:table-cell>
          <table:table-cell table:number-columns-repeated="1019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urnament 3" table:style-name="ta7" table:print="false">
        <office:forms form:automatic-focus="false" form:apply-design-mode="false"/>
        <table:table-column table:style-name="co6" table:number-columns-repeated="1024" table:default-cell-style-name="Excel_20_Built-in_20_Normal"/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Attendees List</text:p>
          </table:table-cell>
          <table:table-cell table:number-columns-repeated="1019"/>
        </table:table-row>
        <table:table-row table:style-name="ro1">
          <table:table-cell office:value-type="string">
            <text:p>Yho!</text:p>
          </table:table-cell>
          <table:table-cell office:value-type="string">
            <text:p>(4, 2, 15, 6, 0)</text:p>
          </table:table-cell>
          <table:table-cell office:value-type="string">
            <text:p>MrNubs</text:p>
          </table:table-cell>
          <table:table-cell office:value-type="string">
            <text:p>(3, 1, 6, 2, 0)</text:p>
          </table:table-cell>
          <table:table-cell office:value-type="string">
            <text:p>Yho!</text:p>
          </table:table-cell>
          <table:table-cell table:number-columns-repeated="1019"/>
        </table:table-row>
        <table:table-row table:style-name="ro1">
          <table:table-cell office:value-type="string">
            <text:p>Quelity</text:p>
          </table:table-cell>
          <table:table-cell office:value-type="string">
            <text:p>(2, 0, 7, 1, 0)</text:p>
          </table:table-cell>
          <table:table-cell office:value-type="string">
            <text:p>Floppy_duck049</text:p>
          </table:table-cell>
          <table:table-cell office:value-type="string">
            <text:p>(2, 0, 4, 0, 0)</text:p>
          </table:table-cell>
          <table:table-cell office:value-type="string">
            <text:p>Quelity</text:p>
          </table:table-cell>
          <table:table-cell table:number-columns-repeated="1019"/>
        </table:table-row>
        <table:table-row table:style-name="ro1">
          <table:table-cell office:value-type="string">
            <text:p>Kuya</text:p>
          </table:table-cell>
          <table:table-cell office:value-type="string">
            <text:p>(6, 4, 23, 13, 0)</text:p>
          </table:table-cell>
          <table:table-cell office:value-type="string">
            <text:p>Vinny, The Lick</text:p>
          </table:table-cell>
          <table:table-cell office:value-type="string">
            <text:p>(4, 2, 9, 5, 0)</text:p>
          </table:table-cell>
          <table:table-cell office:value-type="string">
            <text:p>Kuya</text:p>
          </table:table-cell>
          <table:table-cell table:number-columns-repeated="1019"/>
        </table:table-row>
        <table:table-row table:style-name="ro1">
          <table:table-cell office:value-type="string">
            <text:p>Lars</text:p>
          </table:table-cell>
          <table:table-cell office:value-type="string">
            <text:p>(2, 0, 4, 0, 0)</text:p>
          </table:table-cell>
          <table:table-cell office:value-type="string">
            <text:p>SentPain</text:p>
          </table:table-cell>
          <table:table-cell office:value-type="string">
            <text:p>(2, 0, 4, 0, 0)</text:p>
          </table:table-cell>
          <table:table-cell office:value-type="string">
            <text:p>Lars</text:p>
          </table:table-cell>
          <table:table-cell table:number-columns-repeated="1019"/>
        </table:table-row>
        <table:table-row table:style-name="ro1">
          <table:table-cell office:value-type="string">
            <text:p>20xQuest</text:p>
          </table:table-cell>
          <table:table-cell office:value-type="string">
            <text:p>(5, 3, 17, 11, 0)</text:p>
          </table:table-cell>
          <table:table-cell office:value-type="string">
            <text:p>DGK</text:p>
          </table:table-cell>
          <table:table-cell office:value-type="string">
            <text:p>(3, 1, 8, 4, 0)</text:p>
          </table:table-cell>
          <table:table-cell office:value-type="string">
            <text:p>20xQuest</text:p>
          </table:table-cell>
          <table:table-cell table:number-columns-repeated="1019"/>
        </table:table-row>
        <table:table-row table:style-name="ro1">
          <table:table-cell office:value-type="string">
            <text:p>Sentinel</text:p>
          </table:table-cell>
          <table:table-cell office:value-type="string">
            <text:p>(3, 1, 7, 2, 0)</text:p>
          </table:table-cell>
          <table:table-cell office:value-type="string">
            <text:p>Mr.Feeny</text:p>
          </table:table-cell>
          <table:table-cell office:value-type="string">
            <text:p>(2, 0, 4, 0, 0)</text:p>
          </table:table-cell>
          <table:table-cell office:value-type="string">
            <text:p>Sentinel</text:p>
          </table:table-cell>
          <table:table-cell table:number-columns-repeated="1019"/>
        </table:table-row>
        <table:table-row table:style-name="ro1">
          <table:table-cell office:value-type="string">
            <text:p>Aaron</text:p>
          </table:table-cell>
          <table:table-cell office:value-type="string">
            <text:p>(5, 3, 16, 9, 0)</text:p>
          </table:table-cell>
          <table:table-cell office:value-type="string">
            <text:p>TOTO_PINK</text:p>
          </table:table-cell>
          <table:table-cell office:value-type="string">
            <text:p>(4, 2, 9, 4, 0)</text:p>
          </table:table-cell>
          <table:table-cell office:value-type="string">
            <text:p>Aaron</text:p>
          </table:table-cell>
          <table:table-cell table:number-columns-repeated="1019"/>
        </table:table-row>
        <table:table-row table:style-name="ro1">
          <table:table-cell office:value-type="string">
            <text:p>Textbook</text:p>
          </table:table-cell>
          <table:table-cell office:value-type="string">
            <text:p>(2, 0, 5, 0, 0)</text:p>
          </table:table-cell>
          <table:table-cell office:value-type="string">
            <text:p>xXx_PeterGokuGriffin_xXx</text:p>
          </table:table-cell>
          <table:table-cell office:value-type="string">
            <text:p>(4, 2, 11, 5, 0)</text:p>
          </table:table-cell>
          <table:table-cell office:value-type="string">
            <text:p>Textbook</text:p>
          </table:table-cell>
          <table:table-cell table:number-columns-repeated="1019"/>
        </table:table-row>
        <table:table-row table:style-name="ro1">
          <table:table-cell office:value-type="string">
            <text:p>Kip</text:p>
          </table:table-cell>
          <table:table-cell office:value-type="string">
            <text:p>(3, 1, 9, 3, 0)</text:p>
          </table:table-cell>
          <table:table-cell office:value-type="string">
            <text:p>Zorrin</text:p>
          </table:table-cell>
          <table:table-cell office:value-type="string">
            <text:p>(3, 1, 8, 3, 0)</text:p>
          </table:table-cell>
          <table:table-cell office:value-type="string">
            <text:p>Kip</text:p>
          </table:table-cell>
          <table:table-cell table:number-columns-repeated="1019"/>
        </table:table-row>
        <table:table-row table:style-name="ro1">
          <table:table-cell office:value-type="string">
            <text:p>NotTony</text:p>
          </table:table-cell>
          <table:table-cell office:value-type="string">
            <text:p>(2, 0, 5, 0, 0)</text:p>
          </table:table-cell>
          <table:table-cell office:value-type="string">
            <text:p>Mana</text:p>
          </table:table-cell>
          <table:table-cell office:value-type="string">
            <text:p>(1, 0, 2, 0, 1)</text:p>
          </table:table-cell>
          <table:table-cell office:value-type="string">
            <text:p>NotTony</text:p>
          </table:table-cell>
          <table:table-cell table:number-columns-repeated="1019"/>
        </table:table-row>
        <table:table-row table:style-name="ro1">
          <table:table-cell office:value-type="string">
            <text:p>240p</text:p>
          </table:table-cell>
          <table:table-cell office:value-type="string">
            <text:p>(3, 1, 10, 4, 0)</text:p>
          </table:table-cell>
          <table:table-cell office:value-type="string">
            <text:p>sev7x</text:p>
          </table:table-cell>
          <table:table-cell office:value-type="string">
            <text:p>(3, 1, 7, 2, 0)</text:p>
          </table:table-cell>
          <table:table-cell office:value-type="string">
            <text:p>240p</text:p>
          </table:table-cell>
          <table:table-cell table:number-columns-repeated="1019"/>
        </table:table-row>
        <table:table-row table:style-name="ro1">
          <table:table-cell office:value-type="string">
            <text:p>Stylish thug slayer</text:p>
          </table:table-cell>
          <table:table-cell office:value-type="string">
            <text:p>(0, 0, 0, 0, 2)</text:p>
          </table:table-cell>
          <table:table-cell office:value-type="string">
            <text:p>SamersonT</text:p>
          </table:table-cell>
          <table:table-cell office:value-type="string">
            <text:p>(5, 3, 12, 7, 0)</text:p>
          </table:table-cell>
          <table:table-cell office:value-type="string">
            <text:p>Stylish thug slayer</text:p>
          </table:table-cell>
          <table:table-cell table:number-columns-repeated="1019"/>
        </table:table-row>
        <table:table-row table:style-name="ro1">
          <table:table-cell office:value-type="string">
            <text:p>Howie</text:p>
          </table:table-cell>
          <table:table-cell office:value-type="string">
            <text:p>(5, 3, 15, 8, 0)</text:p>
          </table:table-cell>
          <table:table-cell office:value-type="string">
            <text:p>Yunaka</text:p>
          </table:table-cell>
          <table:table-cell office:value-type="string">
            <text:p>(4, 2, 9, 5, 0)</text:p>
          </table:table-cell>
          <table:table-cell office:value-type="string">
            <text:p>Howie</text:p>
          </table:table-cell>
          <table:table-cell table:number-columns-repeated="1019"/>
        </table:table-row>
        <table:table-row table:style-name="ro1">
          <table:table-cell office:value-type="string">
            <text:p>Frardvark</text:p>
          </table:table-cell>
          <table:table-cell office:value-type="string">
            <text:p>(2, 0, 6, 1, 0)</text:p>
          </table:table-cell>
          <table:table-cell office:value-type="string">
            <text:p>Shnissugah</text:p>
          </table:table-cell>
          <table:table-cell office:value-type="string">
            <text:p>(0, 0, 0, 0, 2)</text:p>
          </table:table-cell>
          <table:table-cell office:value-type="string">
            <text:p>Frardvark</text:p>
          </table:table-cell>
          <table:table-cell table:number-columns-repeated="1019"/>
        </table:table-row>
        <table:table-row table:style-name="ro1">
          <table:table-cell office:value-type="string">
            <text:p>A1.exe</text:p>
          </table:table-cell>
          <table:table-cell office:value-type="string">
            <text:p>(4, 2, 11, 5, 0)</text:p>
          </table:table-cell>
          <table:table-cell office:value-type="string">
            <text:p>Dominator</text:p>
          </table:table-cell>
          <table:table-cell office:value-type="string">
            <text:p>(7, 7, 22, 17, 0)</text:p>
          </table:table-cell>
          <table:table-cell office:value-type="string">
            <text:p>A1.exe</text:p>
          </table:table-cell>
          <table:table-cell table:number-columns-repeated="1019"/>
        </table:table-row>
        <table:table-row table:style-name="ro1">
          <table:table-cell office:value-type="string">
            <text:p>Bobateatime</text:p>
          </table:table-cell>
          <table:table-cell office:value-type="string">
            <text:p>(2, 0, 5, 0, 0)</text:p>
          </table:table-cell>
          <table:table-cell office:value-type="string">
            <text:p>poobii</text:p>
          </table:table-cell>
          <table:table-cell office:value-type="string">
            <text:p>(3, 1, 6, 2, 0)</text:p>
          </table:table-cell>
          <table:table-cell office:value-type="string">
            <text:p>Bobateatime</text:p>
          </table:table-cell>
          <table:table-cell table:number-columns-repeated="1019"/>
        </table:table-row>
        <table:table-row table:style-name="ro1">
          <table:table-cell office:value-type="string">
            <text:p>Jape</text:p>
          </table:table-cell>
          <table:table-cell office:value-type="string">
            <text:p>(5, 3, 15, 9, 0)</text:p>
          </table:table-cell>
          <table:table-cell office:value-type="string">
            <text:p>Tunic</text:p>
          </table:table-cell>
          <table:table-cell office:value-type="string">
            <text:p>(2, 0, 4, 0, 0)</text:p>
          </table:table-cell>
          <table:table-cell office:value-type="string">
            <text:p>Jape</text:p>
          </table:table-cell>
          <table:table-cell table:number-columns-repeated="1019"/>
        </table:table-row>
        <table:table-row table:style-name="ro1">
          <table:table-cell office:value-type="string">
            <text:p>A-K SiN</text:p>
          </table:table-cell>
          <table:table-cell office:value-type="string">
            <text:p>(2, 0, 5, 0, 0)</text:p>
          </table:table-cell>
          <table:table-cell office:value-type="string">
            <text:p>D0g3</text:p>
          </table:table-cell>
          <table:table-cell office:value-type="string">
            <text:p>(6, 4, 14, 9, 0)</text:p>
          </table:table-cell>
          <table:table-cell office:value-type="string">
            <text:p>A-K SiN</text:p>
          </table:table-cell>
          <table:table-cell table:number-columns-repeated="1019"/>
        </table:table-row>
        <table:table-row table:style-name="ro1">
          <table:table-cell office:value-type="string">
            <text:p>Proto</text:p>
          </table:table-cell>
          <table:table-cell office:value-type="string">
            <text:p>(4, 2, 11, 5, 0)</text:p>
          </table:table-cell>
          <table:table-cell office:value-type="string">
            <text:p>Grymlynn</text:p>
          </table:table-cell>
          <table:table-cell office:value-type="string">
            <text:p>(4, 2, 11, 5, 0)</text:p>
          </table:table-cell>
          <table:table-cell office:value-type="string">
            <text:p>Proto</text:p>
          </table:table-cell>
          <table:table-cell table:number-columns-repeated="1019"/>
        </table:table-row>
        <table:table-row table:style-name="ro1">
          <table:table-cell office:value-type="string">
            <text:p>Cloak</text:p>
          </table:table-cell>
          <table:table-cell office:value-type="string">
            <text:p>(2, 0, 5, 0, 0)</text:p>
          </table:table-cell>
          <table:table-cell office:value-type="string">
            <text:p>Venikki</text:p>
          </table:table-cell>
          <table:table-cell office:value-type="string">
            <text:p>(6, 4, 13, 8, 0)</text:p>
          </table:table-cell>
          <table:table-cell office:value-type="string">
            <text:p>Cloak</text:p>
          </table:table-cell>
          <table:table-cell table:number-columns-repeated="1019"/>
        </table:table-row>
        <table:table-row table:style-name="ro1">
          <table:table-cell office:value-type="string">
            <text:p>Sneakywill</text:p>
          </table:table-cell>
          <table:table-cell office:value-type="string">
            <text:p>(4, 2, 17, 8, 0)</text:p>
          </table:table-cell>
          <table:table-cell office:value-type="string">
            <text:p>Twilight</text:p>
          </table:table-cell>
          <table:table-cell office:value-type="string">
            <text:p>(5, 3, 11, 7, 0)</text:p>
          </table:table-cell>
          <table:table-cell office:value-type="string">
            <text:p>Sneakywill</text:p>
          </table:table-cell>
          <table:table-cell table:number-columns-repeated="1019"/>
        </table:table-row>
        <table:table-row table:style-name="ro1">
          <table:table-cell office:value-type="string">
            <text:p>jitmasterswag</text:p>
          </table:table-cell>
          <table:table-cell office:value-type="string">
            <text:p>(0, 0, 0, 0, 2)</text:p>
          </table:table-cell>
          <table:table-cell office:value-type="string">
            <text:p>Koloax</text:p>
          </table:table-cell>
          <table:table-cell office:value-type="string">
            <text:p>(4, 2, 9, 4, 0)</text:p>
          </table:table-cell>
          <table:table-cell office:value-type="string">
            <text:p>jitmasterswag</text:p>
          </table:table-cell>
          <table:table-cell table:number-columns-repeated="1019"/>
        </table:table-row>
        <table:table-row table:style-name="ro1">
          <table:table-cell office:value-type="string">
            <text:p>SandBag</text:p>
          </table:table-cell>
          <table:table-cell office:value-type="string">
            <text:p>(5, 3, 17, 11, 0)</text:p>
          </table:table-cell>
          <table:table-cell office:value-type="string">
            <text:p>S. Phantm</text:p>
          </table:table-cell>
          <table:table-cell office:value-type="string">
            <text:p>(6, 4, 13, 9, 0)</text:p>
          </table:table-cell>
          <table:table-cell office:value-type="string">
            <text:p>SandBag</text:p>
          </table:table-cell>
          <table:table-cell table:number-columns-repeated="1019"/>
        </table:table-row>
        <table:table-row table:style-name="ro1">
          <table:table-cell office:value-type="string">
            <text:p>ThatOneGuy</text:p>
          </table:table-cell>
          <table:table-cell office:value-type="string">
            <text:p>(2, 0, 5, 0, 0)</text:p>
          </table:table-cell>
          <table:table-cell office:value-type="string">
            <text:p>B_Slam</text:p>
          </table:table-cell>
          <table:table-cell office:value-type="string">
            <text:p>(4, 2, 9, 4, 0)</text:p>
          </table:table-cell>
          <table:table-cell office:value-type="string">
            <text:p>ThatOneGuy</text:p>
          </table:table-cell>
          <table:table-cell table:number-columns-repeated="1019"/>
        </table:table-row>
        <table:table-row table:style-name="ro1">
          <table:table-cell office:value-type="string">
            <text:p>ted.</text:p>
          </table:table-cell>
          <table:table-cell office:value-type="string">
            <text:p>(4, 2, 12, 5, 0)</text:p>
          </table:table-cell>
          <table:table-cell office:value-type="string">
            <text:p>BooBell</text:p>
          </table:table-cell>
          <table:table-cell office:value-type="string">
            <text:p>(2, 0, 4, 0, 0)</text:p>
          </table:table-cell>
          <table:table-cell office:value-type="string">
            <text:p>ted.</text:p>
          </table:table-cell>
          <table:table-cell table:number-columns-repeated="1019"/>
        </table:table-row>
        <table:table-row table:style-name="ro1">
          <table:table-cell office:value-type="string">
            <text:p>Jovian</text:p>
          </table:table-cell>
          <table:table-cell office:value-type="string">
            <text:p>(2, 0, 5, 0, 0)</text:p>
          </table:table-cell>
          <table:table-cell office:value-type="string">
            <text:p>LuMiSaDi</text:p>
          </table:table-cell>
          <table:table-cell office:value-type="string">
            <text:p>(6, 4, 12, 8, 0)</text:p>
          </table:table-cell>
          <table:table-cell office:value-type="string">
            <text:p>Jovian</text:p>
          </table:table-cell>
          <table:table-cell table:number-columns-repeated="1019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(5, 3, 17, 10, 0)</text:p>
          </table:table-cell>
          <table:table-cell office:value-type="string">
            <text:p>Synvy</text:p>
          </table:table-cell>
          <table:table-cell office:value-type="string">
            <text:p>(2, 0, 4, 0, 0)</text:p>
          </table:table-cell>
          <table:table-cell office:value-type="string">
            <text:p>Hod Strat</text:p>
          </table:table-cell>
          <table:table-cell table:number-columns-repeated="1019"/>
        </table:table-row>
        <table:table-row table:style-name="ro1">
          <table:table-cell office:value-type="string">
            <text:p>drc</text:p>
          </table:table-cell>
          <table:table-cell office:value-type="string">
            <text:p>(2, 0, 5, 0, 0)</text:p>
          </table:table-cell>
          <table:table-cell office:value-type="string">
            <text:p>Shawnbd3</text:p>
          </table:table-cell>
          <table:table-cell office:value-type="string">
            <text:p>(2, 0, 4, 0, 0)</text:p>
          </table:table-cell>
          <table:table-cell office:value-type="string">
            <text:p>drc</text:p>
          </table:table-cell>
          <table:table-cell table:number-columns-repeated="1019"/>
        </table:table-row>
        <table:table-row table:style-name="ro1">
          <table:table-cell office:value-type="string">
            <text:p>Checkmate</text:p>
          </table:table-cell>
          <table:table-cell office:value-type="string">
            <text:p>(3, 1, 9, 3, 0)</text:p>
          </table:table-cell>
          <table:table-cell office:value-type="string">
            <text:p>syntax</text:p>
          </table:table-cell>
          <table:table-cell office:value-type="string">
            <text:p>(0, 0, 0, 0, 2)</text:p>
          </table:table-cell>
          <table:table-cell office:value-type="string">
            <text:p>Checkmate</text:p>
          </table:table-cell>
          <table:table-cell table:number-columns-repeated="1019"/>
        </table:table-row>
        <table:table-row table:style-name="ro1">
          <table:table-cell office:value-type="string">
            <text:p>Abraham</text:p>
          </table:table-cell>
          <table:table-cell office:value-type="string">
            <text:p>(0, 0, 0, 0, 2)</text:p>
          </table:table-cell>
          <table:table-cell office:value-type="string">
            <text:p>Jean Papitas</text:p>
          </table:table-cell>
          <table:table-cell office:value-type="string">
            <text:p>(4, 2, 9, 4, 0)</text:p>
          </table:table-cell>
          <table:table-cell office:value-type="string">
            <text:p>Abraham</text:p>
          </table:table-cell>
          <table:table-cell table:number-columns-repeated="1019"/>
        </table:table-row>
        <table:table-row table:style-name="ro1">
          <table:table-cell office:value-type="string">
            <text:p>Cappuccino</text:p>
          </table:table-cell>
          <table:table-cell office:value-type="string">
            <text:p>(5, 3, 16, 10, 0)</text:p>
          </table:table-cell>
          <table:table-cell office:value-type="string">
            <text:p>GoldenDark</text:p>
          </table:table-cell>
          <table:table-cell office:value-type="string">
            <text:p>(3, 1, 6, 2, 0)</text:p>
          </table:table-cell>
          <table:table-cell office:value-type="string">
            <text:p>Cappuccino</text:p>
          </table:table-cell>
          <table:table-cell table:number-columns-repeated="1019"/>
        </table:table-row>
        <table:table-row table:style-name="ro1">
          <table:table-cell office:value-type="string">
            <text:p>okusuii</text:p>
          </table:table-cell>
          <table:table-cell office:value-type="string">
            <text:p>(2, 0, 5, 0, 0)</text:p>
          </table:table-cell>
          <table:table-cell office:value-type="string">
            <text:p>Pendragon</text:p>
          </table:table-cell>
          <table:table-cell office:value-type="string">
            <text:p>(4, 2, 9, 5, 0)</text:p>
          </table:table-cell>
          <table:table-cell office:value-type="string">
            <text:p>okusuii</text:p>
          </table:table-cell>
          <table:table-cell table:number-columns-repeated="1019"/>
        </table:table-row>
        <table:table-row table:style-name="ro1">
          <table:table-cell office:value-type="string">
            <text:p>AzLu</text:p>
          </table:table-cell>
          <table:table-cell office:value-type="string">
            <text:p>(5, 3, 14, 8, 0)</text:p>
          </table:table-cell>
          <table:table-cell office:value-type="string">
            <text:p>elite</text:p>
          </table:table-cell>
          <table:table-cell office:value-type="string">
            <text:p>(2, 0, 4, 0, 0)</text:p>
          </table:table-cell>
          <table:table-cell office:value-type="string">
            <text:p>AzLu</text:p>
          </table:table-cell>
          <table:table-cell table:number-columns-repeated="1019"/>
        </table:table-row>
        <table:table-row table:style-name="ro1">
          <table:table-cell office:value-type="string">
            <text:p>uhline</text:p>
          </table:table-cell>
          <table:table-cell office:value-type="string">
            <text:p>(3, 1, 8, 3, 0)</text:p>
          </table:table-cell>
          <table:table-cell office:value-type="string">
            <text:p>The Chuckster</text:p>
          </table:table-cell>
          <table:table-cell office:value-type="string">
            <text:p>(4, 2, 8, 4, 0)</text:p>
          </table:table-cell>
          <table:table-cell office:value-type="string">
            <text:p>uhline</text:p>
          </table:table-cell>
          <table:table-cell table:number-columns-repeated="1019"/>
        </table:table-row>
        <table:table-row table:style-name="ro1">
          <table:table-cell office:value-type="string">
            <text:p>Titan</text:p>
          </table:table-cell>
          <table:table-cell office:value-type="string">
            <text:p>(4, 2, 11, 5, 0)</text:p>
          </table:table-cell>
          <table:table-cell office:value-type="string">
            <text:p>ebat</text:p>
          </table:table-cell>
          <table:table-cell office:value-type="string">
            <text:p>(2, 0, 5, 1, 0)</text:p>
          </table:table-cell>
          <table:table-cell office:value-type="string">
            <text:p>Titan</text:p>
          </table:table-cell>
          <table:table-cell table:number-columns-repeated="1019"/>
        </table:table-row>
        <table:table-row table:style-name="ro1">
          <table:table-cell office:value-type="string">
            <text:p>tgags</text:p>
          </table:table-cell>
          <table:table-cell office:value-type="string">
            <text:p>(2, 0, 5, 0, 0)</text:p>
          </table:table-cell>
          <table:table-cell office:value-type="string">
            <text:p>BeastModePaul</text:p>
          </table:table-cell>
          <table:table-cell office:value-type="string">
            <text:p>(7, 5, 21, 14, 0)</text:p>
          </table:table-cell>
          <table:table-cell office:value-type="string">
            <text:p>tgags</text:p>
          </table:table-cell>
          <table:table-cell table:number-columns-repeated="1019"/>
        </table:table-row>
        <table:table-row table:style-name="ro1">
          <table:table-cell office:value-type="string">
            <text:p>Ricky6</text:p>
          </table:table-cell>
          <table:table-cell office:value-type="string">
            <text:p>(5, 3, 16, 10, 0)</text:p>
          </table:table-cell>
          <table:table-cell office:value-type="string">
            <text:p>Breezy 400</text:p>
          </table:table-cell>
          <table:table-cell office:value-type="string">
            <text:p>(3, 1, 7, 2, 0)</text:p>
          </table:table-cell>
          <table:table-cell office:value-type="string">
            <text:p>Ricky6</text:p>
          </table:table-cell>
          <table:table-cell table:number-columns-repeated="1019"/>
        </table:table-row>
        <table:table-row table:style-name="ro1">
          <table:table-cell office:value-type="string">
            <text:p>CCgrabs</text:p>
          </table:table-cell>
          <table:table-cell office:value-type="string">
            <text:p>(2, 0, 7, 2, 0)</text:p>
          </table:table-cell>
          <table:table-cell office:value-type="string">
            <text:p>Dingodile</text:p>
          </table:table-cell>
          <table:table-cell office:value-type="string">
            <text:p>(4, 2, 10, 6, 0)</text:p>
          </table:table-cell>
          <table:table-cell office:value-type="string">
            <text:p>CCgrabs</text:p>
          </table:table-cell>
          <table:table-cell table:number-columns-repeated="1019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7, 5, 27, 16, 0)</text:p>
          </table:table-cell>
          <table:table-cell office:value-type="string">
            <text:p>Navé</text:p>
          </table:table-cell>
          <table:table-cell office:value-type="string">
            <text:p>(4, 2, 8, 4, 0)</text:p>
          </table:table-cell>
          <table:table-cell office:value-type="string">
            <text:p>Hungrybox</text:p>
          </table:table-cell>
          <table:table-cell table:number-columns-repeated="1019"/>
        </table:table-row>
        <table:table-row table:style-name="ro1">
          <table:table-cell office:value-type="string">
            <text:p>Equilateral</text:p>
          </table:table-cell>
          <table:table-cell office:value-type="string">
            <text:p>(5, 3, 18, 12, 0)</text:p>
          </table:table-cell>
          <table:table-cell office:value-type="string">
            <text:p>chpstks</text:p>
          </table:table-cell>
          <table:table-cell office:value-type="string">
            <text:p>(5, 3, 11, 7, 0)</text:p>
          </table:table-cell>
          <table:table-cell office:value-type="string">
            <text:p>Equilateral</text:p>
          </table:table-cell>
          <table:table-cell table:number-columns-repeated="1019"/>
        </table:table-row>
        <table:table-row table:style-name="ro1">
          <table:table-cell office:value-type="string">
            <text:p>brokenyew</text:p>
          </table:table-cell>
          <table:table-cell office:value-type="string">
            <text:p>(3, 1, 10, 4, 0)</text:p>
          </table:table-cell>
          <table:table-cell office:value-type="string">
            <text:p>Kobe</text:p>
          </table:table-cell>
          <table:table-cell office:value-type="string">
            <text:p>(0, 0, 0, 0, 2)</text:p>
          </table:table-cell>
          <table:table-cell office:value-type="string">
            <text:p>brokenyew</text:p>
          </table:table-cell>
          <table:table-cell table:number-columns-repeated="1019"/>
        </table:table-row>
        <table:table-row table:style-name="ro1">
          <table:table-cell office:value-type="string">
            <text:p>Panda</text:p>
          </table:table-cell>
          <table:table-cell office:value-type="string">
            <text:p>(6, 4, 21, 13, 0)</text:p>
          </table:table-cell>
          <table:table-cell office:value-type="string">
            <text:p>Madera</text:p>
          </table:table-cell>
          <table:table-cell office:value-type="string">
            <text:p>(6, 4, 18, 11, 0)</text:p>
          </table:table-cell>
          <table:table-cell office:value-type="string">
            <text:p>Panda</text:p>
          </table:table-cell>
          <table:table-cell table:number-columns-repeated="1019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4, 2, 17, 9, 0)</text:p>
          </table:table-cell>
          <table:table-cell office:value-type="string">
            <text:p>Wiccan</text:p>
          </table:table-cell>
          <table:table-cell office:value-type="string">
            <text:p>(5, 3, 11, 7, 0)</text:p>
          </table:table-cell>
          <table:table-cell office:value-type="string">
            <text:p>Slowpez</text:p>
          </table:table-cell>
          <table:table-cell table:number-columns-repeated="1019"/>
        </table:table-row>
        <table:table-row table:style-name="ro1">
          <table:table-cell office:value-type="string">
            <text:p>OG Kid</text:p>
          </table:table-cell>
          <table:table-cell office:value-type="string">
            <text:p>(6, 4, 23, 14, 0)</text:p>
          </table:table-cell>
          <table:table-cell office:value-type="string">
            <text:p>Surehyper</text:p>
          </table:table-cell>
          <table:table-cell office:value-type="string">
            <text:p>(6, 4, 14, 8, 0)</text:p>
          </table:table-cell>
          <table:table-cell office:value-type="string">
            <text:p>OG Kid</text:p>
          </table:table-cell>
          <table:table-cell table:number-columns-repeated="1019"/>
        </table:table-row>
        <table:table-row table:style-name="ro1">
          <table:table-cell office:value-type="string">
            <text:p>Yeti</text:p>
          </table:table-cell>
          <table:table-cell office:value-type="string">
            <text:p>(5, 3, 20, 10, 0)</text:p>
          </table:table-cell>
          <table:table-cell office:value-type="string">
            <text:p>fiend</text:p>
          </table:table-cell>
          <table:table-cell office:value-type="string">
            <text:p>(3, 1, 6, 2, 0)</text:p>
          </table:table-cell>
          <table:table-cell office:value-type="string">
            <text:p>Yeti</text:p>
          </table:table-cell>
          <table:table-cell table:number-columns-repeated="1019"/>
        </table:table-row>
        <table:table-row table:style-name="ro1">
          <table:table-cell office:value-type="string">
            <text:p>Krudo</text:p>
          </table:table-cell>
          <table:table-cell office:value-type="string">
            <text:p>(6, 4, 22, 16, 0)</text:p>
          </table:table-cell>
          <table:table-cell office:value-type="string">
            <text:p>Blaine</text:p>
          </table:table-cell>
          <table:table-cell office:value-type="string">
            <text:p>(4, 2, 9, 4, 0)</text:p>
          </table:table-cell>
          <table:table-cell office:value-type="string">
            <text:p>Krudo</text:p>
          </table:table-cell>
          <table:table-cell table:number-columns-repeated="1019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6, 4, 21, 13, 0)</text:p>
          </table:table-cell>
          <table:table-cell office:value-type="string">
            <text:p>JediSmash</text:p>
          </table:table-cell>
          <table:table-cell office:value-type="string">
            <text:p>(2, 0, 4, 0, 0)</text:p>
          </table:table-cell>
          <table:table-cell office:value-type="string">
            <text:p>Captain G</text:p>
          </table:table-cell>
          <table:table-cell table:number-columns-repeated="1019"/>
        </table:table-row>
        <table:table-row table:style-name="ro1">
          <table:table-cell office:value-type="string">
            <text:p>pace</text:p>
          </table:table-cell>
          <table:table-cell office:value-type="string">
            <text:p>(5, 3, 20, 10, 0)</text:p>
          </table:table-cell>
          <table:table-cell office:value-type="string">
            <text:p>HaydenEatsShrimp</text:p>
          </table:table-cell>
          <table:table-cell office:value-type="string">
            <text:p>(5, 3, 13, 7, 0)</text:p>
          </table:table-cell>
          <table:table-cell office:value-type="string">
            <text:p>pace</text:p>
          </table:table-cell>
          <table:table-cell table:number-columns-repeated="1019"/>
        </table:table-row>
        <table:table-row table:style-name="ro1">
          <table:table-cell office:value-type="string">
            <text:p>Wizzrobe</text:p>
          </table:table-cell>
          <table:table-cell office:value-type="string">
            <text:p>(9, 8, 32, 24, 0)</text:p>
          </table:table-cell>
          <table:table-cell office:value-type="string">
            <text:p>Manta</text:p>
          </table:table-cell>
          <table:table-cell office:value-type="string">
            <text:p>(2, 0, 4, 0, 0)</text:p>
          </table:table-cell>
          <table:table-cell office:value-type="string">
            <text:p>Wizzrobe</text:p>
          </table:table-cell>
          <table:table-cell table:number-columns-repeated="1019"/>
        </table:table-row>
        <table:table-row table:style-name="ro1">
          <table:table-cell office:value-type="string">
            <text:p>Komodo</text:p>
          </table:table-cell>
          <table:table-cell office:value-type="string">
            <text:p>(5, 3, 19, 11, 0)</text:p>
          </table:table-cell>
          <table:table-cell office:value-type="string">
            <text:p>JDQ05</text:p>
          </table:table-cell>
          <table:table-cell office:value-type="string">
            <text:p>(3, 1, 6, 2, 0)</text:p>
          </table:table-cell>
          <table:table-cell office:value-type="string">
            <text:p>Komodo</text:p>
          </table:table-cell>
          <table:table-cell table:number-columns-repeated="1019"/>
        </table:table-row>
        <table:table-row table:style-name="ro1">
          <table:table-cell office:value-type="string">
            <text:p>Franco</text:p>
          </table:table-cell>
          <table:table-cell office:value-type="string">
            <text:p>(5, 3, 20, 11, 0)</text:p>
          </table:table-cell>
          <table:table-cell office:value-type="string">
            <text:p>MustSeek</text:p>
          </table:table-cell>
          <table:table-cell office:value-type="string">
            <text:p>(3, 1, 7, 2, 0)</text:p>
          </table:table-cell>
          <table:table-cell office:value-type="string">
            <text:p>Franc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onin</text:p>
          </table:table-cell>
          <table:table-cell office:value-type="string">
            <text:p>(2, 0, 5, 1, 0)</text:p>
          </table:table-cell>
          <table:table-cell office:value-type="string">
            <text:p>MrNub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api</text:p>
          </table:table-cell>
          <table:table-cell office:value-type="string">
            <text:p>(0, 0, 0, 0, 2)</text:p>
          </table:table-cell>
          <table:table-cell office:value-type="string">
            <text:p>Floppy_duck04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c_tweekin</text:p>
          </table:table-cell>
          <table:table-cell office:value-type="string">
            <text:p>(2, 0, 4, 0, 0)</text:p>
          </table:table-cell>
          <table:table-cell office:value-type="string">
            <text:p>Vinny, The Li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acket</text:p>
          </table:table-cell>
          <table:table-cell office:value-type="string">
            <text:p>(0, 0, 0, 0, 2)</text:p>
          </table:table-cell>
          <table:table-cell office:value-type="string">
            <text:p>SentP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iddekel</text:p>
          </table:table-cell>
          <table:table-cell office:value-type="string">
            <text:p>(5, 3, 11, 7, 0)</text:p>
          </table:table-cell>
          <table:table-cell office:value-type="string">
            <text:p>DG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rincessPopkorn</text:p>
          </table:table-cell>
          <table:table-cell office:value-type="string">
            <text:p>(2, 0, 5, 1, 0)</text:p>
          </table:table-cell>
          <table:table-cell office:value-type="string">
            <text:p>Mr.Feen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pic_Gabriel</text:p>
          </table:table-cell>
          <table:table-cell office:value-type="string">
            <text:p>(10, 8, 32, 22, 0)</text:p>
          </table:table-cell>
          <table:table-cell office:value-type="string">
            <text:p>TOTO_PIN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quishy~</text:p>
          </table:table-cell>
          <table:table-cell office:value-type="string">
            <text:p>(5, 3, 10, 6, 0)</text:p>
          </table:table-cell>
          <table:table-cell office:value-type="string">
            <text:p>xXx_PeterGokuGriffin_xX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Dark4orce</text:p>
          </table:table-cell>
          <table:table-cell office:value-type="string">
            <text:p>(3, 1, 6, 2, 0)</text:p>
          </table:table-cell>
          <table:table-cell office:value-type="string">
            <text:p>Zorr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lack Lemonade</text:p>
          </table:table-cell>
          <table:table-cell office:value-type="string">
            <text:p>(4, 2, 11, 6, 0)</text:p>
          </table:table-cell>
          <table:table-cell office:value-type="string">
            <text:p>Man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trobics</text:p>
          </table:table-cell>
          <table:table-cell office:value-type="string">
            <text:p>(4, 2, 10, 5, 0)</text:p>
          </table:table-cell>
          <table:table-cell office:value-type="string">
            <text:p>sev7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iku</text:p>
          </table:table-cell>
          <table:table-cell office:value-type="string">
            <text:p>(6, 4, 13, 9, 0)</text:p>
          </table:table-cell>
          <table:table-cell office:value-type="string">
            <text:p>Samerso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enji</text:p>
          </table:table-cell>
          <table:table-cell office:value-type="string">
            <text:p>(7, 5, 17, 11, 0)</text:p>
          </table:table-cell>
          <table:table-cell office:value-type="string">
            <text:p>Yunak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hez</text:p>
          </table:table-cell>
          <table:table-cell office:value-type="string">
            <text:p>(4, 2, 8, 4, 0)</text:p>
          </table:table-cell>
          <table:table-cell office:value-type="string">
            <text:p>Shnissuga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ticccy</text:p>
          </table:table-cell>
          <table:table-cell office:value-type="string">
            <text:p>(6, 4, 16, 9, 0)</text:p>
          </table:table-cell>
          <table:table-cell office:value-type="string">
            <text:p>Dominat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hand</text:p>
          </table:table-cell>
          <table:table-cell office:value-type="string">
            <text:p>(3, 1, 7, 3, 0)</text:p>
          </table:table-cell>
          <table:table-cell office:value-type="string">
            <text:p>poobi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tepKnightUp</text:p>
          </table:table-cell>
          <table:table-cell office:value-type="string">
            <text:p>(2, 0, 5, 1, 0)</text:p>
          </table:table-cell>
          <table:table-cell office:value-type="string">
            <text:p>Tuni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havalava</text:p>
          </table:table-cell>
          <table:table-cell office:value-type="string">
            <text:p>(0, 0, 0, 0, 2)</text:p>
          </table:table-cell>
          <table:table-cell office:value-type="string">
            <text:p>D0g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VileSpecter</text:p>
          </table:table-cell>
          <table:table-cell office:value-type="string">
            <text:p>(3, 1, 7, 3, 0)</text:p>
          </table:table-cell>
          <table:table-cell office:value-type="string">
            <text:p>Grymlyn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XIX</text:p>
          </table:table-cell>
          <table:table-cell office:value-type="string">
            <text:p>(2, 0, 4, 0, 0)</text:p>
          </table:table-cell>
          <table:table-cell office:value-type="string">
            <text:p>Venikk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hezFarach001</text:p>
          </table:table-cell>
          <table:table-cell office:value-type="string">
            <text:p>(6, 4, 13, 8, 0)</text:p>
          </table:table-cell>
          <table:table-cell office:value-type="string">
            <text:p>Twiligh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G00MBA</text:p>
          </table:table-cell>
          <table:table-cell office:value-type="string">
            <text:p>(2, 0, 4, 0, 0)</text:p>
          </table:table-cell>
          <table:table-cell office:value-type="string">
            <text:p>Koloa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UpChuck</text:p>
          </table:table-cell>
          <table:table-cell office:value-type="string">
            <text:p>(4, 2, 9, 4, 0)</text:p>
          </table:table-cell>
          <table:table-cell office:value-type="string">
            <text:p>S. Phant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NaClg0d</text:p>
          </table:table-cell>
          <table:table-cell office:value-type="string">
            <text:p>(2, 0, 6, 2, 0)</text:p>
          </table:table-cell>
          <table:table-cell office:value-type="string">
            <text:p>B_Sla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a_Successor</text:p>
          </table:table-cell>
          <table:table-cell office:value-type="string">
            <text:p>(2, 0, 4, 0, 0)</text:p>
          </table:table-cell>
          <table:table-cell office:value-type="string">
            <text:p>BooBe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Ginger</text:p>
          </table:table-cell>
          <table:table-cell office:value-type="string">
            <text:p>(0, 0, 0, 0, 2)</text:p>
          </table:table-cell>
          <table:table-cell office:value-type="string">
            <text:p>LuMiSaD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uno</text:p>
          </table:table-cell>
          <table:table-cell office:value-type="string">
            <text:p>(3, 1, 7, 3, 0)</text:p>
          </table:table-cell>
          <table:table-cell office:value-type="string">
            <text:p>Synv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apple</text:p>
          </table:table-cell>
          <table:table-cell office:value-type="string">
            <text:p>(3, 1, 7, 2, 0)</text:p>
          </table:table-cell>
          <table:table-cell office:value-type="string">
            <text:p>Shawnbd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Aaron</text:p>
          </table:table-cell>
          <table:table-cell office:value-type="string">
            <text:p>(8, 6, 22, 15, 0)</text:p>
          </table:table-cell>
          <table:table-cell office:value-type="string">
            <text:p>synta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inimaxify</text:p>
          </table:table-cell>
          <table:table-cell office:value-type="string">
            <text:p>(4, 2, 9, 5, 0)</text:p>
          </table:table-cell>
          <table:table-cell office:value-type="string">
            <text:p>Jean Papita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y Dad</text:p>
          </table:table-cell>
          <table:table-cell office:value-type="string">
            <text:p>(3, 1, 6, 2, 0)</text:p>
          </table:table-cell>
          <table:table-cell office:value-type="string">
            <text:p>GoldenDar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sysilex</text:p>
          </table:table-cell>
          <table:table-cell office:value-type="string">
            <text:p>(5, 3, 13, 8, 0)</text:p>
          </table:table-cell>
          <table:table-cell office:value-type="string">
            <text:p>Pendrag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cFunny</text:p>
          </table:table-cell>
          <table:table-cell office:value-type="string">
            <text:p>(5, 3, 12, 7, 0)</text:p>
          </table:table-cell>
          <table:table-cell office:value-type="string">
            <text:p>eli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haine</text:p>
          </table:table-cell>
          <table:table-cell office:value-type="string">
            <text:p>(6, 4, 19, 10, 0)</text:p>
          </table:table-cell>
          <table:table-cell office:value-type="string">
            <text:p>The Chuckst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ispanic! at the Disco</text:p>
          </table:table-cell>
          <table:table-cell office:value-type="string">
            <text:p>(5, 3, 11, 7, 0)</text:p>
          </table:table-cell>
          <table:table-cell office:value-type="string">
            <text:p>eba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DarthCJ8</text:p>
          </table:table-cell>
          <table:table-cell office:value-type="string">
            <text:p>(4, 2, 8, 4, 0)</text:p>
          </table:table-cell>
          <table:table-cell office:value-type="string">
            <text:p>BeastModePau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nzana</text:p>
          </table:table-cell>
          <table:table-cell office:value-type="string">
            <text:p>(6, 4, 16, 9, 0)</text:p>
          </table:table-cell>
          <table:table-cell office:value-type="string">
            <text:p>Breezy 4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nderBread</text:p>
          </table:table-cell>
          <table:table-cell office:value-type="string">
            <text:p>(0, 0, 0, 0, 2)</text:p>
          </table:table-cell>
          <table:table-cell office:value-type="string">
            <text:p>Dingodil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avé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hpstk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Kob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Mader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Wicca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urehyp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ien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lain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JediSm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aydenEatsShrim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Mant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JDQ0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MustSee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Jon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ap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c_tweek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acke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iddeke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rincessPopkor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pic_Gabrie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quishy~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rk4orc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lack Lemonad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trobic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Riku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enj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hez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ticcc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han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tepKnightU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havalav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VileSpect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LX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hezFarach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0MB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pChu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aClg0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a_Successo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ing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jun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appl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Minimaxif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My Da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sysile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McFunn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hain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ispanic! at the Disc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rthCJ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Manzan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WonderBread</text:p>
          </table:table-cell>
          <table:table-cell table:number-columns-repeated="1019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urnament 4" table:style-name="ta8" table:print="false">
        <office:forms form:automatic-focus="false" form:apply-design-mode="false"/>
        <table:table-column table:style-name="co6" table:number-columns-repeated="1024" table:default-cell-style-name="Excel_20_Built-in_20_Normal"/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Attendees List</text:p>
          </table:table-cell>
          <table:table-cell table:number-columns-repeated="1019"/>
        </table:table-row>
        <table:table-row table:style-name="ro1">
          <table:table-cell office:value-type="string">
            <text:p>MrNubs</text:p>
          </table:table-cell>
          <table:table-cell office:value-type="string">
            <text:p>(3, 1, 7, 2, 0)</text:p>
          </table:table-cell>
          <table:table-cell office:value-type="string">
            <text:p>Abraham</text:p>
          </table:table-cell>
          <table:table-cell office:value-type="string">
            <text:p>(4, 2, 12, 6, 0)</text:p>
          </table:table-cell>
          <table:table-cell office:value-type="string">
            <text:p>MrNubs</text:p>
          </table:table-cell>
          <table:table-cell table:number-columns-repeated="1019"/>
        </table:table-row>
        <table:table-row table:style-name="ro1">
          <table:table-cell office:value-type="string">
            <text:p>ebat</text:p>
          </table:table-cell>
          <table:table-cell office:value-type="string">
            <text:p>(0, 0, 0, 0, 2)</text:p>
          </table:table-cell>
          <table:table-cell office:value-type="string">
            <text:p>Lapi</text:p>
          </table:table-cell>
          <table:table-cell office:value-type="string">
            <text:p>(3, 1, 12, 5, 0)</text:p>
          </table:table-cell>
          <table:table-cell office:value-type="string">
            <text:p>ebat</text:p>
          </table:table-cell>
          <table:table-cell table:number-columns-repeated="1019"/>
        </table:table-row>
        <table:table-row table:style-name="ro1">
          <table:table-cell office:value-type="string">
            <text:p>JDQ05</text:p>
          </table:table-cell>
          <table:table-cell office:value-type="string">
            <text:p>(5, 3, 11, 7, 0)</text:p>
          </table:table-cell>
          <table:table-cell office:value-type="string">
            <text:p>SandBag</text:p>
          </table:table-cell>
          <table:table-cell office:value-type="string">
            <text:p>(2, 0, 7, 1, 0)</text:p>
          </table:table-cell>
          <table:table-cell office:value-type="string">
            <text:p>JDQ05</text:p>
          </table:table-cell>
          <table:table-cell table:number-columns-repeated="1019"/>
        </table:table-row>
        <table:table-row table:style-name="ro1">
          <table:table-cell office:value-type="string">
            <text:p>Domingo</text:p>
          </table:table-cell>
          <table:table-cell office:value-type="string">
            <text:p>(2, 0, 4, 0, 0)</text:p>
          </table:table-cell>
          <table:table-cell office:value-type="string">
            <text:p>Ban</text:p>
          </table:table-cell>
          <table:table-cell office:value-type="string">
            <text:p>(0, 0, 0, 0, 2)</text:p>
          </table:table-cell>
          <table:table-cell office:value-type="string">
            <text:p>Domingo</text:p>
          </table:table-cell>
          <table:table-cell table:number-columns-repeated="1019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4, 2, 8, 4, 0)</text:p>
          </table:table-cell>
          <table:table-cell office:value-type="string">
            <text:p>Benny</text:p>
          </table:table-cell>
          <table:table-cell office:value-type="string">
            <text:p>(0, 0, 0, 0, 2)</text:p>
          </table:table-cell>
          <table:table-cell office:value-type="string">
            <text:p>HaydenEatsShrimp</text:p>
          </table:table-cell>
          <table:table-cell table:number-columns-repeated="1019"/>
        </table:table-row>
        <table:table-row table:style-name="ro1">
          <table:table-cell office:value-type="string">
            <text:p>Shnissugah</text:p>
          </table:table-cell>
          <table:table-cell office:value-type="string">
            <text:p>(2, 0, 4, 0, 0)</text:p>
          </table:table-cell>
          <table:table-cell office:value-type="string">
            <text:p>Bustopher</text:p>
          </table:table-cell>
          <table:table-cell office:value-type="string">
            <text:p>(0, 0, 0, 0, 2)</text:p>
          </table:table-cell>
          <table:table-cell office:value-type="string">
            <text:p>Shnissugah</text:p>
          </table:table-cell>
          <table:table-cell table:number-columns-repeated="1019"/>
        </table:table-row>
        <table:table-row table:style-name="ro1">
          <table:table-cell office:value-type="string">
            <text:p>The Chuckster</text:p>
          </table:table-cell>
          <table:table-cell office:value-type="string">
            <text:p>(5, 3, 10, 6, 0)</text:p>
          </table:table-cell>
          <table:table-cell office:value-type="string">
            <text:p>Hordan</text:p>
          </table:table-cell>
          <table:table-cell office:value-type="string">
            <text:p>(5, 3, 15, 9, 0)</text:p>
          </table:table-cell>
          <table:table-cell office:value-type="string">
            <text:p>The Chuckster</text:p>
          </table:table-cell>
          <table:table-cell table:number-columns-repeated="1019"/>
        </table:table-row>
        <table:table-row table:style-name="ro1">
          <table:table-cell office:value-type="string">
            <text:p>Eliastar</text:p>
          </table:table-cell>
          <table:table-cell office:value-type="string">
            <text:p>(2, 0, 4, 0, 0)</text:p>
          </table:table-cell>
          <table:table-cell office:value-type="string">
            <text:p>iphone on 2% since 2018</text:p>
          </table:table-cell>
          <table:table-cell office:value-type="string">
            <text:p>(2, 0, 6, 0, 0)</text:p>
          </table:table-cell>
          <table:table-cell office:value-type="string">
            <text:p>Eliastar</text:p>
          </table:table-cell>
          <table:table-cell table:number-columns-repeated="1019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6, 4, 12, 8, 0)</text:p>
          </table:table-cell>
          <table:table-cell office:value-type="string">
            <text:p>NotTony</text:p>
          </table:table-cell>
          <table:table-cell office:value-type="string">
            <text:p>(2, 0, 6, 0, 0)</text:p>
          </table:table-cell>
          <table:table-cell office:value-type="string">
            <text:p>Chavalava</text:p>
          </table:table-cell>
          <table:table-cell table:number-columns-repeated="1019"/>
        </table:table-row>
        <table:table-row table:style-name="ro1">
          <table:table-cell office:value-type="string">
            <text:p>RedPik</text:p>
          </table:table-cell>
          <table:table-cell office:value-type="string">
            <text:p>(2, 0, 4, 0, 0)</text:p>
          </table:table-cell>
          <table:table-cell office:value-type="string">
            <text:p>A-K SiN</text:p>
          </table:table-cell>
          <table:table-cell office:value-type="string">
            <text:p>(0, 0, 0, 0, 2)</text:p>
          </table:table-cell>
          <table:table-cell office:value-type="string">
            <text:p>RedPik</text:p>
          </table:table-cell>
          <table:table-cell table:number-columns-repeated="1019"/>
        </table:table-row>
        <table:table-row table:style-name="ro1">
          <table:table-cell office:value-type="string">
            <text:p>Ginger</text:p>
          </table:table-cell>
          <table:table-cell office:value-type="string">
            <text:p>(4, 2, 10, 6, 0)</text:p>
          </table:table-cell>
          <table:table-cell office:value-type="string">
            <text:p>drc</text:p>
          </table:table-cell>
          <table:table-cell office:value-type="string">
            <text:p>(4, 2, 14, 6, 0)</text:p>
          </table:table-cell>
          <table:table-cell office:value-type="string">
            <text:p>Ginger</text:p>
          </table:table-cell>
          <table:table-cell table:number-columns-repeated="1019"/>
        </table:table-row>
        <table:table-row table:style-name="ro1">
          <table:table-cell office:value-type="string">
            <text:p>OwiePowie69</text:p>
          </table:table-cell>
          <table:table-cell office:value-type="string">
            <text:p>(2, 0, 4, 0, 0)</text:p>
          </table:table-cell>
          <table:table-cell office:value-type="string">
            <text:p>pancake</text:p>
          </table:table-cell>
          <table:table-cell office:value-type="string">
            <text:p>(2, 0, 6, 0, 0)</text:p>
          </table:table-cell>
          <table:table-cell office:value-type="string">
            <text:p>OwiePowie69</text:p>
          </table:table-cell>
          <table:table-cell table:number-columns-repeated="1019"/>
        </table:table-row>
        <table:table-row table:style-name="ro1">
          <table:table-cell office:value-type="string">
            <text:p>JediSmash</text:p>
          </table:table-cell>
          <table:table-cell office:value-type="string">
            <text:p>(3, 1, 7, 2, 0)</text:p>
          </table:table-cell>
          <table:table-cell office:value-type="string">
            <text:p>AzLu</text:p>
          </table:table-cell>
          <table:table-cell office:value-type="string">
            <text:p>(5, 3, 19, 13, 0)</text:p>
          </table:table-cell>
          <table:table-cell office:value-type="string">
            <text:p>JediSmash</text:p>
          </table:table-cell>
          <table:table-cell table:number-columns-repeated="1019"/>
        </table:table-row>
        <table:table-row table:style-name="ro1">
          <table:table-cell office:value-type="string">
            <text:p>tjnikhazy</text:p>
          </table:table-cell>
          <table:table-cell office:value-type="string">
            <text:p>(2, 0, 6, 2, 0)</text:p>
          </table:table-cell>
          <table:table-cell office:value-type="string">
            <text:p>Howie</text:p>
          </table:table-cell>
          <table:table-cell office:value-type="string">
            <text:p>(4, 2, 14, 6, 0)</text:p>
          </table:table-cell>
          <table:table-cell office:value-type="string">
            <text:p>tjnikhazy</text:p>
          </table:table-cell>
          <table:table-cell table:number-columns-repeated="1019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2, 11, 37, 28, 0)</text:p>
          </table:table-cell>
          <table:table-cell office:value-type="string">
            <text:p>Proto</text:p>
          </table:table-cell>
          <table:table-cell office:value-type="string">
            <text:p>(4, 2, 14, 7, 0)</text:p>
          </table:table-cell>
          <table:table-cell office:value-type="string">
            <text:p>BeastModePaul</text:p>
          </table:table-cell>
          <table:table-cell table:number-columns-repeated="1019"/>
        </table:table-row>
        <table:table-row table:style-name="ro1">
          <table:table-cell office:value-type="string">
            <text:p>syntax</text:p>
          </table:table-cell>
          <table:table-cell office:value-type="string">
            <text:p>(3, 1, 7, 2, 0)</text:p>
          </table:table-cell>
          <table:table-cell office:value-type="string">
            <text:p>Frardvark</text:p>
          </table:table-cell>
          <table:table-cell office:value-type="string">
            <text:p>(2, 0, 8, 2, 0)</text:p>
          </table:table-cell>
          <table:table-cell office:value-type="string">
            <text:p>syntax</text:p>
          </table:table-cell>
          <table:table-cell table:number-columns-repeated="1019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4, 2, 9, 5, 0)</text:p>
          </table:table-cell>
          <table:table-cell office:value-type="string">
            <text:p>Jovian</text:p>
          </table:table-cell>
          <table:table-cell office:value-type="string">
            <text:p>(4, 2, 13, 6, 0)</text:p>
          </table:table-cell>
          <table:table-cell office:value-type="string">
            <text:p>LuMiSaDi</text:p>
          </table:table-cell>
          <table:table-cell table:number-columns-repeated="1019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8, 6, 20, 14, 0)</text:p>
          </table:table-cell>
          <table:table-cell office:value-type="string">
            <text:p>ThatOneGuy</text:p>
          </table:table-cell>
          <table:table-cell office:value-type="string">
            <text:p>(2, 0, 7, 1, 0)</text:p>
          </table:table-cell>
          <table:table-cell office:value-type="string">
            <text:p>McFunny</text:p>
          </table:table-cell>
          <table:table-cell table:number-columns-repeated="1019"/>
        </table:table-row>
        <table:table-row table:style-name="ro1">
          <table:table-cell office:value-type="string">
            <text:p>Koloax</text:p>
          </table:table-cell>
          <table:table-cell office:value-type="string">
            <text:p>(6, 4, 15, 9, 0)</text:p>
          </table:table-cell>
          <table:table-cell office:value-type="string">
            <text:p>Bobateatime</text:p>
          </table:table-cell>
          <table:table-cell office:value-type="string">
            <text:p>(4, 2, 13, 6, 0)</text:p>
          </table:table-cell>
          <table:table-cell office:value-type="string">
            <text:p>Koloax</text:p>
          </table:table-cell>
          <table:table-cell table:number-columns-repeated="1019"/>
        </table:table-row>
        <table:table-row table:style-name="ro1">
          <table:table-cell office:value-type="string">
            <text:p>Viri</text:p>
          </table:table-cell>
          <table:table-cell office:value-type="string">
            <text:p>(0, 0, 0, 0, 2)</text:p>
          </table:table-cell>
          <table:table-cell office:value-type="string">
            <text:p>Quelity</text:p>
          </table:table-cell>
          <table:table-cell office:value-type="string">
            <text:p>(2, 0, 7, 1, 0)</text:p>
          </table:table-cell>
          <table:table-cell office:value-type="string">
            <text:p>Viri</text:p>
          </table:table-cell>
          <table:table-cell table:number-columns-repeated="1019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(5, 3, 11, 6, 0)</text:p>
          </table:table-cell>
          <table:table-cell office:value-type="string">
            <text:p>Hod Strat</text:p>
          </table:table-cell>
          <table:table-cell office:value-type="string">
            <text:p>(5, 3, 18, 10, 0)</text:p>
          </table:table-cell>
          <table:table-cell office:value-type="string">
            <text:p>Dingodile</text:p>
          </table:table-cell>
          <table:table-cell table:number-columns-repeated="1019"/>
        </table:table-row>
        <table:table-row table:style-name="ro1">
          <table:table-cell office:value-type="string">
            <text:p>Grymlynn</text:p>
          </table:table-cell>
          <table:table-cell office:value-type="string">
            <text:p>(4, 2, 10, 5, 0)</text:p>
          </table:table-cell>
          <table:table-cell office:value-type="string">
            <text:p>King Momo</text:p>
          </table:table-cell>
          <table:table-cell office:value-type="string">
            <text:p>(0, 0, 0, 0, 2)</text:p>
          </table:table-cell>
          <table:table-cell office:value-type="string">
            <text:p>Grymlynn</text:p>
          </table:table-cell>
          <table:table-cell table:number-columns-repeated="1019"/>
        </table:table-row>
        <table:table-row table:style-name="ro1">
          <table:table-cell office:value-type="string">
            <text:p>My Dad</text:p>
          </table:table-cell>
          <table:table-cell office:value-type="string">
            <text:p>(4, 2, 9, 4, 0)</text:p>
          </table:table-cell>
          <table:table-cell office:value-type="string">
            <text:p>ted.</text:p>
          </table:table-cell>
          <table:table-cell office:value-type="string">
            <text:p>(3, 1, 9, 3, 0)</text:p>
          </table:table-cell>
          <table:table-cell office:value-type="string">
            <text:p>My Dad</text:p>
          </table:table-cell>
          <table:table-cell table:number-columns-repeated="1019"/>
        </table:table-row>
        <table:table-row table:style-name="ro1">
          <table:table-cell office:value-type="string">
            <text:p>BooBell</text:p>
          </table:table-cell>
          <table:table-cell office:value-type="string">
            <text:p>(4, 2, 8, 4, 0)</text:p>
          </table:table-cell>
          <table:table-cell office:value-type="string">
            <text:p>Jacktheragingbull</text:p>
          </table:table-cell>
          <table:table-cell office:value-type="string">
            <text:p>(2, 0, 6, 0, 0)</text:p>
          </table:table-cell>
          <table:table-cell office:value-type="string">
            <text:p>BooBell</text:p>
          </table:table-cell>
          <table:table-cell table:number-columns-repeated="1019"/>
        </table:table-row>
        <table:table-row table:style-name="ro1">
          <table:table-cell office:value-type="string">
            <text:p>SundayGary</text:p>
          </table:table-cell>
          <table:table-cell office:value-type="string">
            <text:p>(2, 0, 4, 0, 0)</text:p>
          </table:table-cell>
          <table:table-cell office:value-type="string">
            <text:p>baggu</text:p>
          </table:table-cell>
          <table:table-cell office:value-type="string">
            <text:p>(4, 2, 14, 8, 0)</text:p>
          </table:table-cell>
          <table:table-cell office:value-type="string">
            <text:p>SundayGary</text:p>
          </table:table-cell>
          <table:table-cell table:number-columns-repeated="1019"/>
        </table:table-row>
        <table:table-row table:style-name="ro1">
          <table:table-cell office:value-type="string">
            <text:p>ThitKho</text:p>
          </table:table-cell>
          <table:table-cell office:value-type="string">
            <text:p>(3, 1, 7, 2, 0)</text:p>
          </table:table-cell>
          <table:table-cell office:value-type="string">
            <text:p>Cloak</text:p>
          </table:table-cell>
          <table:table-cell office:value-type="string">
            <text:p>(2, 0, 8, 2, 0)</text:p>
          </table:table-cell>
          <table:table-cell office:value-type="string">
            <text:p>ThitKho</text:p>
          </table:table-cell>
          <table:table-cell table:number-columns-repeated="1019"/>
        </table:table-row>
        <table:table-row table:style-name="ro1">
          <table:table-cell office:value-type="string">
            <text:p>Pryvate Pigeon</text:p>
          </table:table-cell>
          <table:table-cell office:value-type="string">
            <text:p>(0, 0, 0, 0, 2)</text:p>
          </table:table-cell>
          <table:table-cell office:value-type="string">
            <text:p>Isosceles</text:p>
          </table:table-cell>
          <table:table-cell office:value-type="string">
            <text:p>(4, 2, 13, 6, 0)</text:p>
          </table:table-cell>
          <table:table-cell office:value-type="string">
            <text:p>Pryvate Pigeon</text:p>
          </table:table-cell>
          <table:table-cell table:number-columns-repeated="1019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4, 2, 10, 4, 0)</text:p>
          </table:table-cell>
          <table:table-cell office:value-type="string">
            <text:p>Stylish thug slayer</text:p>
          </table:table-cell>
          <table:table-cell office:value-type="string">
            <text:p>(3, 1, 9, 3, 0)</text:p>
          </table:table-cell>
          <table:table-cell office:value-type="string">
            <text:p>Vinny, The Lick</text:p>
          </table:table-cell>
          <table:table-cell table:number-columns-repeated="1019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(1, 0, 3, 1, 1)</text:p>
          </table:table-cell>
          <table:table-cell office:value-type="string">
            <text:p>OncomingTraffic</text:p>
          </table:table-cell>
          <table:table-cell office:value-type="string">
            <text:p>(4, 2, 14, 8, 0)</text:p>
          </table:table-cell>
          <table:table-cell office:value-type="string">
            <text:p>SamersonT</text:p>
          </table:table-cell>
          <table:table-cell table:number-columns-repeated="1019"/>
        </table:table-row>
        <table:table-row table:style-name="ro1">
          <table:table-cell office:value-type="string">
            <text:p>bignews.co</text:p>
          </table:table-cell>
          <table:table-cell office:value-type="string">
            <text:p>(2, 0, 4, 0, 0)</text:p>
          </table:table-cell>
          <table:table-cell office:value-type="string">
            <text:p>CCgrabs</text:p>
          </table:table-cell>
          <table:table-cell office:value-type="string">
            <text:p>(2, 0, 6, 0, 0)</text:p>
          </table:table-cell>
          <table:table-cell office:value-type="string">
            <text:p>bignews.co</text:p>
          </table:table-cell>
          <table:table-cell table:number-columns-repeated="1019"/>
        </table:table-row>
        <table:table-row table:style-name="ro1">
          <table:table-cell office:value-type="string">
            <text:p>CarlJT</text:p>
          </table:table-cell>
          <table:table-cell office:value-type="string">
            <text:p>(0, 0, 0, 0, 2)</text:p>
          </table:table-cell>
          <table:table-cell office:value-type="string">
            <text:p>uhline</text:p>
          </table:table-cell>
          <table:table-cell office:value-type="string">
            <text:p>(4, 2, 14, 6, 0)</text:p>
          </table:table-cell>
          <table:table-cell office:value-type="string">
            <text:p>CarlJT</text:p>
          </table:table-cell>
          <table:table-cell table:number-columns-repeated="1019"/>
        </table:table-row>
        <table:table-row table:style-name="ro1">
          <table:table-cell office:value-type="string">
            <text:p>Zorrin</text:p>
          </table:table-cell>
          <table:table-cell office:value-type="string">
            <text:p>(5, 3, 11, 7, 0)</text:p>
          </table:table-cell>
          <table:table-cell office:value-type="string">
            <text:p>Chichi Pumpa</text:p>
          </table:table-cell>
          <table:table-cell office:value-type="string">
            <text:p>(2, 0, 6, 0, 0)</text:p>
          </table:table-cell>
          <table:table-cell office:value-type="string">
            <text:p>Zorrin</text:p>
          </table:table-cell>
          <table:table-cell table:number-columns-repeated="1019"/>
        </table:table-row>
        <table:table-row table:style-name="ro1">
          <table:table-cell office:value-type="string">
            <text:p>Mana</text:p>
          </table:table-cell>
          <table:table-cell office:value-type="string">
            <text:p>(2, 0, 5, 1, 0)</text:p>
          </table:table-cell>
          <table:table-cell office:value-type="string">
            <text:p>tgags</text:p>
          </table:table-cell>
          <table:table-cell office:value-type="string">
            <text:p>(2, 0, 7, 1, 0)</text:p>
          </table:table-cell>
          <table:table-cell office:value-type="string">
            <text:p>Mana</text:p>
          </table:table-cell>
          <table:table-cell table:number-columns-repeated="1019"/>
        </table:table-row>
        <table:table-row table:style-name="ro1">
          <table:table-cell office:value-type="string">
            <text:p>Freshness</text:p>
          </table:table-cell>
          <table:table-cell office:value-type="string">
            <text:p>(3, 1, 7, 3, 0)</text:p>
          </table:table-cell>
          <table:table-cell office:value-type="string">
            <text:p>Hazywazy</text:p>
          </table:table-cell>
          <table:table-cell office:value-type="string">
            <text:p>(0, 0, 0, 0, 2)</text:p>
          </table:table-cell>
          <table:table-cell office:value-type="string">
            <text:p>Freshness</text:p>
          </table:table-cell>
          <table:table-cell table:number-columns-repeated="1019"/>
        </table:table-row>
        <table:table-row table:style-name="ro1">
          <table:table-cell office:value-type="string">
            <text:p>DOOM!</text:p>
          </table:table-cell>
          <table:table-cell office:value-type="string">
            <text:p>(4, 2, 8, 4, 0)</text:p>
          </table:table-cell>
          <table:table-cell office:value-type="string">
            <text:p>Hungrybox</text:p>
          </table:table-cell>
          <table:table-cell office:value-type="string">
            <text:p>(7, 5, 24, 17, 0)</text:p>
          </table:table-cell>
          <table:table-cell office:value-type="string">
            <text:p>DOOM!</text:p>
          </table:table-cell>
          <table:table-cell table:number-columns-repeated="1019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7, 5, 15, 11, 0)</text:p>
          </table:table-cell>
          <table:table-cell office:value-type="string">
            <text:p>Gahtzu</text:p>
          </table:table-cell>
          <table:table-cell office:value-type="string">
            <text:p>(7, 5, 25, 15, 0)</text:p>
          </table:table-cell>
          <table:table-cell office:value-type="string">
            <text:p>Squishy~</text:p>
          </table:table-cell>
          <table:table-cell table:number-columns-repeated="1019"/>
        </table:table-row>
        <table:table-row table:style-name="ro1">
          <table:table-cell office:value-type="string">
            <text:p>PrincessPopkorn</text:p>
          </table:table-cell>
          <table:table-cell office:value-type="string">
            <text:p>(2, 0, 4, 0, 0)</text:p>
          </table:table-cell>
          <table:table-cell office:value-type="string">
            <text:p>Forrest</text:p>
          </table:table-cell>
          <table:table-cell office:value-type="string">
            <text:p>(7, 5, 27, 16, 0)</text:p>
          </table:table-cell>
          <table:table-cell office:value-type="string">
            <text:p>PrincessPopkorn</text:p>
          </table:table-cell>
          <table:table-cell table:number-columns-repeated="1019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7, 5, 18, 12, 0)</text:p>
          </table:table-cell>
          <table:table-cell office:value-type="string">
            <text:p>Krudo</text:p>
          </table:table-cell>
          <table:table-cell office:value-type="string">
            <text:p>(6, 6, 22, 18, 0)</text:p>
          </table:table-cell>
          <table:table-cell office:value-type="string">
            <text:p>Epic_Gabriel</text:p>
          </table:table-cell>
          <table:table-cell table:number-columns-repeated="1019"/>
        </table:table-row>
        <table:table-row table:style-name="ro1">
          <table:table-cell office:value-type="string">
            <text:p>Pellonian</text:p>
          </table:table-cell>
          <table:table-cell office:value-type="string">
            <text:p>(3, 1, 7, 2, 0)</text:p>
          </table:table-cell>
          <table:table-cell office:value-type="string">
            <text:p>Slowpez</text:p>
          </table:table-cell>
          <table:table-cell office:value-type="string">
            <text:p>(5, 3, 18, 10, 0)</text:p>
          </table:table-cell>
          <table:table-cell office:value-type="string">
            <text:p>Pellonian</text:p>
          </table:table-cell>
          <table:table-cell table:number-columns-repeated="1019"/>
        </table:table-row>
        <table:table-row table:style-name="ro1">
          <table:table-cell office:value-type="string">
            <text:p>masterqz</text:p>
          </table:table-cell>
          <table:table-cell office:value-type="string">
            <text:p>(2, 0, 5, 1, 0)</text:p>
          </table:table-cell>
          <table:table-cell office:value-type="string">
            <text:p>Captain G</text:p>
          </table:table-cell>
          <table:table-cell office:value-type="string">
            <text:p>(5, 3, 17, 10, 0)</text:p>
          </table:table-cell>
          <table:table-cell office:value-type="string">
            <text:p>masterqz</text:p>
          </table:table-cell>
          <table:table-cell table:number-columns-repeated="1019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5, 3, 11, 6, 0)</text:p>
          </table:table-cell>
          <table:table-cell office:value-type="string">
            <text:p>Sneakywill</text:p>
          </table:table-cell>
          <table:table-cell office:value-type="string">
            <text:p>(0, 0, 0, 0, 2)</text:p>
          </table:table-cell>
          <table:table-cell office:value-type="string">
            <text:p>Plummet</text:p>
          </table:table-cell>
          <table:table-cell table:number-columns-repeated="1019"/>
        </table:table-row>
        <table:table-row table:style-name="ro1">
          <table:table-cell office:value-type="string">
            <text:p>Madera</text:p>
          </table:table-cell>
          <table:table-cell office:value-type="string">
            <text:p>(4, 2, 10, 5, 0)</text:p>
          </table:table-cell>
          <table:table-cell office:value-type="string">
            <text:p>Panda</text:p>
          </table:table-cell>
          <table:table-cell office:value-type="string">
            <text:p>(5, 3, 23, 13, 0)</text:p>
          </table:table-cell>
          <table:table-cell office:value-type="string">
            <text:p>Madera</text:p>
          </table:table-cell>
          <table:table-cell table:number-columns-repeated="1019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5, 3, 12, 8, 0)</text:p>
          </table:table-cell>
          <table:table-cell office:value-type="string">
            <text:p>Yeti</text:p>
          </table:table-cell>
          <table:table-cell office:value-type="string">
            <text:p>(4, 2, 14, 8, 0)</text:p>
          </table:table-cell>
          <table:table-cell office:value-type="string">
            <text:p>Strobics</text:p>
          </table:table-cell>
          <table:table-cell table:number-columns-repeated="1019"/>
        </table:table-row>
        <table:table-row table:style-name="ro1">
          <table:table-cell office:value-type="string">
            <text:p>Breezy 400</text:p>
          </table:table-cell>
          <table:table-cell office:value-type="string">
            <text:p>(5, 3, 12, 6, 0)</text:p>
          </table:table-cell>
          <table:table-cell office:value-type="string">
            <text:p>OG Kid</text:p>
          </table:table-cell>
          <table:table-cell office:value-type="string">
            <text:p>(5, 3, 20, 13, 0)</text:p>
          </table:table-cell>
          <table:table-cell office:value-type="string">
            <text:p>Breezy 400</text:p>
          </table:table-cell>
          <table:table-cell table:number-columns-repeated="1019"/>
        </table:table-row>
        <table:table-row table:style-name="ro1">
          <table:table-cell office:value-type="string">
            <text:p>Livan the Amnesty</text:p>
          </table:table-cell>
          <table:table-cell office:value-type="string">
            <text:p>(7, 5, 17, 11, 0)</text:p>
          </table:table-cell>
          <table:table-cell office:value-type="string">
            <text:p>brokenyew</text:p>
          </table:table-cell>
          <table:table-cell office:value-type="string">
            <text:p>(5, 3, 16, 10, 0)</text:p>
          </table:table-cell>
          <table:table-cell office:value-type="string">
            <text:p>Livan the Amnesty</text:p>
          </table:table-cell>
          <table:table-cell table:number-columns-repeated="1019"/>
        </table:table-row>
        <table:table-row table:style-name="ro1">
          <table:table-cell office:value-type="string">
            <text:p>Turtles</text:p>
          </table:table-cell>
          <table:table-cell office:value-type="string">
            <text:p>(3, 1, 8, 3, 0)</text:p>
          </table:table-cell>
          <table:table-cell office:value-type="string">
            <text:p>Wizzrobe</text:p>
          </table:table-cell>
          <table:table-cell office:value-type="string">
            <text:p>(7, 5, 27, 18, 0)</text:p>
          </table:table-cell>
          <table:table-cell office:value-type="string">
            <text:p>Turtles</text:p>
          </table:table-cell>
          <table:table-cell table:number-columns-repeated="1019"/>
        </table:table-row>
        <table:table-row table:style-name="ro1">
          <table:table-cell office:value-type="string">
            <text:p>jarol</text:p>
          </table:table-cell>
          <table:table-cell office:value-type="string">
            <text:p>(2, 0, 3, 0, 0)</text:p>
          </table:table-cell>
          <table:table-cell office:value-type="string">
            <text:p>Franco</text:p>
          </table:table-cell>
          <table:table-cell office:value-type="string">
            <text:p>(4, 2, 15, 6, 0)</text:p>
          </table:table-cell>
          <table:table-cell office:value-type="string">
            <text:p>jarol</text:p>
          </table:table-cell>
          <table:table-cell table:number-columns-repeated="1019"/>
        </table:table-row>
        <table:table-row table:style-name="ro1">
          <table:table-cell office:value-type="string">
            <text:p>Greybush</text:p>
          </table:table-cell>
          <table:table-cell office:value-type="string">
            <text:p>(0, 0, 0, 0, 2)</text:p>
          </table:table-cell>
          <table:table-cell office:value-type="string">
            <text:p>Komodo</text:p>
          </table:table-cell>
          <table:table-cell office:value-type="string">
            <text:p>(4, 2, 13, 7, 0)</text:p>
          </table:table-cell>
          <table:table-cell office:value-type="string">
            <text:p>Greybush</text:p>
          </table:table-cell>
          <table:table-cell table:number-columns-repeated="1019"/>
        </table:table-row>
        <table:table-row table:style-name="ro1">
          <table:table-cell office:value-type="string">
            <text:p>Yunaka</text:p>
          </table:table-cell>
          <table:table-cell office:value-type="string">
            <text:p>(6, 4, 14, 9, 0)</text:p>
          </table:table-cell>
          <table:table-cell office:value-type="string">
            <text:p>Profanity</text:p>
          </table:table-cell>
          <table:table-cell office:value-type="string">
            <text:p>(5, 3, 18, 11, 0)</text:p>
          </table:table-cell>
          <table:table-cell office:value-type="string">
            <text:p>Yunaka</text:p>
          </table:table-cell>
          <table:table-cell table:number-columns-repeated="1019"/>
        </table:table-row>
        <table:table-row table:style-name="ro1">
          <table:table-cell office:value-type="string">
            <text:p>TommySN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TommySN</text:p>
          </table:table-cell>
          <table:table-cell table:number-columns-repeated="1019"/>
        </table:table-row>
        <table:table-row table:style-name="ro1">
          <table:table-cell office:value-type="string">
            <text:p>CrazySwift</text:p>
          </table:table-cell>
          <table:table-cell office:value-type="string">
            <text:p>(1, 0, 2, 0, 1)</text:p>
          </table:table-cell>
          <table:table-cell table:number-columns-repeated="2"/>
          <table:table-cell office:value-type="string">
            <text:p>CrazySwift</text:p>
          </table:table-cell>
          <table:table-cell table:number-columns-repeated="1019"/>
        </table:table-row>
        <table:table-row table:style-name="ro1">
          <table:table-cell office:value-type="string">
            <text:p>Justeezy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Justeezy</text:p>
          </table:table-cell>
          <table:table-cell table:number-columns-repeated="1019"/>
        </table:table-row>
        <table:table-row table:style-name="ro1">
          <table:table-cell office:value-type="string">
            <text:p>Doc Shock</text:p>
          </table:table-cell>
          <table:table-cell office:value-type="string">
            <text:p>(3, 1, 8, 3, 0)</text:p>
          </table:table-cell>
          <table:table-cell table:number-columns-repeated="2"/>
          <table:table-cell office:value-type="string">
            <text:p>Doc Shock</text:p>
          </table:table-cell>
          <table:table-cell table:number-columns-repeated="1019"/>
        </table:table-row>
        <table:table-row table:style-name="ro1">
          <table:table-cell office:value-type="string">
            <text:p>DREAD</text:p>
          </table:table-cell>
          <table:table-cell office:value-type="string">
            <text:p>(2, 0, 5, 1, 0)</text:p>
          </table:table-cell>
          <table:table-cell table:number-columns-repeated="2"/>
          <table:table-cell office:value-type="string">
            <text:p>DREAD</text:p>
          </table:table-cell>
          <table:table-cell table:number-columns-repeated="1019"/>
        </table:table-row>
        <table:table-row table:style-name="ro1">
          <table:table-cell office:value-type="string">
            <text:p>Kryon</text:p>
          </table:table-cell>
          <table:table-cell office:value-type="string">
            <text:p>(4, 2, 9, 4, 0)</text:p>
          </table:table-cell>
          <table:table-cell table:number-columns-repeated="2"/>
          <table:table-cell office:value-type="string">
            <text:p>Kryon</text:p>
          </table:table-cell>
          <table:table-cell table:number-columns-repeated="1019"/>
        </table:table-row>
        <table:table-row table:style-name="ro1">
          <table:table-cell office:value-type="string">
            <text:p>StepKnightUp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StepKnightUp</text:p>
          </table:table-cell>
          <table:table-cell table:number-columns-repeated="1019"/>
        </table:table-row>
        <table:table-row table:style-name="ro1">
          <table:table-cell office:value-type="string">
            <text:p>Wiccan</text:p>
          </table:table-cell>
          <table:table-cell office:value-type="string">
            <text:p>(4, 2, 9, 5, 0)</text:p>
          </table:table-cell>
          <table:table-cell table:number-columns-repeated="2"/>
          <table:table-cell office:value-type="string">
            <text:p>Wiccan</text:p>
          </table:table-cell>
          <table:table-cell table:number-columns-repeated="1019"/>
        </table:table-row>
        <table:table-row table:style-name="ro1">
          <table:table-cell office:value-type="string">
            <text:p>StimmyTurner</text:p>
          </table:table-cell>
          <table:table-cell office:value-type="string">
            <text:p>(2, 0, 5, 1, 0)</text:p>
          </table:table-cell>
          <table:table-cell table:number-columns-repeated="2"/>
          <table:table-cell office:value-type="string">
            <text:p>StimmyTurner</text:p>
          </table:table-cell>
          <table:table-cell table:number-columns-repeated="1019"/>
        </table:table-row>
        <table:table-row table:style-name="ro1">
          <table:table-cell office:value-type="string">
            <text:p>Panchos</text:p>
          </table:table-cell>
          <table:table-cell office:value-type="string">
            <text:p>(3, 1, 7, 2, 0)</text:p>
          </table:table-cell>
          <table:table-cell table:number-columns-repeated="2"/>
          <table:table-cell office:value-type="string">
            <text:p>Panchos</text:p>
          </table:table-cell>
          <table:table-cell table:number-columns-repeated="1019"/>
        </table:table-row>
        <table:table-row table:style-name="ro1">
          <table:table-cell office:value-type="string">
            <text:p>NotHbox</text:p>
          </table:table-cell>
          <table:table-cell office:value-type="string">
            <text:p>(3, 1, 7, 3, 0)</text:p>
          </table:table-cell>
          <table:table-cell table:number-columns-repeated="2"/>
          <table:table-cell office:value-type="string">
            <text:p>NotHbox</text:p>
          </table:table-cell>
          <table:table-cell table:number-columns-repeated="1019"/>
        </table:table-row>
        <table:table-row table:style-name="ro1">
          <table:table-cell office:value-type="string">
            <text:p>Shaine</text:p>
          </table:table-cell>
          <table:table-cell office:value-type="string">
            <text:p>(6, 4, 15, 9, 0)</text:p>
          </table:table-cell>
          <table:table-cell table:number-columns-repeated="2"/>
          <table:table-cell office:value-type="string">
            <text:p>Shaine</text:p>
          </table:table-cell>
          <table:table-cell table:number-columns-repeated="1019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4, 2, 9, 5, 0)</text:p>
          </table:table-cell>
          <table:table-cell table:number-columns-repeated="2"/>
          <table:table-cell office:value-type="string">
            <text:p>DarthCJ8</text:p>
          </table:table-cell>
          <table:table-cell table:number-columns-repeated="1019"/>
        </table:table-row>
        <table:table-row table:style-name="ro1">
          <table:table-cell office:value-type="string">
            <text:p>sev7x</text:p>
          </table:table-cell>
          <table:table-cell office:value-type="string">
            <text:p>(4, 2, 10, 4, 0)</text:p>
          </table:table-cell>
          <table:table-cell table:number-columns-repeated="2"/>
          <table:table-cell office:value-type="string">
            <text:p>sev7x</text:p>
          </table:table-cell>
          <table:table-cell table:number-columns-repeated="1019"/>
        </table:table-row>
        <table:table-row table:style-name="ro1">
          <table:table-cell office:value-type="string">
            <text:p>Bhand</text:p>
          </table:table-cell>
          <table:table-cell office:value-type="string">
            <text:p>(5, 3, 13, 7, 0)</text:p>
          </table:table-cell>
          <table:table-cell table:number-columns-repeated="2"/>
          <table:table-cell office:value-type="string">
            <text:p>Bhand</text:p>
          </table:table-cell>
          <table:table-cell table:number-columns-repeated="1019"/>
        </table:table-row>
        <table:table-row table:style-name="ro1">
          <table:table-cell office:value-type="string">
            <text:p>Black Lemonade</text:p>
          </table:table-cell>
          <table:table-cell office:value-type="string">
            <text:p>(5, 3, 12, 6, 0)</text:p>
          </table:table-cell>
          <table:table-cell table:number-columns-repeated="2"/>
          <table:table-cell office:value-type="string">
            <text:p>Black Lemonade</text:p>
          </table:table-cell>
          <table:table-cell table:number-columns-repeated="1019"/>
        </table:table-row>
        <table:table-row table:style-name="ro1">
          <table:table-cell office:value-type="string">
            <text:p>Venikki</text:p>
          </table:table-cell>
          <table:table-cell office:value-type="string">
            <text:p>(8, 6, 22, 14, 0)</text:p>
          </table:table-cell>
          <table:table-cell table:number-columns-repeated="2"/>
          <table:table-cell office:value-type="string">
            <text:p>Venikki</text:p>
          </table:table-cell>
          <table:table-cell table:number-columns-repeated="1019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2, 1, 4, 2, 1)</text:p>
          </table:table-cell>
          <table:table-cell table:number-columns-repeated="2"/>
          <table:table-cell office:value-type="string">
            <text:p>Hungrybox</text:p>
          </table:table-cell>
          <table:table-cell table:number-columns-repeated="1019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5, 3, 11, 7, 0)</text:p>
          </table:table-cell>
          <table:table-cell table:number-columns-repeated="2"/>
          <table:table-cell office:value-type="string">
            <text:p>WonderBread</text:p>
          </table:table-cell>
          <table:table-cell table:number-columns-repeated="1019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3, 1, 7, 3, 0)</text:p>
          </table:table-cell>
          <table:table-cell table:number-columns-repeated="2"/>
          <table:table-cell office:value-type="string">
            <text:p>Twilight</text:p>
          </table:table-cell>
          <table:table-cell table:number-columns-repeated="1019"/>
        </table:table-row>
        <table:table-row table:style-name="ro1">
          <table:table-cell office:value-type="string">
            <text:p>Serph</text:p>
          </table:table-cell>
          <table:table-cell office:value-type="string">
            <text:p>(3, 1, 7, 3, 0)</text:p>
          </table:table-cell>
          <table:table-cell table:number-columns-repeated="2"/>
          <table:table-cell office:value-type="string">
            <text:p>Serph</text:p>
          </table:table-cell>
          <table:table-cell table:number-columns-repeated="1019"/>
        </table:table-row>
        <table:table-row table:style-name="ro1">
          <table:table-cell office:value-type="string">
            <text:p>Kakarot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Kakarot</text:p>
          </table:table-cell>
          <table:table-cell table:number-columns-repeated="1019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4, 2, 9, 5, 0)</text:p>
          </table:table-cell>
          <table:table-cell table:number-columns-repeated="2"/>
          <table:table-cell office:value-type="string">
            <text:p>xXx_PeterGokuGriffin_xXx</text:p>
          </table:table-cell>
          <table:table-cell table:number-columns-repeated="1019"/>
        </table:table-row>
        <table:table-row table:style-name="ro1">
          <table:table-cell office:value-type="string">
            <text:p>Just_A_Tarrasque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Just_A_Tarrasque</text:p>
          </table:table-cell>
          <table:table-cell table:number-columns-repeated="1019"/>
        </table:table-row>
        <table:table-row table:style-name="ro1">
          <table:table-cell office:value-type="string">
            <text:p>Luffysupreme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Luffysupreme</text:p>
          </table:table-cell>
          <table:table-cell table:number-columns-repeated="1019"/>
        </table:table-row>
        <table:table-row table:style-name="ro1">
          <table:table-cell office:value-type="string">
            <text:p>Packet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Packet</text:p>
          </table:table-cell>
          <table:table-cell table:number-columns-repeated="1019"/>
        </table:table-row>
        <table:table-row table:style-name="ro1">
          <table:table-cell office:value-type="string">
            <text:p>Papi</text:p>
          </table:table-cell>
          <table:table-cell office:value-type="string">
            <text:p>(4, 2, 9, 4, 0)</text:p>
          </table:table-cell>
          <table:table-cell table:number-columns-repeated="2"/>
          <table:table-cell office:value-type="string">
            <text:p>Papi</text:p>
          </table:table-cell>
          <table:table-cell table:number-columns-repeated="1019"/>
        </table:table-row>
        <table:table-row table:style-name="ro1">
          <table:table-cell office:value-type="string">
            <text:p>Viprskreen</text:p>
          </table:table-cell>
          <table:table-cell office:value-type="string">
            <text:p>(2, 0, 5, 1, 0)</text:p>
          </table:table-cell>
          <table:table-cell table:number-columns-repeated="2"/>
          <table:table-cell office:value-type="string">
            <text:p>Viprskreen</text:p>
          </table:table-cell>
          <table:table-cell table:number-columns-repeated="1019"/>
        </table:table-row>
        <table:table-row table:style-name="ro1">
          <table:table-cell office:value-type="string">
            <text:p>juno</text:p>
          </table:table-cell>
          <table:table-cell office:value-type="string">
            <text:p>(4, 2, 9, 5, 0)</text:p>
          </table:table-cell>
          <table:table-cell table:number-columns-repeated="2"/>
          <table:table-cell office:value-type="string">
            <text:p>juno</text:p>
          </table:table-cell>
          <table:table-cell table:number-columns-repeated="1019"/>
        </table:table-row>
        <table:table-row table:style-name="ro1">
          <table:table-cell office:value-type="string">
            <text:p>Hazywazy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Hazywazy</text:p>
          </table:table-cell>
          <table:table-cell table:number-columns-repeated="1019"/>
        </table:table-row>
        <table:table-row table:style-name="ro1">
          <table:table-cell office:value-type="string">
            <text:p>Blaine</text:p>
          </table:table-cell>
          <table:table-cell office:value-type="string">
            <text:p>(3, 1, 7, 3, 0)</text:p>
          </table:table-cell>
          <table:table-cell table:number-columns-repeated="2"/>
          <table:table-cell office:value-type="string">
            <text:p>Blaine</text:p>
          </table:table-cell>
          <table:table-cell table:number-columns-repeated="1019"/>
        </table:table-row>
        <table:table-row table:style-name="ro1">
          <table:table-cell office:value-type="string">
            <text:p>elite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elite</text:p>
          </table:table-cell>
          <table:table-cell table:number-columns-repeated="1019"/>
        </table:table-row>
        <table:table-row table:style-name="ro1">
          <table:table-cell office:value-type="string">
            <text:p>Kobe</text:p>
          </table:table-cell>
          <table:table-cell office:value-type="string">
            <text:p>(8, 6, 23, 17, 0)</text:p>
          </table:table-cell>
          <table:table-cell table:number-columns-repeated="2"/>
          <table:table-cell office:value-type="string">
            <text:p>Kobe</text:p>
          </table:table-cell>
          <table:table-cell table:number-columns-repeated="1019"/>
        </table:table-row>
        <table:table-row table:style-name="ro1">
          <table:table-cell office:value-type="string">
            <text:p>fiend</text:p>
          </table:table-cell>
          <table:table-cell office:value-type="string">
            <text:p>(5, 3, 11, 6, 0)</text:p>
          </table:table-cell>
          <table:table-cell table:number-columns-repeated="2"/>
          <table:table-cell office:value-type="string">
            <text:p>fiend</text:p>
          </table:table-cell>
          <table:table-cell table:number-columns-repeated="1019"/>
        </table:table-row>
        <table:table-row table:style-name="ro1">
          <table:table-cell office:value-type="string">
            <text:p>Chez</text:p>
          </table:table-cell>
          <table:table-cell office:value-type="string">
            <text:p>(4, 2, 10, 4, 0)</text:p>
          </table:table-cell>
          <table:table-cell table:number-columns-repeated="2"/>
          <table:table-cell office:value-type="string">
            <text:p>Chez</text:p>
          </table:table-cell>
          <table:table-cell table:number-columns-repeated="1019"/>
        </table:table-row>
        <table:table-row table:style-name="ro1">
          <table:table-cell office:value-type="string">
            <text:p>S. Phantm</text:p>
          </table:table-cell>
          <table:table-cell office:value-type="string">
            <text:p>(5, 3, 10, 6, 0)</text:p>
          </table:table-cell>
          <table:table-cell table:number-columns-repeated="2"/>
          <table:table-cell office:value-type="string">
            <text:p>S. Phantm</text:p>
          </table:table-cell>
          <table:table-cell table:number-columns-repeated="1019"/>
        </table:table-row>
        <table:table-row table:style-name="ro1">
          <table:table-cell office:value-type="string">
            <text:p>D0g3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D0g3</text:p>
          </table:table-cell>
          <table:table-cell table:number-columns-repeated="1019"/>
        </table:table-row>
        <table:table-row table:style-name="ro1">
          <table:table-cell office:value-type="string">
            <text:p>Benji</text:p>
          </table:table-cell>
          <table:table-cell office:value-type="string">
            <text:p>(6, 4, 14, 9, 0)</text:p>
          </table:table-cell>
          <table:table-cell table:number-columns-repeated="2"/>
          <table:table-cell office:value-type="string">
            <text:p>Benji</text:p>
          </table:table-cell>
          <table:table-cell table:number-columns-repeated="1019"/>
        </table:table-row>
        <table:table-row table:style-name="ro1">
          <table:table-cell office:value-type="string">
            <text:p>Oki</text:p>
          </table:table-cell>
          <table:table-cell office:value-type="string">
            <text:p>(3, 1, 9, 4, 0)</text:p>
          </table:table-cell>
          <table:table-cell table:number-columns-repeated="2"/>
          <table:table-cell office:value-type="string">
            <text:p>Oki</text:p>
          </table:table-cell>
          <table:table-cell table:number-columns-repeated="1019"/>
        </table:table-row>
        <table:table-row table:style-name="ro1">
          <table:table-cell office:value-type="string">
            <text:p>derk</text:p>
          </table:table-cell>
          <table:table-cell office:value-type="string">
            <text:p>(3, 1, 7, 3, 0)</text:p>
          </table:table-cell>
          <table:table-cell table:number-columns-repeated="2"/>
          <table:table-cell office:value-type="string">
            <text:p>derk</text:p>
          </table:table-cell>
          <table:table-cell table:number-columns-repeated="1019"/>
        </table:table-row>
        <table:table-row table:style-name="ro1">
          <table:table-cell office:value-type="string">
            <text:p>Navé</text:p>
          </table:table-cell>
          <table:table-cell office:value-type="string">
            <text:p>(5, 3, 12, 6, 0)</text:p>
          </table:table-cell>
          <table:table-cell table:number-columns-repeated="2"/>
          <table:table-cell office:value-type="string">
            <text:p>Navé</text:p>
          </table:table-cell>
          <table:table-cell table:number-columns-repeated="1019"/>
        </table:table-row>
        <table:table-row table:style-name="ro1">
          <table:table-cell office:value-type="string">
            <text:p>poobii</text:p>
          </table:table-cell>
          <table:table-cell office:value-type="string">
            <text:p>(5, 3, 13, 7, 0)</text:p>
          </table:table-cell>
          <table:table-cell table:number-columns-repeated="2"/>
          <table:table-cell office:value-type="string">
            <text:p>poobi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Abraham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Lap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andBa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a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enn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ustoph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orda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phone on 2% since 201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tTon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A-K S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rc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ancak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AzLu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owi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rot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rardvar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Jovia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hatOneGu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obateatim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Quelit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od Stra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King Mom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Jacktheragingbul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aggu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loa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sosce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tylish thug slay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ncomingTraffic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Cgrab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hlin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hichi Pump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gag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ahtzu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orres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Krud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lowpez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aptain 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neakywil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and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et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G Ki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rokenyew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Wizzrob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ranc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Komod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rofanity</text:p>
          </table:table-cell>
          <table:table-cell table:number-columns-repeated="1019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urnament 5" table:style-name="ta9" table:print="false">
        <office:forms form:automatic-focus="false" form:apply-design-mode="false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13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Attendees List</text:p>
          </table:table-cell>
          <table:table-cell table:number-columns-repeated="1019"/>
        </table:table-row>
        <table:table-row table:style-name="ro1">
          <table:table-cell office:value-type="string">
            <text:p>TAOS</text:p>
          </table:table-cell>
          <table:table-cell office:value-type="string">
            <text:p>(3, 1, 6, 2, 0)</text:p>
          </table:table-cell>
          <table:table-cell office:value-type="string">
            <text:p>SpikeGod</text:p>
          </table:table-cell>
          <table:table-cell office:value-type="string">
            <text:p>(2, 0, 4, 0, 0)</text:p>
          </table:table-cell>
          <table:table-cell office:value-type="string">
            <text:p>TAOS</text:p>
          </table:table-cell>
          <table:table-cell table:number-columns-repeated="1019"/>
        </table:table-row>
        <table:table-row table:style-name="ro1">
          <table:table-cell office:value-type="string">
            <text:p>Sandwich</text:p>
          </table:table-cell>
          <table:table-cell office:value-type="string">
            <text:p>(4, 2, 9, 4, 0)</text:p>
          </table:table-cell>
          <table:table-cell office:value-type="string">
            <text:p>Soy Juan</text:p>
          </table:table-cell>
          <table:table-cell office:value-type="string">
            <text:p>(0, 0, 0, 0, 2)</text:p>
          </table:table-cell>
          <table:table-cell office:value-type="string">
            <text:p>Sandwich</text:p>
          </table:table-cell>
          <table:table-cell table:number-columns-repeated="1019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8, 8, 20, 19, 0)</text:p>
          </table:table-cell>
          <table:table-cell office:value-type="string">
            <text:p>bag</text:p>
          </table:table-cell>
          <table:table-cell office:value-type="string">
            <text:p>(0, 0, 0, 0, 2)</text:p>
          </table:table-cell>
          <table:table-cell office:value-type="string">
            <text:p>BeastModePaul</text:p>
          </table:table-cell>
          <table:table-cell table:number-columns-repeated="1019"/>
        </table:table-row>
        <table:table-row table:style-name="ro1">
          <table:table-cell office:value-type="string">
            <text:p>Viprskreen</text:p>
          </table:table-cell>
          <table:table-cell office:value-type="string">
            <text:p>(3, 1, 7, 3, 0)</text:p>
          </table:table-cell>
          <table:table-cell office:value-type="string">
            <text:p>Bada</text:p>
          </table:table-cell>
          <table:table-cell office:value-type="string">
            <text:p>(0, 0, 0, 0, 2)</text:p>
          </table:table-cell>
          <table:table-cell office:value-type="string">
            <text:p>Viprskreen</text:p>
          </table:table-cell>
          <table:table-cell table:number-columns-repeated="1019"/>
        </table:table-row>
        <table:table-row table:style-name="ro1">
          <table:table-cell office:value-type="string">
            <text:p>Just_A_Tarrasque</text:p>
          </table:table-cell>
          <table:table-cell office:value-type="string">
            <text:p>(3, 1, 7, 3, 0)</text:p>
          </table:table-cell>
          <table:table-cell office:value-type="string">
            <text:p>Hungrybox</text:p>
          </table:table-cell>
          <table:table-cell office:value-type="string">
            <text:p>(7, 7, 23, 19, 0)</text:p>
          </table:table-cell>
          <table:table-cell office:value-type="string">
            <text:p>Just_A_Tarrasque</text:p>
          </table:table-cell>
          <table:table-cell table:number-columns-repeated="1019"/>
        </table:table-row>
        <table:table-row table:style-name="ro1">
          <table:table-cell office:value-type="string">
            <text:p>SuperStatic</text:p>
          </table:table-cell>
          <table:table-cell office:value-type="string">
            <text:p>(5, 3, 12, 7, 0)</text:p>
          </table:table-cell>
          <table:table-cell office:value-type="string">
            <text:p>Titan</text:p>
          </table:table-cell>
          <table:table-cell office:value-type="string">
            <text:p>(2, 0, 4, 0, 0)</text:p>
          </table:table-cell>
          <table:table-cell office:value-type="string">
            <text:p>SuperStatic</text:p>
          </table:table-cell>
          <table:table-cell table:number-columns-repeated="1019"/>
        </table:table-row>
        <table:table-row table:style-name="ro1">
          <table:table-cell office:value-type="string">
            <text:p>MrNubs</text:p>
          </table:table-cell>
          <table:table-cell office:value-type="string">
            <text:p>(3, 1, 7, 3, 0)</text:p>
          </table:table-cell>
          <table:table-cell office:value-type="string">
            <text:p>party animal</text:p>
          </table:table-cell>
          <table:table-cell office:value-type="string">
            <text:p>(0, 0, 0, 0, 2)</text:p>
          </table:table-cell>
          <table:table-cell office:value-type="string">
            <text:p>MrNubs</text:p>
          </table:table-cell>
          <table:table-cell table:number-columns-repeated="1019"/>
        </table:table-row>
        <table:table-row table:style-name="ro1">
          <table:table-cell office:value-type="string">
            <text:p>derk</text:p>
          </table:table-cell>
          <table:table-cell office:value-type="string">
            <text:p>(6, 4, 14, 9, 0)</text:p>
          </table:table-cell>
          <table:table-cell office:value-type="string">
            <text:p>Wild Bill</text:p>
          </table:table-cell>
          <table:table-cell office:value-type="string">
            <text:p>(5, 3, 15, 8, 0)</text:p>
          </table:table-cell>
          <table:table-cell office:value-type="string">
            <text:p>derk</text:p>
          </table:table-cell>
          <table:table-cell table:number-columns-repeated="1019"/>
        </table:table-row>
        <table:table-row table:style-name="ro1">
          <table:table-cell office:value-type="string">
            <text:p>WantingSkate</text:p>
          </table:table-cell>
          <table:table-cell office:value-type="string">
            <text:p>(2, 0, 4, 0, 0)</text:p>
          </table:table-cell>
          <table:table-cell office:value-type="string">
            <text:p>Jackie Chun</text:p>
          </table:table-cell>
          <table:table-cell office:value-type="string">
            <text:p>(2, 0, 4, 0, 0)</text:p>
          </table:table-cell>
          <table:table-cell office:value-type="string">
            <text:p>WantingSkate</text:p>
          </table:table-cell>
          <table:table-cell table:number-columns-repeated="1019"/>
        </table:table-row>
        <table:table-row table:style-name="ro1">
          <table:table-cell office:value-type="string">
            <text:p>D0g3</text:p>
          </table:table-cell>
          <table:table-cell office:value-type="string">
            <text:p>(6, 4, 13, 8, 0)</text:p>
          </table:table-cell>
          <table:table-cell office:value-type="string">
            <text:p>Bustopher</text:p>
          </table:table-cell>
          <table:table-cell office:value-type="string">
            <text:p>(5, 3, 11, 6, 0)</text:p>
          </table:table-cell>
          <table:table-cell office:value-type="string">
            <text:p>D0g3</text:p>
          </table:table-cell>
          <table:table-cell table:number-columns-repeated="1019"/>
        </table:table-row>
        <table:table-row table:style-name="ro1">
          <table:table-cell office:value-type="string">
            <text:p>SlimBubbles</text:p>
          </table:table-cell>
          <table:table-cell office:value-type="string">
            <text:p>(0, 0, 0, 0, 2)</text:p>
          </table:table-cell>
          <table:table-cell office:value-type="string">
            <text:p>Sigh</text:p>
          </table:table-cell>
          <table:table-cell office:value-type="string">
            <text:p>(3, 1, 6, 2, 0)</text:p>
          </table:table-cell>
          <table:table-cell office:value-type="string">
            <text:p>SlimBubbles</text:p>
          </table:table-cell>
          <table:table-cell table:number-columns-repeated="1019"/>
        </table:table-row>
        <table:table-row table:style-name="ro1">
          <table:table-cell office:value-type="string">
            <text:p>Doormatt</text:p>
          </table:table-cell>
          <table:table-cell office:value-type="string">
            <text:p>(3, 1, 7, 2, 0)</text:p>
          </table:table-cell>
          <table:table-cell office:value-type="string">
            <text:p>brokenyew</text:p>
          </table:table-cell>
          <table:table-cell office:value-type="string">
            <text:p>(7, 5, 24, 17, 0)</text:p>
          </table:table-cell>
          <table:table-cell office:value-type="string">
            <text:p>Doormatt</text:p>
          </table:table-cell>
          <table:table-cell table:number-columns-repeated="1019"/>
        </table:table-row>
        <table:table-row table:style-name="ro1">
          <table:table-cell office:value-type="string">
            <text:p>Nightmare Fredbear</text:p>
          </table:table-cell>
          <table:table-cell office:value-type="string">
            <text:p>(0, 0, 0, 0, 2)</text:p>
          </table:table-cell>
          <table:table-cell office:value-type="string">
            <text:p>Jovian</text:p>
          </table:table-cell>
          <table:table-cell office:value-type="string">
            <text:p>(2, 0, 5, 1, 0)</text:p>
          </table:table-cell>
          <table:table-cell office:value-type="string">
            <text:p>Nightmare Fredbear</text:p>
          </table:table-cell>
          <table:table-cell table:number-columns-repeated="1019"/>
        </table:table-row>
        <table:table-row table:style-name="ro1">
          <table:table-cell office:value-type="string">
            <text:p>Navé</text:p>
          </table:table-cell>
          <table:table-cell office:value-type="string">
            <text:p>(7, 5, 14, 10, 0)</text:p>
          </table:table-cell>
          <table:table-cell office:value-type="string">
            <text:p>OncomingTraffic</text:p>
          </table:table-cell>
          <table:table-cell office:value-type="string">
            <text:p>(5, 3, 12, 7, 0)</text:p>
          </table:table-cell>
          <table:table-cell office:value-type="string">
            <text:p>Navé</text:p>
          </table:table-cell>
          <table:table-cell table:number-columns-repeated="1019"/>
        </table:table-row>
        <table:table-row table:style-name="ro1">
          <table:table-cell office:value-type="string">
            <text:p>Gameboyfreshy</text:p>
          </table:table-cell>
          <table:table-cell office:value-type="string">
            <text:p>(2, 0, 4, 0, 0)</text:p>
          </table:table-cell>
          <table:table-cell office:value-type="string">
            <text:p>baggu</text:p>
          </table:table-cell>
          <table:table-cell office:value-type="string">
            <text:p>(3, 1, 8, 3, 0)</text:p>
          </table:table-cell>
          <table:table-cell office:value-type="string">
            <text:p>Gameboyfreshy</text:p>
          </table:table-cell>
          <table:table-cell table:number-columns-repeated="1019"/>
        </table:table-row>
        <table:table-row table:style-name="ro1">
          <table:table-cell office:value-type="string">
            <text:p>DGK</text:p>
          </table:table-cell>
          <table:table-cell office:value-type="string">
            <text:p>(4, 2, 9, 4, 0)</text:p>
          </table:table-cell>
          <table:table-cell office:value-type="string">
            <text:p>Franco</text:p>
          </table:table-cell>
          <table:table-cell office:value-type="string">
            <text:p>(5, 3, 16, 8, 0)</text:p>
          </table:table-cell>
          <table:table-cell office:value-type="string">
            <text:p>DGK</text:p>
          </table:table-cell>
          <table:table-cell table:number-columns-repeated="1019"/>
        </table:table-row>
        <table:table-row table:style-name="ro1">
          <table:table-cell office:value-type="string">
            <text:p>Wiccan</text:p>
          </table:table-cell>
          <table:table-cell office:value-type="string">
            <text:p>(0, 0, 0, 0, 2)</text:p>
          </table:table-cell>
          <table:table-cell office:value-type="string">
            <text:p>Cloak</text:p>
          </table:table-cell>
          <table:table-cell office:value-type="string">
            <text:p>(0, 0, 0, 0, 2)</text:p>
          </table:table-cell>
          <table:table-cell office:value-type="string">
            <text:p>Wiccan</text:p>
          </table:table-cell>
          <table:table-cell table:number-columns-repeated="1019"/>
        </table:table-row>
        <table:table-row table:style-name="ro1">
          <table:table-cell office:value-type="string">
            <text:p>Grymlynn</text:p>
          </table:table-cell>
          <table:table-cell office:value-type="string">
            <text:p>(7, 5, 16, 11, 0)</text:p>
          </table:table-cell>
          <table:table-cell office:value-type="string">
            <text:p>TESTIKYLE</text:p>
          </table:table-cell>
          <table:table-cell office:value-type="string">
            <text:p>(3, 1, 8, 3, 0)</text:p>
          </table:table-cell>
          <table:table-cell office:value-type="string">
            <text:p>Grymlynn</text:p>
          </table:table-cell>
          <table:table-cell table:number-columns-repeated="1019"/>
        </table:table-row>
        <table:table-row table:style-name="ro1">
          <table:table-cell office:value-type="string">
            <text:p>Packy</text:p>
          </table:table-cell>
          <table:table-cell office:value-type="string">
            <text:p>(2, 1, 4, 2, 1)</text:p>
          </table:table-cell>
          <table:table-cell office:value-type="string">
            <text:p>Baby Carrot</text:p>
          </table:table-cell>
          <table:table-cell office:value-type="string">
            <text:p>(0, 0, 0, 0, 2)</text:p>
          </table:table-cell>
          <table:table-cell office:value-type="string">
            <text:p>Packy</text:p>
          </table:table-cell>
          <table:table-cell table:number-columns-repeated="1019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5, 3, 13, 7, 0)</text:p>
          </table:table-cell>
          <table:table-cell office:value-type="string">
            <text:p>Komodo</text:p>
          </table:table-cell>
          <table:table-cell office:value-type="string">
            <text:p>(6, 4, 21, 15, 0)</text:p>
          </table:table-cell>
          <table:table-cell office:value-type="string">
            <text:p>DarthCJ8</text:p>
          </table:table-cell>
          <table:table-cell table:number-columns-repeated="1019"/>
        </table:table-row>
        <table:table-row table:style-name="ro1">
          <table:table-cell office:value-type="string">
            <text:p>OwiePowie69</text:p>
          </table:table-cell>
          <table:table-cell office:value-type="string">
            <text:p>(2, 0, 4, 0, 0)</text:p>
          </table:table-cell>
          <table:table-cell office:value-type="string">
            <text:p>masterqz</text:p>
          </table:table-cell>
          <table:table-cell office:value-type="string">
            <text:p>(0, 0, 0, 0, 2)</text:p>
          </table:table-cell>
          <table:table-cell office:value-type="string">
            <text:p>OwiePowie69</text:p>
          </table:table-cell>
          <table:table-cell table:number-columns-repeated="1019"/>
        </table:table-row>
        <table:table-row table:style-name="ro1">
          <table:table-cell office:value-type="string">
            <text:p>KRilL</text:p>
          </table:table-cell>
          <table:table-cell office:value-type="string">
            <text:p>(4, 2, 8, 4, 0)</text:p>
          </table:table-cell>
          <table:table-cell office:value-type="string">
            <text:p>Hod Strat</text:p>
          </table:table-cell>
          <table:table-cell office:value-type="string">
            <text:p>(6, 4, 17, 11, 0)</text:p>
          </table:table-cell>
          <table:table-cell office:value-type="string">
            <text:p>KRilL</text:p>
          </table:table-cell>
          <table:table-cell table:number-columns-repeated="1019"/>
        </table:table-row>
        <table:table-row table:style-name="ro1">
          <table:table-cell office:value-type="string">
            <text:p>spiderboy1327</text:p>
          </table:table-cell>
          <table:table-cell office:value-type="string">
            <text:p>(2, 0, 4, 0, 0)</text:p>
          </table:table-cell>
          <table:table-cell office:value-type="string">
            <text:p>LuMiSaDi</text:p>
          </table:table-cell>
          <table:table-cell office:value-type="string">
            <text:p>(2, 0, 5, 1, 0)</text:p>
          </table:table-cell>
          <table:table-cell office:value-type="string">
            <text:p>spiderboy1327</text:p>
          </table:table-cell>
          <table:table-cell table:number-columns-repeated="1019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(3, 1, 8, 3, 0)</text:p>
          </table:table-cell>
          <table:table-cell office:value-type="string">
            <text:p>Sneakywill</text:p>
          </table:table-cell>
          <table:table-cell office:value-type="string">
            <text:p>(5, 3, 15, 7, 0)</text:p>
          </table:table-cell>
          <table:table-cell office:value-type="string">
            <text:p>Dingodile</text:p>
          </table:table-cell>
          <table:table-cell table:number-columns-repeated="1019"/>
        </table:table-row>
        <table:table-row table:style-name="ro1">
          <table:table-cell office:value-type="string">
            <text:p>SeiryuSDVX</text:p>
          </table:table-cell>
          <table:table-cell office:value-type="string">
            <text:p>(0, 0, 0, 0, 2)</text:p>
          </table:table-cell>
          <table:table-cell office:value-type="string">
            <text:p>Proto</text:p>
          </table:table-cell>
          <table:table-cell office:value-type="string">
            <text:p>(2, 0, 5, 1, 0)</text:p>
          </table:table-cell>
          <table:table-cell office:value-type="string">
            <text:p>SeiryuSDVX</text:p>
          </table:table-cell>
          <table:table-cell table:number-columns-repeated="1019"/>
        </table:table-row>
        <table:table-row table:style-name="ro1">
          <table:table-cell office:value-type="string">
            <text:p>Black Lemonade</text:p>
          </table:table-cell>
          <table:table-cell office:value-type="string">
            <text:p>(5, 3, 12, 7, 0)</text:p>
          </table:table-cell>
          <table:table-cell office:value-type="string">
            <text:p>Jacktheragingbull</text:p>
          </table:table-cell>
          <table:table-cell office:value-type="string">
            <text:p>(2, 0, 4, 0, 0)</text:p>
          </table:table-cell>
          <table:table-cell office:value-type="string">
            <text:p>Black Lemonade</text:p>
          </table:table-cell>
          <table:table-cell table:number-columns-repeated="1019"/>
        </table:table-row>
        <table:table-row table:style-name="ro1">
          <table:table-cell office:value-type="string">
            <text:p>ElMexicano</text:p>
          </table:table-cell>
          <table:table-cell office:value-type="string">
            <text:p>(0, 0, 0, 0, 2)</text:p>
          </table:table-cell>
          <table:table-cell office:value-type="string">
            <text:p>Kairos</text:p>
          </table:table-cell>
          <table:table-cell office:value-type="string">
            <text:p>(0, 0, 0, 0, 2)</text:p>
          </table:table-cell>
          <table:table-cell office:value-type="string">
            <text:p>ElMexicano</text:p>
          </table:table-cell>
          <table:table-cell table:number-columns-repeated="1019"/>
        </table:table-row>
        <table:table-row table:style-name="ro1">
          <table:table-cell office:value-type="string">
            <text:p>Ginger</text:p>
          </table:table-cell>
          <table:table-cell office:value-type="string">
            <text:p>(4, 2, 8, 4, 0)</text:p>
          </table:table-cell>
          <table:table-cell office:value-type="string">
            <text:p>Captain G</text:p>
          </table:table-cell>
          <table:table-cell office:value-type="string">
            <text:p>(7, 5, 24, 16, 0)</text:p>
          </table:table-cell>
          <table:table-cell office:value-type="string">
            <text:p>Ginger</text:p>
          </table:table-cell>
          <table:table-cell table:number-columns-repeated="1019"/>
        </table:table-row>
        <table:table-row table:style-name="ro1">
          <table:table-cell office:value-type="string">
            <text:p>Milkboy</text:p>
          </table:table-cell>
          <table:table-cell office:value-type="string">
            <text:p>(2, 0, 5, 1, 0)</text:p>
          </table:table-cell>
          <table:table-cell office:value-type="string">
            <text:p>NotTony</text:p>
          </table:table-cell>
          <table:table-cell office:value-type="string">
            <text:p>(2, 0, 4, 0, 0)</text:p>
          </table:table-cell>
          <table:table-cell office:value-type="string">
            <text:p>Milkboy</text:p>
          </table:table-cell>
          <table:table-cell table:number-columns-repeated="1019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4, 2, 9, 5, 0)</text:p>
          </table:table-cell>
          <table:table-cell office:value-type="string">
            <text:p>ted.</text:p>
          </table:table-cell>
          <table:table-cell office:value-type="string">
            <text:p>(2, 0, 5, 1, 0)</text:p>
          </table:table-cell>
          <table:table-cell office:value-type="string">
            <text:p>Hungrybox</text:p>
          </table:table-cell>
          <table:table-cell table:number-columns-repeated="1019"/>
        </table:table-row>
        <table:table-row table:style-name="ro1">
          <table:table-cell office:value-type="string">
            <text:p>Lord Farquaad</text:p>
          </table:table-cell>
          <table:table-cell office:value-type="string">
            <text:p>(2, 0, 5, 1, 0)</text:p>
          </table:table-cell>
          <table:table-cell office:value-type="string">
            <text:p>Vision</text:p>
          </table:table-cell>
          <table:table-cell office:value-type="string">
            <text:p>(0, 0, 0, 0, 2)</text:p>
          </table:table-cell>
          <table:table-cell office:value-type="string">
            <text:p>Lord Farquaad</text:p>
          </table:table-cell>
          <table:table-cell table:number-columns-repeated="1019"/>
        </table:table-row>
        <table:table-row table:style-name="ro1">
          <table:table-cell office:value-type="string">
            <text:p>The Chuckster</text:p>
          </table:table-cell>
          <table:table-cell office:value-type="string">
            <text:p>(5, 3, 11, 6, 0)</text:p>
          </table:table-cell>
          <table:table-cell office:value-type="string">
            <text:p>Cappuccino</text:p>
          </table:table-cell>
          <table:table-cell office:value-type="string">
            <text:p>(6, 4, 16, 10, 0)</text:p>
          </table:table-cell>
          <table:table-cell office:value-type="string">
            <text:p>The Chuckster</text:p>
          </table:table-cell>
          <table:table-cell table:number-columns-repeated="1019"/>
        </table:table-row>
        <table:table-row table:style-name="ro1">
          <table:table-cell office:value-type="string">
            <text:p>Mr. J</text:p>
          </table:table-cell>
          <table:table-cell office:value-type="string">
            <text:p>(2, 0, 4, 0, 0)</text:p>
          </table:table-cell>
          <table:table-cell office:value-type="string">
            <text:p>rndy</text:p>
          </table:table-cell>
          <table:table-cell office:value-type="string">
            <text:p>(3, 1, 6, 2, 0)</text:p>
          </table:table-cell>
          <table:table-cell office:value-type="string">
            <text:p>Mr. J</text:p>
          </table:table-cell>
          <table:table-cell table:number-columns-repeated="1019"/>
        </table:table-row>
        <table:table-row table:style-name="ro1">
          <table:table-cell office:value-type="string">
            <text:p>Charz</text:p>
          </table:table-cell>
          <table:table-cell office:value-type="string">
            <text:p>(2, 1, 4, 2, 1)</text:p>
          </table:table-cell>
          <table:table-cell office:value-type="string">
            <text:p>bardon</text:p>
          </table:table-cell>
          <table:table-cell office:value-type="string">
            <text:p>(5, 3, 14, 7, 0)</text:p>
          </table:table-cell>
          <table:table-cell office:value-type="string">
            <text:p>Charz</text:p>
          </table:table-cell>
          <table:table-cell table:number-columns-repeated="1019"/>
        </table:table-row>
        <table:table-row table:style-name="ro1">
          <table:table-cell office:value-type="string">
            <text:p>DREAD</text:p>
          </table:table-cell>
          <table:table-cell office:value-type="string">
            <text:p>(2, 0, 4, 0, 0)</text:p>
          </table:table-cell>
          <table:table-cell office:value-type="string">
            <text:p>iphone on 2% since 2018</text:p>
          </table:table-cell>
          <table:table-cell office:value-type="string">
            <text:p>(2, 0, 4, 0, 0)</text:p>
          </table:table-cell>
          <table:table-cell office:value-type="string">
            <text:p>DREAD</text:p>
          </table:table-cell>
          <table:table-cell table:number-columns-repeated="1019"/>
        </table:table-row>
        <table:table-row table:style-name="ro1">
          <table:table-cell office:value-type="string">
            <text:p>Kobe</text:p>
          </table:table-cell>
          <table:table-cell office:value-type="string">
            <text:p>(7, 5, 15, 11, 0)</text:p>
          </table:table-cell>
          <table:table-cell office:value-type="string">
            <text:p>Panda</text:p>
          </table:table-cell>
          <table:table-cell office:value-type="string">
            <text:p>(8, 6, 31, 20, 0)</text:p>
          </table:table-cell>
          <table:table-cell office:value-type="string">
            <text:p>Kobe</text:p>
          </table:table-cell>
          <table:table-cell table:number-columns-repeated="1019"/>
        </table:table-row>
        <table:table-row table:style-name="ro1">
          <table:table-cell office:value-type="string">
            <text:p>damashi</text:p>
          </table:table-cell>
          <table:table-cell office:value-type="string">
            <text:p>(2, 0, 5, 1, 0)</text:p>
          </table:table-cell>
          <table:table-cell office:value-type="string">
            <text:p>yungxgucci</text:p>
          </table:table-cell>
          <table:table-cell office:value-type="string">
            <text:p>(3, 1, 8, 3, 0)</text:p>
          </table:table-cell>
          <table:table-cell office:value-type="string">
            <text:p>damashi</text:p>
          </table:table-cell>
          <table:table-cell table:number-columns-repeated="1019"/>
        </table:table-row>
        <table:table-row table:style-name="ro1">
          <table:table-cell office:value-type="string">
            <text:p>ThitKho</text:p>
          </table:table-cell>
          <table:table-cell office:value-type="string">
            <text:p>(0, 0, 0, 0, 2)</text:p>
          </table:table-cell>
          <table:table-cell office:value-type="string">
            <text:p>Whif</text:p>
          </table:table-cell>
          <table:table-cell office:value-type="string">
            <text:p>(0, 0, 0, 0, 2)</text:p>
          </table:table-cell>
          <table:table-cell office:value-type="string">
            <text:p>ThitKho</text:p>
          </table:table-cell>
          <table:table-cell table:number-columns-repeated="1019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5, 3, 12, 6, 0)</text:p>
          </table:table-cell>
          <table:table-cell office:value-type="string">
            <text:p>Peele</text:p>
          </table:table-cell>
          <table:table-cell office:value-type="string">
            <text:p>(5, 3, 13, 7, 0)</text:p>
          </table:table-cell>
          <table:table-cell office:value-type="string">
            <text:p>Twilight</text:p>
          </table:table-cell>
          <table:table-cell table:number-columns-repeated="1019"/>
        </table:table-row>
        <table:table-row table:style-name="ro1">
          <table:table-cell office:value-type="string">
            <text:p>RadioActiv</text:p>
          </table:table-cell>
          <table:table-cell office:value-type="string">
            <text:p>(3, 1, 6, 2, 0)</text:p>
          </table:table-cell>
          <table:table-cell office:value-type="string">
            <text:p>SquattingxBear</text:p>
          </table:table-cell>
          <table:table-cell office:value-type="string">
            <text:p>(3, 1, 6, 2, 0)</text:p>
          </table:table-cell>
          <table:table-cell office:value-type="string">
            <text:p>RadioActiv</text:p>
          </table:table-cell>
          <table:table-cell table:number-columns-repeated="1019"/>
        </table:table-row>
        <table:table-row table:style-name="ro1">
          <table:table-cell office:value-type="string">
            <text:p>JDQ05</text:p>
          </table:table-cell>
          <table:table-cell office:value-type="string">
            <text:p>(4, 2, 8, 4, 0)</text:p>
          </table:table-cell>
          <table:table-cell office:value-type="string">
            <text:p>AzLu</text:p>
          </table:table-cell>
          <table:table-cell office:value-type="string">
            <text:p>(6, 4, 18, 10, 0)</text:p>
          </table:table-cell>
          <table:table-cell office:value-type="string">
            <text:p>JDQ05</text:p>
          </table:table-cell>
          <table:table-cell table:number-columns-repeated="1019"/>
        </table:table-row>
        <table:table-row table:style-name="ro1">
          <table:table-cell office:value-type="string">
            <text:p>Leone_Ace</text:p>
          </table:table-cell>
          <table:table-cell office:value-type="string">
            <text:p>(2, 0, 4, 0, 0)</text:p>
          </table:table-cell>
          <table:table-cell office:value-type="string">
            <text:p>jamV</text:p>
          </table:table-cell>
          <table:table-cell office:value-type="string">
            <text:p>(2, 0, 4, 0, 0)</text:p>
          </table:table-cell>
          <table:table-cell office:value-type="string">
            <text:p>Leone_Ace</text:p>
          </table:table-cell>
          <table:table-cell table:number-columns-repeated="1019"/>
        </table:table-row>
        <table:table-row table:style-name="ro1">
          <table:table-cell office:value-type="string">
            <text:p>IRUSH</text:p>
          </table:table-cell>
          <table:table-cell office:value-type="string">
            <text:p>(4, 2, 9, 5, 0)</text:p>
          </table:table-cell>
          <table:table-cell office:value-type="string">
            <text:p>ADMJ</text:p>
          </table:table-cell>
          <table:table-cell office:value-type="string">
            <text:p>(5, 3, 15, 8, 0)</text:p>
          </table:table-cell>
          <table:table-cell office:value-type="string">
            <text:p>IRUSH</text:p>
          </table:table-cell>
          <table:table-cell table:number-columns-repeated="1019"/>
        </table:table-row>
        <table:table-row table:style-name="ro1">
          <table:table-cell office:value-type="string">
            <text:p>Fonica</text:p>
          </table:table-cell>
          <table:table-cell office:value-type="string">
            <text:p>(0, 0, 0, 0, 2)</text:p>
          </table:table-cell>
          <table:table-cell office:value-type="string">
            <text:p>Soup</text:p>
          </table:table-cell>
          <table:table-cell office:value-type="string">
            <text:p>(2, 0, 4, 0, 0)</text:p>
          </table:table-cell>
          <table:table-cell office:value-type="string">
            <text:p>Fonica</text:p>
          </table:table-cell>
          <table:table-cell table:number-columns-repeated="1019"/>
        </table:table-row>
        <table:table-row table:style-name="ro1">
          <table:table-cell office:value-type="string">
            <text:p>Keegore</text:p>
          </table:table-cell>
          <table:table-cell office:value-type="string">
            <text:p>(5, 3, 11, 6, 0)</text:p>
          </table:table-cell>
          <table:table-cell office:value-type="string">
            <text:p>xaninmyfaygo666</text:p>
          </table:table-cell>
          <table:table-cell office:value-type="string">
            <text:p>(3, 1, 9, 3, 0)</text:p>
          </table:table-cell>
          <table:table-cell office:value-type="string">
            <text:p>Keegore</text:p>
          </table:table-cell>
          <table:table-cell table:number-columns-repeated="1019"/>
        </table:table-row>
        <table:table-row table:style-name="ro1">
          <table:table-cell office:value-type="string">
            <text:p>Jlaw</text:p>
          </table:table-cell>
          <table:table-cell office:value-type="string">
            <text:p>(1, 0, 2, 0, 1)</text:p>
          </table:table-cell>
          <table:table-cell office:value-type="string">
            <text:p>Halberd</text:p>
          </table:table-cell>
          <table:table-cell office:value-type="string">
            <text:p>(0, 0, 0, 0, 2)</text:p>
          </table:table-cell>
          <table:table-cell office:value-type="string">
            <text:p>Jlaw</text:p>
          </table:table-cell>
          <table:table-cell table:number-columns-repeated="1019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6, 4, 16, 8, 0)</text:p>
          </table:table-cell>
          <table:table-cell office:value-type="string">
            <text:p>Yeti</text:p>
          </table:table-cell>
          <table:table-cell office:value-type="string">
            <text:p>(4, 2, 11, 5, 0)</text:p>
          </table:table-cell>
          <table:table-cell office:value-type="string">
            <text:p>Strobics</text:p>
          </table:table-cell>
          <table:table-cell table:number-columns-repeated="1019"/>
        </table:table-row>
        <table:table-row table:style-name="ro1">
          <table:table-cell office:value-type="string">
            <text:p>KurryRose</text:p>
          </table:table-cell>
          <table:table-cell office:value-type="string">
            <text:p>(0, 0, 0, 0, 2)</text:p>
          </table:table-cell>
          <table:table-cell office:value-type="string">
            <text:p>ThatOneGuy</text:p>
          </table:table-cell>
          <table:table-cell office:value-type="string">
            <text:p>(2, 0, 4, 0, 0)</text:p>
          </table:table-cell>
          <table:table-cell office:value-type="string">
            <text:p>KurryRose</text:p>
          </table:table-cell>
          <table:table-cell table:number-columns-repeated="1019"/>
        </table:table-row>
        <table:table-row table:style-name="ro1">
          <table:table-cell office:value-type="string">
            <text:p>Packet</text:p>
          </table:table-cell>
          <table:table-cell office:value-type="string">
            <text:p>(3, 1, 8, 4, 0)</text:p>
          </table:table-cell>
          <table:table-cell office:value-type="string">
            <text:p>Jape</text:p>
          </table:table-cell>
          <table:table-cell office:value-type="string">
            <text:p>(4, 2, 13, 7, 0)</text:p>
          </table:table-cell>
          <table:table-cell office:value-type="string">
            <text:p>Packet</text:p>
          </table:table-cell>
          <table:table-cell table:number-columns-repeated="1019"/>
        </table:table-row>
        <table:table-row table:style-name="ro1">
          <table:table-cell office:value-type="string">
            <text:p>Mario Circuit 3</text:p>
          </table:table-cell>
          <table:table-cell office:value-type="string">
            <text:p>(3, 1, 8, 3, 0)</text:p>
          </table:table-cell>
          <table:table-cell office:value-type="string">
            <text:p>Lapi</text:p>
          </table:table-cell>
          <table:table-cell office:value-type="string">
            <text:p>(3, 1, 8, 3, 0)</text:p>
          </table:table-cell>
          <table:table-cell office:value-type="string">
            <text:p>Mario Circuit 3</text:p>
          </table:table-cell>
          <table:table-cell table:number-columns-repeated="1019"/>
        </table:table-row>
        <table:table-row table:style-name="ro1">
          <table:table-cell office:value-type="string">
            <text:p>LightningCam</text:p>
          </table:table-cell>
          <table:table-cell office:value-type="string">
            <text:p>(7, 5, 19, 13, 0)</text:p>
          </table:table-cell>
          <table:table-cell office:value-type="string">
            <text:p>OG Kid</text:p>
          </table:table-cell>
          <table:table-cell office:value-type="string">
            <text:p>(6, 4, 20, 12, 0)</text:p>
          </table:table-cell>
          <table:table-cell office:value-type="string">
            <text:p>LightningCam</text:p>
          </table:table-cell>
          <table:table-cell table:number-columns-repeated="1019"/>
        </table:table-row>
        <table:table-row table:style-name="ro1">
          <table:table-cell office:value-type="string">
            <text:p>SundayGary</text:p>
          </table:table-cell>
          <table:table-cell office:value-type="string">
            <text:p>(2, 0, 4, 0, 0)</text:p>
          </table:table-cell>
          <table:table-cell office:value-type="string">
            <text:p>Klondike64</text:p>
          </table:table-cell>
          <table:table-cell office:value-type="string">
            <text:p>(2, 0, 4, 0, 0)</text:p>
          </table:table-cell>
          <table:table-cell office:value-type="string">
            <text:p>SundayGary</text:p>
          </table:table-cell>
          <table:table-cell table:number-columns-repeated="1019"/>
        </table:table-row>
        <table:table-row table:style-name="ro1">
          <table:table-cell office:value-type="string">
            <text:p>Blaine</text:p>
          </table:table-cell>
          <table:table-cell office:value-type="string">
            <text:p>(4, 2, 8, 4, 0)</text:p>
          </table:table-cell>
          <table:table-cell office:value-type="string">
            <text:p>Navé</text:p>
          </table:table-cell>
          <table:table-cell office:value-type="string">
            <text:p>(0, 0, 0, 0, 2)</text:p>
          </table:table-cell>
          <table:table-cell office:value-type="string">
            <text:p>Blaine</text:p>
          </table:table-cell>
          <table:table-cell table:number-columns-repeated="1019"/>
        </table:table-row>
        <table:table-row table:style-name="ro1">
          <table:table-cell office:value-type="string">
            <text:p>Gogemon</text:p>
          </table:table-cell>
          <table:table-cell office:value-type="string">
            <text:p>(4, 2, 10, 5, 0)</text:p>
          </table:table-cell>
          <table:table-cell office:value-type="string">
            <text:p>Alwaysinsync</text:p>
          </table:table-cell>
          <table:table-cell office:value-type="string">
            <text:p>(0, 0, 0, 0, 2)</text:p>
          </table:table-cell>
          <table:table-cell office:value-type="string">
            <text:p>Gogemon</text:p>
          </table:table-cell>
          <table:table-cell table:number-columns-repeated="1019"/>
        </table:table-row>
        <table:table-row table:style-name="ro1">
          <table:table-cell office:value-type="string">
            <text:p>Benji</text:p>
          </table:table-cell>
          <table:table-cell office:value-type="string">
            <text:p>(4, 2, 9, 5, 0)</text:p>
          </table:table-cell>
          <table:table-cell office:value-type="string">
            <text:p>SandBag</text:p>
          </table:table-cell>
          <table:table-cell office:value-type="string">
            <text:p>(5, 3, 14, 7, 0)</text:p>
          </table:table-cell>
          <table:table-cell office:value-type="string">
            <text:p>Benji</text:p>
          </table:table-cell>
          <table:table-cell table:number-columns-repeated="1019"/>
        </table:table-row>
        <table:table-row table:style-name="ro1">
          <table:table-cell office:value-type="string">
            <text:p>Dmar3</text:p>
          </table:table-cell>
          <table:table-cell office:value-type="string">
            <text:p>(2, 0, 4, 0, 0)</text:p>
          </table:table-cell>
          <table:table-cell office:value-type="string">
            <text:p>tgags</text:p>
          </table:table-cell>
          <table:table-cell office:value-type="string">
            <text:p>(2, 0, 4, 0, 0)</text:p>
          </table:table-cell>
          <table:table-cell office:value-type="string">
            <text:p>Dmar3</text:p>
          </table:table-cell>
          <table:table-cell table:number-columns-repeated="1019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6, 4, 14, 8, 0)</text:p>
          </table:table-cell>
          <table:table-cell office:value-type="string">
            <text:p>Hordan</text:p>
          </table:table-cell>
          <table:table-cell office:value-type="string">
            <text:p>(5, 3, 12, 6, 0)</text:p>
          </table:table-cell>
          <table:table-cell office:value-type="string">
            <text:p>Squishy~</text:p>
          </table:table-cell>
          <table:table-cell table:number-columns-repeated="1019"/>
        </table:table-row>
        <table:table-row table:style-name="ro1">
          <table:table-cell office:value-type="string">
            <text:p>Carlito</text:p>
          </table:table-cell>
          <table:table-cell office:value-type="string">
            <text:p>(3, 1, 7, 3, 0)</text:p>
          </table:table-cell>
          <table:table-cell office:value-type="string">
            <text:p>Conn Man</text:p>
          </table:table-cell>
          <table:table-cell office:value-type="string">
            <text:p>(4, 2, 8, 4, 0)</text:p>
          </table:table-cell>
          <table:table-cell office:value-type="string">
            <text:p>Carlito</text:p>
          </table:table-cell>
          <table:table-cell table:number-columns-repeated="1019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6, 4, 15, 9, 0)</text:p>
          </table:table-cell>
          <table:table-cell office:value-type="string">
            <text:p>King Momo</text:p>
          </table:table-cell>
          <table:table-cell office:value-type="string">
            <text:p>(7, 5, 26, 15, 0)</text:p>
          </table:table-cell>
          <table:table-cell office:value-type="string">
            <text:p>McFunny</text:p>
          </table:table-cell>
          <table:table-cell table:number-columns-repeated="1019"/>
        </table:table-row>
        <table:table-row table:style-name="ro1">
          <table:table-cell office:value-type="string">
            <text:p>World Jade Center</text:p>
          </table:table-cell>
          <table:table-cell office:value-type="string">
            <text:p>(2, 0, 4, 0, 0)</text:p>
          </table:table-cell>
          <table:table-cell office:value-type="string">
            <text:p>A-K SiN</text:p>
          </table:table-cell>
          <table:table-cell office:value-type="string">
            <text:p>(2, 0, 4, 0, 0)</text:p>
          </table:table-cell>
          <table:table-cell office:value-type="string">
            <text:p>World Jade Center</text:p>
          </table:table-cell>
          <table:table-cell table:number-columns-repeated="1019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5, 3, 12, 7, 0)</text:p>
          </table:table-cell>
          <table:table-cell office:value-type="string">
            <text:p>Kip</text:p>
          </table:table-cell>
          <table:table-cell office:value-type="string">
            <text:p>(5, 3, 13, 7, 0)</text:p>
          </table:table-cell>
          <table:table-cell office:value-type="string">
            <text:p>HaydenEatsShrimp</text:p>
          </table:table-cell>
          <table:table-cell table:number-columns-repeated="1019"/>
        </table:table-row>
        <table:table-row table:style-name="ro1">
          <table:table-cell office:value-type="string">
            <text:p>Yukoa</text:p>
          </table:table-cell>
          <table:table-cell office:value-type="string">
            <text:p>(0, 0, 0, 0, 2)</text:p>
          </table:table-cell>
          <table:table-cell office:value-type="string">
            <text:p>Abraham</text:p>
          </table:table-cell>
          <table:table-cell office:value-type="string">
            <text:p>(4, 2, 12, 6, 0)</text:p>
          </table:table-cell>
          <table:table-cell office:value-type="string">
            <text:p>Yukoa</text:p>
          </table:table-cell>
          <table:table-cell table:number-columns-repeated="1019"/>
        </table:table-row>
        <table:table-row table:style-name="ro1">
          <table:table-cell office:value-type="string">
            <text:p>BMoC</text:p>
          </table:table-cell>
          <table:table-cell office:value-type="string">
            <text:p>(5, 3, 12, 8, 0)</text:p>
          </table:table-cell>
          <table:table-cell office:value-type="string">
            <text:p>Slowpez</text:p>
          </table:table-cell>
          <table:table-cell office:value-type="string">
            <text:p>(6, 4, 19, 12, 0)</text:p>
          </table:table-cell>
          <table:table-cell office:value-type="string">
            <text:p>BMoC</text:p>
          </table:table-cell>
          <table:table-cell table:number-columns-repeated="1019"/>
        </table:table-row>
        <table:table-row table:style-name="ro1">
          <table:table-cell office:value-type="string">
            <text:p>Jackie Chun</text:p>
          </table:table-cell>
          <table:table-cell office:value-type="string">
            <text:p>(4, 2, 10, 4, 0)</text:p>
          </table:table-cell>
          <table:table-cell office:value-type="string">
            <text:p>drc</text:p>
          </table:table-cell>
          <table:table-cell office:value-type="string">
            <text:p>(3, 1, 7, 2, 0)</text:p>
          </table:table-cell>
          <table:table-cell office:value-type="string">
            <text:p>Jackie Chun</text:p>
          </table:table-cell>
          <table:table-cell table:number-columns-repeated="1019"/>
        </table:table-row>
        <table:table-row table:style-name="ro1">
          <table:table-cell office:value-type="string">
            <text:p>DOOM!</text:p>
          </table:table-cell>
          <table:table-cell office:value-type="string">
            <text:p>(3, 1, 8, 3, 0)</text:p>
          </table:table-cell>
          <table:table-cell office:value-type="string">
            <text:p>Howie</text:p>
          </table:table-cell>
          <table:table-cell office:value-type="string">
            <text:p>(4, 2, 10, 6, 0)</text:p>
          </table:table-cell>
          <table:table-cell office:value-type="string">
            <text:p>DOOM!</text:p>
          </table:table-cell>
          <table:table-cell table:number-columns-repeated="1019"/>
        </table:table-row>
        <table:table-row table:style-name="ro1">
          <table:table-cell office:value-type="string">
            <text:p>Yasmine22!</text:p>
          </table:table-cell>
          <table:table-cell office:value-type="string">
            <text:p>(3, 1, 8, 4, 0)</text:p>
          </table:table-cell>
          <table:table-cell office:value-type="string">
            <text:p>Quelity</text:p>
          </table:table-cell>
          <table:table-cell office:value-type="string">
            <text:p>(2, 0, 5, 1, 0)</text:p>
          </table:table-cell>
          <table:table-cell office:value-type="string">
            <text:p>Yasmine22!</text:p>
          </table:table-cell>
          <table:table-cell table:number-columns-repeated="1019"/>
        </table:table-row>
        <table:table-row table:style-name="ro1">
          <table:table-cell office:value-type="string">
            <text:p>Pingu</text:p>
          </table:table-cell>
          <table:table-cell office:value-type="string">
            <text:p>(3, 1, 7, 2, 0)</text:p>
          </table:table-cell>
          <table:table-cell table:number-columns-repeated="2"/>
          <table:table-cell office:value-type="string">
            <text:p>Pingu</text:p>
          </table:table-cell>
          <table:table-cell table:number-columns-repeated="1019"/>
        </table:table-row>
        <table:table-row table:style-name="ro1">
          <table:table-cell office:value-type="string">
            <text:p>Woofie87</text:p>
          </table:table-cell>
          <table:table-cell office:value-type="string">
            <text:p>(2, 0, 5, 1, 0)</text:p>
          </table:table-cell>
          <table:table-cell table:number-columns-repeated="2"/>
          <table:table-cell office:value-type="string">
            <text:p>Woofie87</text:p>
          </table:table-cell>
          <table:table-cell table:number-columns-repeated="1019"/>
        </table:table-row>
        <table:table-row table:style-name="ro1">
          <table:table-cell office:value-type="string">
            <text:p>EternalBran</text:p>
          </table:table-cell>
          <table:table-cell office:value-type="string">
            <text:p>(3, 1, 7, 2, 0)</text:p>
          </table:table-cell>
          <table:table-cell table:number-columns-repeated="2"/>
          <table:table-cell office:value-type="string">
            <text:p>EternalBran</text:p>
          </table:table-cell>
          <table:table-cell table:number-columns-repeated="1019"/>
        </table:table-row>
        <table:table-row table:style-name="ro1">
          <table:table-cell office:value-type="string">
            <text:p>Sneakers O'Toole</text:p>
          </table:table-cell>
          <table:table-cell office:value-type="string">
            <text:p>(2, 0, 5, 1, 0)</text:p>
          </table:table-cell>
          <table:table-cell table:number-columns-repeated="2"/>
          <table:table-cell office:value-type="string">
            <text:p>Sneakers O'Toole</text:p>
          </table:table-cell>
          <table:table-cell table:number-columns-repeated="1019"/>
        </table:table-row>
        <table:table-row table:style-name="ro1">
          <table:table-cell office:value-type="string">
            <text:p>Shaine</text:p>
          </table:table-cell>
          <table:table-cell office:value-type="string">
            <text:p>(8, 6, 21, 13, 0)</text:p>
          </table:table-cell>
          <table:table-cell table:number-columns-repeated="2"/>
          <table:table-cell office:value-type="string">
            <text:p>Shaine</text:p>
          </table:table-cell>
          <table:table-cell table:number-columns-repeated="1019"/>
        </table:table-row>
        <table:table-row table:style-name="ro1">
          <table:table-cell office:value-type="string">
            <text:p>Newiby (Entropy)</text:p>
          </table:table-cell>
          <table:table-cell office:value-type="string">
            <text:p>(4, 2, 9, 5, 0)</text:p>
          </table:table-cell>
          <table:table-cell table:number-columns-repeated="2"/>
          <table:table-cell office:value-type="string">
            <text:p>Newiby (Entropy)</text:p>
          </table:table-cell>
          <table:table-cell table:number-columns-repeated="1019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5, 3, 11, 6, 0)</text:p>
          </table:table-cell>
          <table:table-cell table:number-columns-repeated="2"/>
          <table:table-cell office:value-type="string">
            <text:p>Chavalava</text:p>
          </table:table-cell>
          <table:table-cell table:number-columns-repeated="1019"/>
        </table:table-row>
        <table:table-row table:style-name="ro1">
          <table:table-cell office:value-type="string">
            <text:p>nap</text:p>
          </table:table-cell>
          <table:table-cell office:value-type="string">
            <text:p>(4, 2, 9, 4, 0)</text:p>
          </table:table-cell>
          <table:table-cell table:number-columns-repeated="2"/>
          <table:table-cell office:value-type="string">
            <text:p>nap</text:p>
          </table:table-cell>
          <table:table-cell table:number-columns-repeated="1019"/>
        </table:table-row>
        <table:table-row table:style-name="ro1">
          <table:table-cell office:value-type="string">
            <text:p>M0kujin</text:p>
          </table:table-cell>
          <table:table-cell office:value-type="string">
            <text:p>(1, 0, 2, 0, 1)</text:p>
          </table:table-cell>
          <table:table-cell table:number-columns-repeated="2"/>
          <table:table-cell office:value-type="string">
            <text:p>M0kujin</text:p>
          </table:table-cell>
          <table:table-cell table:number-columns-repeated="1019"/>
        </table:table-row>
        <table:table-row table:style-name="ro1">
          <table:table-cell office:value-type="string">
            <text:p>Oki</text:p>
          </table:table-cell>
          <table:table-cell office:value-type="string">
            <text:p>(6, 4, 14, 9, 0)</text:p>
          </table:table-cell>
          <table:table-cell table:number-columns-repeated="2"/>
          <table:table-cell office:value-type="string">
            <text:p>Oki</text:p>
          </table:table-cell>
          <table:table-cell table:number-columns-repeated="1019"/>
        </table:table-row>
        <table:table-row table:style-name="ro1">
          <table:table-cell office:value-type="string">
            <text:p>Lowgun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Lowgun</text:p>
          </table:table-cell>
          <table:table-cell table:number-columns-repeated="1019"/>
        </table:table-row>
        <table:table-row table:style-name="ro1">
          <table:table-cell office:value-type="string">
            <text:p>Livan the Amnesty</text:p>
          </table:table-cell>
          <table:table-cell office:value-type="string">
            <text:p>(5, 3, 12, 7, 0)</text:p>
          </table:table-cell>
          <table:table-cell table:number-columns-repeated="2"/>
          <table:table-cell office:value-type="string">
            <text:p>Livan the Amnesty</text:p>
          </table:table-cell>
          <table:table-cell table:number-columns-repeated="1019"/>
        </table:table-row>
        <table:table-row table:style-name="ro1">
          <table:table-cell office:value-type="string">
            <text:p>Shnissugah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Shnissugah</text:p>
          </table:table-cell>
          <table:table-cell table:number-columns-repeated="1019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4, 2, 9, 5, 0)</text:p>
          </table:table-cell>
          <table:table-cell table:number-columns-repeated="2"/>
          <table:table-cell office:value-type="string">
            <text:p>LuMiSaDi</text:p>
          </table:table-cell>
          <table:table-cell table:number-columns-repeated="1019"/>
        </table:table-row>
        <table:table-row table:style-name="ro1">
          <table:table-cell office:value-type="string">
            <text:p>TnKaos</text:p>
          </table:table-cell>
          <table:table-cell office:value-type="string">
            <text:p>(3, 1, 6, 2, 0)</text:p>
          </table:table-cell>
          <table:table-cell table:number-columns-repeated="2"/>
          <table:table-cell office:value-type="string">
            <text:p>TnKaos</text:p>
          </table:table-cell>
          <table:table-cell table:number-columns-repeated="1019"/>
        </table:table-row>
        <table:table-row table:style-name="ro1">
          <table:table-cell office:value-type="string">
            <text:p>Nori</text:p>
          </table:table-cell>
          <table:table-cell office:value-type="string">
            <text:p>(7, 5, 15, 11, 0)</text:p>
          </table:table-cell>
          <table:table-cell table:number-columns-repeated="2"/>
          <table:table-cell office:value-type="string">
            <text:p>Nori</text:p>
          </table:table-cell>
          <table:table-cell table:number-columns-repeated="1019"/>
        </table:table-row>
        <table:table-row table:style-name="ro1">
          <table:table-cell office:value-type="string">
            <text:p>apachesavage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apachesavage</text:p>
          </table:table-cell>
          <table:table-cell table:number-columns-repeated="1019"/>
        </table:table-row>
        <table:table-row table:style-name="ro1">
          <table:table-cell office:value-type="string">
            <text:p>Pellonian</text:p>
          </table:table-cell>
          <table:table-cell office:value-type="string">
            <text:p>(5, 3, 10, 6, 0)</text:p>
          </table:table-cell>
          <table:table-cell table:number-columns-repeated="2"/>
          <table:table-cell office:value-type="string">
            <text:p>Pellonian</text:p>
          </table:table-cell>
          <table:table-cell table:number-columns-repeated="1019"/>
        </table:table-row>
        <table:table-row table:style-name="ro1">
          <table:table-cell office:value-type="string">
            <text:p>CarlJT</text:p>
          </table:table-cell>
          <table:table-cell office:value-type="string">
            <text:p>(4, 2, 8, 4, 0)</text:p>
          </table:table-cell>
          <table:table-cell table:number-columns-repeated="2"/>
          <table:table-cell office:value-type="string">
            <text:p>CarlJT</text:p>
          </table:table-cell>
          <table:table-cell table:number-columns-repeated="1019"/>
        </table:table-row>
        <table:table-row table:style-name="ro1">
          <table:table-cell office:value-type="string">
            <text:p>Manzana</text:p>
          </table:table-cell>
          <table:table-cell office:value-type="string">
            <text:p>(8, 6, 20, 14, 0)</text:p>
          </table:table-cell>
          <table:table-cell table:number-columns-repeated="2"/>
          <table:table-cell office:value-type="string">
            <text:p>Manzana</text:p>
          </table:table-cell>
          <table:table-cell table:number-columns-repeated="1019"/>
        </table:table-row>
        <table:table-row table:style-name="ro1">
          <table:table-cell office:value-type="string">
            <text:p>Spiker</text:p>
          </table:table-cell>
          <table:table-cell office:value-type="string">
            <text:p>(2, 0, 5, 1, 0)</text:p>
          </table:table-cell>
          <table:table-cell table:number-columns-repeated="2"/>
          <table:table-cell office:value-type="string">
            <text:p>Spiker</text:p>
          </table:table-cell>
          <table:table-cell table:number-columns-repeated="1019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SamersonT</text:p>
          </table:table-cell>
          <table:table-cell table:number-columns-repeated="1019"/>
        </table:table-row>
        <table:table-row table:style-name="ro1">
          <table:table-cell office:value-type="string">
            <text:p>stilios</text:p>
          </table:table-cell>
          <table:table-cell office:value-type="string">
            <text:p>(5, 3, 12, 7, 0)</text:p>
          </table:table-cell>
          <table:table-cell table:number-columns-repeated="2"/>
          <table:table-cell office:value-type="string">
            <text:p>stilios</text:p>
          </table:table-cell>
          <table:table-cell table:number-columns-repeated="1019"/>
        </table:table-row>
        <table:table-row table:style-name="ro1">
          <table:table-cell office:value-type="string">
            <text:p>Tabby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Tabby</text:p>
          </table:table-cell>
          <table:table-cell table:number-columns-repeated="1019"/>
        </table:table-row>
        <table:table-row table:style-name="ro1">
          <table:table-cell office:value-type="string">
            <text:p>StepKnightUp</text:p>
          </table:table-cell>
          <table:table-cell office:value-type="string">
            <text:p>(3, 1, 6, 2, 0)</text:p>
          </table:table-cell>
          <table:table-cell table:number-columns-repeated="2"/>
          <table:table-cell office:value-type="string">
            <text:p>StepKnightUp</text:p>
          </table:table-cell>
          <table:table-cell table:number-columns-repeated="1019"/>
        </table:table-row>
        <table:table-row table:style-name="ro1">
          <table:table-cell office:value-type="string">
            <text:p>scruffie:))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scruffie:))</text:p>
          </table:table-cell>
          <table:table-cell table:number-columns-repeated="1019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8, 6, 22, 15, 0)</text:p>
          </table:table-cell>
          <table:table-cell table:number-columns-repeated="2"/>
          <table:table-cell office:value-type="string">
            <text:p>WonderBread</text:p>
          </table:table-cell>
          <table:table-cell table:number-columns-repeated="1019"/>
        </table:table-row>
        <table:table-row table:style-name="ro1">
          <table:table-cell office:value-type="string">
            <text:p>Stubbaloo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Stubbaloo</text:p>
          </table:table-cell>
          <table:table-cell table:number-columns-repeated="1019"/>
        </table:table-row>
        <table:table-row table:style-name="ro1">
          <table:table-cell office:value-type="string">
            <text:p>NotHbox</text:p>
          </table:table-cell>
          <table:table-cell office:value-type="string">
            <text:p>(6, 4, 12, 8, 0)</text:p>
          </table:table-cell>
          <table:table-cell table:number-columns-repeated="2"/>
          <table:table-cell office:value-type="string">
            <text:p>NotHbox</text:p>
          </table:table-cell>
          <table:table-cell table:number-columns-repeated="1019"/>
        </table:table-row>
        <table:table-row table:style-name="ro1">
          <table:table-cell office:value-type="string">
            <text:p>Kryon</text:p>
          </table:table-cell>
          <table:table-cell office:value-type="string">
            <text:p>(3, 1, 6, 2, 0)</text:p>
          </table:table-cell>
          <table:table-cell table:number-columns-repeated="2"/>
          <table:table-cell office:value-type="string">
            <text:p>Kryon</text:p>
          </table:table-cell>
          <table:table-cell table:number-columns-repeated="1019"/>
        </table:table-row>
        <table:table-row table:style-name="ro1">
          <table:table-cell office:value-type="string">
            <text:p>RedPik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RedPik</text:p>
          </table:table-cell>
          <table:table-cell table:number-columns-repeated="1019"/>
        </table:table-row>
        <table:table-row table:style-name="ro1">
          <table:table-cell office:value-type="string">
            <text:p>ChuckFug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ChuckFug</text:p>
          </table:table-cell>
          <table:table-cell table:number-columns-repeated="1019"/>
        </table:table-row>
        <table:table-row table:style-name="ro1">
          <table:table-cell office:value-type="string">
            <text:p>NIMROD69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NIMROD69</text:p>
          </table:table-cell>
          <table:table-cell table:number-columns-repeated="1019"/>
        </table:table-row>
        <table:table-row table:style-name="ro1">
          <table:table-cell office:value-type="string">
            <text:p>syntax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syntax</text:p>
          </table:table-cell>
          <table:table-cell table:number-columns-repeated="1019"/>
        </table:table-row>
        <table:table-row table:style-name="ro1">
          <table:table-cell office:value-type="string">
            <text:p>Fapple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Fapple</text:p>
          </table:table-cell>
          <table:table-cell table:number-columns-repeated="1019"/>
        </table:table-row>
        <table:table-row table:style-name="ro1">
          <table:table-cell office:value-type="string">
            <text:p>GreatSpence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GreatSpence</text:p>
          </table:table-cell>
          <table:table-cell table:number-columns-repeated="1019"/>
        </table:table-row>
        <table:table-row table:style-name="ro1">
          <table:table-cell office:value-type="string">
            <text:p>JediSmash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JediSmash</text:p>
          </table:table-cell>
          <table:table-cell table:number-columns-repeated="1019"/>
        </table:table-row>
        <table:table-row table:style-name="ro1">
          <table:table-cell office:value-type="string">
            <text:p>DirtyDeli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DirtyDeli</text:p>
          </table:table-cell>
          <table:table-cell table:number-columns-repeated="1019"/>
        </table:table-row>
        <table:table-row table:style-name="ro1">
          <table:table-cell office:value-type="string">
            <text:p>Viri</text:p>
          </table:table-cell>
          <table:table-cell office:value-type="string">
            <text:p>(8, 6, 23, 17, 0)</text:p>
          </table:table-cell>
          <table:table-cell table:number-columns-repeated="2"/>
          <table:table-cell office:value-type="string">
            <text:p>Viri</text:p>
          </table:table-cell>
          <table:table-cell table:number-columns-repeated="1019"/>
        </table:table-row>
        <table:table-row table:style-name="ro1">
          <table:table-cell office:value-type="string">
            <text:p>Second Floor Basement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Second Floor Basement</text:p>
          </table:table-cell>
          <table:table-cell table:number-columns-repeated="1019"/>
        </table:table-row>
        <table:table-row table:style-name="ro1">
          <table:table-cell office:value-type="string">
            <text:p>Franknbean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Franknbean</text:p>
          </table:table-cell>
          <table:table-cell table:number-columns-repeated="1019"/>
        </table:table-row>
        <table:table-row table:style-name="ro1">
          <table:table-cell office:value-type="string">
            <text:p>BITTR</text:p>
          </table:table-cell>
          <table:table-cell office:value-type="string">
            <text:p>(4, 2, 8, 4, 0)</text:p>
          </table:table-cell>
          <table:table-cell table:number-columns-repeated="2"/>
          <table:table-cell office:value-type="string">
            <text:p>BITTR</text:p>
          </table:table-cell>
          <table:table-cell table:number-columns-repeated="1019"/>
        </table:table-row>
        <table:table-row table:style-name="ro1">
          <table:table-cell office:value-type="string">
            <text:p>Ryzakyn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Ryzakyn</text:p>
          </table:table-cell>
          <table:table-cell table:number-columns-repeated="1019"/>
        </table:table-row>
        <table:table-row table:style-name="ro1">
          <table:table-cell office:value-type="string">
            <text:p>Zorrin</text:p>
          </table:table-cell>
          <table:table-cell office:value-type="string">
            <text:p>(3, 1, 7, 3, 0)</text:p>
          </table:table-cell>
          <table:table-cell table:number-columns-repeated="2"/>
          <table:table-cell office:value-type="string">
            <text:p>Zorrin</text:p>
          </table:table-cell>
          <table:table-cell table:number-columns-repeated="1019"/>
        </table:table-row>
        <table:table-row table:style-name="ro1">
          <table:table-cell office:value-type="string">
            <text:p>Whyit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Whyit</text:p>
          </table:table-cell>
          <table:table-cell table:number-columns-repeated="1019"/>
        </table:table-row>
        <table:table-row table:style-name="ro1">
          <table:table-cell office:value-type="string">
            <text:p>Bhand</text:p>
          </table:table-cell>
          <table:table-cell office:value-type="string">
            <text:p>(7, 5, 15, 10, 0)</text:p>
          </table:table-cell>
          <table:table-cell table:number-columns-repeated="2"/>
          <table:table-cell office:value-type="string">
            <text:p>Bhand</text:p>
          </table:table-cell>
          <table:table-cell table:number-columns-repeated="1019"/>
        </table:table-row>
        <table:table-row table:style-name="ro1">
          <table:table-cell office:value-type="string">
            <text:p>BooBell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BooBell</text:p>
          </table:table-cell>
          <table:table-cell table:number-columns-repeated="1019"/>
        </table:table-row>
        <table:table-row table:style-name="ro1">
          <table:table-cell office:value-type="string">
            <text:p>masterqz</text:p>
          </table:table-cell>
          <table:table-cell office:value-type="string">
            <text:p>(4, 2, 10, 4, 0)</text:p>
          </table:table-cell>
          <table:table-cell table:number-columns-repeated="2"/>
          <table:table-cell office:value-type="string">
            <text:p>masterqz</text:p>
          </table:table-cell>
          <table:table-cell table:number-columns-repeated="1019"/>
        </table:table-row>
        <table:table-row table:style-name="ro1">
          <table:table-cell office:value-type="string">
            <text:p>Hiddekel</text:p>
          </table:table-cell>
          <table:table-cell office:value-type="string">
            <text:p>(8, 6, 18, 13, 0)</text:p>
          </table:table-cell>
          <table:table-cell table:number-columns-repeated="2"/>
          <table:table-cell office:value-type="string">
            <text:p>Hiddekel</text:p>
          </table:table-cell>
          <table:table-cell table:number-columns-repeated="1019"/>
        </table:table-row>
        <table:table-row table:style-name="ro1">
          <table:table-cell office:value-type="string">
            <text:p>Seal King Barbaros</text:p>
          </table:table-cell>
          <table:table-cell office:value-type="string">
            <text:p>(4, 2, 9, 5, 0)</text:p>
          </table:table-cell>
          <table:table-cell table:number-columns-repeated="2"/>
          <table:table-cell office:value-type="string">
            <text:p>Seal King Barbaros</text:p>
          </table:table-cell>
          <table:table-cell table:number-columns-repeated="1019"/>
        </table:table-row>
        <table:table-row table:style-name="ro1">
          <table:table-cell office:value-type="string">
            <text:p>Chicken Parm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Chicken Parm</text:p>
          </table:table-cell>
          <table:table-cell table:number-columns-repeated="1019"/>
        </table:table-row>
        <table:table-row table:style-name="ro1">
          <table:table-cell office:value-type="string">
            <text:p>fiend</text:p>
          </table:table-cell>
          <table:table-cell office:value-type="string">
            <text:p>(4, 2, 8, 4, 0)</text:p>
          </table:table-cell>
          <table:table-cell table:number-columns-repeated="2"/>
          <table:table-cell office:value-type="string">
            <text:p>fiend</text:p>
          </table:table-cell>
          <table:table-cell table:number-columns-repeated="1019"/>
        </table:table-row>
        <table:table-row table:style-name="ro1">
          <table:table-cell office:value-type="string">
            <text:p>dunktastic</text:p>
          </table:table-cell>
          <table:table-cell office:value-type="string">
            <text:p>(3, 1, 6, 2, 0)</text:p>
          </table:table-cell>
          <table:table-cell table:number-columns-repeated="2"/>
          <table:table-cell office:value-type="string">
            <text:p>dunktastic</text:p>
          </table:table-cell>
          <table:table-cell table:number-columns-repeated="1019"/>
        </table:table-row>
        <table:table-row table:style-name="ro1">
          <table:table-cell office:value-type="string">
            <text:p>Newo</text:p>
          </table:table-cell>
          <table:table-cell office:value-type="string">
            <text:p>(10, 8, 32, 20, 0)</text:p>
          </table:table-cell>
          <table:table-cell table:number-columns-repeated="2"/>
          <table:table-cell office:value-type="string">
            <text:p>Newo</text:p>
          </table:table-cell>
          <table:table-cell table:number-columns-repeated="1019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5, 3, 11, 6, 0)</text:p>
          </table:table-cell>
          <table:table-cell table:number-columns-repeated="2"/>
          <table:table-cell office:value-type="string">
            <text:p>xXx_PeterGokuGriffin_xXx</text:p>
          </table:table-cell>
          <table:table-cell table:number-columns-repeated="1019"/>
        </table:table-row>
        <table:table-row table:style-name="ro1">
          <table:table-cell office:value-type="string">
            <text:p>puff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puff</text:p>
          </table:table-cell>
          <table:table-cell table:number-columns-repeated="1019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5, 3, 11, 7, 0)</text:p>
          </table:table-cell>
          <table:table-cell table:number-columns-repeated="2"/>
          <table:table-cell office:value-type="string">
            <text:p>Plummet</text:p>
          </table:table-cell>
          <table:table-cell table:number-columns-repeated="1019"/>
        </table:table-row>
        <table:table-row table:style-name="ro1">
          <table:table-cell office:value-type="string">
            <text:p>Dude2steezy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Dude2steezy</text:p>
          </table:table-cell>
          <table:table-cell table:number-columns-repeated="1019"/>
        </table:table-row>
        <table:table-row table:style-name="ro1">
          <table:table-cell office:value-type="string">
            <text:p>DuckMark</text:p>
          </table:table-cell>
          <table:table-cell office:value-type="string">
            <text:p>(2, 0, 4, 0, 0)</text:p>
          </table:table-cell>
          <table:table-cell table:number-columns-repeated="2"/>
          <table:table-cell office:value-type="string">
            <text:p>DuckMark</text:p>
          </table:table-cell>
          <table:table-cell table:number-columns-repeated="1019"/>
        </table:table-row>
        <table:table-row table:style-name="ro1">
          <table:table-cell office:value-type="string">
            <text:p>Redeemed Schrader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Redeemed Schrader</text:p>
          </table:table-cell>
          <table:table-cell table:number-columns-repeated="1019"/>
        </table:table-row>
        <table:table-row table:style-name="ro1">
          <table:table-cell office:value-type="string">
            <text:p>lucida</text:p>
          </table:table-cell>
          <table:table-cell office:value-type="string">
            <text:p>(6, 4, 13, 8, 0)</text:p>
          </table:table-cell>
          <table:table-cell table:number-columns-repeated="2"/>
          <table:table-cell office:value-type="string">
            <text:p>lucida</text:p>
          </table:table-cell>
          <table:table-cell table:number-columns-repeated="1019"/>
        </table:table-row>
        <table:table-row table:style-name="ro1">
          <table:table-cell office:value-type="string">
            <text:p>NFBJacob</text:p>
          </table:table-cell>
          <table:table-cell office:value-type="string">
            <text:p>(2, 0, 5, 1, 0)</text:p>
          </table:table-cell>
          <table:table-cell table:number-columns-repeated="2"/>
          <table:table-cell office:value-type="string">
            <text:p>NFBJacob</text:p>
          </table:table-cell>
          <table:table-cell table:number-columns-repeated="1019"/>
        </table:table-row>
        <table:table-row table:style-name="ro1">
          <table:table-cell office:value-type="string">
            <text:p>spicywingz11</text:p>
          </table:table-cell>
          <table:table-cell office:value-type="string">
            <text:p>(2, 0, 5, 1, 0)</text:p>
          </table:table-cell>
          <table:table-cell table:number-columns-repeated="2"/>
          <table:table-cell office:value-type="string">
            <text:p>spicywingz11</text:p>
          </table:table-cell>
          <table:table-cell table:number-columns-repeated="1019"/>
        </table:table-row>
        <table:table-row table:style-name="ro1">
          <table:table-cell office:value-type="string">
            <text:p>Nitrobone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Nitrobone</text:p>
          </table:table-cell>
          <table:table-cell table:number-columns-repeated="1019"/>
        </table:table-row>
        <table:table-row table:style-name="ro1">
          <table:table-cell office:value-type="string">
            <text:p>Professor E. Gyatt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Professor E. Gyatt</text:p>
          </table:table-cell>
          <table:table-cell table:number-columns-repeated="1019"/>
        </table:table-row>
        <table:table-row table:style-name="ro1">
          <table:table-cell office:value-type="string">
            <text:p>D07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D07</text:p>
          </table:table-cell>
          <table:table-cell table:number-columns-repeated="1019"/>
        </table:table-row>
        <table:table-row table:style-name="ro1">
          <table:table-cell office:value-type="string">
            <text:p>Chez</text:p>
          </table:table-cell>
          <table:table-cell office:value-type="string">
            <text:p>(3, 1, 6, 2, 0)</text:p>
          </table:table-cell>
          <table:table-cell table:number-columns-repeated="2"/>
          <table:table-cell office:value-type="string">
            <text:p>Chez</text:p>
          </table:table-cell>
          <table:table-cell table:number-columns-repeated="1019"/>
        </table:table-row>
        <table:table-row table:style-name="ro1">
          <table:table-cell office:value-type="string">
            <text:p>Doc Shock</text:p>
          </table:table-cell>
          <table:table-cell office:value-type="string">
            <text:p>(0, 0, 0, 0, 2)</text:p>
          </table:table-cell>
          <table:table-cell table:number-columns-repeated="2"/>
          <table:table-cell office:value-type="string">
            <text:p>Doc Sho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pikeGo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oy Jua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a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ad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ta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arty anim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Wild Bil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ustoph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ig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rokenyew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Jovia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ncomingTraffic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aggu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ranc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loa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STIKYL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aby Carro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Komod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od Stra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neakywil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rot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Jacktheragingbul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Kairo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aptain 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tTon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Vis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appuccin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rnd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ard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phone on 2% since 201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and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ungxgucc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Whif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eel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quattingxB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AzLu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jamV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ADMJ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ou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xaninmyfaygo66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albe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et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hatOneGu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Jap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Lap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G Ki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Klondike6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Alwaysinsync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andBa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gag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orda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onn Ma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King Mom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A-K S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Ki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Abraham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lowpez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rc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owi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Quelity</text:p>
          </table:table-cell>
          <table:table-cell table:number-columns-repeated="1019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urnament 6" table:style-name="ta10" table:print="false">
        <office:forms form:automatic-focus="false" form:apply-design-mode="false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6" table:number-columns-repeated="1021" table:default-cell-style-name="Excel_20_Built-in_20_Normal"/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Attendees List</text:p>
          </table:table-cell>
          <table:table-cell table:number-columns-repeated="1021"/>
        </table:table-row>
        <table:table-row table:style-name="ro1">
          <table:table-cell office:value-type="string">
            <text:p>ThitKho</text:p>
          </table:table-cell>
          <table:table-cell office:value-type="string">
            <text:p>(4, 2, 8, 4, 0)</text:p>
          </table:table-cell>
          <table:table-cell office:value-type="string">
            <text:p>ThitKho</text:p>
          </table:table-cell>
          <table:table-cell table:number-columns-repeated="1021"/>
        </table:table-row>
        <table:table-row table:style-name="ro1">
          <table:table-cell office:value-type="string">
            <text:p>Notorious</text:p>
          </table:table-cell>
          <table:table-cell office:value-type="string">
            <text:p>(2, 0, 4, 0, 0)</text:p>
          </table:table-cell>
          <table:table-cell office:value-type="string">
            <text:p>Notorious</text:p>
          </table:table-cell>
          <table:table-cell table:number-columns-repeated="1021"/>
        </table:table-row>
        <table:table-row table:style-name="ro1">
          <table:table-cell office:value-type="string">
            <text:p>fork</text:p>
          </table:table-cell>
          <table:table-cell office:value-type="string">
            <text:p>(4, 2, 8, 4, 0)</text:p>
          </table:table-cell>
          <table:table-cell office:value-type="string">
            <text:p>fork</text:p>
          </table:table-cell>
          <table:table-cell table:number-columns-repeated="1021"/>
        </table:table-row>
        <table:table-row table:style-name="ro1">
          <table:table-cell office:value-type="string">
            <text:p>Dude2steezy</text:p>
          </table:table-cell>
          <table:table-cell office:value-type="string">
            <text:p>(1, 0, 2, 0, 1)</text:p>
          </table:table-cell>
          <table:table-cell office:value-type="string">
            <text:p>Dude2steezy</text:p>
          </table:table-cell>
          <table:table-cell table:number-columns-repeated="1021"/>
        </table:table-row>
        <table:table-row table:style-name="ro1">
          <table:table-cell office:value-type="string">
            <text:p>MrNubs</text:p>
          </table:table-cell>
          <table:table-cell office:value-type="string">
            <text:p>(5, 3, 10, 6, 0)</text:p>
          </table:table-cell>
          <table:table-cell office:value-type="string">
            <text:p>MrNubs</text:p>
          </table:table-cell>
          <table:table-cell table:number-columns-repeated="1021"/>
        </table:table-row>
        <table:table-row table:style-name="ro1">
          <table:table-cell office:value-type="string">
            <text:p>JimmyCaldero</text:p>
          </table:table-cell>
          <table:table-cell office:value-type="string">
            <text:p>(2, 0, 5, 1, 0)</text:p>
          </table:table-cell>
          <table:table-cell office:value-type="string">
            <text:p>JimmyCaldero</text:p>
          </table:table-cell>
          <table:table-cell table:number-columns-repeated="1021"/>
        </table:table-row>
        <table:table-row table:style-name="ro1">
          <table:table-cell office:value-type="string">
            <text:p>Proto</text:p>
          </table:table-cell>
          <table:table-cell office:value-type="string">
            <text:p>(0, 0, 0, 0, 2)</text:p>
          </table:table-cell>
          <table:table-cell office:value-type="string">
            <text:p>Proto</text:p>
          </table:table-cell>
          <table:table-cell table:number-columns-repeated="1021"/>
        </table:table-row>
        <table:table-row table:style-name="ro1">
          <table:table-cell office:value-type="string">
            <text:p>Greenvenom20</text:p>
          </table:table-cell>
          <table:table-cell office:value-type="string">
            <text:p>(0, 0, 0, 0, 2)</text:p>
          </table:table-cell>
          <table:table-cell office:value-type="string">
            <text:p>Greenvenom20</text:p>
          </table:table-cell>
          <table:table-cell table:number-columns-repeated="1021"/>
        </table:table-row>
        <table:table-row table:style-name="ro1">
          <table:table-cell office:value-type="string">
            <text:p>Dark Link</text:p>
          </table:table-cell>
          <table:table-cell office:value-type="string">
            <text:p>(5, 3, 10, 6, 0)</text:p>
          </table:table-cell>
          <table:table-cell office:value-type="string">
            <text:p>Dark Link</text:p>
          </table:table-cell>
          <table:table-cell table:number-columns-repeated="1021"/>
        </table:table-row>
        <table:table-row table:style-name="ro1">
          <table:table-cell office:value-type="string">
            <text:p>MC12</text:p>
          </table:table-cell>
          <table:table-cell office:value-type="string">
            <text:p>(2, 0, 4, 0, 0)</text:p>
          </table:table-cell>
          <table:table-cell office:value-type="string">
            <text:p>MC12</text:p>
          </table:table-cell>
          <table:table-cell table:number-columns-repeated="1021"/>
        </table:table-row>
        <table:table-row table:style-name="ro1">
          <table:table-cell office:value-type="string">
            <text:p>CarlJT</text:p>
          </table:table-cell>
          <table:table-cell office:value-type="string">
            <text:p>(6, 4, 13, 9, 0)</text:p>
          </table:table-cell>
          <table:table-cell office:value-type="string">
            <text:p>CarlJT</text:p>
          </table:table-cell>
          <table:table-cell table:number-columns-repeated="1021"/>
        </table:table-row>
        <table:table-row table:style-name="ro1">
          <table:table-cell office:value-type="string">
            <text:p>spiderboy1327</text:p>
          </table:table-cell>
          <table:table-cell office:value-type="string">
            <text:p>(2, 0, 4, 0, 0)</text:p>
          </table:table-cell>
          <table:table-cell office:value-type="string">
            <text:p>spiderboy1327</text:p>
          </table:table-cell>
          <table:table-cell table:number-columns-repeated="1021"/>
        </table:table-row>
        <table:table-row table:style-name="ro1">
          <table:table-cell office:value-type="string">
            <text:p>Donczzz</text:p>
          </table:table-cell>
          <table:table-cell office:value-type="string">
            <text:p>(4, 2, 9, 4, 0)</text:p>
          </table:table-cell>
          <table:table-cell office:value-type="string">
            <text:p>Donczzz</text:p>
          </table:table-cell>
          <table:table-cell table:number-columns-repeated="1021"/>
        </table:table-row>
        <table:table-row table:style-name="ro1">
          <table:table-cell office:value-type="string">
            <text:p>Stubbaloo</text:p>
          </table:table-cell>
          <table:table-cell office:value-type="string">
            <text:p>(2, 0, 4, 0, 0)</text:p>
          </table:table-cell>
          <table:table-cell office:value-type="string">
            <text:p>Stubbaloo</text:p>
          </table:table-cell>
          <table:table-cell table:number-columns-repeated="1021"/>
        </table:table-row>
        <table:table-row table:style-name="ro1">
          <table:table-cell office:value-type="string">
            <text:p>TnKaos</text:p>
          </table:table-cell>
          <table:table-cell office:value-type="string">
            <text:p>(7, 5, 15, 10, 0)</text:p>
          </table:table-cell>
          <table:table-cell office:value-type="string">
            <text:p>TnKaos</text:p>
          </table:table-cell>
          <table:table-cell table:number-columns-repeated="1021"/>
        </table:table-row>
        <table:table-row table:style-name="ro1">
          <table:table-cell office:value-type="string">
            <text:p>Arhkma MuddyKipz</text:p>
          </table:table-cell>
          <table:table-cell office:value-type="string">
            <text:p>(3, 1, 8, 3, 0)</text:p>
          </table:table-cell>
          <table:table-cell office:value-type="string">
            <text:p>Arhkma MuddyKipz</text:p>
          </table:table-cell>
          <table:table-cell table:number-columns-repeated="1021"/>
        </table:table-row>
        <table:table-row table:style-name="ro1">
          <table:table-cell office:value-type="string">
            <text:p>guayo.sv</text:p>
          </table:table-cell>
          <table:table-cell office:value-type="string">
            <text:p>(3, 1, 7, 3, 0)</text:p>
          </table:table-cell>
          <table:table-cell office:value-type="string">
            <text:p>guayo.sv</text:p>
          </table:table-cell>
          <table:table-cell table:number-columns-repeated="1021"/>
        </table:table-row>
        <table:table-row table:style-name="ro1">
          <table:table-cell office:value-type="string">
            <text:p>Ryeiscool</text:p>
          </table:table-cell>
          <table:table-cell office:value-type="string">
            <text:p>(2, 0, 4, 0, 0)</text:p>
          </table:table-cell>
          <table:table-cell office:value-type="string">
            <text:p>Ryeiscool</text:p>
          </table:table-cell>
          <table:table-cell table:number-columns-repeated="1021"/>
        </table:table-row>
        <table:table-row table:style-name="ro1">
          <table:table-cell office:value-type="string">
            <text:p>RonaldX</text:p>
          </table:table-cell>
          <table:table-cell office:value-type="string">
            <text:p>(4, 2, 9, 4, 0)</text:p>
          </table:table-cell>
          <table:table-cell office:value-type="string">
            <text:p>RonaldX</text:p>
          </table:table-cell>
          <table:table-cell table:number-columns-repeated="1021"/>
        </table:table-row>
        <table:table-row table:style-name="ro1">
          <table:table-cell office:value-type="string">
            <text:p>Gameboyfreshy</text:p>
          </table:table-cell>
          <table:table-cell office:value-type="string">
            <text:p>(2, 0, 5, 1, 0)</text:p>
          </table:table-cell>
          <table:table-cell office:value-type="string">
            <text:p>Gameboyfreshy</text:p>
          </table:table-cell>
          <table:table-cell table:number-columns-repeated="1021"/>
        </table:table-row>
        <table:table-row table:style-name="ro1">
          <table:table-cell office:value-type="string">
            <text:p>Gogemon</text:p>
          </table:table-cell>
          <table:table-cell office:value-type="string">
            <text:p>(6, 4, 12, 8, 0)</text:p>
          </table:table-cell>
          <table:table-cell office:value-type="string">
            <text:p>Gogemon</text:p>
          </table:table-cell>
          <table:table-cell table:number-columns-repeated="1021"/>
        </table:table-row>
        <table:table-row table:style-name="ro1">
          <table:table-cell office:value-type="string">
            <text:p>Elreyec</text:p>
          </table:table-cell>
          <table:table-cell office:value-type="string">
            <text:p>(2, 0, 4, 0, 0)</text:p>
          </table:table-cell>
          <table:table-cell office:value-type="string">
            <text:p>Elreyec</text:p>
          </table:table-cell>
          <table:table-cell table:number-columns-repeated="1021"/>
        </table:table-row>
        <table:table-row table:style-name="ro1">
          <table:table-cell office:value-type="string">
            <text:p>OG Kid</text:p>
          </table:table-cell>
          <table:table-cell office:value-type="string">
            <text:p>(5, 3, 11, 6, 0)</text:p>
          </table:table-cell>
          <table:table-cell office:value-type="string">
            <text:p>OG Kid</text:p>
          </table:table-cell>
          <table:table-cell table:number-columns-repeated="1021"/>
        </table:table-row>
        <table:table-row table:style-name="ro1">
          <table:table-cell office:value-type="string">
            <text:p>BeefCalculator</text:p>
          </table:table-cell>
          <table:table-cell office:value-type="string">
            <text:p>(2, 0, 4, 0, 0)</text:p>
          </table:table-cell>
          <table:table-cell office:value-type="string">
            <text:p>BeefCalculator</text:p>
          </table:table-cell>
          <table:table-cell table:number-columns-repeated="1021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5, 3, 10, 6, 0)</text:p>
          </table:table-cell>
          <table:table-cell office:value-type="string">
            <text:p>Chavalava</text:p>
          </table:table-cell>
          <table:table-cell table:number-columns-repeated="1021"/>
        </table:table-row>
        <table:table-row table:style-name="ro1">
          <table:table-cell office:value-type="string">
            <text:p>Twonny</text:p>
          </table:table-cell>
          <table:table-cell office:value-type="string">
            <text:p>(2, 0, 4, 0, 0)</text:p>
          </table:table-cell>
          <table:table-cell office:value-type="string">
            <text:p>Twonny</text:p>
          </table:table-cell>
          <table:table-cell table:number-columns-repeated="1021"/>
        </table:table-row>
        <table:table-row table:style-name="ro1">
          <table:table-cell office:value-type="string">
            <text:p>WiFi warrior</text:p>
          </table:table-cell>
          <table:table-cell office:value-type="string">
            <text:p>(7, 5, 17, 12, 0)</text:p>
          </table:table-cell>
          <table:table-cell office:value-type="string">
            <text:p>WiFi warrior</text:p>
          </table:table-cell>
          <table:table-cell table:number-columns-repeated="1021"/>
        </table:table-row>
        <table:table-row table:style-name="ro1">
          <table:table-cell office:value-type="string">
            <text:p>Dmar3</text:p>
          </table:table-cell>
          <table:table-cell office:value-type="string">
            <text:p>(2, 0, 4, 0, 0)</text:p>
          </table:table-cell>
          <table:table-cell office:value-type="string">
            <text:p>Dmar3</text:p>
          </table:table-cell>
          <table:table-cell table:number-columns-repeated="1021"/>
        </table:table-row>
        <table:table-row table:style-name="ro1">
          <table:table-cell office:value-type="string">
            <text:p>Camdne</text:p>
          </table:table-cell>
          <table:table-cell office:value-type="string">
            <text:p>(3, 1, 7, 2, 0)</text:p>
          </table:table-cell>
          <table:table-cell office:value-type="string">
            <text:p>Camdne</text:p>
          </table:table-cell>
          <table:table-cell table:number-columns-repeated="1021"/>
        </table:table-row>
        <table:table-row table:style-name="ro1">
          <table:table-cell office:value-type="string">
            <text:p>Thvggernaut</text:p>
          </table:table-cell>
          <table:table-cell office:value-type="string">
            <text:p>(2, 0, 5, 1, 0)</text:p>
          </table:table-cell>
          <table:table-cell office:value-type="string">
            <text:p>Thvggernaut</text:p>
          </table:table-cell>
          <table:table-cell table:number-columns-repeated="1021"/>
        </table:table-row>
        <table:table-row table:style-name="ro1">
          <table:table-cell office:value-type="string">
            <text:p>Ronaldo Goat</text:p>
          </table:table-cell>
          <table:table-cell office:value-type="string">
            <text:p>(3, 1, 7, 3, 0)</text:p>
          </table:table-cell>
          <table:table-cell office:value-type="string">
            <text:p>Ronaldo Goat</text:p>
          </table:table-cell>
          <table:table-cell table:number-columns-repeated="1021"/>
        </table:table-row>
        <table:table-row table:style-name="ro1">
          <table:table-cell office:value-type="string">
            <text:p>Chronicle2</text:p>
          </table:table-cell>
          <table:table-cell office:value-type="string">
            <text:p>(2, 0, 4, 0, 0)</text:p>
          </table:table-cell>
          <table:table-cell office:value-type="string">
            <text:p>Chronicle2</text:p>
          </table:table-cell>
          <table:table-cell table:number-columns-repeated="1021"/>
        </table:table-row>
        <table:table-row table:style-name="ro1">
          <table:table-cell office:value-type="string">
            <text:p>bball</text:p>
          </table:table-cell>
          <table:table-cell office:value-type="string">
            <text:p>(2, 0, 4, 0, 0)</text:p>
          </table:table-cell>
          <table:table-cell office:value-type="string">
            <text:p>bball</text:p>
          </table:table-cell>
          <table:table-cell table:number-columns-repeated="1021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(0, 0, 0, 0, 2)</text:p>
          </table:table-cell>
          <table:table-cell office:value-type="string">
            <text:p>Hod Strat</text:p>
          </table:table-cell>
          <table:table-cell table:number-columns-repeated="1021"/>
        </table:table-row>
        <table:table-row table:style-name="ro1">
          <table:table-cell office:value-type="string">
            <text:p>Squish</text:p>
          </table:table-cell>
          <table:table-cell office:value-type="string">
            <text:p>(8, 6, 18, 12, 0)</text:p>
          </table:table-cell>
          <table:table-cell office:value-type="string">
            <text:p>Squish</text:p>
          </table:table-cell>
          <table:table-cell table:number-columns-repeated="1021"/>
        </table:table-row>
        <table:table-row table:style-name="ro1">
          <table:table-cell office:value-type="string">
            <text:p>Manbien</text:p>
          </table:table-cell>
          <table:table-cell office:value-type="string">
            <text:p>(3, 1, 6, 2, 0)</text:p>
          </table:table-cell>
          <table:table-cell office:value-type="string">
            <text:p>Manbien</text:p>
          </table:table-cell>
          <table:table-cell table:number-columns-repeated="1021"/>
        </table:table-row>
        <table:table-row table:style-name="ro1">
          <table:table-cell office:value-type="string">
            <text:p>Moisesito</text:p>
          </table:table-cell>
          <table:table-cell office:value-type="string">
            <text:p>(2, 1, 5, 2, 1)</text:p>
          </table:table-cell>
          <table:table-cell office:value-type="string">
            <text:p>Moisesito</text:p>
          </table:table-cell>
          <table:table-cell table:number-columns-repeated="1021"/>
        </table:table-row>
        <table:table-row table:style-name="ro1">
          <table:table-cell office:value-type="string">
            <text:p>Pendragon</text:p>
          </table:table-cell>
          <table:table-cell office:value-type="string">
            <text:p>(4, 2, 10, 5, 0)</text:p>
          </table:table-cell>
          <table:table-cell office:value-type="string">
            <text:p>Pendragon</text:p>
          </table:table-cell>
          <table:table-cell table:number-columns-repeated="1021"/>
        </table:table-row>
        <table:table-row table:style-name="ro1">
          <table:table-cell office:value-type="string">
            <text:p>Packy</text:p>
          </table:table-cell>
          <table:table-cell office:value-type="string">
            <text:p>(5, 3, 11, 6, 0)</text:p>
          </table:table-cell>
          <table:table-cell office:value-type="string">
            <text:p>Packy</text:p>
          </table:table-cell>
          <table:table-cell table:number-columns-repeated="1021"/>
        </table:table-row>
        <table:table-row table:style-name="ro1">
          <table:table-cell office:value-type="string">
            <text:p>a_Successor</text:p>
          </table:table-cell>
          <table:table-cell office:value-type="string">
            <text:p>(4, 2, 9, 5, 0)</text:p>
          </table:table-cell>
          <table:table-cell office:value-type="string">
            <text:p>a_Successor</text:p>
          </table:table-cell>
          <table:table-cell table:number-columns-repeated="1021"/>
        </table:table-row>
        <table:table-row table:style-name="ro1">
          <table:table-cell office:value-type="string">
            <text:p>Dpweber4</text:p>
          </table:table-cell>
          <table:table-cell office:value-type="string">
            <text:p>(2, 1, 4, 2, 1)</text:p>
          </table:table-cell>
          <table:table-cell office:value-type="string">
            <text:p>Dpweber4</text:p>
          </table:table-cell>
          <table:table-cell table:number-columns-repeated="1021"/>
        </table:table-row>
        <table:table-row table:style-name="ro1">
          <table:table-cell office:value-type="string">
            <text:p>Jredfire</text:p>
          </table:table-cell>
          <table:table-cell office:value-type="string">
            <text:p>(2, 0, 4, 0, 0)</text:p>
          </table:table-cell>
          <table:table-cell office:value-type="string">
            <text:p>Jredfire</text:p>
          </table:table-cell>
          <table:table-cell table:number-columns-repeated="1021"/>
        </table:table-row>
        <table:table-row table:style-name="ro1">
          <table:table-cell office:value-type="string">
            <text:p>Aghybrid</text:p>
          </table:table-cell>
          <table:table-cell office:value-type="string">
            <text:p>(2, 1, 4, 2, 1)</text:p>
          </table:table-cell>
          <table:table-cell office:value-type="string">
            <text:p>Aghybrid</text:p>
          </table:table-cell>
          <table:table-cell table:number-columns-repeated="1021"/>
        </table:table-row>
        <table:table-row table:style-name="ro1">
          <table:table-cell office:value-type="string">
            <text:p>FallenAries6</text:p>
          </table:table-cell>
          <table:table-cell office:value-type="string">
            <text:p>(2, 0, 4, 0, 0)</text:p>
          </table:table-cell>
          <table:table-cell office:value-type="string">
            <text:p>FallenAries6</text:p>
          </table:table-cell>
          <table:table-cell table:number-columns-repeated="1021"/>
        </table:table-row>
        <table:table-row table:style-name="ro1">
          <table:table-cell office:value-type="string">
            <text:p>tjnikhazy</text:p>
          </table:table-cell>
          <table:table-cell office:value-type="string">
            <text:p>(5, 3, 10, 6, 0)</text:p>
          </table:table-cell>
          <table:table-cell office:value-type="string">
            <text:p>tjnikhazy</text:p>
          </table:table-cell>
          <table:table-cell table:number-columns-repeated="1021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2, 0, 5, 1, 0)</text:p>
          </table:table-cell>
          <table:table-cell office:value-type="string">
            <text:p>Slowpez</text:p>
          </table:table-cell>
          <table:table-cell table:number-columns-repeated="1021"/>
        </table:table-row>
        <table:table-row table:style-name="ro1">
          <table:table-cell office:value-type="string">
            <text:p>aidanbobaidan</text:p>
          </table:table-cell>
          <table:table-cell office:value-type="string">
            <text:p>(5, 3, 11, 6, 0)</text:p>
          </table:table-cell>
          <table:table-cell office:value-type="string">
            <text:p>aidanbobaidan</text:p>
          </table:table-cell>
          <table:table-cell table:number-columns-repeated="1021"/>
        </table:table-row>
        <table:table-row table:style-name="ro1">
          <table:table-cell office:value-type="string">
            <text:p>Doc Shock</text:p>
          </table:table-cell>
          <table:table-cell office:value-type="string">
            <text:p>(2, 0, 4, 0, 0)</text:p>
          </table:table-cell>
          <table:table-cell office:value-type="string">
            <text:p>Doc Shock</text:p>
          </table:table-cell>
          <table:table-cell table:number-columns-repeated="1021"/>
        </table:table-row>
        <table:table-row table:style-name="ro1">
          <table:table-cell office:value-type="string">
            <text:p>NFBJacob</text:p>
          </table:table-cell>
          <table:table-cell office:value-type="string">
            <text:p>(4, 2, 9, 4, 0)</text:p>
          </table:table-cell>
          <table:table-cell office:value-type="string">
            <text:p>NFBJacob</text:p>
          </table:table-cell>
          <table:table-cell table:number-columns-repeated="1021"/>
        </table:table-row>
        <table:table-row table:style-name="ro1">
          <table:table-cell office:value-type="string">
            <text:p>Xavi</text:p>
          </table:table-cell>
          <table:table-cell office:value-type="string">
            <text:p>(2, 0, 5, 1, 0)</text:p>
          </table:table-cell>
          <table:table-cell office:value-type="string">
            <text:p>Xavi</text:p>
          </table:table-cell>
          <table:table-cell table:number-columns-repeated="1021"/>
        </table:table-row>
        <table:table-row table:style-name="ro1">
          <table:table-cell office:value-type="string">
            <text:p>DuckMark</text:p>
          </table:table-cell>
          <table:table-cell office:value-type="string">
            <text:p>(5, 3, 10, 6, 0)</text:p>
          </table:table-cell>
          <table:table-cell office:value-type="string">
            <text:p>DuckMark</text:p>
          </table:table-cell>
          <table:table-cell table:number-columns-repeated="1021"/>
        </table:table-row>
        <table:table-row table:style-name="ro1">
          <table:table-cell office:value-type="string">
            <text:p>Mathius</text:p>
          </table:table-cell>
          <table:table-cell office:value-type="string">
            <text:p>(1, 0, 2, 0, 1)</text:p>
          </table:table-cell>
          <table:table-cell office:value-type="string">
            <text:p>Mathius</text:p>
          </table:table-cell>
          <table:table-cell table:number-columns-repeated="1021"/>
        </table:table-row>
        <table:table-row table:style-name="ro1">
          <table:table-cell office:value-type="string">
            <text:p>vipertoo</text:p>
          </table:table-cell>
          <table:table-cell office:value-type="string">
            <text:p>(4, 2, 9, 4, 0)</text:p>
          </table:table-cell>
          <table:table-cell office:value-type="string">
            <text:p>vipertoo</text:p>
          </table:table-cell>
          <table:table-cell table:number-columns-repeated="1021"/>
        </table:table-row>
        <table:table-row table:style-name="ro1">
          <table:table-cell office:value-type="string">
            <text:p>GrantMA</text:p>
          </table:table-cell>
          <table:table-cell office:value-type="string">
            <text:p>(2, 0, 4, 0, 0)</text:p>
          </table:table-cell>
          <table:table-cell office:value-type="string">
            <text:p>GrantMA</text:p>
          </table:table-cell>
          <table:table-cell table:number-columns-repeated="1021"/>
        </table:table-row>
        <table:table-row table:style-name="ro1">
          <table:table-cell office:value-type="string">
            <text:p>Quelity</text:p>
          </table:table-cell>
          <table:table-cell office:value-type="string">
            <text:p>(5, 3, 11, 6, 0)</text:p>
          </table:table-cell>
          <table:table-cell office:value-type="string">
            <text:p>Quelity</text:p>
          </table:table-cell>
          <table:table-cell table:number-columns-repeated="1021"/>
        </table:table-row>
        <table:table-row table:style-name="ro1">
          <table:table-cell office:value-type="string">
            <text:p>Synvy</text:p>
          </table:table-cell>
          <table:table-cell office:value-type="string">
            <text:p>(2, 0, 5, 1, 0)</text:p>
          </table:table-cell>
          <table:table-cell office:value-type="string">
            <text:p>Synvy</text:p>
          </table:table-cell>
          <table:table-cell table:number-columns-repeated="1021"/>
        </table:table-row>
        <table:table-row table:style-name="ro1">
          <table:table-cell office:value-type="string">
            <text:p>Lapis</text:p>
          </table:table-cell>
          <table:table-cell office:value-type="string">
            <text:p>(3, 1, 7, 3, 0)</text:p>
          </table:table-cell>
          <table:table-cell office:value-type="string">
            <text:p>Lapis</text:p>
          </table:table-cell>
          <table:table-cell table:number-columns-repeated="1021"/>
        </table:table-row>
        <table:table-row table:style-name="ro1">
          <table:table-cell office:value-type="string">
            <text:p>phat dawg</text:p>
          </table:table-cell>
          <table:table-cell office:value-type="string">
            <text:p>(1, 0, 2, 0, 1)</text:p>
          </table:table-cell>
          <table:table-cell office:value-type="string">
            <text:p>phat dawg</text:p>
          </table:table-cell>
          <table:table-cell table:number-columns-repeated="1021"/>
        </table:table-row>
        <table:table-row table:style-name="ro1">
          <table:table-cell office:value-type="string">
            <text:p>Mav</text:p>
          </table:table-cell>
          <table:table-cell office:value-type="string">
            <text:p>(5, 3, 11, 6, 0)</text:p>
          </table:table-cell>
          <table:table-cell office:value-type="string">
            <text:p>Mav</text:p>
          </table:table-cell>
          <table:table-cell table:number-columns-repeated="1021"/>
        </table:table-row>
        <table:table-row table:style-name="ro1">
          <table:table-cell office:value-type="string">
            <text:p>Krabz</text:p>
          </table:table-cell>
          <table:table-cell office:value-type="string">
            <text:p>(2, 0, 4, 0, 0)</text:p>
          </table:table-cell>
          <table:table-cell office:value-type="string">
            <text:p>Krabz</text:p>
          </table:table-cell>
          <table:table-cell table:number-columns-repeated="1021"/>
        </table:table-row>
        <table:table-row table:style-name="ro1">
          <table:table-cell office:value-type="string">
            <text:p>AzLu</text:p>
          </table:table-cell>
          <table:table-cell office:value-type="string">
            <text:p>(3, 1, 7, 3, 0)</text:p>
          </table:table-cell>
          <table:table-cell office:value-type="string">
            <text:p>AzLu</text:p>
          </table:table-cell>
          <table:table-cell table:number-columns-repeated="1021"/>
        </table:table-row>
        <table:table-row table:style-name="ro1">
          <table:table-cell office:value-type="string">
            <text:p>Turbo</text:p>
          </table:table-cell>
          <table:table-cell office:value-type="string">
            <text:p>(2, 0, 4, 0, 0)</text:p>
          </table:table-cell>
          <table:table-cell office:value-type="string">
            <text:p>Turbo</text:p>
          </table:table-cell>
          <table:table-cell table:number-columns-repeated="1021"/>
        </table:table-row>
        <table:table-row table:style-name="ro1">
          <table:table-cell office:value-type="string">
            <text:p>Zetsubo</text:p>
          </table:table-cell>
          <table:table-cell office:value-type="string">
            <text:p>(5, 3, 12, 7, 0)</text:p>
          </table:table-cell>
          <table:table-cell office:value-type="string">
            <text:p>Zetsubo</text:p>
          </table:table-cell>
          <table:table-cell table:number-columns-repeated="1021"/>
        </table:table-row>
        <table:table-row table:style-name="ro1">
          <table:table-cell office:value-type="string">
            <text:p>Schef</text:p>
          </table:table-cell>
          <table:table-cell office:value-type="string">
            <text:p>(2, 0, 4, 0, 0)</text:p>
          </table:table-cell>
          <table:table-cell office:value-type="string">
            <text:p>Schef</text:p>
          </table:table-cell>
          <table:table-cell table:number-columns-repeated="1021"/>
        </table:table-row>
        <table:table-row table:style-name="ro1">
          <table:table-cell office:value-type="string">
            <text:p>BooBell</text:p>
          </table:table-cell>
          <table:table-cell office:value-type="string">
            <text:p>(4, 2, 8, 4, 0)</text:p>
          </table:table-cell>
          <table:table-cell office:value-type="string">
            <text:p>BooBell</text:p>
          </table:table-cell>
          <table:table-cell table:number-columns-repeated="1021"/>
        </table:table-row>
        <table:table-row table:style-name="ro1">
          <table:table-cell office:value-type="string">
            <text:p>Pryvate Pigeon</text:p>
          </table:table-cell>
          <table:table-cell office:value-type="string">
            <text:p>(2, 0, 4, 0, 0)</text:p>
          </table:table-cell>
          <table:table-cell office:value-type="string">
            <text:p>Pryvate Pigeon</text:p>
          </table:table-cell>
          <table:table-cell table:number-columns-repeated="1021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8, 6, 24, 15, 0)</text:p>
          </table:table-cell>
          <table:table-cell office:value-type="string">
            <text:p>BeastModePaul</text:p>
          </table:table-cell>
          <table:table-cell table:number-columns-repeated="1021"/>
        </table:table-row>
        <table:table-row table:style-name="ro1">
          <table:table-cell office:value-type="string">
            <text:p>Ryzakyn</text:p>
          </table:table-cell>
          <table:table-cell office:value-type="string">
            <text:p>(3, 1, 7, 3, 0)</text:p>
          </table:table-cell>
          <table:table-cell office:value-type="string">
            <text:p>Ryzakyn</text:p>
          </table:table-cell>
          <table:table-cell table:number-columns-repeated="1021"/>
        </table:table-row>
        <table:table-row table:style-name="ro1">
          <table:table-cell office:value-type="string">
            <text:p>derk</text:p>
          </table:table-cell>
          <table:table-cell office:value-type="string">
            <text:p>(5, 3, 11, 7, 0)</text:p>
          </table:table-cell>
          <table:table-cell office:value-type="string">
            <text:p>derk</text:p>
          </table:table-cell>
          <table:table-cell table:number-columns-repeated="1021"/>
        </table:table-row>
        <table:table-row table:style-name="ro1">
          <table:table-cell office:value-type="string">
            <text:p>Anthzeny</text:p>
          </table:table-cell>
          <table:table-cell office:value-type="string">
            <text:p>(6, 4, 15, 9, 0)</text:p>
          </table:table-cell>
          <table:table-cell office:value-type="string">
            <text:p>Anthzeny</text:p>
          </table:table-cell>
          <table:table-cell table:number-columns-repeated="1021"/>
        </table:table-row>
        <table:table-row table:style-name="ro1">
          <table:table-cell office:value-type="string">
            <text:p>Franknbean</text:p>
          </table:table-cell>
          <table:table-cell office:value-type="string">
            <text:p>(4, 2, 9, 5, 0)</text:p>
          </table:table-cell>
          <table:table-cell office:value-type="string">
            <text:p>Franknbean</text:p>
          </table:table-cell>
          <table:table-cell table:number-columns-repeated="1021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5, 3, 11, 6, 0)</text:p>
          </table:table-cell>
          <table:table-cell office:value-type="string">
            <text:p>McFunny</text:p>
          </table:table-cell>
          <table:table-cell table:number-columns-repeated="1021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5, 3, 13, 7, 0)</text:p>
          </table:table-cell>
          <table:table-cell office:value-type="string">
            <text:p>HaydenEatsShrimp</text:p>
          </table:table-cell>
          <table:table-cell table:number-columns-repeated="1021"/>
        </table:table-row>
        <table:table-row table:style-name="ro1">
          <table:table-cell office:value-type="string">
            <text:p>Riku</text:p>
          </table:table-cell>
          <table:table-cell office:value-type="string">
            <text:p>(7, 5, 18, 11, 0)</text:p>
          </table:table-cell>
          <table:table-cell office:value-type="string">
            <text:p>Riku</text:p>
          </table:table-cell>
          <table:table-cell table:number-columns-repeated="1021"/>
        </table:table-row>
        <table:table-row table:style-name="ro1">
          <table:table-cell office:value-type="string">
            <text:p>Freshness</text:p>
          </table:table-cell>
          <table:table-cell office:value-type="string">
            <text:p>(2, 1, 4, 2, 1)</text:p>
          </table:table-cell>
          <table:table-cell office:value-type="string">
            <text:p>Freshness</text:p>
          </table:table-cell>
          <table:table-cell table:number-columns-repeated="1021"/>
        </table:table-row>
        <table:table-row table:style-name="ro1">
          <table:table-cell office:value-type="string">
            <text:p>S. Phantm</text:p>
          </table:table-cell>
          <table:table-cell office:value-type="string">
            <text:p>(6, 4, 13, 9, 0)</text:p>
          </table:table-cell>
          <table:table-cell office:value-type="string">
            <text:p>S. Phantm</text:p>
          </table:table-cell>
          <table:table-cell table:number-columns-repeated="1021"/>
        </table:table-row>
        <table:table-row table:style-name="ro1">
          <table:table-cell office:value-type="string">
            <text:p>Palestine</text:p>
          </table:table-cell>
          <table:table-cell office:value-type="string">
            <text:p>(0, 0, 0, 0, 2)</text:p>
          </table:table-cell>
          <table:table-cell office:value-type="string">
            <text:p>Palestine</text:p>
          </table:table-cell>
          <table:table-cell table:number-columns-repeated="1021"/>
        </table:table-row>
        <table:table-row table:style-name="ro1">
          <table:table-cell office:value-type="string">
            <text:p>Fonica</text:p>
          </table:table-cell>
          <table:table-cell office:value-type="string">
            <text:p>(0, 0, 0, 0, 2)</text:p>
          </table:table-cell>
          <table:table-cell office:value-type="string">
            <text:p>Fonica</text:p>
          </table:table-cell>
          <table:table-cell table:number-columns-repeated="1021"/>
        </table:table-row>
        <table:table-row table:style-name="ro1">
          <table:table-cell office:value-type="string">
            <text:p>NotHbox</text:p>
          </table:table-cell>
          <table:table-cell office:value-type="string">
            <text:p>(5, 3, 11, 7, 0)</text:p>
          </table:table-cell>
          <table:table-cell office:value-type="string">
            <text:p>NotHbox</text:p>
          </table:table-cell>
          <table:table-cell table:number-columns-repeated="1021"/>
        </table:table-row>
        <table:table-row table:style-name="ro1">
          <table:table-cell office:value-type="string">
            <text:p>Minimaxify</text:p>
          </table:table-cell>
          <table:table-cell office:value-type="string">
            <text:p>(5, 3, 10, 6, 0)</text:p>
          </table:table-cell>
          <table:table-cell office:value-type="string">
            <text:p>Minimaxify</text:p>
          </table:table-cell>
          <table:table-cell table:number-columns-repeated="1021"/>
        </table:table-row>
        <table:table-row table:style-name="ro1">
          <table:table-cell office:value-type="string">
            <text:p>VileSpecter</text:p>
          </table:table-cell>
          <table:table-cell office:value-type="string">
            <text:p>(4, 2, 9, 4, 0)</text:p>
          </table:table-cell>
          <table:table-cell office:value-type="string">
            <text:p>VileSpecter</text:p>
          </table:table-cell>
          <table:table-cell table:number-columns-repeated="1021"/>
        </table:table-row>
        <table:table-row table:style-name="ro1">
          <table:table-cell office:value-type="string">
            <text:p>Dominator</text:p>
          </table:table-cell>
          <table:table-cell office:value-type="string">
            <text:p>(8, 8, 23, 19, 0)</text:p>
          </table:table-cell>
          <table:table-cell office:value-type="string">
            <text:p>Dominator</text:p>
          </table:table-cell>
          <table:table-cell table:number-columns-repeated="1021"/>
        </table:table-row>
        <table:table-row table:style-name="ro1">
          <table:table-cell office:value-type="string">
            <text:p>Chez</text:p>
          </table:table-cell>
          <table:table-cell office:value-type="string">
            <text:p>(5, 3, 10, 6, 0)</text:p>
          </table:table-cell>
          <table:table-cell office:value-type="string">
            <text:p>Chez</text:p>
          </table:table-cell>
          <table:table-cell table:number-columns-repeated="1021"/>
        </table:table-row>
        <table:table-row table:style-name="ro1">
          <table:table-cell office:value-type="string">
            <text:p>BMoC</text:p>
          </table:table-cell>
          <table:table-cell office:value-type="string">
            <text:p>(5, 3, 11, 6, 0)</text:p>
          </table:table-cell>
          <table:table-cell office:value-type="string">
            <text:p>BMoC</text:p>
          </table:table-cell>
          <table:table-cell table:number-columns-repeated="1021"/>
        </table:table-row>
        <table:table-row table:style-name="ro1">
          <table:table-cell office:value-type="string">
            <text:p>Muttley</text:p>
          </table:table-cell>
          <table:table-cell office:value-type="string">
            <text:p>(4, 2, 8, 4, 0)</text:p>
          </table:table-cell>
          <table:table-cell office:value-type="string">
            <text:p>Muttley</text:p>
          </table:table-cell>
          <table:table-cell table:number-columns-repeated="1021"/>
        </table:table-row>
        <table:table-row table:style-name="ro1">
          <table:table-cell office:value-type="string">
            <text:p>Manzana</text:p>
          </table:table-cell>
          <table:table-cell office:value-type="string">
            <text:p>(7, 5, 16, 11, 0)</text:p>
          </table:table-cell>
          <table:table-cell office:value-type="string">
            <text:p>Manzana</text:p>
          </table:table-cell>
          <table:table-cell table:number-columns-repeated="1021"/>
        </table:table-row>
        <table:table-row table:style-name="ro1">
          <table:table-cell office:value-type="string">
            <text:p>Serph</text:p>
          </table:table-cell>
          <table:table-cell office:value-type="string">
            <text:p>(3, 1, 6, 2, 0)</text:p>
          </table:table-cell>
          <table:table-cell office:value-type="string">
            <text:p>Serph</text:p>
          </table:table-cell>
          <table:table-cell table:number-columns-repeated="1021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7, 5, 15, 11, 0)</text:p>
          </table:table-cell>
          <table:table-cell office:value-type="string">
            <text:p>Strobics</text:p>
          </table:table-cell>
          <table:table-cell table:number-columns-repeated="1021"/>
        </table:table-row>
        <table:table-row table:style-name="ro1">
          <table:table-cell office:value-type="string">
            <text:p>Packet</text:p>
          </table:table-cell>
          <table:table-cell office:value-type="string">
            <text:p>(1, 0, 3, 1, 1)</text:p>
          </table:table-cell>
          <table:table-cell office:value-type="string">
            <text:p>Packet</text:p>
          </table:table-cell>
          <table:table-cell table:number-columns-repeated="1021"/>
        </table:table-row>
        <table:table-row table:style-name="ro1">
          <table:table-cell office:value-type="string">
            <text:p>ESAM</text:p>
          </table:table-cell>
          <table:table-cell office:value-type="string">
            <text:p>(8, 6, 24, 16, 0)</text:p>
          </table:table-cell>
          <table:table-cell office:value-type="string">
            <text:p>ESAM</text:p>
          </table:table-cell>
          <table:table-cell table:number-columns-repeated="1021"/>
        </table:table-row>
        <table:table-row table:style-name="ro1">
          <table:table-cell office:value-type="string">
            <text:p>Newiby (Entropy)</text:p>
          </table:table-cell>
          <table:table-cell office:value-type="string">
            <text:p>(2, 0, 6, 2, 0)</text:p>
          </table:table-cell>
          <table:table-cell office:value-type="string">
            <text:p>Newiby (Entropy)</text:p>
          </table:table-cell>
          <table:table-cell table:number-columns-repeated="1021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3, 2, 8, 5, 1)</text:p>
          </table:table-cell>
          <table:table-cell office:value-type="string">
            <text:p>Hungrybox</text:p>
          </table:table-cell>
          <table:table-cell table:number-columns-repeated="1021"/>
        </table:table-row>
        <table:table-row table:style-name="ro1">
          <table:table-cell office:value-type="string">
            <text:p>Wiccan</text:p>
          </table:table-cell>
          <table:table-cell office:value-type="string">
            <text:p>(5, 3, 12, 8, 0)</text:p>
          </table:table-cell>
          <table:table-cell office:value-type="string">
            <text:p>Wiccan</text:p>
          </table:table-cell>
          <table:table-cell table:number-columns-repeated="1021"/>
        </table:table-row>
        <table:table-row table:style-name="ro1">
          <table:table-cell office:value-type="string">
            <text:p>JMxfia</text:p>
          </table:table-cell>
          <table:table-cell office:value-type="string">
            <text:p>(6, 4, 13, 9, 0)</text:p>
          </table:table-cell>
          <table:table-cell office:value-type="string">
            <text:p>JMxfia</text:p>
          </table:table-cell>
          <table:table-cell table:number-columns-repeated="1021"/>
        </table:table-row>
        <table:table-row table:style-name="ro1">
          <table:table-cell office:value-type="string">
            <text:p>Ginger</text:p>
          </table:table-cell>
          <table:table-cell office:value-type="string">
            <text:p>(5, 3, 11, 6, 0)</text:p>
          </table:table-cell>
          <table:table-cell office:value-type="string">
            <text:p>Ginger</text:p>
          </table:table-cell>
          <table:table-cell table:number-columns-repeated="1021"/>
        </table:table-row>
        <table:table-row table:style-name="ro1">
          <table:table-cell office:value-type="string">
            <text:p>Breezy 400</text:p>
          </table:table-cell>
          <table:table-cell office:value-type="string">
            <text:p>(4, 2, 10, 6, 0)</text:p>
          </table:table-cell>
          <table:table-cell office:value-type="string">
            <text:p>Breezy 400</text:p>
          </table:table-cell>
          <table:table-cell table:number-columns-repeated="1021"/>
        </table:table-row>
        <table:table-row table:style-name="ro1">
          <table:table-cell office:value-type="string">
            <text:p>NATO</text:p>
          </table:table-cell>
          <table:table-cell office:value-type="string">
            <text:p>(4, 2, 9, 4, 0)</text:p>
          </table:table-cell>
          <table:table-cell office:value-type="string">
            <text:p>NATO</text:p>
          </table:table-cell>
          <table:table-cell table:number-columns-repeated="1021"/>
        </table:table-row>
        <table:table-row table:style-name="ro1">
          <table:table-cell office:value-type="string">
            <text:p>Reticent</text:p>
          </table:table-cell>
          <table:table-cell office:value-type="string">
            <text:p>(6, 4, 13, 9, 0)</text:p>
          </table:table-cell>
          <table:table-cell office:value-type="string">
            <text:p>Reticent</text:p>
          </table:table-cell>
          <table:table-cell table:number-columns-repeated="1021"/>
        </table:table-row>
        <table:table-row table:style-name="ro1">
          <table:table-cell office:value-type="string">
            <text:p>DREAD</text:p>
          </table:table-cell>
          <table:table-cell office:value-type="string">
            <text:p>(1, 0, 2, 0, 1)</text:p>
          </table:table-cell>
          <table:table-cell office:value-type="string">
            <text:p>DREAD</text:p>
          </table:table-cell>
          <table:table-cell table:number-columns-repeated="1021"/>
        </table:table-row>
        <table:table-row table:style-name="ro1">
          <table:table-cell office:value-type="string">
            <text:p>Mcdrizz</text:p>
          </table:table-cell>
          <table:table-cell office:value-type="string">
            <text:p>(0, 0, 0, 0, 2)</text:p>
          </table:table-cell>
          <table:table-cell office:value-type="string">
            <text:p>Mcdrizz</text:p>
          </table:table-cell>
          <table:table-cell table:number-columns-repeated="1021"/>
        </table:table-row>
        <table:table-row table:style-name="ro1">
          <table:table-cell office:value-type="string">
            <text:p>DAIGURREN</text:p>
          </table:table-cell>
          <table:table-cell office:value-type="string">
            <text:p>(0, 0, 0, 0, 2)</text:p>
          </table:table-cell>
          <table:table-cell office:value-type="string">
            <text:p>DAIGURREN</text:p>
          </table:table-cell>
          <table:table-cell table:number-columns-repeated="1021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(5, 3, 11, 7, 0)</text:p>
          </table:table-cell>
          <table:table-cell office:value-type="string">
            <text:p>Dingodile</text:p>
          </table:table-cell>
          <table:table-cell table:number-columns-repeated="1021"/>
        </table:table-row>
        <table:table-row table:style-name="ro1">
          <table:table-cell office:value-type="string">
            <text:p>Caz</text:p>
          </table:table-cell>
          <table:table-cell office:value-type="string">
            <text:p>(2, 0, 4, 0, 0)</text:p>
          </table:table-cell>
          <table:table-cell office:value-type="string">
            <text:p>Caz</text:p>
          </table:table-cell>
          <table:table-cell table:number-columns-repeated="1021"/>
        </table:table-row>
        <table:table-row table:style-name="ro1">
          <table:table-cell office:value-type="string">
            <text:p>Dre05</text:p>
          </table:table-cell>
          <table:table-cell office:value-type="string">
            <text:p>(2, 1, 5, 2, 1)</text:p>
          </table:table-cell>
          <table:table-cell office:value-type="string">
            <text:p>Dre05</text:p>
          </table:table-cell>
          <table:table-cell table:number-columns-repeated="1021"/>
        </table:table-row>
        <table:table-row table:style-name="ro1">
          <table:table-cell office:value-type="string">
            <text:p>ElMexicano</text:p>
          </table:table-cell>
          <table:table-cell office:value-type="string">
            <text:p>(2, 0, 5, 1, 0)</text:p>
          </table:table-cell>
          <table:table-cell office:value-type="string">
            <text:p>ElMexicano</text:p>
          </table:table-cell>
          <table:table-cell table:number-columns-repeated="1021"/>
        </table:table-row>
        <table:table-row table:style-name="ro1">
          <table:table-cell office:value-type="string">
            <text:p>GoGo</text:p>
          </table:table-cell>
          <table:table-cell office:value-type="string">
            <text:p>(2, 0, 4, 0, 0)</text:p>
          </table:table-cell>
          <table:table-cell office:value-type="string">
            <text:p>GoGo</text:p>
          </table:table-cell>
          <table:table-cell table:number-columns-repeated="1021"/>
        </table:table-row>
        <table:table-row table:style-name="ro1">
          <table:table-cell office:value-type="string">
            <text:p>YoungSanta</text:p>
          </table:table-cell>
          <table:table-cell office:value-type="string">
            <text:p>(0, 0, 0, 0, 2)</text:p>
          </table:table-cell>
          <table:table-cell office:value-type="string">
            <text:p>YoungSanta</text:p>
          </table:table-cell>
          <table:table-cell table:number-columns-repeated="1021"/>
        </table:table-row>
        <table:table-row table:style-name="ro1">
          <table:table-cell office:value-type="string">
            <text:p>apachesavage</text:p>
          </table:table-cell>
          <table:table-cell office:value-type="string">
            <text:p>(2, 0, 4, 0, 0)</text:p>
          </table:table-cell>
          <table:table-cell office:value-type="string">
            <text:p>apachesavage</text:p>
          </table:table-cell>
          <table:table-cell table:number-columns-repeated="1021"/>
        </table:table-row>
        <table:table-row table:style-name="ro1">
          <table:table-cell office:value-type="string">
            <text:p>Shibe</text:p>
          </table:table-cell>
          <table:table-cell office:value-type="string">
            <text:p>(0, 0, 0, 0, 2)</text:p>
          </table:table-cell>
          <table:table-cell office:value-type="string">
            <text:p>Shibe</text:p>
          </table:table-cell>
          <table:table-cell table:number-columns-repeated="1021"/>
        </table:table-row>
        <table:table-row table:style-name="ro1">
          <table:table-cell office:value-type="string">
            <text:p>Doormatt</text:p>
          </table:table-cell>
          <table:table-cell office:value-type="string">
            <text:p>(4, 2, 10, 6, 0)</text:p>
          </table:table-cell>
          <table:table-cell office:value-type="string">
            <text:p>Doormatt</text:p>
          </table:table-cell>
          <table:table-cell table:number-columns-repeated="1021"/>
        </table:table-row>
        <table:table-row table:style-name="ro1">
          <table:table-cell office:value-type="string">
            <text:p>TurtleDerby</text:p>
          </table:table-cell>
          <table:table-cell office:value-type="string">
            <text:p>(0, 0, 0, 0, 2)</text:p>
          </table:table-cell>
          <table:table-cell office:value-type="string">
            <text:p>TurtleDerby</text:p>
          </table:table-cell>
          <table:table-cell table:number-columns-repeated="1021"/>
        </table:table-row>
        <table:table-row table:style-name="ro1">
          <table:table-cell office:value-type="string">
            <text:p>nap</text:p>
          </table:table-cell>
          <table:table-cell office:value-type="string">
            <text:p>(5, 3, 11, 7, 0)</text:p>
          </table:table-cell>
          <table:table-cell office:value-type="string">
            <text:p>nap</text:p>
          </table:table-cell>
          <table:table-cell table:number-columns-repeated="1021"/>
        </table:table-row>
        <table:table-row table:style-name="ro1">
          <table:table-cell office:value-type="string">
            <text:p>Mimicx18</text:p>
          </table:table-cell>
          <table:table-cell office:value-type="string">
            <text:p>(1, 0, 2, 0, 1)</text:p>
          </table:table-cell>
          <table:table-cell office:value-type="string">
            <text:p>Mimicx18</text:p>
          </table:table-cell>
          <table:table-cell table:number-columns-repeated="1021"/>
        </table:table-row>
        <table:table-row table:style-name="ro1">
          <table:table-cell office:value-type="string">
            <text:p>Redpik</text:p>
          </table:table-cell>
          <table:table-cell office:value-type="string">
            <text:p>(3, 1, 6, 2, 0)</text:p>
          </table:table-cell>
          <table:table-cell office:value-type="string">
            <text:p>Redpik</text:p>
          </table:table-cell>
          <table:table-cell table:number-columns-repeated="1021"/>
        </table:table-row>
        <table:table-row table:style-name="ro1">
          <table:table-cell office:value-type="string">
            <text:p>Áçé</text:p>
          </table:table-cell>
          <table:table-cell office:value-type="string">
            <text:p>(2, 0, 4, 0, 0)</text:p>
          </table:table-cell>
          <table:table-cell office:value-type="string">
            <text:p>Áçé</text:p>
          </table:table-cell>
          <table:table-cell table:number-columns-repeated="1021"/>
        </table:table-row>
        <table:table-row table:style-name="ro1">
          <table:table-cell office:value-type="string">
            <text:p>Big</text:p>
          </table:table-cell>
          <table:table-cell office:value-type="string">
            <text:p>(2, 1, 4, 2, 1)</text:p>
          </table:table-cell>
          <table:table-cell office:value-type="string">
            <text:p>Big</text:p>
          </table:table-cell>
          <table:table-cell table:number-columns-repeated="1021"/>
        </table:table-row>
        <table:table-row table:style-name="ro1">
          <table:table-cell office:value-type="string">
            <text:p>Sb</text:p>
          </table:table-cell>
          <table:table-cell office:value-type="string">
            <text:p>(1, 0, 2, 0, 1)</text:p>
          </table:table-cell>
          <table:table-cell office:value-type="string">
            <text:p>Sb</text:p>
          </table:table-cell>
          <table:table-cell table:number-columns-repeated="1021"/>
        </table:table-row>
        <table:table-row table:style-name="ro1">
          <table:table-cell office:value-type="string">
            <text:p>masterqz</text:p>
          </table:table-cell>
          <table:table-cell office:value-type="string">
            <text:p>(5, 3, 11, 7, 0)</text:p>
          </table:table-cell>
          <table:table-cell office:value-type="string">
            <text:p>masterqz</text:p>
          </table:table-cell>
          <table:table-cell table:number-columns-repeated="1021"/>
        </table:table-row>
        <table:table-row table:style-name="ro1">
          <table:table-cell office:value-type="string">
            <text:p>italiangamer325</text:p>
          </table:table-cell>
          <table:table-cell office:value-type="string">
            <text:p>(3, 1, 6, 2, 0)</text:p>
          </table:table-cell>
          <table:table-cell office:value-type="string">
            <text:p>italiangamer325</text:p>
          </table:table-cell>
          <table:table-cell table:number-columns-repeated="1021"/>
        </table:table-row>
        <table:table-row table:style-name="ro1">
          <table:table-cell office:value-type="string">
            <text:p>Mr. J</text:p>
          </table:table-cell>
          <table:table-cell office:value-type="string">
            <text:p>(4, 2, 8, 4, 0)</text:p>
          </table:table-cell>
          <table:table-cell office:value-type="string">
            <text:p>Mr. J</text:p>
          </table:table-cell>
          <table:table-cell table:number-columns-repeated="1021"/>
        </table:table-row>
        <table:table-row table:style-name="ro1">
          <table:table-cell office:value-type="string">
            <text:p>Checkmate</text:p>
          </table:table-cell>
          <table:table-cell office:value-type="string">
            <text:p>(2, 0, 4, 0, 0)</text:p>
          </table:table-cell>
          <table:table-cell office:value-type="string">
            <text:p>Checkmate</text:p>
          </table:table-cell>
          <table:table-cell table:number-columns-repeated="1021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(4, 2, 10, 6, 0)</text:p>
          </table:table-cell>
          <table:table-cell office:value-type="string">
            <text:p>SamersonT</text:p>
          </table:table-cell>
          <table:table-cell table:number-columns-repeated="1021"/>
        </table:table-row>
        <table:table-row table:style-name="ro1">
          <table:table-cell office:value-type="string">
            <text:p>lilzach</text:p>
          </table:table-cell>
          <table:table-cell office:value-type="string">
            <text:p>(0, 0, 0, 0, 2)</text:p>
          </table:table-cell>
          <table:table-cell office:value-type="string">
            <text:p>lilzach</text:p>
          </table:table-cell>
          <table:table-cell table:number-columns-repeated="1021"/>
        </table:table-row>
        <table:table-row table:style-name="ro1">
          <table:table-cell office:value-type="string">
            <text:p>Sinclair</text:p>
          </table:table-cell>
          <table:table-cell office:value-type="string">
            <text:p>(4, 2, 9, 5, 0)</text:p>
          </table:table-cell>
          <table:table-cell office:value-type="string">
            <text:p>Sinclair</text:p>
          </table:table-cell>
          <table:table-cell table:number-columns-repeated="1021"/>
        </table:table-row>
        <table:table-row table:style-name="ro1">
          <table:table-cell office:value-type="string">
            <text:p>Leo</text:p>
          </table:table-cell>
          <table:table-cell office:value-type="string">
            <text:p>(0, 0, 0, 0, 2)</text:p>
          </table:table-cell>
          <table:table-cell office:value-type="string">
            <text:p>Leo</text:p>
          </table:table-cell>
          <table:table-cell table:number-columns-repeated="1021"/>
        </table:table-row>
        <table:table-row table:style-name="ro1">
          <table:table-cell office:value-type="string">
            <text:p>Powerstar</text:p>
          </table:table-cell>
          <table:table-cell office:value-type="string">
            <text:p>(3, 1, 6, 2, 0)</text:p>
          </table:table-cell>
          <table:table-cell office:value-type="string">
            <text:p>Powerstar</text:p>
          </table:table-cell>
          <table:table-cell table:number-columns-repeated="1021"/>
        </table:table-row>
        <table:table-row table:style-name="ro1">
          <table:table-cell office:value-type="string">
            <text:p>Hadou</text:p>
          </table:table-cell>
          <table:table-cell office:value-type="string">
            <text:p>(4, 2, 8, 4, 0)</text:p>
          </table:table-cell>
          <table:table-cell office:value-type="string">
            <text:p>Hadou</text:p>
          </table:table-cell>
          <table:table-cell table:number-columns-repeated="1021"/>
        </table:table-row>
        <table:table-row table:style-name="ro1">
          <table:table-cell office:value-type="string">
            <text:p>noemiglazer67</text:p>
          </table:table-cell>
          <table:table-cell office:value-type="string">
            <text:p>(9, 7, 27, 18, 0)</text:p>
          </table:table-cell>
          <table:table-cell office:value-type="string">
            <text:p>noemiglazer67</text:p>
          </table:table-cell>
          <table:table-cell table:number-columns-repeated="1021"/>
        </table:table-row>
        <table:table-row table:style-name="ro1">
          <table:table-cell office:value-type="string">
            <text:p>Autocon</text:p>
          </table:table-cell>
          <table:table-cell office:value-type="string">
            <text:p>(2, 0, 4, 0, 0)</text:p>
          </table:table-cell>
          <table:table-cell office:value-type="string">
            <text:p>Autocon</text:p>
          </table:table-cell>
          <table:table-cell table:number-columns-repeated="1021"/>
        </table:table-row>
        <table:table-row table:style-name="ro1">
          <table:table-cell office:value-type="string">
            <text:p>LSDEEZNUTS</text:p>
          </table:table-cell>
          <table:table-cell office:value-type="string">
            <text:p>(3, 1, 7, 2, 0)</text:p>
          </table:table-cell>
          <table:table-cell office:value-type="string">
            <text:p>LSDEEZNUTS</text:p>
          </table:table-cell>
          <table:table-cell table:number-columns-repeated="1021"/>
        </table:table-row>
        <table:table-row table:style-name="ro1">
          <table:table-cell office:value-type="string">
            <text:p>Portals</text:p>
          </table:table-cell>
          <table:table-cell office:value-type="string">
            <text:p>(4, 2, 9, 5, 0)</text:p>
          </table:table-cell>
          <table:table-cell office:value-type="string">
            <text:p>Portals</text:p>
          </table:table-cell>
          <table:table-cell table:number-columns-repeated="1021"/>
        </table:table-row>
        <table:table-row table:style-name="ro1">
          <table:table-cell office:value-type="string">
            <text:p>Mario Circuit 3</text:p>
          </table:table-cell>
          <table:table-cell office:value-type="string">
            <text:p>(3, 1, 7, 2, 0)</text:p>
          </table:table-cell>
          <table:table-cell office:value-type="string">
            <text:p>Mario Circuit 3</text:p>
          </table:table-cell>
          <table:table-cell table:number-columns-repeated="1021"/>
        </table:table-row>
        <table:table-row table:style-name="ro1">
          <table:table-cell office:value-type="string">
            <text:p>syntax</text:p>
          </table:table-cell>
          <table:table-cell office:value-type="string">
            <text:p>(3, 1, 7, 3, 0)</text:p>
          </table:table-cell>
          <table:table-cell office:value-type="string">
            <text:p>syntax</text:p>
          </table:table-cell>
          <table:table-cell table:number-columns-repeated="1021"/>
        </table:table-row>
        <table:table-row table:style-name="ro1">
          <table:table-cell office:value-type="string">
            <text:p>Diam</text:p>
          </table:table-cell>
          <table:table-cell office:value-type="string">
            <text:p>(0, 0, 0, 0, 2)</text:p>
          </table:table-cell>
          <table:table-cell office:value-type="string">
            <text:p>Diam</text:p>
          </table:table-cell>
          <table:table-cell table:number-columns-repeated="1021"/>
        </table:table-row>
        <table:table-row table:style-name="ro1">
          <table:table-cell office:value-type="string">
            <text:p>Danraj</text:p>
          </table:table-cell>
          <table:table-cell office:value-type="string">
            <text:p>(0, 0, 0, 0, 2)</text:p>
          </table:table-cell>
          <table:table-cell office:value-type="string">
            <text:p>Danraj</text:p>
          </table:table-cell>
          <table:table-cell table:number-columns-repeated="1021"/>
        </table:table-row>
        <table:table-row table:style-name="ro1">
          <table:table-cell office:value-type="string">
            <text:p>Nitrobone</text:p>
          </table:table-cell>
          <table:table-cell office:value-type="string">
            <text:p>(3, 1, 6, 2, 0)</text:p>
          </table:table-cell>
          <table:table-cell office:value-type="string">
            <text:p>Nitrobone</text:p>
          </table:table-cell>
          <table:table-cell table:number-columns-repeated="1021"/>
        </table:table-row>
        <table:table-row table:style-name="ro1">
          <table:table-cell office:value-type="string">
            <text:p>A-K SiN</text:p>
          </table:table-cell>
          <table:table-cell office:value-type="string">
            <text:p>(2, 0, 4, 0, 0)</text:p>
          </table:table-cell>
          <table:table-cell office:value-type="string">
            <text:p>A-K SiN</text:p>
          </table:table-cell>
          <table:table-cell table:number-columns-repeated="1021"/>
        </table:table-row>
        <table:table-row table:style-name="ro1">
          <table:table-cell office:value-type="string">
            <text:p>Hairlineslayer54</text:p>
          </table:table-cell>
          <table:table-cell office:value-type="string">
            <text:p>(2, 1, 4, 2, 1)</text:p>
          </table:table-cell>
          <table:table-cell office:value-type="string">
            <text:p>Hairlineslayer54</text:p>
          </table:table-cell>
          <table:table-cell table:number-columns-repeated="1021"/>
        </table:table-row>
        <table:table-row table:style-name="ro1">
          <table:table-cell office:value-type="string">
            <text:p>Lunar</text:p>
          </table:table-cell>
          <table:table-cell office:value-type="string">
            <text:p>(3, 1, 6, 2, 0)</text:p>
          </table:table-cell>
          <table:table-cell office:value-type="string">
            <text:p>Lunar</text:p>
          </table:table-cell>
          <table:table-cell table:number-columns-repeated="1021"/>
        </table:table-row>
        <table:table-row table:style-name="ro1">
          <table:table-cell office:value-type="string">
            <text:p>Socks</text:p>
          </table:table-cell>
          <table:table-cell office:value-type="string">
            <text:p>(2, 0, 4, 0, 0)</text:p>
          </table:table-cell>
          <table:table-cell office:value-type="string">
            <text:p>Socks</text:p>
          </table:table-cell>
          <table:table-cell table:number-columns-repeated="1021"/>
        </table:table-row>
        <table:table-row table:style-name="ro1">
          <table:table-cell office:value-type="string">
            <text:p>Grandpa</text:p>
          </table:table-cell>
          <table:table-cell office:value-type="string">
            <text:p>(1, 0, 2, 0, 1)</text:p>
          </table:table-cell>
          <table:table-cell office:value-type="string">
            <text:p>Grandpa</text:p>
          </table:table-cell>
          <table:table-cell table:number-columns-repeated="1021"/>
        </table:table-row>
        <table:table-row table:style-name="ro1">
          <table:table-cell office:value-type="string">
            <text:p>World Jade Center</text:p>
          </table:table-cell>
          <table:table-cell office:value-type="string">
            <text:p>(4, 2, 9, 4, 0)</text:p>
          </table:table-cell>
          <table:table-cell office:value-type="string">
            <text:p>World Jade Center</text:p>
          </table:table-cell>
          <table:table-cell table:number-columns-repeated="1021"/>
        </table:table-row>
        <table:table-row table:style-name="ro1">
          <table:table-cell office:value-type="string">
            <text:p>Rudy568</text:p>
          </table:table-cell>
          <table:table-cell office:value-type="string">
            <text:p>(2, 0, 4, 0, 0)</text:p>
          </table:table-cell>
          <table:table-cell office:value-type="string">
            <text:p>Rudy568</text:p>
          </table:table-cell>
          <table:table-cell table:number-columns-repeated="1021"/>
        </table:table-row>
        <table:table-row table:style-name="ro1">
          <table:table-cell office:value-type="string">
            <text:p>Colt</text:p>
          </table:table-cell>
          <table:table-cell office:value-type="string">
            <text:p>(4, 2, 9, 5, 0)</text:p>
          </table:table-cell>
          <table:table-cell office:value-type="string">
            <text:p>Colt</text:p>
          </table:table-cell>
          <table:table-cell table:number-columns-repeated="1021"/>
        </table:table-row>
        <table:table-row table:style-name="ro1">
          <table:table-cell office:value-type="string">
            <text:p>Commonerscoffee</text:p>
          </table:table-cell>
          <table:table-cell office:value-type="string">
            <text:p>(2, 0, 4, 0, 0)</text:p>
          </table:table-cell>
          <table:table-cell office:value-type="string">
            <text:p>Commonerscoffee</text:p>
          </table:table-cell>
          <table:table-cell table:number-columns-repeated="1021"/>
        </table:table-row>
        <table:table-row table:style-name="ro1">
          <table:table-cell office:value-type="string">
            <text:p>exeter</text:p>
          </table:table-cell>
          <table:table-cell office:value-type="string">
            <text:p>(1, 1, 2, 2, 2)</text:p>
          </table:table-cell>
          <table:table-cell office:value-type="string">
            <text:p>exeter</text:p>
          </table:table-cell>
          <table:table-cell table:number-columns-repeated="1021"/>
        </table:table-row>
        <table:table-row table:style-name="ro1">
          <table:table-cell office:value-type="string">
            <text:p>JonConBoi</text:p>
          </table:table-cell>
          <table:table-cell office:value-type="string">
            <text:p>(2, 0, 4, 0, 0)</text:p>
          </table:table-cell>
          <table:table-cell office:value-type="string">
            <text:p>JonConBoi</text:p>
          </table:table-cell>
          <table:table-cell table:number-columns-repeated="1021"/>
        </table:table-row>
        <table:table-row table:style-name="ro1">
          <table:table-cell office:value-type="string">
            <text:p>Dezzi</text:p>
          </table:table-cell>
          <table:table-cell office:value-type="string">
            <text:p>(2, 0, 4, 0, 0)</text:p>
          </table:table-cell>
          <table:table-cell office:value-type="string">
            <text:p>Dezzi</text:p>
          </table:table-cell>
          <table:table-cell table:number-columns-repeated="1021"/>
        </table:table-row>
        <table:table-row table:style-name="ro1">
          <table:table-cell office:value-type="string">
            <text:p>Minu</text:p>
          </table:table-cell>
          <table:table-cell office:value-type="string">
            <text:p>(0, 0, 0, 0, 2)</text:p>
          </table:table-cell>
          <table:table-cell office:value-type="string">
            <text:p>Minu</text:p>
          </table:table-cell>
          <table:table-cell table:number-columns-repeated="1021"/>
        </table:table-row>
        <table:table-row table:style-name="ro1">
          <table:table-cell office:value-type="string">
            <text:p>Yukoa</text:p>
          </table:table-cell>
          <table:table-cell office:value-type="string">
            <text:p>(4, 2, 8, 4, 0)</text:p>
          </table:table-cell>
          <table:table-cell office:value-type="string">
            <text:p>Yukoa</text:p>
          </table:table-cell>
          <table:table-cell table:number-columns-repeated="1021"/>
        </table:table-row>
        <table:table-row table:style-name="ro1">
          <table:table-cell office:value-type="string">
            <text:p>Franco</text:p>
          </table:table-cell>
          <table:table-cell office:value-type="string">
            <text:p>(3, 1, 6, 2, 0)</text:p>
          </table:table-cell>
          <table:table-cell office:value-type="string">
            <text:p>Franco</text:p>
          </table:table-cell>
          <table:table-cell table:number-columns-repeated="1021"/>
        </table:table-row>
        <table:table-row table:style-name="ro1">
          <table:table-cell office:value-type="string">
            <text:p>spicywingz11</text:p>
          </table:table-cell>
          <table:table-cell office:value-type="string">
            <text:p>(4, 2, 8, 4, 0)</text:p>
          </table:table-cell>
          <table:table-cell office:value-type="string">
            <text:p>spicywingz11</text:p>
          </table:table-cell>
          <table:table-cell table:number-columns-repeated="1021"/>
        </table:table-row>
        <table:table-row table:style-name="ro1">
          <table:table-cell office:value-type="string">
            <text:p>Puff</text:p>
          </table:table-cell>
          <table:table-cell office:value-type="string">
            <text:p>(1, 0, 2, 0, 1)</text:p>
          </table:table-cell>
          <table:table-cell office:value-type="string">
            <text:p>Puff</text:p>
          </table:table-cell>
          <table:table-cell table:number-columns-repeated="1021"/>
        </table:table-row>
        <table:table-row table:style-name="ro1">
          <table:table-cell office:value-type="string">
            <text:p>AngelStatue</text:p>
          </table:table-cell>
          <table:table-cell office:value-type="string">
            <text:p>(4, 2, 8, 4, 0)</text:p>
          </table:table-cell>
          <table:table-cell office:value-type="string">
            <text:p>AngelStatue</text:p>
          </table:table-cell>
          <table:table-cell table:number-columns-repeated="1021"/>
        </table:table-row>
        <table:table-row table:style-name="ro1">
          <table:table-cell office:value-type="string">
            <text:p>ThatOneGuy</text:p>
          </table:table-cell>
          <table:table-cell office:value-type="string">
            <text:p>(2, 0, 4, 0, 0)</text:p>
          </table:table-cell>
          <table:table-cell office:value-type="string">
            <text:p>ThatOneGuy</text:p>
          </table:table-cell>
          <table:table-cell table:number-columns-repeated="1021"/>
        </table:table-row>
        <table:table-row table:style-name="ro1">
          <table:table-cell office:value-type="string">
            <text:p>G</text:p>
          </table:table-cell>
          <table:table-cell office:value-type="string">
            <text:p>(2, 0, 4, 0, 0)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Medici</text:p>
          </table:table-cell>
          <table:table-cell office:value-type="string">
            <text:p>(0, 0, 0, 0, 2)</text:p>
          </table:table-cell>
          <table:table-cell office:value-type="string">
            <text:p>Medici</text:p>
          </table:table-cell>
          <table:table-cell table:number-columns-repeated="1021"/>
        </table:table-row>
        <table:table-row table:style-name="ro1">
          <table:table-cell office:value-type="string">
            <text:p>NIMROD69</text:p>
          </table:table-cell>
          <table:table-cell office:value-type="string">
            <text:p>(3, 1, 6, 2, 0)</text:p>
          </table:table-cell>
          <table:table-cell office:value-type="string">
            <text:p>NIMROD69</text:p>
          </table:table-cell>
          <table:table-cell table:number-columns-repeated="1021"/>
        </table:table-row>
        <table:table-row table:style-name="ro1">
          <table:table-cell office:value-type="string">
            <text:p>GUNSLINGING GATOS</text:p>
          </table:table-cell>
          <table:table-cell office:value-type="string">
            <text:p>(0, 0, 0, 0, 2)</text:p>
          </table:table-cell>
          <table:table-cell office:value-type="string">
            <text:p>GUNSLINGING GATOS</text:p>
          </table:table-cell>
          <table:table-cell table:number-columns-repeated="1021"/>
        </table:table-row>
        <table:table-row table:style-name="ro1">
          <table:table-cell office:value-type="string">
            <text:p>Yasmine22!</text:p>
          </table:table-cell>
          <table:table-cell office:value-type="string">
            <text:p>(3, 1, 6, 2, 0)</text:p>
          </table:table-cell>
          <table:table-cell office:value-type="string">
            <text:p>Yasmine22!</text:p>
          </table:table-cell>
          <table:table-cell table:number-columns-repeated="1021"/>
        </table:table-row>
        <table:table-row table:style-name="ro1">
          <table:table-cell office:value-type="string">
            <text:p>Zongo</text:p>
          </table:table-cell>
          <table:table-cell office:value-type="string">
            <text:p>(0, 0, 0, 0, 2)</text:p>
          </table:table-cell>
          <table:table-cell office:value-type="string">
            <text:p>Zongo</text:p>
          </table:table-cell>
          <table:table-cell table:number-columns-repeated="1021"/>
        </table:table-row>
        <table:table-row table:style-name="ro1">
          <table:table-cell office:value-type="string">
            <text:p>BagOfChips</text:p>
          </table:table-cell>
          <table:table-cell office:value-type="string">
            <text:p>(5, 3, 10, 6, 0)</text:p>
          </table:table-cell>
          <table:table-cell office:value-type="string">
            <text:p>BagOfChips</text:p>
          </table:table-cell>
          <table:table-cell table:number-columns-repeated="1021"/>
        </table:table-row>
        <table:table-row table:style-name="ro1">
          <table:table-cell office:value-type="string">
            <text:p>Mitchell</text:p>
          </table:table-cell>
          <table:table-cell office:value-type="string">
            <text:p>(2, 0, 4, 0, 0)</text:p>
          </table:table-cell>
          <table:table-cell office:value-type="string">
            <text:p>Mitchell</text:p>
          </table:table-cell>
          <table:table-cell table:number-columns-repeated="1021"/>
        </table:table-row>
        <table:table-row table:style-name="ro1">
          <table:table-cell office:value-type="string">
            <text:p>Lag_Spike</text:p>
          </table:table-cell>
          <table:table-cell office:value-type="string">
            <text:p>(3, 1, 6, 2, 0)</text:p>
          </table:table-cell>
          <table:table-cell office:value-type="string">
            <text:p>Lag_Spike</text:p>
          </table:table-cell>
          <table:table-cell table:number-columns-repeated="1021"/>
        </table:table-row>
        <table:table-row table:style-name="ro1">
          <table:table-cell office:value-type="string">
            <text:p>Pingu</text:p>
          </table:table-cell>
          <table:table-cell office:value-type="string">
            <text:p>(2, 0, 4, 0, 0)</text:p>
          </table:table-cell>
          <table:table-cell office:value-type="string">
            <text:p>Pingu</text:p>
          </table:table-cell>
          <table:table-cell table:number-columns-repeated="1021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0, 8, 34, 21, 0)</text:p>
          </table:table-cell>
          <table:table-cell office:value-type="string">
            <text:p>Epic_Gabriel</text:p>
          </table:table-cell>
          <table:table-cell table:number-columns-repeated="1021"/>
        </table:table-row>
        <table:table-row table:style-name="ro1">
          <table:table-cell office:value-type="string">
            <text:p>lucida</text:p>
          </table:table-cell>
          <table:table-cell office:value-type="string">
            <text:p>(5, 3, 11, 6, 0)</text:p>
          </table:table-cell>
          <table:table-cell office:value-type="string">
            <text:p>lucida</text:p>
          </table:table-cell>
          <table:table-cell table:number-columns-repeated="1021"/>
        </table:table-row>
        <table:table-row table:style-name="ro1">
          <table:table-cell office:value-type="string">
            <text:p>Seel</text:p>
          </table:table-cell>
          <table:table-cell office:value-type="string">
            <text:p>(0, 0, 0, 0, 2)</text:p>
          </table:table-cell>
          <table:table-cell office:value-type="string">
            <text:p>Seel</text:p>
          </table:table-cell>
          <table:table-cell table:number-columns-repeated="1021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4, 3, 10, 7, 1)</text:p>
          </table:table-cell>
          <table:table-cell office:value-type="string">
            <text:p>WonderBread</text:p>
          </table:table-cell>
          <table:table-cell table:number-columns-repeated="1021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4, 2, 11, 6, 0)</text:p>
          </table:table-cell>
          <table:table-cell office:value-type="string">
            <text:p>LuMiSaDi</text:p>
          </table:table-cell>
          <table:table-cell table:number-columns-repeated="1021"/>
        </table:table-row>
        <table:table-row table:style-name="ro1">
          <table:table-cell office:value-type="string">
            <text:p>Cless</text:p>
          </table:table-cell>
          <table:table-cell office:value-type="string">
            <text:p>(5, 3, 13, 7, 0)</text:p>
          </table:table-cell>
          <table:table-cell office:value-type="string">
            <text:p>Cless</text:p>
          </table:table-cell>
          <table:table-cell table:number-columns-repeated="1021"/>
        </table:table-row>
        <table:table-row table:style-name="ro1">
          <table:table-cell office:value-type="string">
            <text:p>poobii</text:p>
          </table:table-cell>
          <table:table-cell office:value-type="string">
            <text:p>(4, 2, 9, 4, 0)</text:p>
          </table:table-cell>
          <table:table-cell office:value-type="string">
            <text:p>poobii</text:p>
          </table:table-cell>
          <table:table-cell table:number-columns-repeated="1021"/>
        </table:table-row>
        <table:table-row table:style-name="ro1">
          <table:table-cell office:value-type="string">
            <text:p>Black Lemonade</text:p>
          </table:table-cell>
          <table:table-cell office:value-type="string">
            <text:p>(6, 4, 12, 8, 0)</text:p>
          </table:table-cell>
          <table:table-cell office:value-type="string">
            <text:p>Black Lemonade</text:p>
          </table:table-cell>
          <table:table-cell table:number-columns-repeated="1021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3, 1, 6, 2, 0)</text:p>
          </table:table-cell>
          <table:table-cell office:value-type="string">
            <text:p>xXx_PeterGokuGriffin_xXx</text:p>
          </table:table-cell>
          <table:table-cell table:number-columns-repeated="1021"/>
        </table:table-row>
        <table:table-row table:style-name="ro1">
          <table:table-cell office:value-type="string">
            <text:p>Bhand</text:p>
          </table:table-cell>
          <table:table-cell office:value-type="string">
            <text:p>(4, 2, 8, 4, 0)</text:p>
          </table:table-cell>
          <table:table-cell office:value-type="string">
            <text:p>Bhand</text:p>
          </table:table-cell>
          <table:table-cell table:number-columns-repeated="1021"/>
        </table:table-row>
        <table:table-row table:style-name="ro1">
          <table:table-cell office:value-type="string">
            <text:p>MPH</text:p>
          </table:table-cell>
          <table:table-cell office:value-type="string">
            <text:p>(5, 3, 12, 6, 0)</text:p>
          </table:table-cell>
          <table:table-cell office:value-type="string">
            <text:p>MPH</text:p>
          </table:table-cell>
          <table:table-cell table:number-columns-repeated="1021"/>
        </table:table-row>
        <table:table-row table:style-name="ro1">
          <table:table-cell office:value-type="string">
            <text:p>Benji</text:p>
          </table:table-cell>
          <table:table-cell office:value-type="string">
            <text:p>(6, 4, 15, 10, 0)</text:p>
          </table:table-cell>
          <table:table-cell office:value-type="string">
            <text:p>Benji</text:p>
          </table:table-cell>
          <table:table-cell table:number-columns-repeated="1021"/>
        </table:table-row>
        <table:table-row table:style-name="ro1">
          <table:table-cell office:value-type="string">
            <text:p>Hiddekel</text:p>
          </table:table-cell>
          <table:table-cell office:value-type="string">
            <text:p>(4, 2, 9, 5, 0)</text:p>
          </table:table-cell>
          <table:table-cell office:value-type="string">
            <text:p>Hiddekel</text:p>
          </table:table-cell>
          <table:table-cell table:number-columns-repeated="1021"/>
        </table:table-row>
        <table:table-row table:style-name="ro1">
          <table:table-cell office:value-type="string">
            <text:p>My Dad</text:p>
          </table:table-cell>
          <table:table-cell office:value-type="string">
            <text:p>(4, 2, 8, 4, 0)</text:p>
          </table:table-cell>
          <table:table-cell office:value-type="string">
            <text:p>My Dad</text:p>
          </table:table-cell>
          <table:table-cell table:number-columns-repeated="1021"/>
        </table:table-row>
        <table:table-row table:style-name="ro1">
          <table:table-cell office:value-type="string">
            <text:p>Nori</text:p>
          </table:table-cell>
          <table:table-cell office:value-type="string">
            <text:p>(6, 4, 15, 10, 0)</text:p>
          </table:table-cell>
          <table:table-cell office:value-type="string">
            <text:p>Nori</text:p>
          </table:table-cell>
          <table:table-cell table:number-columns-repeated="1021"/>
        </table:table-row>
        <table:table-row table:style-name="ro1">
          <table:table-cell office:value-type="string">
            <text:p>Karu!</text:p>
          </table:table-cell>
          <table:table-cell office:value-type="string">
            <text:p>(8, 6, 22, 15, 0)</text:p>
          </table:table-cell>
          <table:table-cell office:value-type="string">
            <text:p>Karu!</text:p>
          </table:table-cell>
          <table:table-cell table:number-columns-repeated="1021"/>
        </table:table-row>
        <table:table-row table:style-name="ro1">
          <table:table-cell office:value-type="string">
            <text:p>SuperStatic</text:p>
          </table:table-cell>
          <table:table-cell office:value-type="string">
            <text:p>(4, 2, 10, 5, 0)</text:p>
          </table:table-cell>
          <table:table-cell office:value-type="string">
            <text:p>SuperStatic</text:p>
          </table:table-cell>
          <table:table-cell table:number-columns-repeated="1021"/>
        </table:table-row>
        <table:table-row table:style-name="ro1">
          <table:table-cell office:value-type="string">
            <text:p>The Chuckster</text:p>
          </table:table-cell>
          <table:table-cell office:value-type="string">
            <text:p>(4, 2, 9, 4, 0)</text:p>
          </table:table-cell>
          <table:table-cell office:value-type="string">
            <text:p>The Chuckster</text:p>
          </table:table-cell>
          <table:table-cell table:number-columns-repeated="1021"/>
        </table:table-row>
        <table:table-row table:style-name="ro1">
          <table:table-cell office:value-type="string">
            <text:p>chpstks</text:p>
          </table:table-cell>
          <table:table-cell office:value-type="string">
            <text:p>(7, 5, 16, 10, 0)</text:p>
          </table:table-cell>
          <table:table-cell office:value-type="string">
            <text:p>chpstks</text:p>
          </table:table-cell>
          <table:table-cell table:number-columns-repeated="1021"/>
        </table:table-row>
        <table:table-row table:style-name="ro1">
          <table:table-cell office:value-type="string">
            <text:p>Oki</text:p>
          </table:table-cell>
          <table:table-cell office:value-type="string">
            <text:p>(6, 4, 15, 10, 0)</text:p>
          </table:table-cell>
          <table:table-cell office:value-type="string">
            <text:p>Oki</text:p>
          </table:table-cell>
          <table:table-cell table:number-columns-repeated="1021"/>
        </table:table-row>
        <table:table-row table:style-name="ro1">
          <table:table-cell office:value-type="string">
            <text:p>LightningCam</text:p>
          </table:table-cell>
          <table:table-cell office:value-type="string">
            <text:p>(6, 4, 15, 10, 0)</text:p>
          </table:table-cell>
          <table:table-cell office:value-type="string">
            <text:p>LightningCam</text:p>
          </table:table-cell>
          <table:table-cell table:number-columns-repeated="1021"/>
        </table:table-row>
        <table:table-row table:style-name="ro1">
          <table:table-cell office:value-type="string">
            <text:p>Mr_Trollmaster7</text:p>
          </table:table-cell>
          <table:table-cell office:value-type="string">
            <text:p>(3, 1, 6, 2, 0)</text:p>
          </table:table-cell>
          <table:table-cell office:value-type="string">
            <text:p>Mr_Trollmaster7</text:p>
          </table:table-cell>
          <table:table-cell table:number-columns-repeated="1021"/>
        </table:table-row>
        <table:table-row table:style-name="ro1">
          <table:table-cell office:value-type="string">
            <text:p>Turtles</text:p>
          </table:table-cell>
          <table:table-cell office:value-type="string">
            <text:p>(7, 5, 17, 11, 0)</text:p>
          </table:table-cell>
          <table:table-cell office:value-type="string">
            <text:p>Turtles</text:p>
          </table:table-cell>
          <table:table-cell table:number-columns-repeated="1021"/>
        </table:table-row>
        <table:table-row table:style-name="ro1">
          <table:table-cell office:value-type="string">
            <text:p>Lucky</text:p>
          </table:table-cell>
          <table:table-cell office:value-type="string">
            <text:p>(7, 5, 14, 10, 0)</text:p>
          </table:table-cell>
          <table:table-cell office:value-type="string">
            <text:p>Lucky</text:p>
          </table:table-cell>
          <table:table-cell table:number-columns-repeated="1021"/>
        </table:table-row>
        <table:table-row table:style-name="ro1">
          <table:table-cell office:value-type="string">
            <text:p>ChuckFug</text:p>
          </table:table-cell>
          <table:table-cell office:value-type="string">
            <text:p>(5, 3, 11, 7, 0)</text:p>
          </table:table-cell>
          <table:table-cell office:value-type="string">
            <text:p>ChuckFug</text:p>
          </table:table-cell>
          <table:table-cell table:number-columns-repeated="1021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4, 2, 9, 4, 0)</text:p>
          </table:table-cell>
          <table:table-cell office:value-type="string">
            <text:p>Squishy~</text:p>
          </table:table-cell>
          <table:table-cell table:number-columns-repeated="1021"/>
        </table:table-row>
        <table:table-row table:style-name="ro1">
          <table:table-cell office:value-type="string">
            <text:p>CD</text:p>
          </table:table-cell>
          <table:table-cell office:value-type="string">
            <text:p>(6, 4, 13, 8, 0)</text:p>
          </table:table-cell>
          <table:table-cell office:value-type="string">
            <text:p>CD</text:p>
          </table:table-cell>
          <table:table-cell table:number-columns-repeated="1021"/>
        </table:table-row>
        <table:table-row table:style-name="ro1">
          <table:table-cell office:value-type="string">
            <text:p>NepNep</text:p>
          </table:table-cell>
          <table:table-cell office:value-type="string">
            <text:p>(4, 2, 9, 4, 0)</text:p>
          </table:table-cell>
          <table:table-cell office:value-type="string">
            <text:p>NepNep</text:p>
          </table:table-cell>
          <table:table-cell table:number-columns-repeated="1021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6, 4, 13, 8, 0)</text:p>
          </table:table-cell>
          <table:table-cell office:value-type="string">
            <text:p>Plummet</text:p>
          </table:table-cell>
          <table:table-cell table:number-columns-repeated="1021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5, 3, 11, 7, 0)</text:p>
          </table:table-cell>
          <table:table-cell office:value-type="string">
            <text:p>Twilight</text:p>
          </table:table-cell>
          <table:table-cell table:number-columns-repeated="1021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DISMASH" table:style-name="ta1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JediSmash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cuffed</text:p>
          </table:table-cell>
          <table:table-cell office:value-type="string">
            <text:p>(1, 1, 0, 2, 2, 0, 0)</text:p>
          </table:table-cell>
          <table:table-cell office:value-type="string">
            <text:p>Scuffe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Zomba</text:p>
          </table:table-cell>
          <table:table-cell office:value-type="string">
            <text:p>(1, 0, 1, 2, 0, 2, 0)</text:p>
          </table:table-cell>
          <table:table-cell office:value-type="string">
            <text:p>Zomb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LXIX</text:p>
          </table:table-cell>
          <table:table-cell office:value-type="string">
            <text:p>(1, 1, 0, 2, 2, 0, 0)</text:p>
          </table:table-cell>
          <table:table-cell office:value-type="string">
            <text:p>LXI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1, 0, 1, 2, 0, 2, 0)</text:p>
          </table:table-cell>
          <table:table-cell office:value-type="string">
            <text:p>Chez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Rondon</text:p>
          </table:table-cell>
          <table:table-cell office:value-type="string">
            <text:p>(1, 1, 0, 3, 2, 1, 0)</text:p>
          </table:table-cell>
          <table:table-cell office:value-type="string">
            <text:p>Rondon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1, 0, 1, 2, 0, 2, 0)</text:p>
          </table:table-cell>
          <table:table-cell office:value-type="string">
            <text:p>WonderBrea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endragon</text:p>
          </table:table-cell>
          <table:table-cell office:value-type="string">
            <text:p>(1, 0, 1, 2, 0, 2, 0)</text:p>
          </table:table-cell>
          <table:table-cell office:value-type="string">
            <text:p>Pendrago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laine</text:p>
          </table:table-cell>
          <table:table-cell office:value-type="string">
            <text:p>(1, 0, 1, 2, 0, 2, 0)</text:p>
          </table:table-cell>
          <table:table-cell office:value-type="string">
            <text:p>Blain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Hiddekel</text:p>
          </table:table-cell>
          <table:table-cell office:value-type="string">
            <text:p>(1, 0, 1, 2, 0, 2, 0)</text:p>
          </table:table-cell>
          <table:table-cell office:value-type="string">
            <text:p>Hiddek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jnikhazy</text:p>
          </table:table-cell>
          <table:table-cell office:value-type="string">
            <text:p>(1, 1, 0, 3, 2, 1, 0)</text:p>
          </table:table-cell>
          <table:table-cell office:value-type="string">
            <text:p>tjnikhazy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My Dad</text:p>
          </table:table-cell>
          <table:table-cell office:value-type="string">
            <text:p>(1, 0, 1, 2, 0, 2, 0)</text:p>
          </table:table-cell>
          <table:table-cell office:value-type="string">
            <text:p>My Da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ebat</text:p>
          </table:table-cell>
          <table:table-cell office:value-type="string">
            <text:p>(0, 0, 0, 0, 0, 0, 1)</text:p>
          </table:table-cell>
          <table:table-cell office:value-type="string">
            <text:p>ebat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Ginger</text:p>
          </table:table-cell>
          <table:table-cell office:value-type="string">
            <text:p>(1, 0, 1, 2, 0, 2, 0)</text:p>
          </table:table-cell>
          <table:table-cell office:value-type="string">
            <text:p>Ginger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irtyDeli</text:p>
          </table:table-cell>
          <table:table-cell office:value-type="string">
            <text:p>(0, 0, 0, 0, 0, 0, 1)</text:p>
          </table:table-cell>
          <table:table-cell office:value-type="string">
            <text:p>DirtyDeli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Newo</text:p>
          </table:table-cell>
          <table:table-cell office:value-type="string">
            <text:p>(1, 0, 1, 2, 0, 2, 0)</text:p>
          </table:table-cell>
          <table:table-cell office:value-type="string">
            <text:p>Newo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uff</text:p>
          </table:table-cell>
          <table:table-cell office:value-type="string">
            <text:p>(0, 0, 0, 0, 0, 0, 1)</text:p>
          </table:table-cell>
          <table:table-cell office:value-type="string">
            <text:p>puff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econd Floor Basement</text:p>
          </table:table-cell>
          <table:table-cell office:value-type="string">
            <text:p>(0, 0, 0, 0, 0, 0, 1)</text:p>
          </table:table-cell>
          <table:table-cell office:value-type="string">
            <text:p>Second Floor Basement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BITTR</text:p>
          </table:table-cell>
          <table:table-cell office:value-type="string">
            <text:p>(1, 0, 1, 2, 0, 2, 0)</text:p>
          </table:table-cell>
          <table:table-cell office:value-type="string">
            <text:p>BITTR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UFFED" table:style-name="ta1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cuffed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JediSmash</text:p>
          </table:table-cell>
          <table:table-cell office:value-type="string">
            <text:p>(1, 0, 1, 2, 0, 2, 0)</text:p>
          </table:table-cell>
          <table:table-cell office:value-type="string">
            <text:p>JediSmash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iam</text:p>
          </table:table-cell>
          <table:table-cell office:value-type="string">
            <text:p>(1, 0, 1, 2, 0, 2, 0)</text:p>
          </table:table-cell>
          <table:table-cell office:value-type="string">
            <text:p>Dia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RRIN" table:style-name="ta1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Zorri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OwiePowie69</text:p>
          </table:table-cell>
          <table:table-cell office:value-type="string">
            <text:p>(0, 0, 0, 0, 0, 0, 1)</text:p>
          </table:table-cell>
          <table:table-cell office:value-type="string">
            <text:p>OwiePowie69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Zomba</text:p>
          </table:table-cell>
          <table:table-cell office:value-type="string">
            <text:p>(1, 0, 1, 2, 0, 2, 0)</text:p>
          </table:table-cell>
          <table:table-cell office:value-type="string">
            <text:p>Zomb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JoeysMemeTeam</text:p>
          </table:table-cell>
          <table:table-cell office:value-type="string">
            <text:p>(1, 1, 0, 2, 2, 0, 0)</text:p>
          </table:table-cell>
          <table:table-cell office:value-type="string">
            <text:p>JoeysMemeTeam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1, 1, 0, 3, 2, 1, 0)</text:p>
          </table:table-cell>
          <table:table-cell office:value-type="string">
            <text:p>Plummet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1, 0, 1, 3, 1, 2, 0)</text:p>
          </table:table-cell>
          <table:table-cell office:value-type="string">
            <text:p>Shaine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Mana</text:p>
          </table:table-cell>
          <table:table-cell office:value-type="string">
            <text:p>(1, 1, 0, 2, 2, 0, 1)</text:p>
          </table:table-cell>
          <table:table-cell office:value-type="string">
            <text:p>Mana</text:p>
          </table:table-cell>
          <table:table-cell office:value-type="string">
            <text:p>(1, 1, 0, 2, 2, 0, 1)</text:p>
          </table:table-cell>
          <table:table-cell table:number-columns-repeated="10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1, 1, 0, 3, 2, 1, 0)</text:p>
          </table:table-cell>
          <table:table-cell office:value-type="string">
            <text:p>Twilight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Venikki</text:p>
          </table:table-cell>
          <table:table-cell office:value-type="string">
            <text:p>(1, 0, 1, 2, 0, 2, 0)</text:p>
          </table:table-cell>
          <table:table-cell office:value-type="string">
            <text:p>Venikk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(1, 0, 1, 3, 1, 2, 0)</text:p>
          </table:table-cell>
          <table:table-cell office:value-type="string">
            <text:p>SamersonT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Breezy 400</text:p>
          </table:table-cell>
          <table:table-cell office:value-type="string">
            <text:p>(1, 0, 1, 3, 1, 2, 0)</text:p>
          </table:table-cell>
          <table:table-cell office:value-type="string">
            <text:p>Breezy 400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Pryvate Pigeon</text:p>
          </table:table-cell>
          <table:table-cell office:value-type="string">
            <text:p>(0, 0, 0, 0, 0, 0, 1)</text:p>
          </table:table-cell>
          <table:table-cell office:value-type="string">
            <text:p>Pryvate Pigeo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bignews.co</text:p>
          </table:table-cell>
          <table:table-cell office:value-type="string">
            <text:p>(1, 1, 0, 2, 2, 0, 0)</text:p>
          </table:table-cell>
          <table:table-cell office:value-type="string">
            <text:p>bignews.c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ellonian</text:p>
          </table:table-cell>
          <table:table-cell office:value-type="string">
            <text:p>(1, 1, 0, 2, 2, 0, 0)</text:p>
          </table:table-cell>
          <table:table-cell office:value-type="string">
            <text:p>Pellonia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Whyit</text:p>
          </table:table-cell>
          <table:table-cell office:value-type="string">
            <text:p>(0, 0, 0, 0, 0, 0, 1)</text:p>
          </table:table-cell>
          <table:table-cell office:value-type="string">
            <text:p>Whyit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BITTR</text:p>
          </table:table-cell>
          <table:table-cell office:value-type="string">
            <text:p>(1, 1, 0, 2, 2, 0, 0)</text:p>
          </table:table-cell>
          <table:table-cell office:value-type="string">
            <text:p>BITT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Viri</text:p>
          </table:table-cell>
          <table:table-cell office:value-type="string">
            <text:p>(1, 0, 1, 2, 0, 2, 0)</text:p>
          </table:table-cell>
          <table:table-cell office:value-type="string">
            <text:p>Vir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Hiddekel</text:p>
          </table:table-cell>
          <table:table-cell office:value-type="string">
            <text:p>(1, 0, 1, 3, 1, 2, 0)</text:p>
          </table:table-cell>
          <table:table-cell office:value-type="string">
            <text:p>Hiddekel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WIEPOWIE69" table:style-name="ta1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OwiePowie69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Zorrin</text:p>
          </table:table-cell>
          <table:table-cell office:value-type="string">
            <text:p>(0, 0, 0, 0, 0, 0, 1)</text:p>
          </table:table-cell>
          <table:table-cell office:value-type="string">
            <text:p>Zorri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Redemption</text:p>
          </table:table-cell>
          <table:table-cell office:value-type="string">
            <text:p>(0, 0, 0, 0, 0, 0, 1)</text:p>
          </table:table-cell>
          <table:table-cell office:value-type="string">
            <text:p>Redemptio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Ginger</text:p>
          </table:table-cell>
          <table:table-cell office:value-type="string">
            <text:p>(1, 0, 1, 2, 0, 2, 0)</text:p>
          </table:table-cell>
          <table:table-cell office:value-type="string">
            <text:p>Ginger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1, 0, 1, 2, 0, 2, 0)</text:p>
          </table:table-cell>
          <table:table-cell office:value-type="string">
            <text:p>LuMiSaD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1, 0, 1, 2, 0, 2, 0)</text:p>
          </table:table-cell>
          <table:table-cell office:value-type="string">
            <text:p>DarthCJ8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acky</text:p>
          </table:table-cell>
          <table:table-cell office:value-type="string">
            <text:p>(1, 0, 1, 2, 0, 2, 0)</text:p>
          </table:table-cell>
          <table:table-cell office:value-type="string">
            <text:p>Pack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Z" table:style-name="ta1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Chez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Redemption</text:p>
          </table:table-cell>
          <table:table-cell office:value-type="string">
            <text:p>(1, 1, 0, 2, 2, 0, 0)</text:p>
          </table:table-cell>
          <table:table-cell office:value-type="string">
            <text:p>Redemptio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Zorrin</text:p>
          </table:table-cell>
          <table:table-cell office:value-type="string">
            <text:p>(1, 0, 1, 2, 0, 2, 0)</text:p>
          </table:table-cell>
          <table:table-cell office:value-type="string">
            <text:p>Zorri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onegg</text:p>
          </table:table-cell>
          <table:table-cell office:value-type="string">
            <text:p>(1, 1, 0, 2, 2, 0, 0)</text:p>
          </table:table-cell>
          <table:table-cell office:value-type="string">
            <text:p>Donegg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JediSmash</text:p>
          </table:table-cell>
          <table:table-cell office:value-type="string">
            <text:p>(1, 1, 0, 2, 2, 0, 0)</text:p>
          </table:table-cell>
          <table:table-cell office:value-type="string">
            <text:p>JediSmas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Venikki</text:p>
          </table:table-cell>
          <table:table-cell office:value-type="string">
            <text:p>(1, 0, 1, 2, 0, 2, 0)</text:p>
          </table:table-cell>
          <table:table-cell office:value-type="string">
            <text:p>Venikk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VileSpecter</text:p>
          </table:table-cell>
          <table:table-cell office:value-type="string">
            <text:p>(0, 0, 0, 0, 0, 0, 1)</text:p>
          </table:table-cell>
          <table:table-cell office:value-type="string">
            <text:p>VileSpecter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Oki</text:p>
          </table:table-cell>
          <table:table-cell office:value-type="string">
            <text:p>(2, 1, 1, 6, 3, 3, 0)</text:p>
          </table:table-cell>
          <table:table-cell office:value-type="string">
            <text:p>Oki</text:p>
          </table:table-cell>
          <table:table-cell office:value-type="string">
            <text:p>(2, 1, 1, 6, 3, 3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1, 0, 1, 2, 0, 2, 0)</text:p>
          </table:table-cell>
          <table:table-cell office:value-type="string">
            <text:p>Benj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anta</text:p>
          </table:table-cell>
          <table:table-cell office:value-type="string">
            <text:p>(1, 1, 0, 2, 2, 0, 0)</text:p>
          </table:table-cell>
          <table:table-cell office:value-type="string">
            <text:p>Mant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ustSeek</text:p>
          </table:table-cell>
          <table:table-cell office:value-type="string">
            <text:p>(1, 1, 0, 2, 2, 0, 0)</text:p>
          </table:table-cell>
          <table:table-cell office:value-type="string">
            <text:p>MustSee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fiend</text:p>
          </table:table-cell>
          <table:table-cell office:value-type="string">
            <text:p>(1, 0, 1, 2, 0, 2, 0)</text:p>
          </table:table-cell>
          <table:table-cell office:value-type="string">
            <text:p>fien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Hazywazy</text:p>
          </table:table-cell>
          <table:table-cell office:value-type="string">
            <text:p>(0, 0, 0, 0, 0, 0, 1)</text:p>
          </table:table-cell>
          <table:table-cell office:value-type="string">
            <text:p>Hazywaz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erph</text:p>
          </table:table-cell>
          <table:table-cell office:value-type="string">
            <text:p>(1, 1, 0, 3, 2, 1, 0)</text:p>
          </table:table-cell>
          <table:table-cell office:value-type="string">
            <text:p>Serph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poobii</text:p>
          </table:table-cell>
          <table:table-cell office:value-type="string">
            <text:p>(1, 0, 1, 2, 0, 2, 0)</text:p>
          </table:table-cell>
          <table:table-cell office:value-type="string">
            <text:p>poobi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oc Shock</text:p>
          </table:table-cell>
          <table:table-cell office:value-type="string">
            <text:p>(0, 0, 0, 0, 0, 0, 1)</text:p>
          </table:table-cell>
          <table:table-cell office:value-type="string">
            <text:p>Doc Shock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Professor E. Gyatt</text:p>
          </table:table-cell>
          <table:table-cell office:value-type="string">
            <text:p>(0, 0, 0, 0, 0, 0, 1)</text:p>
          </table:table-cell>
          <table:table-cell office:value-type="string">
            <text:p>Professor E. Gyatt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lucida</text:p>
          </table:table-cell>
          <table:table-cell office:value-type="string">
            <text:p>(1, 1, 0, 2, 2, 0, 0)</text:p>
          </table:table-cell>
          <table:table-cell office:value-type="string">
            <text:p>lucid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ewo</text:p>
          </table:table-cell>
          <table:table-cell office:value-type="string">
            <text:p>(1, 0, 1, 2, 0, 2, 0)</text:p>
          </table:table-cell>
          <table:table-cell office:value-type="string">
            <text:p>Newo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Hiddekel</text:p>
          </table:table-cell>
          <table:table-cell office:value-type="string">
            <text:p>(1, 0, 1, 2, 0, 2, 0)</text:p>
          </table:table-cell>
          <table:table-cell office:value-type="string">
            <text:p>Hiddek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oisesito</text:p>
          </table:table-cell>
          <table:table-cell office:value-type="string">
            <text:p>(1, 1, 0, 2, 2, 0, 0)</text:p>
          </table:table-cell>
          <table:table-cell office:value-type="string">
            <text:p>Moisesit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ominator</text:p>
          </table:table-cell>
          <table:table-cell office:value-type="string">
            <text:p>(1, 0, 1, 2, 0, 2, 0)</text:p>
          </table:table-cell>
          <table:table-cell office:value-type="string">
            <text:p>Dominator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rNubs</text:p>
          </table:table-cell>
          <table:table-cell office:value-type="string">
            <text:p>(1, 1, 0, 2, 2, 0, 0)</text:p>
          </table:table-cell>
          <table:table-cell office:value-type="string">
            <text:p>MrNub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uttley</text:p>
          </table:table-cell>
          <table:table-cell office:value-type="string">
            <text:p>(1, 1, 0, 2, 2, 0, 0)</text:p>
          </table:table-cell>
          <table:table-cell office:value-type="string">
            <text:p>Muttle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inimaxify</text:p>
          </table:table-cell>
          <table:table-cell office:value-type="string">
            <text:p>(1, 0, 1, 2, 0, 2, 0)</text:p>
          </table:table-cell>
          <table:table-cell office:value-type="string">
            <text:p>Minimaxif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DEMPTION" table:style-name="ta1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Redemptio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1, 0, 1, 2, 0, 2, 0)</text:p>
          </table:table-cell>
          <table:table-cell office:value-type="string">
            <text:p>Chez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OwiePowie69</text:p>
          </table:table-cell>
          <table:table-cell office:value-type="string">
            <text:p>(0, 0, 0, 0, 0, 0, 1)</text:p>
          </table:table-cell>
          <table:table-cell office:value-type="string">
            <text:p>OwiePowie69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quilliam Afton</text:p>
          </table:table-cell>
          <table:table-cell office:value-type="string">
            <text:p>(1, 0, 1, 2, 0, 2, 0)</text:p>
          </table:table-cell>
          <table:table-cell office:value-type="string">
            <text:p>Squilliam Afto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R-HUGE" table:style-name="ta1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r-Huge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KurryRose</text:p>
          </table:table-cell>
          <table:table-cell office:value-type="string">
            <text:p>(0, 0, 0, 0, 0, 0, 1)</text:p>
          </table:table-cell>
          <table:table-cell office:value-type="string">
            <text:p>KurryRos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Fonica</text:p>
          </table:table-cell>
          <table:table-cell office:value-type="string">
            <text:p>(1, 0, 1, 3, 0, 3, 0)</text:p>
          </table:table-cell>
          <table:table-cell office:value-type="string">
            <text:p>Fonica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SentPain</text:p>
          </table:table-cell>
          <table:table-cell office:value-type="string">
            <text:p>(1, 1, 0, 2, 2, 0, 0)</text:p>
          </table:table-cell>
          <table:table-cell office:value-type="string">
            <text:p>SentPai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1, 0, 1, 2, 0, 2, 0)</text:p>
          </table:table-cell>
          <table:table-cell office:value-type="string">
            <text:p>HaydenEatsShrimp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Galaxia</text:p>
          </table:table-cell>
          <table:table-cell office:value-type="string">
            <text:p>(1, 1, 0, 2, 2, 0, 0)</text:p>
          </table:table-cell>
          <table:table-cell office:value-type="string">
            <text:p>Galaxi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neakers O'Toole</text:p>
          </table:table-cell>
          <table:table-cell office:value-type="string">
            <text:p>(1, 1, 0, 2, 2, 0, 0)</text:p>
          </table:table-cell>
          <table:table-cell office:value-type="string">
            <text:p>Sneakers O'Tool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hezFarach001</text:p>
          </table:table-cell>
          <table:table-cell office:value-type="string">
            <text:p>(1, 1, 0, 3, 2, 1, 0)</text:p>
          </table:table-cell>
          <table:table-cell office:value-type="string">
            <text:p>ChezFarach001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1, 0, 1, 2, 0, 2, 0)</text:p>
          </table:table-cell>
          <table:table-cell office:value-type="string">
            <text:p>Plumme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URRYROSE" table:style-name="ta1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KurryRose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r-Huge</text:p>
          </table:table-cell>
          <table:table-cell office:value-type="string">
            <text:p>(0, 0, 0, 0, 0, 0, 1)</text:p>
          </table:table-cell>
          <table:table-cell office:value-type="string">
            <text:p>Sr-Hug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JoeysMemeTeam</text:p>
          </table:table-cell>
          <table:table-cell office:value-type="string">
            <text:p>(0, 0, 0, 0, 0, 0, 1)</text:p>
          </table:table-cell>
          <table:table-cell office:value-type="string">
            <text:p>JoeysMemeTeam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0, 0, 0, 0, 0, 0, 1)</text:p>
          </table:table-cell>
          <table:table-cell office:value-type="string">
            <text:p>Strobics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Mario Circuit 3</text:p>
          </table:table-cell>
          <table:table-cell office:value-type="string">
            <text:p>(0, 0, 0, 0, 0, 0, 1)</text:p>
          </table:table-cell>
          <table:table-cell office:value-type="string">
            <text:p>Mario Circuit 3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NNY, THE LICK" table:style-name="ta1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Vinny, The Lick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Hollywood</text:p>
          </table:table-cell>
          <table:table-cell office:value-type="string">
            <text:p>(1, 1, 0, 2, 2, 0, 0)</text:p>
          </table:table-cell>
          <table:table-cell office:value-type="string">
            <text:p>Hollywoo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2, 0, 2, 5, 1, 4, 0)</text:p>
          </table:table-cell>
          <table:table-cell office:value-type="string">
            <text:p>Plummet</text:p>
          </table:table-cell>
          <table:table-cell office:value-type="string">
            <text:p>(2, 0, 2, 5, 1, 4, 0)</text:p>
          </table:table-cell>
          <table:table-cell table:number-columns-repeated="1020"/>
        </table:table-row>
        <table:table-row table:style-name="ro1">
          <table:table-cell office:value-type="string">
            <text:p>Rec</text:p>
          </table:table-cell>
          <table:table-cell office:value-type="string">
            <text:p>(0, 0, 0, 0, 0, 0, 1)</text:p>
          </table:table-cell>
          <table:table-cell office:value-type="string">
            <text:p>Rec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r-Huge</text:p>
          </table:table-cell>
          <table:table-cell office:value-type="string">
            <text:p>(1, 1, 0, 2, 2, 0, 0)</text:p>
          </table:table-cell>
          <table:table-cell office:value-type="string">
            <text:p>Sr-Hug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pam no jutsu</text:p>
          </table:table-cell>
          <table:table-cell office:value-type="string">
            <text:p>(1, 1, 0, 2, 2, 0, 0)</text:p>
          </table:table-cell>
          <table:table-cell office:value-type="string">
            <text:p>Spam no jutsu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Venikki</text:p>
          </table:table-cell>
          <table:table-cell office:value-type="string">
            <text:p>(1, 1, 0, 2, 2, 0, 0)</text:p>
          </table:table-cell>
          <table:table-cell office:value-type="string">
            <text:p>Venikk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UNSLINGING GATOS</text:p>
          </table:table-cell>
          <table:table-cell office:value-type="string">
            <text:p>(1, 0, 1, 2, 0, 2, 0)</text:p>
          </table:table-cell>
          <table:table-cell office:value-type="string">
            <text:p>GUNSLINGING GATO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ynvy</text:p>
          </table:table-cell>
          <table:table-cell office:value-type="string">
            <text:p>(1, 1, 0, 2, 2, 0, 0)</text:p>
          </table:table-cell>
          <table:table-cell office:value-type="string">
            <text:p>Synv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0, 1, 2, 0, 2, 0)</text:p>
          </table:table-cell>
          <table:table-cell office:value-type="string">
            <text:p>Hungrybo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aelo.plays</text:p>
          </table:table-cell>
          <table:table-cell office:value-type="string">
            <text:p>(1, 1, 0, 2, 2, 0, 0)</text:p>
          </table:table-cell>
          <table:table-cell office:value-type="string">
            <text:p>aelo.play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oormatt</text:p>
          </table:table-cell>
          <table:table-cell office:value-type="string">
            <text:p>(1, 1, 0, 2, 2, 0, 0)</text:p>
          </table:table-cell>
          <table:table-cell office:value-type="string">
            <text:p>Doormat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ellonian</text:p>
          </table:table-cell>
          <table:table-cell office:value-type="string">
            <text:p>(1, 1, 0, 2, 2, 0, 0)</text:p>
          </table:table-cell>
          <table:table-cell office:value-type="string">
            <text:p>Pellonia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Rondon</text:p>
          </table:table-cell>
          <table:table-cell office:value-type="string">
            <text:p>(1, 1, 0, 2, 2, 0, 0)</text:p>
          </table:table-cell>
          <table:table-cell office:value-type="string">
            <text:p>Rondo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eal King Barbaros</text:p>
          </table:table-cell>
          <table:table-cell office:value-type="string">
            <text:p>(1, 0, 1, 2, 0, 2, 0)</text:p>
          </table:table-cell>
          <table:table-cell office:value-type="string">
            <text:p>Seal King Barbaro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entPain</text:p>
          </table:table-cell>
          <table:table-cell office:value-type="string">
            <text:p>(1, 1, 0, 2, 2, 0, 0)</text:p>
          </table:table-cell>
          <table:table-cell office:value-type="string">
            <text:p>SentPai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0g3</text:p>
          </table:table-cell>
          <table:table-cell office:value-type="string">
            <text:p>(1, 0, 1, 2, 0, 2, 0)</text:p>
          </table:table-cell>
          <table:table-cell office:value-type="string">
            <text:p>D0g3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ana</text:p>
          </table:table-cell>
          <table:table-cell office:value-type="string">
            <text:p>(1, 1, 0, 2, 2, 0, 0)</text:p>
          </table:table-cell>
          <table:table-cell office:value-type="string">
            <text:p>Man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1, 0, 1, 3, 1, 2, 0)</text:p>
          </table:table-cell>
          <table:table-cell office:value-type="string">
            <text:p>xXx_PeterGokuGriffin_xXx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(1, 1, 0, 3, 2, 1, 0)</text:p>
          </table:table-cell>
          <table:table-cell office:value-type="string">
            <text:p>SamersonT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Madera</text:p>
          </table:table-cell>
          <table:table-cell office:value-type="string">
            <text:p>(1, 1, 0, 3, 2, 1, 0)</text:p>
          </table:table-cell>
          <table:table-cell office:value-type="string">
            <text:p>Madera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LLYWOOD" table:style-name="ta2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Hollywood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Jacen</text:p>
          </table:table-cell>
          <table:table-cell office:value-type="string">
            <text:p>(0, 0, 0, 0, 0, 0, 1)</text:p>
          </table:table-cell>
          <table:table-cell office:value-type="string">
            <text:p>Jace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JoeysMemeTeam</text:p>
          </table:table-cell>
          <table:table-cell office:value-type="string">
            <text:p>(1, 0, 1, 2, 0, 2, 0)</text:p>
          </table:table-cell>
          <table:table-cell office:value-type="string">
            <text:p>JoeysMemeTea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CEN" table:style-name="ta2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Jace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Rec</text:p>
          </table:table-cell>
          <table:table-cell office:value-type="string">
            <text:p>(0, 0, 0, 0, 0, 0, 1)</text:p>
          </table:table-cell>
          <table:table-cell office:value-type="string">
            <text:p>Rec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Venikki</text:p>
          </table:table-cell>
          <table:table-cell office:value-type="string">
            <text:p>(0, 0, 0, 0, 0, 0, 1)</text:p>
          </table:table-cell>
          <table:table-cell office:value-type="string">
            <text:p>Venikki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Hollywood</text:p>
          </table:table-cell>
          <table:table-cell office:value-type="string">
            <text:p>(0, 0, 0, 0, 0, 0, 1)</text:p>
          </table:table-cell>
          <table:table-cell office:value-type="string">
            <text:p>Hollywood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" table:style-name="ta2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Rec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Jacen</text:p>
          </table:table-cell>
          <table:table-cell office:value-type="string">
            <text:p>(0, 0, 0, 0, 0, 0, 1)</text:p>
          </table:table-cell>
          <table:table-cell office:value-type="string">
            <text:p>Jace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0, 0, 0, 0, 0, 0, 1)</text:p>
          </table:table-cell>
          <table:table-cell office:value-type="string">
            <text:p>Vinny, The Lick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EYSMEMETEAM" table:style-name="ta2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JoeysMemeTeam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entPain</text:p>
          </table:table-cell>
          <table:table-cell office:value-type="string">
            <text:p>(1, 1, 0, 2, 2, 0, 0)</text:p>
          </table:table-cell>
          <table:table-cell office:value-type="string">
            <text:p>SentPai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reezy 400</text:p>
          </table:table-cell>
          <table:table-cell office:value-type="string">
            <text:p>(1, 0, 1, 2, 0, 2, 0)</text:p>
          </table:table-cell>
          <table:table-cell office:value-type="string">
            <text:p>Breezy 400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KurryRose</text:p>
          </table:table-cell>
          <table:table-cell office:value-type="string">
            <text:p>(0, 0, 0, 0, 0, 0, 1)</text:p>
          </table:table-cell>
          <table:table-cell office:value-type="string">
            <text:p>KurryRos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Hollywood</text:p>
          </table:table-cell>
          <table:table-cell office:value-type="string">
            <text:p>(1, 1, 0, 2, 2, 0, 0)</text:p>
          </table:table-cell>
          <table:table-cell office:value-type="string">
            <text:p>Hollywoo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Zorrin</text:p>
          </table:table-cell>
          <table:table-cell office:value-type="string">
            <text:p>(1, 0, 1, 2, 0, 2, 0)</text:p>
          </table:table-cell>
          <table:table-cell office:value-type="string">
            <text:p>Zorri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PAIN" table:style-name="ta2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entPai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JoeysMemeTeam</text:p>
          </table:table-cell>
          <table:table-cell office:value-type="string">
            <text:p>(1, 0, 1, 2, 0, 2, 0)</text:p>
          </table:table-cell>
          <table:table-cell office:value-type="string">
            <text:p>JoeysMemeTea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r-Huge</text:p>
          </table:table-cell>
          <table:table-cell office:value-type="string">
            <text:p>(1, 0, 1, 2, 0, 2, 0)</text:p>
          </table:table-cell>
          <table:table-cell office:value-type="string">
            <text:p>Sr-Hug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picywingz11</text:p>
          </table:table-cell>
          <table:table-cell office:value-type="string">
            <text:p>(0, 0, 0, 0, 0, 0, 1)</text:p>
          </table:table-cell>
          <table:table-cell office:value-type="string">
            <text:p>spicywingz11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VileSpecter</text:p>
          </table:table-cell>
          <table:table-cell office:value-type="string">
            <text:p>(0, 0, 0, 0, 0, 0, 1)</text:p>
          </table:table-cell>
          <table:table-cell office:value-type="string">
            <text:p>VileSpecter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Awsmsun</text:p>
          </table:table-cell>
          <table:table-cell office:value-type="string">
            <text:p>(0, 0, 0, 0, 0, 0, 1)</text:p>
          </table:table-cell>
          <table:table-cell office:value-type="string">
            <text:p>Awsmsu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1, 0, 1, 2, 0, 2, 0)</text:p>
          </table:table-cell>
          <table:table-cell office:value-type="string">
            <text:p>Twiligh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UILLIAM AFTON" table:style-name="ta2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quilliam Afto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Donegg</text:p>
          </table:table-cell>
          <table:table-cell office:value-type="string">
            <text:p>(1, 1, 0, 3, 2, 1, 0)</text:p>
          </table:table-cell>
          <table:table-cell office:value-type="string">
            <text:p>Donegg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Kiki</text:p>
          </table:table-cell>
          <table:table-cell office:value-type="string">
            <text:p>(1, 0, 1, 2, 0, 2, 0)</text:p>
          </table:table-cell>
          <table:table-cell office:value-type="string">
            <text:p>Kik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Redemption</text:p>
          </table:table-cell>
          <table:table-cell office:value-type="string">
            <text:p>(1, 1, 0, 2, 2, 0, 0)</text:p>
          </table:table-cell>
          <table:table-cell office:value-type="string">
            <text:p>Redemptio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iam</text:p>
          </table:table-cell>
          <table:table-cell office:value-type="string">
            <text:p>(1, 0, 1, 2, 0, 2, 0)</text:p>
          </table:table-cell>
          <table:table-cell office:value-type="string">
            <text:p>Dia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NEGG" table:style-name="ta2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Donegg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quilliam Afton</text:p>
          </table:table-cell>
          <table:table-cell office:value-type="string">
            <text:p>(1, 0, 1, 3, 1, 2, 0)</text:p>
          </table:table-cell>
          <table:table-cell office:value-type="string">
            <text:p>Squilliam Afton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1, 0, 1, 2, 0, 2, 0)</text:p>
          </table:table-cell>
          <table:table-cell office:value-type="string">
            <text:p>Chez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M" table:style-name="ta2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Diam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LXIX</text:p>
          </table:table-cell>
          <table:table-cell office:value-type="string">
            <text:p>(1, 1, 0, 2, 2, 0, 0)</text:p>
          </table:table-cell>
          <table:table-cell office:value-type="string">
            <text:p>LXI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pam no jutsu</text:p>
          </table:table-cell>
          <table:table-cell office:value-type="string">
            <text:p>(1, 0, 1, 2, 0, 2, 0)</text:p>
          </table:table-cell>
          <table:table-cell office:value-type="string">
            <text:p>Spam no jutsu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cuffed</text:p>
          </table:table-cell>
          <table:table-cell office:value-type="string">
            <text:p>(1, 1, 0, 2, 2, 0, 0)</text:p>
          </table:table-cell>
          <table:table-cell office:value-type="string">
            <text:p>Scuffe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quilliam Afton</text:p>
          </table:table-cell>
          <table:table-cell office:value-type="string">
            <text:p>(1, 1, 0, 2, 2, 0, 0)</text:p>
          </table:table-cell>
          <table:table-cell office:value-type="string">
            <text:p>Squilliam Afto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1, 0, 1, 2, 0, 2, 0)</text:p>
          </table:table-cell>
          <table:table-cell office:value-type="string">
            <text:p>Plumme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anraj</text:p>
          </table:table-cell>
          <table:table-cell office:value-type="string">
            <text:p>(0, 0, 0, 0, 0, 0, 1)</text:p>
          </table:table-cell>
          <table:table-cell office:value-type="string">
            <text:p>Danraj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Nitrobone</text:p>
          </table:table-cell>
          <table:table-cell office:value-type="string">
            <text:p>(0, 0, 0, 0, 0, 0, 1)</text:p>
          </table:table-cell>
          <table:table-cell office:value-type="string">
            <text:p>Nitrobon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Autocon</text:p>
          </table:table-cell>
          <table:table-cell office:value-type="string">
            <text:p>(0, 0, 0, 0, 0, 0, 1)</text:p>
          </table:table-cell>
          <table:table-cell office:value-type="string">
            <text:p>Autoco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XIX" table:style-name="ta2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LXIX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Diam</text:p>
          </table:table-cell>
          <table:table-cell office:value-type="string">
            <text:p>(1, 0, 1, 2, 0, 2, 0)</text:p>
          </table:table-cell>
          <table:table-cell office:value-type="string">
            <text:p>Dia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JediSmash</text:p>
          </table:table-cell>
          <table:table-cell office:value-type="string">
            <text:p>(1, 0, 1, 2, 0, 2, 0)</text:p>
          </table:table-cell>
          <table:table-cell office:value-type="string">
            <text:p>JediSmash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1, 0, 1, 2, 0, 2, 0)</text:p>
          </table:table-cell>
          <table:table-cell office:value-type="string">
            <text:p>Chavalav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otHbox</text:p>
          </table:table-cell>
          <table:table-cell office:value-type="string">
            <text:p>(1, 0, 1, 2, 0, 2, 0)</text:p>
          </table:table-cell>
          <table:table-cell office:value-type="string">
            <text:p>NotHbo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VileSpecter</text:p>
          </table:table-cell>
          <table:table-cell office:value-type="string">
            <text:p>(1, 0, 1, 2, 0, 2, 0)</text:p>
          </table:table-cell>
          <table:table-cell office:value-type="string">
            <text:p>VileSpecter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1, 0, 1, 2, 0, 2, 0)</text:p>
          </table:table-cell>
          <table:table-cell office:value-type="string">
            <text:p>DarthCJ8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MBA" table:style-name="ta2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Zomba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JediSmash</text:p>
          </table:table-cell>
          <table:table-cell office:value-type="string">
            <text:p>(1, 1, 0, 2, 2, 0, 0)</text:p>
          </table:table-cell>
          <table:table-cell office:value-type="string">
            <text:p>JediSmas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Zorrin</text:p>
          </table:table-cell>
          <table:table-cell office:value-type="string">
            <text:p>(1, 1, 0, 2, 2, 0, 0)</text:p>
          </table:table-cell>
          <table:table-cell office:value-type="string">
            <text:p>Zorri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Fonica</text:p>
          </table:table-cell>
          <table:table-cell office:value-type="string">
            <text:p>(1, 1, 0, 3, 2, 1, 0)</text:p>
          </table:table-cell>
          <table:table-cell office:value-type="string">
            <text:p>Fonica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Kiki</text:p>
          </table:table-cell>
          <table:table-cell office:value-type="string">
            <text:p>(1, 1, 0, 2, 2, 0, 0)</text:p>
          </table:table-cell>
          <table:table-cell office:value-type="string">
            <text:p>Kik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aru!</text:p>
          </table:table-cell>
          <table:table-cell office:value-type="string">
            <text:p>(1, 1, 0, 4, 3, 1, 0)</text:p>
          </table:table-cell>
          <table:table-cell office:value-type="string">
            <text:p>Karu!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1, 0, 5, 3, 2, 0)</text:p>
          </table:table-cell>
          <table:table-cell office:value-type="string">
            <text:p>BeastModePaul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1, 0, 4, 3, 1, 0)</text:p>
          </table:table-cell>
          <table:table-cell office:value-type="string">
            <text:p>Epic_Gabriel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ICA" table:style-name="ta3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Fonica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r-Huge</text:p>
          </table:table-cell>
          <table:table-cell office:value-type="string">
            <text:p>(1, 1, 0, 3, 3, 0, 0)</text:p>
          </table:table-cell>
          <table:table-cell office:value-type="string">
            <text:p>Sr-Huge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1, 1, 0, 2, 2, 0, 0)</text:p>
          </table:table-cell>
          <table:table-cell office:value-type="string">
            <text:p>Plumme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Zomba</text:p>
          </table:table-cell>
          <table:table-cell office:value-type="string">
            <text:p>(1, 0, 1, 3, 1, 2, 0)</text:p>
          </table:table-cell>
          <table:table-cell office:value-type="string">
            <text:p>Zomba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1, 0, 2, 2, 0, 0)</text:p>
          </table:table-cell>
          <table:table-cell office:value-type="string">
            <text:p>Hungrybo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IRUSH</text:p>
          </table:table-cell>
          <table:table-cell office:value-type="string">
            <text:p>(0, 0, 0, 0, 0, 0, 1)</text:p>
          </table:table-cell>
          <table:table-cell office:value-type="string">
            <text:p>IRUSH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Jlaw</text:p>
          </table:table-cell>
          <table:table-cell office:value-type="string">
            <text:p>(0, 0, 0, 0, 0, 0, 1)</text:p>
          </table:table-cell>
          <table:table-cell office:value-type="string">
            <text:p>Jlaw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WiFi warrior</text:p>
          </table:table-cell>
          <table:table-cell office:value-type="string">
            <text:p>(0, 0, 0, 0, 0, 0, 1)</text:p>
          </table:table-cell>
          <table:table-cell office:value-type="string">
            <text:p>WiFi warrior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Jredfire</text:p>
          </table:table-cell>
          <table:table-cell office:value-type="string">
            <text:p>(0, 0, 0, 0, 0, 0, 1)</text:p>
          </table:table-cell>
          <table:table-cell office:value-type="string">
            <text:p>Jredfir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UMMET" table:style-name="ta3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Plummet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2, 2, 0, 5, 4, 1, 0)</text:p>
          </table:table-cell>
          <table:table-cell office:value-type="string">
            <text:p>Vinny, The Lick</text:p>
          </table:table-cell>
          <table:table-cell office:value-type="string">
            <text:p>(2, 2, 0, 5, 4, 1, 0)</text:p>
          </table:table-cell>
          <table:table-cell table:number-columns-repeated="1020"/>
        </table:table-row>
        <table:table-row table:style-name="ro1">
          <table:table-cell office:value-type="string">
            <text:p>Fonica</text:p>
          </table:table-cell>
          <table:table-cell office:value-type="string">
            <text:p>(1, 0, 1, 2, 0, 2, 0)</text:p>
          </table:table-cell>
          <table:table-cell office:value-type="string">
            <text:p>Fonic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iam</text:p>
          </table:table-cell>
          <table:table-cell office:value-type="string">
            <text:p>(1, 1, 0, 2, 2, 0, 0)</text:p>
          </table:table-cell>
          <table:table-cell office:value-type="string">
            <text:p>Diam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Zorrin</text:p>
          </table:table-cell>
          <table:table-cell office:value-type="string">
            <text:p>(1, 0, 1, 3, 1, 2, 0)</text:p>
          </table:table-cell>
          <table:table-cell office:value-type="string">
            <text:p>Zorrin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Axl</text:p>
          </table:table-cell>
          <table:table-cell office:value-type="string">
            <text:p>(1, 1, 0, 2, 2, 0, 0)</text:p>
          </table:table-cell>
          <table:table-cell office:value-type="string">
            <text:p>Ax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fiend</text:p>
          </table:table-cell>
          <table:table-cell office:value-type="string">
            <text:p>(2, 1, 1, 4, 2, 2, 0)</text:p>
          </table:table-cell>
          <table:table-cell office:value-type="string">
            <text:p>fiend</text:p>
          </table:table-cell>
          <table:table-cell office:value-type="string">
            <text:p>(2, 1, 1, 4, 2, 2, 0)</text:p>
          </table:table-cell>
          <table:table-cell table:number-columns-repeated="1020"/>
        </table:table-row>
        <table:table-row table:style-name="ro1">
          <table:table-cell office:value-type="string">
            <text:p>nap</text:p>
          </table:table-cell>
          <table:table-cell office:value-type="string">
            <text:p>(1, 1, 0, 2, 2, 0, 0)</text:p>
          </table:table-cell>
          <table:table-cell office:value-type="string">
            <text:p>nap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r-Huge</text:p>
          </table:table-cell>
          <table:table-cell office:value-type="string">
            <text:p>(1, 1, 0, 2, 2, 0, 0)</text:p>
          </table:table-cell>
          <table:table-cell office:value-type="string">
            <text:p>Sr-Hug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loax</text:p>
          </table:table-cell>
          <table:table-cell office:value-type="string">
            <text:p>(1, 0, 1, 2, 0, 2, 0)</text:p>
          </table:table-cell>
          <table:table-cell office:value-type="string">
            <text:p>Koloa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hitKho</text:p>
          </table:table-cell>
          <table:table-cell office:value-type="string">
            <text:p>(1, 1, 0, 2, 2, 0, 0)</text:p>
          </table:table-cell>
          <table:table-cell office:value-type="string">
            <text:p>ThitKh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1, 1, 0, 3, 2, 1, 0)</text:p>
          </table:table-cell>
          <table:table-cell office:value-type="string">
            <text:p>Strobics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2, 1, 1, 5, 2, 3, 0)</text:p>
          </table:table-cell>
          <table:table-cell office:value-type="string">
            <text:p>Benji</text:p>
          </table:table-cell>
          <table:table-cell office:value-type="string">
            <text:p>(2, 1, 1, 5, 2, 3, 0)</text:p>
          </table:table-cell>
          <table:table-cell table:number-columns-repeated="1020"/>
        </table:table-row>
        <table:table-row table:style-name="ro1">
          <table:table-cell office:value-type="string">
            <text:p>Dude2steezy</text:p>
          </table:table-cell>
          <table:table-cell office:value-type="string">
            <text:p>(1, 1, 0, 2, 2, 0, 0)</text:p>
          </table:table-cell>
          <table:table-cell office:value-type="string">
            <text:p>Dude2steez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uckMark</text:p>
          </table:table-cell>
          <table:table-cell office:value-type="string">
            <text:p>(1, 1, 0, 2, 2, 0, 0)</text:p>
          </table:table-cell>
          <table:table-cell office:value-type="string">
            <text:p>DuckMar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ewo</text:p>
          </table:table-cell>
          <table:table-cell office:value-type="string">
            <text:p>(1, 0, 1, 3, 1, 2, 0)</text:p>
          </table:table-cell>
          <table:table-cell office:value-type="string">
            <text:p>Newo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lucida</text:p>
          </table:table-cell>
          <table:table-cell office:value-type="string">
            <text:p>(1, 0, 1, 2, 0, 2, 0)</text:p>
          </table:table-cell>
          <table:table-cell office:value-type="string">
            <text:p>lucid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agOfChips</text:p>
          </table:table-cell>
          <table:table-cell office:value-type="string">
            <text:p>(1, 1, 0, 2, 2, 0, 0)</text:p>
          </table:table-cell>
          <table:table-cell office:value-type="string">
            <text:p>BagOfChip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1, 1, 0, 2, 2, 0, 0)</text:p>
          </table:table-cell>
          <table:table-cell office:value-type="string">
            <text:p>Twiligh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D</text:p>
          </table:table-cell>
          <table:table-cell office:value-type="string">
            <text:p>(1, 1, 0, 2, 2, 0, 0)</text:p>
          </table:table-cell>
          <table:table-cell office:value-type="string">
            <text:p>C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urtles</text:p>
          </table:table-cell>
          <table:table-cell office:value-type="string">
            <text:p>(1, 0, 1, 2, 0, 2, 0)</text:p>
          </table:table-cell>
          <table:table-cell office:value-type="string">
            <text:p>Turtle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hpstks</text:p>
          </table:table-cell>
          <table:table-cell office:value-type="string">
            <text:p>(1, 0, 1, 2, 0, 2, 0)</text:p>
          </table:table-cell>
          <table:table-cell office:value-type="string">
            <text:p>chpstk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IKKI" table:style-name="ta3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Venikki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Jacen</text:p>
          </table:table-cell>
          <table:table-cell office:value-type="string">
            <text:p>(0, 0, 0, 0, 0, 0, 1)</text:p>
          </table:table-cell>
          <table:table-cell office:value-type="string">
            <text:p>Jace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Breezy 400</text:p>
          </table:table-cell>
          <table:table-cell office:value-type="string">
            <text:p>(1, 0, 1, 3, 1, 2, 0)</text:p>
          </table:table-cell>
          <table:table-cell office:value-type="string">
            <text:p>Breezy 400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tepKnightUp</text:p>
          </table:table-cell>
          <table:table-cell office:value-type="string">
            <text:p>(1, 1, 0, 2, 2, 0, 0)</text:p>
          </table:table-cell>
          <table:table-cell office:value-type="string">
            <text:p>StepKnightUp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rNubs</text:p>
          </table:table-cell>
          <table:table-cell office:value-type="string">
            <text:p>(1, 1, 0, 3, 2, 1, 0)</text:p>
          </table:table-cell>
          <table:table-cell office:value-type="string">
            <text:p>MrNubs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2, 1, 1, 5, 3, 2, 0)</text:p>
          </table:table-cell>
          <table:table-cell office:value-type="string">
            <text:p>WonderBread</text:p>
          </table:table-cell>
          <table:table-cell office:value-type="string">
            <text:p>(2, 1, 1, 5, 3, 2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2, 1, 1, 5, 3, 2, 0)</text:p>
          </table:table-cell>
          <table:table-cell office:value-type="string">
            <text:p>Hungrybox</text:p>
          </table:table-cell>
          <table:table-cell office:value-type="string">
            <text:p>(2, 1, 1, 5, 3, 2, 0)</text:p>
          </table:table-cell>
          <table:table-cell table:number-columns-repeated="1020"/>
        </table:table-row>
        <table:table-row table:style-name="ro1">
          <table:table-cell office:value-type="string">
            <text:p>TOTO_PINK</text:p>
          </table:table-cell>
          <table:table-cell office:value-type="string">
            <text:p>(1, 1, 0, 2, 2, 0, 0)</text:p>
          </table:table-cell>
          <table:table-cell office:value-type="string">
            <text:p>TOTO_PIN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Zorrin</text:p>
          </table:table-cell>
          <table:table-cell office:value-type="string">
            <text:p>(1, 1, 0, 2, 2, 0, 0)</text:p>
          </table:table-cell>
          <table:table-cell office:value-type="string">
            <text:p>Zorri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loax</text:p>
          </table:table-cell>
          <table:table-cell office:value-type="string">
            <text:p>(2, 2, 0, 6, 5, 1, 0)</text:p>
          </table:table-cell>
          <table:table-cell office:value-type="string">
            <text:p>Koloax</text:p>
          </table:table-cell>
          <table:table-cell office:value-type="string">
            <text:p>(2, 2, 0, 6, 5, 1, 0)</text:p>
          </table:table-cell>
          <table:table-cell table:number-columns-repeated="1020"/>
        </table:table-row>
        <table:table-row table:style-name="ro1">
          <table:table-cell office:value-type="string">
            <text:p>Dominator</text:p>
          </table:table-cell>
          <table:table-cell office:value-type="string">
            <text:p>(1, 0, 1, 2, 0, 2, 0)</text:p>
          </table:table-cell>
          <table:table-cell office:value-type="string">
            <text:p>Dominator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urehyper</text:p>
          </table:table-cell>
          <table:table-cell office:value-type="string">
            <text:p>(1, 1, 0, 2, 2, 0, 0)</text:p>
          </table:table-cell>
          <table:table-cell office:value-type="string">
            <text:p>Surehype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Aaron</text:p>
          </table:table-cell>
          <table:table-cell office:value-type="string">
            <text:p>(1, 0, 1, 3, 0, 3, 0)</text:p>
          </table:table-cell>
          <table:table-cell office:value-type="string">
            <text:p>Aaron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Doc Shock</text:p>
          </table:table-cell>
          <table:table-cell office:value-type="string">
            <text:p>(1, 1, 0, 2, 2, 0, 0)</text:p>
          </table:table-cell>
          <table:table-cell office:value-type="string">
            <text:p>Doc Shoc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1, 1, 0, 2, 2, 0, 0)</text:p>
          </table:table-cell>
          <table:table-cell office:value-type="string">
            <text:p>Benj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1, 1, 0, 5, 3, 2, 0)</text:p>
          </table:table-cell>
          <table:table-cell office:value-type="string">
            <text:p>McFunny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0, 1, 3, 0, 3, 0)</text:p>
          </table:table-cell>
          <table:table-cell office:value-type="string">
            <text:p>BeastModePaul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EEZY 400" table:style-name="ta3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Breezy 400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JoeysMemeTeam</text:p>
          </table:table-cell>
          <table:table-cell office:value-type="string">
            <text:p>(1, 1, 0, 2, 2, 0, 0)</text:p>
          </table:table-cell>
          <table:table-cell office:value-type="string">
            <text:p>JoeysMemeTeam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Venikki</text:p>
          </table:table-cell>
          <table:table-cell office:value-type="string">
            <text:p>(1, 1, 0, 3, 2, 1, 0)</text:p>
          </table:table-cell>
          <table:table-cell office:value-type="string">
            <text:p>Venikki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Kiki</text:p>
          </table:table-cell>
          <table:table-cell office:value-type="string">
            <text:p>(1, 0, 1, 2, 0, 2, 0)</text:p>
          </table:table-cell>
          <table:table-cell office:value-type="string">
            <text:p>Kik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2, 0, 2, 5, 1, 4, 0)</text:p>
          </table:table-cell>
          <table:table-cell office:value-type="string">
            <text:p>McFunny</text:p>
          </table:table-cell>
          <table:table-cell office:value-type="string">
            <text:p>(2, 0, 2, 5, 1, 4, 0)</text:p>
          </table:table-cell>
          <table:table-cell table:number-columns-repeated="1020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(1, 1, 0, 3, 2, 1, 0)</text:p>
          </table:table-cell>
          <table:table-cell office:value-type="string">
            <text:p>Dingodile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Wiccan</text:p>
          </table:table-cell>
          <table:table-cell office:value-type="string">
            <text:p>(1, 0, 1, 2, 0, 2, 0)</text:p>
          </table:table-cell>
          <table:table-cell office:value-type="string">
            <text:p>Wicca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Zorrin</text:p>
          </table:table-cell>
          <table:table-cell office:value-type="string">
            <text:p>(1, 1, 0, 3, 2, 1, 0)</text:p>
          </table:table-cell>
          <table:table-cell office:value-type="string">
            <text:p>Zorrin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1, 1, 0, 3, 2, 1, 0)</text:p>
          </table:table-cell>
          <table:table-cell office:value-type="string">
            <text:p>Strobics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Livan the Amnesty</text:p>
          </table:table-cell>
          <table:table-cell office:value-type="string">
            <text:p>(1, 1, 0, 2, 2, 0, 0)</text:p>
          </table:table-cell>
          <table:table-cell office:value-type="string">
            <text:p>Livan the Amnest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Zetsubo</text:p>
          </table:table-cell>
          <table:table-cell office:value-type="string">
            <text:p>(1, 1, 0, 2, 2, 0, 0)</text:p>
          </table:table-cell>
          <table:table-cell office:value-type="string">
            <text:p>Zetsub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ATO</text:p>
          </table:table-cell>
          <table:table-cell office:value-type="string">
            <text:p>(1, 0, 1, 3, 1, 2, 0)</text:p>
          </table:table-cell>
          <table:table-cell office:value-type="string">
            <text:p>NATO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Pendragon</text:p>
          </table:table-cell>
          <table:table-cell office:value-type="string">
            <text:p>(1, 1, 0, 2, 2, 0, 0)</text:p>
          </table:table-cell>
          <table:table-cell office:value-type="string">
            <text:p>Pendrago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inger</text:p>
          </table:table-cell>
          <table:table-cell office:value-type="string">
            <text:p>(1, 0, 1, 3, 1, 2, 0)</text:p>
          </table:table-cell>
          <table:table-cell office:value-type="string">
            <text:p>Ginger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KI" table:style-name="ta3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Kiki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quilliam Afton</text:p>
          </table:table-cell>
          <table:table-cell office:value-type="string">
            <text:p>(1, 1, 0, 2, 2, 0, 0)</text:p>
          </table:table-cell>
          <table:table-cell office:value-type="string">
            <text:p>Squilliam Afto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pam no jutsu</text:p>
          </table:table-cell>
          <table:table-cell office:value-type="string">
            <text:p>(1, 1, 0, 2, 2, 0, 0)</text:p>
          </table:table-cell>
          <table:table-cell office:value-type="string">
            <text:p>Spam no jutsu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reezy 400</text:p>
          </table:table-cell>
          <table:table-cell office:value-type="string">
            <text:p>(1, 1, 0, 2, 2, 0, 0)</text:p>
          </table:table-cell>
          <table:table-cell office:value-type="string">
            <text:p>Breezy 400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Zomba</text:p>
          </table:table-cell>
          <table:table-cell office:value-type="string">
            <text:p>(1, 0, 1, 2, 0, 2, 0)</text:p>
          </table:table-cell>
          <table:table-cell office:value-type="string">
            <text:p>Zomb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1, 0, 1, 2, 0, 2, 0)</text:p>
          </table:table-cell>
          <table:table-cell office:value-type="string">
            <text:p>Benj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M NO JUTSU" table:style-name="ta3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pam no jutsu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Diam</text:p>
          </table:table-cell>
          <table:table-cell office:value-type="string">
            <text:p>(1, 1, 0, 2, 2, 0, 0)</text:p>
          </table:table-cell>
          <table:table-cell office:value-type="string">
            <text:p>Diam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iki</text:p>
          </table:table-cell>
          <table:table-cell office:value-type="string">
            <text:p>(1, 0, 1, 2, 0, 2, 0)</text:p>
          </table:table-cell>
          <table:table-cell office:value-type="string">
            <text:p>Kik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TO" table:style-name="ta3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Octo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Olsen</text:p>
          </table:table-cell>
          <table:table-cell office:value-type="string">
            <text:p>(1, 1, 0, 2, 2, 0, 0)</text:p>
          </table:table-cell>
          <table:table-cell office:value-type="string">
            <text:p>Olse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zar</text:p>
          </table:table-cell>
          <table:table-cell office:value-type="string">
            <text:p>(1, 1, 0, 3, 2, 1, 0)</text:p>
          </table:table-cell>
          <table:table-cell office:value-type="string">
            <text:p>Czar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0, 1, 3, 1, 2, 0)</text:p>
          </table:table-cell>
          <table:table-cell office:value-type="string">
            <text:p>Hungrybox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IRUSH</text:p>
          </table:table-cell>
          <table:table-cell office:value-type="string">
            <text:p>(1, 1, 0, 2, 2, 0, 0)</text:p>
          </table:table-cell>
          <table:table-cell office:value-type="string">
            <text:p>IRUS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M</text:p>
          </table:table-cell>
          <table:table-cell office:value-type="string">
            <text:p>(1, 0, 1, 2, 0, 2, 0)</text:p>
          </table:table-cell>
          <table:table-cell office:value-type="string">
            <text:p>D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r.Feeny</text:p>
          </table:table-cell>
          <table:table-cell office:value-type="string">
            <text:p>(1, 0, 1, 2, 0, 2, 0)</text:p>
          </table:table-cell>
          <table:table-cell office:value-type="string">
            <text:p>Mr.Feen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SEN" table:style-name="ta3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Olse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18"/>
        </table:table-row>
        <table:table-row table:style-name="ro1">
          <table:table-cell office:value-type="string">
            <text:p>Octo</text:p>
          </table:table-cell>
          <table:table-cell office:value-type="string">
            <text:p>(1, 0, 1, 2, 0, 2, 0)</text:p>
          </table:table-cell>
          <table:table-cell office:value-type="string">
            <text:p>Frardvark</text:p>
          </table:table-cell>
          <table:table-cell office:value-type="string">
            <text:p>(1, 1, 0, 3, 3, 0, 0)</text:p>
          </table:table-cell>
          <table:table-cell office:value-type="string">
            <text:p>Octo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office:value-type="string">
            <text:p>zesp</text:p>
          </table:table-cell>
          <table:table-cell office:value-type="string">
            <text:p>(0, 0, 0, 0, 0, 0, 1)</text:p>
          </table:table-cell>
          <table:table-cell office:value-type="string">
            <text:p>Hungrybox</text:p>
          </table:table-cell>
          <table:table-cell office:value-type="string">
            <text:p>(1, 0, 1, 3, 0, 3, 0)</text:p>
          </table:table-cell>
          <table:table-cell office:value-type="string">
            <text:p>zesp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office:value-type="string">
            <text:p>MrNubs</text:p>
          </table:table-cell>
          <table:table-cell office:value-type="string">
            <text:p>(1, 0, 1, 2, 0, 2, 0)</text:p>
          </table:table-cell>
          <table:table-cell office:value-type="string">
            <text:p>pSh4rky</text:p>
          </table:table-cell>
          <table:table-cell office:value-type="string">
            <text:p>(1, 1, 0, 3, 3, 0, 0)</text:p>
          </table:table-cell>
          <table:table-cell office:value-type="string">
            <text:p>MrNubs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Yeti</text:p>
          </table:table-cell>
          <table:table-cell office:value-type="string">
            <text:p>(1, 0, 1, 3, 0, 3, 0)</text:p>
          </table:table-cell>
          <table:table-cell office:value-type="string">
            <text:p>Frardvark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Vintner</text:p>
          </table:table-cell>
          <table:table-cell office:value-type="string">
            <text:p>(1, 1, 0, 3, 3, 0, 0)</text:p>
          </table:table-cell>
          <table:table-cell office:value-type="string">
            <text:p>Hungrybox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Gahtzu</text:p>
          </table:table-cell>
          <table:table-cell office:value-type="string">
            <text:p>(1, 0, 1, 3, 0, 3, 0)</text:p>
          </table:table-cell>
          <table:table-cell office:value-type="string">
            <text:p>pSh4rky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Jfalco</text:p>
          </table:table-cell>
          <table:table-cell office:value-type="string">
            <text:p>(1, 1, 0, 3, 3, 0, 0)</text:p>
          </table:table-cell>
          <table:table-cell office:value-type="string">
            <text:p>Yeti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omodo</text:p>
          </table:table-cell>
          <table:table-cell office:value-type="string">
            <text:p>(1, 0, 1, 3, 0, 3, 0)</text:p>
          </table:table-cell>
          <table:table-cell office:value-type="string">
            <text:p>Vintner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Gahtzu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Jfalco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Komodo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WILIGHT" table:style-name="ta3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Twilight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hiro</text:p>
          </table:table-cell>
          <table:table-cell office:value-type="string">
            <text:p>(1, 1, 0, 2, 2, 0, 0)</text:p>
          </table:table-cell>
          <table:table-cell office:value-type="string">
            <text:p>Shir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1, 0, 3, 2, 1, 0)</text:p>
          </table:table-cell>
          <table:table-cell office:value-type="string">
            <text:p>Hungrybox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(1, 0, 1, 3, 1, 2, 0)</text:p>
          </table:table-cell>
          <table:table-cell office:value-type="string">
            <text:p>Dingodile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Papi</text:p>
          </table:table-cell>
          <table:table-cell office:value-type="string">
            <text:p>(1, 1, 0, 2, 2, 0, 0)</text:p>
          </table:table-cell>
          <table:table-cell office:value-type="string">
            <text:p>Pap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juno</text:p>
          </table:table-cell>
          <table:table-cell office:value-type="string">
            <text:p>(1, 0, 1, 3, 1, 2, 0)</text:p>
          </table:table-cell>
          <table:table-cell office:value-type="string">
            <text:p>juno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Zorrin</text:p>
          </table:table-cell>
          <table:table-cell office:value-type="string">
            <text:p>(1, 0, 1, 3, 1, 2, 0)</text:p>
          </table:table-cell>
          <table:table-cell office:value-type="string">
            <text:p>Zorrin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SentPain</text:p>
          </table:table-cell>
          <table:table-cell office:value-type="string">
            <text:p>(1, 1, 0, 2, 2, 0, 0)</text:p>
          </table:table-cell>
          <table:table-cell office:value-type="string">
            <text:p>SentPai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OTO_PINK</text:p>
          </table:table-cell>
          <table:table-cell office:value-type="string">
            <text:p>(1, 1, 0, 2, 2, 0, 0)</text:p>
          </table:table-cell>
          <table:table-cell office:value-type="string">
            <text:p>TOTO_PIN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oobii</text:p>
          </table:table-cell>
          <table:table-cell office:value-type="string">
            <text:p>(1, 1, 0, 2, 2, 0, 0)</text:p>
          </table:table-cell>
          <table:table-cell office:value-type="string">
            <text:p>poobi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0g3</text:p>
          </table:table-cell>
          <table:table-cell office:value-type="string">
            <text:p>(1, 0, 1, 2, 0, 2, 0)</text:p>
          </table:table-cell>
          <table:table-cell office:value-type="string">
            <text:p>D0g3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anchos</text:p>
          </table:table-cell>
          <table:table-cell office:value-type="string">
            <text:p>(1, 1, 0, 2, 2, 0, 0)</text:p>
          </table:table-cell>
          <table:table-cell office:value-type="string">
            <text:p>Pancho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1, 0, 1, 2, 0, 2, 0)</text:p>
          </table:table-cell>
          <table:table-cell office:value-type="string">
            <text:p>WonderBrea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Yunaka</text:p>
          </table:table-cell>
          <table:table-cell office:value-type="string">
            <text:p>(1, 0, 1, 3, 1, 2, 0)</text:p>
          </table:table-cell>
          <table:table-cell office:value-type="string">
            <text:p>Yunaka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RadioActiv</text:p>
          </table:table-cell>
          <table:table-cell office:value-type="string">
            <text:p>(1, 1, 0, 2, 2, 0, 0)</text:p>
          </table:table-cell>
          <table:table-cell office:value-type="string">
            <text:p>RadioActiv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JDQ05</text:p>
          </table:table-cell>
          <table:table-cell office:value-type="string">
            <text:p>(1, 0, 1, 2, 0, 2, 0)</text:p>
          </table:table-cell>
          <table:table-cell office:value-type="string">
            <text:p>JDQ05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arlito</text:p>
          </table:table-cell>
          <table:table-cell office:value-type="string">
            <text:p>(1, 1, 0, 3, 2, 1, 0)</text:p>
          </table:table-cell>
          <table:table-cell office:value-type="string">
            <text:p>Carlito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Gogemon</text:p>
          </table:table-cell>
          <table:table-cell office:value-type="string">
            <text:p>(1, 1, 0, 3, 2, 1, 0)</text:p>
          </table:table-cell>
          <table:table-cell office:value-type="string">
            <text:p>Gogemon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BMoC</text:p>
          </table:table-cell>
          <table:table-cell office:value-type="string">
            <text:p>(1, 0, 1, 2, 0, 2, 0)</text:p>
          </table:table-cell>
          <table:table-cell office:value-type="string">
            <text:p>BMoC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Lag_Spike</text:p>
          </table:table-cell>
          <table:table-cell office:value-type="string">
            <text:p>(1, 1, 0, 2, 2, 0, 0)</text:p>
          </table:table-cell>
          <table:table-cell office:value-type="string">
            <text:p>Lag_Spik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1, 0, 1, 2, 0, 2, 0)</text:p>
          </table:table-cell>
          <table:table-cell office:value-type="string">
            <text:p>Plumme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y Dad</text:p>
          </table:table-cell>
          <table:table-cell office:value-type="string">
            <text:p>(1, 1, 0, 2, 2, 0, 0)</text:p>
          </table:table-cell>
          <table:table-cell office:value-type="string">
            <text:p>My Da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epNep</text:p>
          </table:table-cell>
          <table:table-cell office:value-type="string">
            <text:p>(1, 1, 0, 2, 2, 0, 0)</text:p>
          </table:table-cell>
          <table:table-cell office:value-type="string">
            <text:p>NepNep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lucida</text:p>
          </table:table-cell>
          <table:table-cell office:value-type="string">
            <text:p>(1, 0, 1, 3, 1, 2, 0)</text:p>
          </table:table-cell>
          <table:table-cell office:value-type="string">
            <text:p>lucida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IRO" table:style-name="ta3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hiro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1, 0, 1, 2, 0, 2, 0)</text:p>
          </table:table-cell>
          <table:table-cell office:value-type="string">
            <text:p>Twiligh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rNubs</text:p>
          </table:table-cell>
          <table:table-cell office:value-type="string">
            <text:p>(1, 0, 1, 2, 0, 2, 0)</text:p>
          </table:table-cell>
          <table:table-cell office:value-type="string">
            <text:p>MrNub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RTHCJ8" table:style-name="ta4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DarthCJ8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ev7x</text:p>
          </table:table-cell>
          <table:table-cell office:value-type="string">
            <text:p>(2, 2, 0, 4, 4, 0, 0)</text:p>
          </table:table-cell>
          <table:table-cell office:value-type="string">
            <text:p>sev7x</text:p>
          </table:table-cell>
          <table:table-cell office:value-type="string">
            <text:p>(2, 2, 0, 4, 4, 0, 0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2, 0, 2, 5, 1, 4, 0)</text:p>
          </table:table-cell>
          <table:table-cell office:value-type="string">
            <text:p>Bhand</text:p>
          </table:table-cell>
          <table:table-cell office:value-type="string">
            <text:p>(2, 0, 2, 5, 1, 4, 0)</text:p>
          </table:table-cell>
          <table:table-cell table:number-columns-repeated="1020"/>
        </table:table-row>
        <table:table-row table:style-name="ro1">
          <table:table-cell office:value-type="string">
            <text:p>Galaxia</text:p>
          </table:table-cell>
          <table:table-cell office:value-type="string">
            <text:p>(1, 1, 0, 2, 2, 0, 0)</text:p>
          </table:table-cell>
          <table:table-cell office:value-type="string">
            <text:p>Galaxi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endragon</text:p>
          </table:table-cell>
          <table:table-cell office:value-type="string">
            <text:p>(1, 1, 0, 2, 2, 0, 0)</text:p>
          </table:table-cell>
          <table:table-cell office:value-type="string">
            <text:p>Pendrago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(1, 0, 1, 2, 0, 2, 0)</text:p>
          </table:table-cell>
          <table:table-cell office:value-type="string">
            <text:p>Samerson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yamaokai</text:p>
          </table:table-cell>
          <table:table-cell office:value-type="string">
            <text:p>(1, 1, 0, 2, 2, 0, 0)</text:p>
          </table:table-cell>
          <table:table-cell office:value-type="string">
            <text:p>yamaoka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picywingz11</text:p>
          </table:table-cell>
          <table:table-cell office:value-type="string">
            <text:p>(1, 1, 0, 2, 2, 0, 0)</text:p>
          </table:table-cell>
          <table:table-cell office:value-type="string">
            <text:p>spicywingz11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arZ</text:p>
          </table:table-cell>
          <table:table-cell office:value-type="string">
            <text:p>(1, 0, 1, 2, 0, 2, 0)</text:p>
          </table:table-cell>
          <table:table-cell office:value-type="string">
            <text:p>StarZ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Oki</text:p>
          </table:table-cell>
          <table:table-cell office:value-type="string">
            <text:p>(1, 0, 1, 3, 1, 2, 0)</text:p>
          </table:table-cell>
          <table:table-cell office:value-type="string">
            <text:p>Oki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Hispanic! at the Disco</text:p>
          </table:table-cell>
          <table:table-cell office:value-type="string">
            <text:p>(1, 0, 1, 2, 0, 2, 0)</text:p>
          </table:table-cell>
          <table:table-cell office:value-type="string">
            <text:p>Hispanic! at the Disco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LXIX</text:p>
          </table:table-cell>
          <table:table-cell office:value-type="string">
            <text:p>(1, 1, 0, 2, 2, 0, 0)</text:p>
          </table:table-cell>
          <table:table-cell office:value-type="string">
            <text:p>LXI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UpChuck</text:p>
          </table:table-cell>
          <table:table-cell office:value-type="string">
            <text:p>(1, 1, 0, 2, 2, 0, 0)</text:p>
          </table:table-cell>
          <table:table-cell office:value-type="string">
            <text:p>UpChuc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inimaxify</text:p>
          </table:table-cell>
          <table:table-cell office:value-type="string">
            <text:p>(1, 0, 1, 2, 0, 2, 0)</text:p>
          </table:table-cell>
          <table:table-cell office:value-type="string">
            <text:p>Minimaxif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Kryon</text:p>
          </table:table-cell>
          <table:table-cell office:value-type="string">
            <text:p>(1, 1, 0, 2, 2, 0, 0)</text:p>
          </table:table-cell>
          <table:table-cell office:value-type="string">
            <text:p>Kryo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OwiePowie69</text:p>
          </table:table-cell>
          <table:table-cell office:value-type="string">
            <text:p>(1, 1, 0, 2, 2, 0, 0)</text:p>
          </table:table-cell>
          <table:table-cell office:value-type="string">
            <text:p>OwiePowie69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rymlynn</text:p>
          </table:table-cell>
          <table:table-cell office:value-type="string">
            <text:p>(1, 0, 1, 2, 0, 2, 0)</text:p>
          </table:table-cell>
          <table:table-cell office:value-type="string">
            <text:p>Grymlyn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Just_A_Tarrasque</text:p>
          </table:table-cell>
          <table:table-cell office:value-type="string">
            <text:p>(1, 1, 0, 3, 2, 1, 0)</text:p>
          </table:table-cell>
          <table:table-cell office:value-type="string">
            <text:p>Just_A_Tarrasque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(1, 1, 0, 3, 2, 1, 0)</text:p>
          </table:table-cell>
          <table:table-cell office:value-type="string">
            <text:p>Dingodile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DGK</text:p>
          </table:table-cell>
          <table:table-cell office:value-type="string">
            <text:p>(1, 0, 1, 3, 1, 2, 0)</text:p>
          </table:table-cell>
          <table:table-cell office:value-type="string">
            <text:p>DGK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V7X" table:style-name="ta4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ev7x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2, 0, 2, 4, 0, 4, 0)</text:p>
          </table:table-cell>
          <table:table-cell office:value-type="string">
            <text:p>DarthCJ8</text:p>
          </table:table-cell>
          <table:table-cell office:value-type="string">
            <text:p>(2, 0, 2, 4, 0, 4, 0)</text:p>
          </table:table-cell>
          <table:table-cell table:number-columns-repeated="1020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(1, 0, 1, 2, 0, 2, 0)</text:p>
          </table:table-cell>
          <table:table-cell office:value-type="string">
            <text:p>Dingodil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zar</text:p>
          </table:table-cell>
          <table:table-cell office:value-type="string">
            <text:p>(1, 1, 0, 2, 2, 0, 0)</text:p>
          </table:table-cell>
          <table:table-cell office:value-type="string">
            <text:p>Cza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loax</text:p>
          </table:table-cell>
          <table:table-cell office:value-type="string">
            <text:p>(2, 0, 2, 4, 0, 4, 0)</text:p>
          </table:table-cell>
          <table:table-cell office:value-type="string">
            <text:p>Koloax</text:p>
          </table:table-cell>
          <table:table-cell office:value-type="string">
            <text:p>(2, 0, 2, 4, 0, 4, 0)</text:p>
          </table:table-cell>
          <table:table-cell table:number-columns-repeated="1020"/>
        </table:table-row>
        <table:table-row table:style-name="ro1">
          <table:table-cell office:value-type="string">
            <text:p>nap</text:p>
          </table:table-cell>
          <table:table-cell office:value-type="string">
            <text:p>(1, 0, 1, 2, 0, 2, 0)</text:p>
          </table:table-cell>
          <table:table-cell office:value-type="string">
            <text:p>nap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(1, 1, 0, 3, 2, 1, 0)</text:p>
          </table:table-cell>
          <table:table-cell office:value-type="string">
            <text:p>SamersonT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Yunaka</text:p>
          </table:table-cell>
          <table:table-cell office:value-type="string">
            <text:p>(2, 0, 2, 4, 0, 4, 0)</text:p>
          </table:table-cell>
          <table:table-cell office:value-type="string">
            <text:p>Yunaka</text:p>
          </table:table-cell>
          <table:table-cell office:value-type="string">
            <text:p>(2, 0, 2, 4, 0, 4, 0)</text:p>
          </table:table-cell>
          <table:table-cell table:number-columns-repeated="1020"/>
        </table:table-row>
        <table:table-row table:style-name="ro1">
          <table:table-cell office:value-type="string">
            <text:p>StimmyTurner</text:p>
          </table:table-cell>
          <table:table-cell office:value-type="string">
            <text:p>(1, 1, 0, 3, 2, 1, 0)</text:p>
          </table:table-cell>
          <table:table-cell office:value-type="string">
            <text:p>StimmyTurner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NotHbox</text:p>
          </table:table-cell>
          <table:table-cell office:value-type="string">
            <text:p>(1, 1, 0, 3, 2, 1, 0)</text:p>
          </table:table-cell>
          <table:table-cell office:value-type="string">
            <text:p>NotHbox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0, 0, 0, 0, 0, 0, 1)</text:p>
          </table:table-cell>
          <table:table-cell office:value-type="string">
            <text:p>Hungrybox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NDRAGON" table:style-name="ta4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Pendrago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yamaokai</text:p>
          </table:table-cell>
          <table:table-cell office:value-type="string">
            <text:p>(1, 1, 0, 2, 2, 0, 0)</text:p>
          </table:table-cell>
          <table:table-cell office:value-type="string">
            <text:p>yamaoka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UNSLINGING GATOS</text:p>
          </table:table-cell>
          <table:table-cell office:value-type="string">
            <text:p>(1, 0, 1, 2, 0, 2, 0)</text:p>
          </table:table-cell>
          <table:table-cell office:value-type="string">
            <text:p>GUNSLINGING GATO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AJG</text:p>
          </table:table-cell>
          <table:table-cell office:value-type="string">
            <text:p>(0, 0, 0, 0, 0, 0, 1)</text:p>
          </table:table-cell>
          <table:table-cell office:value-type="string">
            <text:p>AJG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1, 0, 1, 2, 0, 2, 0)</text:p>
          </table:table-cell>
          <table:table-cell office:value-type="string">
            <text:p>DarthCJ8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ellonian</text:p>
          </table:table-cell>
          <table:table-cell office:value-type="string">
            <text:p>(1, 0, 1, 2, 0, 2, 0)</text:p>
          </table:table-cell>
          <table:table-cell office:value-type="string">
            <text:p>Pellonia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uoca</text:p>
          </table:table-cell>
          <table:table-cell office:value-type="string">
            <text:p>(0, 0, 0, 0, 0, 0, 1)</text:p>
          </table:table-cell>
          <table:table-cell office:value-type="string">
            <text:p>nuoca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JediSmash</text:p>
          </table:table-cell>
          <table:table-cell office:value-type="string">
            <text:p>(1, 1, 0, 2, 2, 0, 0)</text:p>
          </table:table-cell>
          <table:table-cell office:value-type="string">
            <text:p>JediSmas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0, 1, 3, 1, 2, 0)</text:p>
          </table:table-cell>
          <table:table-cell office:value-type="string">
            <text:p>Hungrybox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elite</text:p>
          </table:table-cell>
          <table:table-cell office:value-type="string">
            <text:p>(1, 1, 0, 2, 2, 0, 0)</text:p>
          </table:table-cell>
          <table:table-cell office:value-type="string">
            <text:p>elit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urehyper</text:p>
          </table:table-cell>
          <table:table-cell office:value-type="string">
            <text:p>(1, 0, 1, 3, 1, 2, 0)</text:p>
          </table:table-cell>
          <table:table-cell office:value-type="string">
            <text:p>Surehyper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The Chuckster</text:p>
          </table:table-cell>
          <table:table-cell office:value-type="string">
            <text:p>(1, 1, 0, 2, 2, 0, 0)</text:p>
          </table:table-cell>
          <table:table-cell office:value-type="string">
            <text:p>The Chuckste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avé</text:p>
          </table:table-cell>
          <table:table-cell office:value-type="string">
            <text:p>(1, 0, 1, 2, 0, 2, 0)</text:p>
          </table:table-cell>
          <table:table-cell office:value-type="string">
            <text:p>Navé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oisesito</text:p>
          </table:table-cell>
          <table:table-cell office:value-type="string">
            <text:p>(1, 0, 1, 3, 1, 2, 0)</text:p>
          </table:table-cell>
          <table:table-cell office:value-type="string">
            <text:p>Moisesito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Ronaldo Goat</text:p>
          </table:table-cell>
          <table:table-cell office:value-type="string">
            <text:p>(1, 1, 0, 3, 2, 1, 0)</text:p>
          </table:table-cell>
          <table:table-cell office:value-type="string">
            <text:p>Ronaldo Goat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Manbien</text:p>
          </table:table-cell>
          <table:table-cell office:value-type="string">
            <text:p>(1, 1, 0, 2, 2, 0, 0)</text:p>
          </table:table-cell>
          <table:table-cell office:value-type="string">
            <text:p>Manbie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reezy 400</text:p>
          </table:table-cell>
          <table:table-cell office:value-type="string">
            <text:p>(1, 0, 1, 2, 0, 2, 0)</text:p>
          </table:table-cell>
          <table:table-cell office:value-type="string">
            <text:p>Breezy 400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MAOKAI" table:style-name="ta4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yamaokai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Pendragon</text:p>
          </table:table-cell>
          <table:table-cell office:value-type="string">
            <text:p>(1, 0, 1, 2, 0, 2, 0)</text:p>
          </table:table-cell>
          <table:table-cell office:value-type="string">
            <text:p>Pendrago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hunning</text:p>
          </table:table-cell>
          <table:table-cell office:value-type="string">
            <text:p>(1, 0, 1, 3, 1, 2, 0)</text:p>
          </table:table-cell>
          <table:table-cell office:value-type="string">
            <text:p>Shunning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Mana</text:p>
          </table:table-cell>
          <table:table-cell office:value-type="string">
            <text:p>(1, 1, 0, 2, 2, 0, 0)</text:p>
          </table:table-cell>
          <table:table-cell office:value-type="string">
            <text:p>Man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1, 0, 1, 2, 0, 2, 0)</text:p>
          </table:table-cell>
          <table:table-cell office:value-type="string">
            <text:p>DarthCJ8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Ryeiscool</text:p>
          </table:table-cell>
          <table:table-cell office:value-type="string">
            <text:p>(1, 0, 1, 2, 0, 2, 0)</text:p>
          </table:table-cell>
          <table:table-cell office:value-type="string">
            <text:p>Ryeiscoo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NNING" table:style-name="ta4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hunning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AJG</text:p>
          </table:table-cell>
          <table:table-cell office:value-type="string">
            <text:p>(0, 0, 0, 0, 0, 0, 1)</text:p>
          </table:table-cell>
          <table:table-cell office:value-type="string">
            <text:p>AJG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Newo</text:p>
          </table:table-cell>
          <table:table-cell office:value-type="string">
            <text:p>(1, 0, 1, 2, 0, 2, 0)</text:p>
          </table:table-cell>
          <table:table-cell office:value-type="string">
            <text:p>Newo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yamaokai</text:p>
          </table:table-cell>
          <table:table-cell office:value-type="string">
            <text:p>(1, 1, 0, 3, 2, 1, 0)</text:p>
          </table:table-cell>
          <table:table-cell office:value-type="string">
            <text:p>yamaokai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(1, 0, 1, 2, 0, 2, 0)</text:p>
          </table:table-cell>
          <table:table-cell office:value-type="string">
            <text:p>Dingodil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JG" table:style-name="ta4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AJG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hunning</text:p>
          </table:table-cell>
          <table:table-cell office:value-type="string">
            <text:p>(0, 0, 0, 0, 0, 0, 1)</text:p>
          </table:table-cell>
          <table:table-cell office:value-type="string">
            <text:p>Shunning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Pendragon</text:p>
          </table:table-cell>
          <table:table-cell office:value-type="string">
            <text:p>(0, 0, 0, 0, 0, 0, 1)</text:p>
          </table:table-cell>
          <table:table-cell office:value-type="string">
            <text:p>Pendrago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O" table:style-name="ta4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Mayo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Galaxia</text:p>
          </table:table-cell>
          <table:table-cell office:value-type="string">
            <text:p>(1, 1, 0, 2, 2, 0, 0)</text:p>
          </table:table-cell>
          <table:table-cell office:value-type="string">
            <text:p>Galaxi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(1, 1, 0, 3, 2, 1, 0)</text:p>
          </table:table-cell>
          <table:table-cell office:value-type="string">
            <text:p>Dingodile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Newo</text:p>
          </table:table-cell>
          <table:table-cell office:value-type="string">
            <text:p>(1, 0, 1, 3, 1, 2, 0)</text:p>
          </table:table-cell>
          <table:table-cell office:value-type="string">
            <text:p>Newo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0, 1, 3, 1, 2, 0)</text:p>
          </table:table-cell>
          <table:table-cell office:value-type="string">
            <text:p>Hungrybox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LAXIA" table:style-name="ta4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Galaxia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Mayo</text:p>
          </table:table-cell>
          <table:table-cell office:value-type="string">
            <text:p>(1, 0, 1, 2, 0, 2, 0)</text:p>
          </table:table-cell>
          <table:table-cell office:value-type="string">
            <text:p>Mayo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1, 0, 1, 2, 0, 2, 0)</text:p>
          </table:table-cell>
          <table:table-cell office:value-type="string">
            <text:p>DarthCJ8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Axl</text:p>
          </table:table-cell>
          <table:table-cell office:value-type="string">
            <text:p>(1, 0, 1, 2, 0, 2, 0)</text:p>
          </table:table-cell>
          <table:table-cell office:value-type="string">
            <text:p>Ax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r-Huge</text:p>
          </table:table-cell>
          <table:table-cell office:value-type="string">
            <text:p>(1, 0, 1, 2, 0, 2, 0)</text:p>
          </table:table-cell>
          <table:table-cell office:value-type="string">
            <text:p>Sr-Hug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RNUBS" table:style-name="ta4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MrNubs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Dane</text:p>
          </table:table-cell>
          <table:table-cell office:value-type="string">
            <text:p>(1, 1, 0, 2, 2, 0, 0)</text:p>
          </table:table-cell>
          <table:table-cell office:value-type="string">
            <text:p>Dan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hpstks</text:p>
          </table:table-cell>
          <table:table-cell office:value-type="string">
            <text:p>(1, 0, 1, 2, 0, 2, 0)</text:p>
          </table:table-cell>
          <table:table-cell office:value-type="string">
            <text:p>chpstk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hiro</text:p>
          </table:table-cell>
          <table:table-cell office:value-type="string">
            <text:p>(1, 1, 0, 2, 2, 0, 0)</text:p>
          </table:table-cell>
          <table:table-cell office:value-type="string">
            <text:p>Shir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Olsen</text:p>
          </table:table-cell>
          <table:table-cell office:value-type="string">
            <text:p>(1, 1, 0, 2, 2, 0, 0)</text:p>
          </table:table-cell>
          <table:table-cell office:value-type="string">
            <text:p>Olse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1, 0, 1, 2, 0, 2, 0)</text:p>
          </table:table-cell>
          <table:table-cell office:value-type="string">
            <text:p>Bhan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juno</text:p>
          </table:table-cell>
          <table:table-cell office:value-type="string">
            <text:p>(1, 1, 0, 3, 2, 1, 0)</text:p>
          </table:table-cell>
          <table:table-cell office:value-type="string">
            <text:p>juno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Venikki</text:p>
          </table:table-cell>
          <table:table-cell office:value-type="string">
            <text:p>(1, 0, 1, 3, 1, 2, 0)</text:p>
          </table:table-cell>
          <table:table-cell office:value-type="string">
            <text:p>Venikki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Rondon</text:p>
          </table:table-cell>
          <table:table-cell office:value-type="string">
            <text:p>(1, 0, 1, 3, 1, 2, 0)</text:p>
          </table:table-cell>
          <table:table-cell office:value-type="string">
            <text:p>Rondon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Floppy_duck049</text:p>
          </table:table-cell>
          <table:table-cell office:value-type="string">
            <text:p>(1, 1, 0, 2, 2, 0, 0)</text:p>
          </table:table-cell>
          <table:table-cell office:value-type="string">
            <text:p>Floppy_duck049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ominator</text:p>
          </table:table-cell>
          <table:table-cell office:value-type="string">
            <text:p>(1, 0, 1, 2, 0, 2, 0)</text:p>
          </table:table-cell>
          <table:table-cell office:value-type="string">
            <text:p>Dominator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hnissugah</text:p>
          </table:table-cell>
          <table:table-cell office:value-type="string">
            <text:p>(0, 0, 0, 0, 0, 0, 1)</text:p>
          </table:table-cell>
          <table:table-cell office:value-type="string">
            <text:p>Shnissugah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(1, 0, 1, 2, 0, 2, 0)</text:p>
          </table:table-cell>
          <table:table-cell office:value-type="string">
            <text:p>Samerson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ebat</text:p>
          </table:table-cell>
          <table:table-cell office:value-type="string">
            <text:p>(0, 0, 0, 0, 0, 0, 1)</text:p>
          </table:table-cell>
          <table:table-cell office:value-type="string">
            <text:p>ebat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jnikhazy</text:p>
          </table:table-cell>
          <table:table-cell office:value-type="string">
            <text:p>(1, 1, 0, 3, 2, 1, 0)</text:p>
          </table:table-cell>
          <table:table-cell office:value-type="string">
            <text:p>tjnikhazy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1, 0, 1, 2, 0, 2, 0)</text:p>
          </table:table-cell>
          <table:table-cell office:value-type="string">
            <text:p>LuMiSaD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uperStatic</text:p>
          </table:table-cell>
          <table:table-cell office:value-type="string">
            <text:p>(1, 0, 1, 2, 0, 2, 0)</text:p>
          </table:table-cell>
          <table:table-cell office:value-type="string">
            <text:p>SuperStatic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WantingSkate</text:p>
          </table:table-cell>
          <table:table-cell office:value-type="string">
            <text:p>(1, 1, 0, 2, 2, 0, 0)</text:p>
          </table:table-cell>
          <table:table-cell office:value-type="string">
            <text:p>WantingSkat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(1, 0, 1, 3, 1, 2, 0)</text:p>
          </table:table-cell>
          <table:table-cell office:value-type="string">
            <text:p>Dingodile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JimmyCaldero</text:p>
          </table:table-cell>
          <table:table-cell office:value-type="string">
            <text:p>(1, 1, 0, 2, 2, 0, 0)</text:p>
          </table:table-cell>
          <table:table-cell office:value-type="string">
            <text:p>JimmyCalder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fork</text:p>
          </table:table-cell>
          <table:table-cell office:value-type="string">
            <text:p>(1, 0, 1, 2, 0, 2, 0)</text:p>
          </table:table-cell>
          <table:table-cell office:value-type="string">
            <text:p>for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chef</text:p>
          </table:table-cell>
          <table:table-cell office:value-type="string">
            <text:p>(1, 1, 0, 2, 2, 0, 0)</text:p>
          </table:table-cell>
          <table:table-cell office:value-type="string">
            <text:p>Schef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hitKho</text:p>
          </table:table-cell>
          <table:table-cell office:value-type="string">
            <text:p>(1, 1, 0, 2, 2, 0, 0)</text:p>
          </table:table-cell>
          <table:table-cell office:value-type="string">
            <text:p>ThitKh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1, 0, 1, 2, 0, 2, 0)</text:p>
          </table:table-cell>
          <table:table-cell office:value-type="string">
            <text:p>Chez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NE" table:style-name="ta4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Dane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MrNubs</text:p>
          </table:table-cell>
          <table:table-cell office:value-type="string">
            <text:p>(1, 0, 1, 2, 0, 2, 0)</text:p>
          </table:table-cell>
          <table:table-cell office:value-type="string">
            <text:p>MrNub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0, 1, 2, 0, 2, 0)</text:p>
          </table:table-cell>
          <table:table-cell office:value-type="string">
            <text:p>Hungrybo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ERSONT" table:style-name="ta5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amersonT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Czar</text:p>
          </table:table-cell>
          <table:table-cell office:value-type="string">
            <text:p>(1, 1, 0, 2, 2, 0, 0)</text:p>
          </table:table-cell>
          <table:table-cell office:value-type="string">
            <text:p>Cza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zesp</text:p>
          </table:table-cell>
          <table:table-cell office:value-type="string">
            <text:p>(0, 0, 0, 0, 0, 0, 1)</text:p>
          </table:table-cell>
          <table:table-cell office:value-type="string">
            <text:p>zesp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chpstks</text:p>
          </table:table-cell>
          <table:table-cell office:value-type="string">
            <text:p>(1, 0, 1, 2, 0, 2, 0)</text:p>
          </table:table-cell>
          <table:table-cell office:value-type="string">
            <text:p>chpstk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1, 1, 0, 2, 2, 0, 0)</text:p>
          </table:table-cell>
          <table:table-cell office:value-type="string">
            <text:p>DarthCJ8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0, 1, 2, 0, 2, 0)</text:p>
          </table:table-cell>
          <table:table-cell office:value-type="string">
            <text:p>Hungrybo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lean</text:p>
          </table:table-cell>
          <table:table-cell office:value-type="string">
            <text:p>(2, 1, 1, 6, 3, 3, 0)</text:p>
          </table:table-cell>
          <table:table-cell office:value-type="string">
            <text:p>clean</text:p>
          </table:table-cell>
          <table:table-cell office:value-type="string">
            <text:p>(2, 1, 1, 6, 3, 3, 0)</text:p>
          </table:table-cell>
          <table:table-cell table:number-columns-repeated="1020"/>
        </table:table-row>
        <table:table-row table:style-name="ro1">
          <table:table-cell office:value-type="string">
            <text:p>!Mama_Mia!</text:p>
          </table:table-cell>
          <table:table-cell office:value-type="string">
            <text:p>(1, 1, 0, 2, 2, 0, 0)</text:p>
          </table:table-cell>
          <table:table-cell office:value-type="string">
            <text:p>!Mama_Mia!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ev7x</text:p>
          </table:table-cell>
          <table:table-cell office:value-type="string">
            <text:p>(1, 0, 1, 3, 1, 2, 0)</text:p>
          </table:table-cell>
          <table:table-cell office:value-type="string">
            <text:p>sev7x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Tunic</text:p>
          </table:table-cell>
          <table:table-cell office:value-type="string">
            <text:p>(1, 1, 0, 2, 2, 0, 0)</text:p>
          </table:table-cell>
          <table:table-cell office:value-type="string">
            <text:p>Tunic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rNubs</text:p>
          </table:table-cell>
          <table:table-cell office:value-type="string">
            <text:p>(1, 1, 0, 2, 2, 0, 0)</text:p>
          </table:table-cell>
          <table:table-cell office:value-type="string">
            <text:p>MrNub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Zorrin</text:p>
          </table:table-cell>
          <table:table-cell office:value-type="string">
            <text:p>(1, 1, 0, 3, 2, 1, 0)</text:p>
          </table:table-cell>
          <table:table-cell office:value-type="string">
            <text:p>Zorrin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S. Phantm</text:p>
          </table:table-cell>
          <table:table-cell office:value-type="string">
            <text:p>(1, 0, 1, 2, 0, 2, 0)</text:p>
          </table:table-cell>
          <table:table-cell office:value-type="string">
            <text:p>S. Phant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1, 0, 1, 3, 1, 2, 0)</text:p>
          </table:table-cell>
          <table:table-cell office:value-type="string">
            <text:p>Vinny, The Lick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bignews.co</text:p>
          </table:table-cell>
          <table:table-cell office:value-type="string">
            <text:p>(0, 0, 0, 0, 0, 0, 1)</text:p>
          </table:table-cell>
          <table:table-cell office:value-type="string">
            <text:p>bignews.co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piker</text:p>
          </table:table-cell>
          <table:table-cell office:value-type="string">
            <text:p>(0, 0, 0, 0, 0, 0, 1)</text:p>
          </table:table-cell>
          <table:table-cell office:value-type="string">
            <text:p>Spiker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EternalBran</text:p>
          </table:table-cell>
          <table:table-cell office:value-type="string">
            <text:p>(0, 0, 0, 0, 0, 0, 1)</text:p>
          </table:table-cell>
          <table:table-cell office:value-type="string">
            <text:p>EternalBra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lilzach</text:p>
          </table:table-cell>
          <table:table-cell office:value-type="string">
            <text:p>(0, 0, 0, 0, 0, 0, 1)</text:p>
          </table:table-cell>
          <table:table-cell office:value-type="string">
            <text:p>lilzach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MPH</text:p>
          </table:table-cell>
          <table:table-cell office:value-type="string">
            <text:p>(1, 0, 1, 3, 1, 2, 0)</text:p>
          </table:table-cell>
          <table:table-cell office:value-type="string">
            <text:p>MPH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Rudy568</text:p>
          </table:table-cell>
          <table:table-cell office:value-type="string">
            <text:p>(1, 1, 0, 2, 2, 0, 0)</text:p>
          </table:table-cell>
          <table:table-cell office:value-type="string">
            <text:p>Rudy568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r. J</text:p>
          </table:table-cell>
          <table:table-cell office:value-type="string">
            <text:p>(1, 1, 0, 2, 2, 0, 0)</text:p>
          </table:table-cell>
          <table:table-cell office:value-type="string">
            <text:p>Mr. J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1, 0, 1, 3, 1, 2, 0)</text:p>
          </table:table-cell>
          <table:table-cell office:value-type="string">
            <text:p>Squishy~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ZAR" table:style-name="ta5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Czar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(1, 0, 1, 2, 0, 2, 0)</text:p>
          </table:table-cell>
          <table:table-cell office:value-type="string">
            <text:p>Samerson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Octo</text:p>
          </table:table-cell>
          <table:table-cell office:value-type="string">
            <text:p>(1, 0, 1, 3, 1, 2, 0)</text:p>
          </table:table-cell>
          <table:table-cell office:value-type="string">
            <text:p>Octo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sev7x</text:p>
          </table:table-cell>
          <table:table-cell office:value-type="string">
            <text:p>(1, 0, 1, 2, 0, 2, 0)</text:p>
          </table:table-cell>
          <table:table-cell office:value-type="string">
            <text:p>sev7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Wiccan</text:p>
          </table:table-cell>
          <table:table-cell office:value-type="string">
            <text:p>(1, 0, 1, 2, 0, 2, 0)</text:p>
          </table:table-cell>
          <table:table-cell office:value-type="string">
            <text:p>Wicca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ASTMODEPAUL" table:style-name="ta5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BeastModePaul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Octo</text:p>
          </table:table-cell>
          <table:table-cell office:value-type="string">
            <text:p>(1, 1, 0, 2, 2, 0, 0)</text:p>
          </table:table-cell>
          <table:table-cell office:value-type="string">
            <text:p>Oct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1, 1, 0, 2, 2, 0, 0)</text:p>
          </table:table-cell>
          <table:table-cell office:value-type="string">
            <text:p>Twiligh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UNSLINGING GATOS</text:p>
          </table:table-cell>
          <table:table-cell office:value-type="string">
            <text:p>(1, 1, 0, 2, 2, 0, 0)</text:p>
          </table:table-cell>
          <table:table-cell office:value-type="string">
            <text:p>GUNSLINGING GATO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ewo</text:p>
          </table:table-cell>
          <table:table-cell office:value-type="string">
            <text:p>(3, 3, 0, 9, 8, 1, 0)</text:p>
          </table:table-cell>
          <table:table-cell office:value-type="string">
            <text:p>Newo</text:p>
          </table:table-cell>
          <table:table-cell office:value-type="string">
            <text:p>(3, 3, 0, 9, 8, 1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5, 2, 3, 21, 10, 11, 0)</text:p>
          </table:table-cell>
          <table:table-cell office:value-type="string">
            <text:p>Epic_Gabriel</text:p>
          </table:table-cell>
          <table:table-cell office:value-type="string">
            <text:p>(5, 2, 3, 21, 10, 11, 0)</text:p>
          </table:table-cell>
          <table:table-cell table:number-columns-repeated="1020"/>
        </table:table-row>
        <table:table-row table:style-name="ro1">
          <table:table-cell office:value-type="string">
            <text:p>Zomba</text:p>
          </table:table-cell>
          <table:table-cell office:value-type="string">
            <text:p>(1, 0, 1, 5, 2, 3, 0)</text:p>
          </table:table-cell>
          <table:table-cell office:value-type="string">
            <text:p>Zomba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B_Slam</text:p>
          </table:table-cell>
          <table:table-cell office:value-type="string">
            <text:p>(1, 1, 0, 2, 2, 0, 0)</text:p>
          </table:table-cell>
          <table:table-cell office:value-type="string">
            <text:p>B_Slam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reezy 400</text:p>
          </table:table-cell>
          <table:table-cell office:value-type="string">
            <text:p>(1, 1, 0, 2, 2, 0, 0)</text:p>
          </table:table-cell>
          <table:table-cell office:value-type="string">
            <text:p>Breezy 400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hpstks</text:p>
          </table:table-cell>
          <table:table-cell office:value-type="string">
            <text:p>(1, 1, 0, 2, 2, 0, 0)</text:p>
          </table:table-cell>
          <table:table-cell office:value-type="string">
            <text:p>chpstk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adera</text:p>
          </table:table-cell>
          <table:table-cell office:value-type="string">
            <text:p>(1, 1, 0, 3, 2, 1, 0)</text:p>
          </table:table-cell>
          <table:table-cell office:value-type="string">
            <text:p>Madera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Sticccy</text:p>
          </table:table-cell>
          <table:table-cell office:value-type="string">
            <text:p>(1, 1, 0, 3, 3, 0, 0)</text:p>
          </table:table-cell>
          <table:table-cell office:value-type="string">
            <text:p>Sticccy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Dominator</text:p>
          </table:table-cell>
          <table:table-cell office:value-type="string">
            <text:p>(2, 0, 2, 8, 2, 6, 0)</text:p>
          </table:table-cell>
          <table:table-cell office:value-type="string">
            <text:p>Dominator</text:p>
          </table:table-cell>
          <table:table-cell office:value-type="string">
            <text:p>(2, 0, 2, 8, 2, 6, 0)</text:p>
          </table:table-cell>
          <table:table-cell table:number-columns-repeated="1020"/>
        </table:table-row>
        <table:table-row table:style-name="ro1">
          <table:table-cell office:value-type="string">
            <text:p>MrNubs</text:p>
          </table:table-cell>
          <table:table-cell office:value-type="string">
            <text:p>(1, 1, 0, 2, 2, 0, 0)</text:p>
          </table:table-cell>
          <table:table-cell office:value-type="string">
            <text:p>MrNub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yntax</text:p>
          </table:table-cell>
          <table:table-cell office:value-type="string">
            <text:p>(1, 1, 0, 2, 2, 0, 0)</text:p>
          </table:table-cell>
          <table:table-cell office:value-type="string">
            <text:p>synta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loax</text:p>
          </table:table-cell>
          <table:table-cell office:value-type="string">
            <text:p>(1, 0, 1, 2, 0, 2, 0)</text:p>
          </table:table-cell>
          <table:table-cell office:value-type="string">
            <text:p>Koloa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he Chuckster</text:p>
          </table:table-cell>
          <table:table-cell office:value-type="string">
            <text:p>(1, 1, 0, 2, 2, 0, 0)</text:p>
          </table:table-cell>
          <table:table-cell office:value-type="string">
            <text:p>The Chuckste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be</text:p>
          </table:table-cell>
          <table:table-cell office:value-type="string">
            <text:p>(2, 2, 0, 9, 6, 3, 0)</text:p>
          </table:table-cell>
          <table:table-cell office:value-type="string">
            <text:p>Kobe</text:p>
          </table:table-cell>
          <table:table-cell office:value-type="string">
            <text:p>(2, 2, 0, 9, 6, 3, 0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2, 2, 0, 6, 5, 1, 0)</text:p>
          </table:table-cell>
          <table:table-cell office:value-type="string">
            <text:p>WonderBread</text:p>
          </table:table-cell>
          <table:table-cell office:value-type="string">
            <text:p>(2, 2, 0, 6, 5, 1, 0)</text:p>
          </table:table-cell>
          <table:table-cell table:number-columns-repeated="1020"/>
        </table:table-row>
        <table:table-row table:style-name="ro1">
          <table:table-cell office:value-type="string">
            <text:p>Navé</text:p>
          </table:table-cell>
          <table:table-cell office:value-type="string">
            <text:p>(1, 1, 0, 2, 2, 0, 0)</text:p>
          </table:table-cell>
          <table:table-cell office:value-type="string">
            <text:p>Navé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Livan the Amnesty</text:p>
          </table:table-cell>
          <table:table-cell office:value-type="string">
            <text:p>(1, 1, 0, 4, 3, 1, 0)</text:p>
          </table:table-cell>
          <table:table-cell office:value-type="string">
            <text:p>Livan the Amnesty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1, 1, 0, 4, 3, 1, 0)</text:p>
          </table:table-cell>
          <table:table-cell office:value-type="string">
            <text:p>Shaine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Venikki</text:p>
          </table:table-cell>
          <table:table-cell office:value-type="string">
            <text:p>(1, 1, 0, 3, 3, 0, 0)</text:p>
          </table:table-cell>
          <table:table-cell office:value-type="string">
            <text:p>Venikki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TAOS</text:p>
          </table:table-cell>
          <table:table-cell office:value-type="string">
            <text:p>(1, 1, 0, 2, 2, 0, 0)</text:p>
          </table:table-cell>
          <table:table-cell office:value-type="string">
            <text:p>TAO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Viprskreen</text:p>
          </table:table-cell>
          <table:table-cell office:value-type="string">
            <text:p>(1, 1, 0, 2, 2, 0, 0)</text:p>
          </table:table-cell>
          <table:table-cell office:value-type="string">
            <text:p>Viprskree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erk</text:p>
          </table:table-cell>
          <table:table-cell office:value-type="string">
            <text:p>(2, 2, 0, 5, 4, 1, 0)</text:p>
          </table:table-cell>
          <table:table-cell office:value-type="string">
            <text:p>derk</text:p>
          </table:table-cell>
          <table:table-cell office:value-type="string">
            <text:p>(2, 2, 0, 5, 4, 1, 0)</text:p>
          </table:table-cell>
          <table:table-cell table:number-columns-repeated="1020"/>
        </table:table-row>
        <table:table-row table:style-name="ro1">
          <table:table-cell office:value-type="string">
            <text:p>D0g3</text:p>
          </table:table-cell>
          <table:table-cell office:value-type="string">
            <text:p>(1, 1, 0, 2, 2, 0, 0)</text:p>
          </table:table-cell>
          <table:table-cell office:value-type="string">
            <text:p>D0g3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rymlynn</text:p>
          </table:table-cell>
          <table:table-cell office:value-type="string">
            <text:p>(1, 1, 0, 2, 2, 0, 0)</text:p>
          </table:table-cell>
          <table:table-cell office:value-type="string">
            <text:p>Grymlyn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hitKho</text:p>
          </table:table-cell>
          <table:table-cell office:value-type="string">
            <text:p>(1, 1, 0, 2, 2, 0, 0)</text:p>
          </table:table-cell>
          <table:table-cell office:value-type="string">
            <text:p>ThitKh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fork</text:p>
          </table:table-cell>
          <table:table-cell office:value-type="string">
            <text:p>(1, 1, 0, 2, 2, 0, 0)</text:p>
          </table:table-cell>
          <table:table-cell office:value-type="string">
            <text:p>for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1, 1, 0, 2, 2, 0, 0)</text:p>
          </table:table-cell>
          <table:table-cell office:value-type="string">
            <text:p>McFunn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Riku</text:p>
          </table:table-cell>
          <table:table-cell office:value-type="string">
            <text:p>(1, 1, 0, 2, 2, 0, 0)</text:p>
          </table:table-cell>
          <table:table-cell office:value-type="string">
            <text:p>Riku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oemiglazer67</text:p>
          </table:table-cell>
          <table:table-cell office:value-type="string">
            <text:p>(1, 1, 0, 5, 3, 2, 0)</text:p>
          </table:table-cell>
          <table:table-cell office:value-type="string">
            <text:p>noemiglazer67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UNGRYBOX" table:style-name="ta53" table:print="false">
        <office:forms form:automatic-focus="false" form:apply-design-mode="false"/>
        <table:table-column table:style-name="co6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2" table:default-cell-style-name="Excel_20_Built-in_20_Normal"/>
        <table:table-column table:style-name="co28" table:default-cell-style-name="Excel_20_Built-in_20_Normal"/>
        <table:table-column table:style-name="co4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office:value-type="string">
            <text:p>Hungrybox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18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1, 0, 1, 3, 1, 2, 0)</text:p>
          </table:table-cell>
          <table:table-cell office:value-type="string">
            <text:p>Olsen</text:p>
          </table:table-cell>
          <table:table-cell office:value-type="string">
            <text:p>(1, 1, 0, 3, 3, 0, 0)</text:p>
          </table:table-cell>
          <table:table-cell office:value-type="string">
            <text:p>Twilight</text:p>
          </table:table-cell>
          <table:table-cell office:value-type="string">
            <text:p>(1, 0, 1, 3, 1, 2, 0)</text:p>
          </table:table-cell>
          <table:table-cell table:number-columns-repeated="1018"/>
        </table:table-row>
        <table:table-row table:style-name="ro1">
          <table:table-cell office:value-type="string">
            <text:p>Dane</text:p>
          </table:table-cell>
          <table:table-cell office:value-type="string">
            <text:p>(1, 1, 0, 2, 2, 0, 0)</text:p>
          </table:table-cell>
          <table:table-cell office:value-type="string">
            <text:p>brokenyew</text:p>
          </table:table-cell>
          <table:table-cell office:value-type="string">
            <text:p>(2, 2, 0, 6, 6, 0, 0)</text:p>
          </table:table-cell>
          <table:table-cell office:value-type="string">
            <text:p>Dane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Octo</text:p>
          </table:table-cell>
          <table:table-cell office:value-type="string">
            <text:p>(1, 1, 0, 3, 2, 1, 0)</text:p>
          </table:table-cell>
          <table:table-cell office:value-type="string">
            <text:p>Captain G</text:p>
          </table:table-cell>
          <table:table-cell office:value-type="string">
            <text:p>(2, 2, 0, 8, 6, 2, 0)</text:p>
          </table:table-cell>
          <table:table-cell office:value-type="string">
            <text:p>Octo</text:p>
          </table:table-cell>
          <table:table-cell office:value-type="string">
            <text:p>(1, 1, 0, 3, 2, 1, 0)</text:p>
          </table:table-cell>
          <table:table-cell table:number-columns-repeated="1018"/>
        </table:table-row>
        <table:table-row table:style-name="ro1">
          <table:table-cell office:value-type="string">
            <text:p>Mayo</text:p>
          </table:table-cell>
          <table:table-cell office:value-type="string">
            <text:p>(1, 1, 0, 3, 2, 1, 0)</text:p>
          </table:table-cell>
          <table:table-cell office:value-type="string">
            <text:p>Panda</text:p>
          </table:table-cell>
          <table:table-cell office:value-type="string">
            <text:p>(4, 4, 0, 14, 12, 2, 0)</text:p>
          </table:table-cell>
          <table:table-cell office:value-type="string">
            <text:p>Mayo</text:p>
          </table:table-cell>
          <table:table-cell office:value-type="string">
            <text:p>(1, 1, 0, 3, 2, 1, 0)</text:p>
          </table:table-cell>
          <table:table-cell table:number-columns-repeated="1018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(1, 1, 0, 2, 2, 0, 0)</text:p>
          </table:table-cell>
          <table:table-cell office:value-type="string">
            <text:p>Krudo</text:p>
          </table:table-cell>
          <table:table-cell office:value-type="string">
            <text:p>(5, 4, 1, 19, 13, 6, 0)</text:p>
          </table:table-cell>
          <table:table-cell office:value-type="string">
            <text:p>SamersonT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Fonica</text:p>
          </table:table-cell>
          <table:table-cell office:value-type="string">
            <text:p>(1, 0, 1, 2, 0, 2, 0)</text:p>
          </table:table-cell>
          <table:table-cell office:value-type="string">
            <text:p>Jovian</text:p>
          </table:table-cell>
          <table:table-cell office:value-type="string">
            <text:p>(1, 1, 0, 3, 3, 0, 0)</text:p>
          </table:table-cell>
          <table:table-cell office:value-type="string">
            <text:p>Fonica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1, 1, 0, 2, 2, 0, 0)</text:p>
          </table:table-cell>
          <table:table-cell office:value-type="string">
            <text:p>SandBag</text:p>
          </table:table-cell>
          <table:table-cell office:value-type="string">
            <text:p>(2, 2, 0, 6, 6, 0, 0)</text:p>
          </table:table-cell>
          <table:table-cell office:value-type="string">
            <text:p>Vinny, The Lick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Seal King Barbaros</text:p>
          </table:table-cell>
          <table:table-cell office:value-type="string">
            <text:p>(1, 0, 1, 2, 0, 2, 0)</text:p>
          </table:table-cell>
          <table:table-cell office:value-type="string">
            <text:p>Yho!</text:p>
          </table:table-cell>
          <table:table-cell office:value-type="string">
            <text:p>(1, 1, 0, 3, 3, 0, 0)</text:p>
          </table:table-cell>
          <table:table-cell office:value-type="string">
            <text:p>Seal King Barbaros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office:value-type="string">
            <text:p>Pendragon</text:p>
          </table:table-cell>
          <table:table-cell office:value-type="string">
            <text:p>(1, 1, 0, 3, 2, 1, 0)</text:p>
          </table:table-cell>
          <table:table-cell office:value-type="string">
            <text:p>Kuya</text:p>
          </table:table-cell>
          <table:table-cell office:value-type="string">
            <text:p>(1, 1, 0, 4, 3, 1, 0)</text:p>
          </table:table-cell>
          <table:table-cell office:value-type="string">
            <text:p>Pendragon</text:p>
          </table:table-cell>
          <table:table-cell office:value-type="string">
            <text:p>(1, 1, 0, 3, 2, 1, 0)</text:p>
          </table:table-cell>
          <table:table-cell table:number-columns-repeated="1018"/>
        </table:table-row>
        <table:table-row table:style-name="ro1">
          <table:table-cell office:value-type="string">
            <text:p>juno</text:p>
          </table:table-cell>
          <table:table-cell office:value-type="string">
            <text:p>(1, 1, 0, 3, 2, 1, 0)</text:p>
          </table:table-cell>
          <table:table-cell office:value-type="string">
            <text:p>Equilateral</text:p>
          </table:table-cell>
          <table:table-cell office:value-type="string">
            <text:p>(1, 1, 0, 4, 3, 1, 0)</text:p>
          </table:table-cell>
          <table:table-cell office:value-type="string">
            <text:p>juno</text:p>
          </table:table-cell>
          <table:table-cell office:value-type="string">
            <text:p>(1, 1, 0, 3, 2, 1, 0)</text:p>
          </table:table-cell>
          <table:table-cell table:number-columns-repeated="1018"/>
        </table:table-row>
        <table:table-row table:style-name="ro1">
          <table:table-cell office:value-type="string">
            <text:p>Venikki</text:p>
          </table:table-cell>
          <table:table-cell office:value-type="string">
            <text:p>(2, 1, 1, 5, 2, 3, 0)</text:p>
          </table:table-cell>
          <table:table-cell office:value-type="string">
            <text:p>Wizzrobe</text:p>
          </table:table-cell>
          <table:table-cell office:value-type="string">
            <text:p>(3, 0, 3, 11, 2, 9, 0)</text:p>
          </table:table-cell>
          <table:table-cell office:value-type="string">
            <text:p>Venikki</text:p>
          </table:table-cell>
          <table:table-cell office:value-type="string">
            <text:p>(2, 1, 1, 5, 2, 3, 0)</text:p>
          </table:table-cell>
          <table:table-cell table:number-columns-repeated="1018"/>
        </table:table-row>
        <table:table-row table:style-name="ro1">
          <table:table-cell office:value-type="string">
            <text:p>Oki</text:p>
          </table:table-cell>
          <table:table-cell office:value-type="string">
            <text:p>(1, 1, 0, 3, 2, 1, 0)</text:p>
          </table:table-cell>
          <table:table-cell office:value-type="string">
            <text:p>Abraham</text:p>
          </table:table-cell>
          <table:table-cell office:value-type="string">
            <text:p>(1, 1, 0, 3, 3, 0, 0)</text:p>
          </table:table-cell>
          <table:table-cell office:value-type="string">
            <text:p>Oki</text:p>
          </table:table-cell>
          <table:table-cell office:value-type="string">
            <text:p>(1, 1, 0, 3, 2, 1, 0)</text:p>
          </table:table-cell>
          <table:table-cell table:number-columns-repeated="1018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office:value-type="string">
            <text:p>Forrest</text:p>
          </table:table-cell>
          <table:table-cell office:value-type="string">
            <text:p>(2, 2, 0, 7, 6, 1, 0)</text:p>
          </table:table-cell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office:value-type="string">
            <text:p>Kryon</text:p>
          </table:table-cell>
          <table:table-cell office:value-type="string">
            <text:p>(1, 1, 0, 2, 2, 0, 0)</text:p>
          </table:table-cell>
          <table:table-cell office:value-type="string">
            <text:p>Gahtzu</text:p>
          </table:table-cell>
          <table:table-cell office:value-type="string">
            <text:p>(1, 1, 0, 3, 3, 0, 0)</text:p>
          </table:table-cell>
          <table:table-cell office:value-type="string">
            <text:p>Kryon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sev7x</text:p>
          </table:table-cell>
          <table:table-cell office:value-type="string">
            <text:p>(0, 0, 0, 0, 0, 0, 1)</text:p>
          </table:table-cell>
          <table:table-cell office:value-type="string">
            <text:p>SpikeGod</text:p>
          </table:table-cell>
          <table:table-cell office:value-type="string">
            <text:p>(1, 1, 0, 2, 2, 0, 0)</text:p>
          </table:table-cell>
          <table:table-cell office:value-type="string">
            <text:p>sev7x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office:value-type="string">
            <text:p>Lord Farquaad</text:p>
          </table:table-cell>
          <table:table-cell office:value-type="string">
            <text:p>(1, 1, 0, 2, 2, 0, 0)</text:p>
          </table:table-cell>
          <table:table-cell office:value-type="string">
            <text:p>Titan</text:p>
          </table:table-cell>
          <table:table-cell office:value-type="string">
            <text:p>(1, 1, 0, 2, 2, 0, 0)</text:p>
          </table:table-cell>
          <table:table-cell office:value-type="string">
            <text:p>Lord Farquaad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The Chuckster</text:p>
          </table:table-cell>
          <table:table-cell office:value-type="string">
            <text:p>(1, 0, 1, 3, 1, 2, 0)</text:p>
          </table:table-cell>
          <table:table-cell office:value-type="string">
            <text:p>Wild Bill</text:p>
          </table:table-cell>
          <table:table-cell office:value-type="string">
            <text:p>(1, 1, 0, 4, 3, 1, 0)</text:p>
          </table:table-cell>
          <table:table-cell office:value-type="string">
            <text:p>The Chuckster</text:p>
          </table:table-cell>
          <table:table-cell office:value-type="string">
            <text:p>(1, 0, 1, 3, 1, 2, 0)</text:p>
          </table:table-cell>
          <table:table-cell table:number-columns-repeated="1018"/>
        </table:table-row>
        <table:table-row table:style-name="ro1">
          <table:table-cell office:value-type="string">
            <text:p>Gameboyfreshy</text:p>
          </table:table-cell>
          <table:table-cell office:value-type="string">
            <text:p>(1, 1, 0, 2, 2, 0, 0)</text:p>
          </table:table-cell>
          <table:table-cell office:value-type="string">
            <text:p>Franco</text:p>
          </table:table-cell>
          <table:table-cell office:value-type="string">
            <text:p>(1, 1, 0, 3, 3, 0, 0)</text:p>
          </table:table-cell>
          <table:table-cell office:value-type="string">
            <text:p>Gameboyfreshy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Ginger</text:p>
          </table:table-cell>
          <table:table-cell office:value-type="string">
            <text:p>(1, 0, 1, 2, 0, 2, 0)</text:p>
          </table:table-cell>
          <table:table-cell office:value-type="string">
            <text:p>King Momo</text:p>
          </table:table-cell>
          <table:table-cell office:value-type="string">
            <text:p>(1, 1, 0, 4, 3, 1, 0)</text:p>
          </table:table-cell>
          <table:table-cell office:value-type="string">
            <text:p>Ginger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office:value-type="string">
            <text:p>Quelity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Quelity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Wiccan</text:p>
          </table:table-cell>
          <table:table-cell office:value-type="string">
            <text:p>(1, 1, 0, 3, 2, 1, 0)</text:p>
          </table:table-cell>
          <table:table-cell table:number-columns-repeated="2"/>
          <table:table-cell office:value-type="string">
            <text:p>Wiccan</text:p>
          </table:table-cell>
          <table:table-cell office:value-type="string">
            <text:p>(1, 1, 0, 3, 2, 1, 0)</text:p>
          </table:table-cell>
          <table:table-cell table:number-columns-repeated="1018"/>
        </table:table-row>
        <table:table-row table:style-name="ro1">
          <table:table-cell office:value-type="string">
            <text:p>ESAM</text:p>
          </table:table-cell>
          <table:table-cell office:value-type="string">
            <text:p>(1, 0, 1, 3, 1, 2, 0)</text:p>
          </table:table-cell>
          <table:table-cell table:number-columns-repeated="2"/>
          <table:table-cell office:value-type="string">
            <text:p>ESAM</text:p>
          </table:table-cell>
          <table:table-cell office:value-type="string">
            <text:p>(1, 0, 1, 3, 1, 2, 0)</text:p>
          </table:table-cell>
          <table:table-cell table:number-columns-repeated="1018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0, 0, 0, 0, 0, 0, 1)</text:p>
          </table:table-cell>
          <table:table-cell table:number-columns-repeated="2"/>
          <table:table-cell office:value-type="string">
            <text:p>HaydenEatsShrimp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Olsen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brokenyew</text:p>
          </table:table-cell>
          <table:table-cell office:value-type="string">
            <text:p>(2, 2, 0, 6, 6, 0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Captain G</text:p>
          </table:table-cell>
          <table:table-cell office:value-type="string">
            <text:p>(2, 2, 0, 8, 6, 2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anda</text:p>
          </table:table-cell>
          <table:table-cell office:value-type="string">
            <text:p>(4, 4, 0, 14, 12, 2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Krudo</text:p>
          </table:table-cell>
          <table:table-cell office:value-type="string">
            <text:p>(5, 4, 1, 19, 13, 6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Jovian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andBag</text:p>
          </table:table-cell>
          <table:table-cell office:value-type="string">
            <text:p>(2, 2, 0, 6, 6, 0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ho!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Kuya</text:p>
          </table:table-cell>
          <table:table-cell office:value-type="string">
            <text:p>(1, 1, 0, 4, 3, 1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Equilateral</text:p>
          </table:table-cell>
          <table:table-cell office:value-type="string">
            <text:p>(1, 1, 0, 4, 3, 1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Wizzrobe</text:p>
          </table:table-cell>
          <table:table-cell office:value-type="string">
            <text:p>(3, 0, 3, 11, 2, 9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braham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Forrest</text:p>
          </table:table-cell>
          <table:table-cell office:value-type="string">
            <text:p>(2, 2, 0, 7, 6, 1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Gahtzu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pikeGod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Titan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Wild Bill</text:p>
          </table:table-cell>
          <table:table-cell office:value-type="string">
            <text:p>(1, 1, 0, 4, 3, 1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Franco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King Momo</text:p>
          </table:table-cell>
          <table:table-cell office:value-type="string">
            <text:p>(1, 1, 0, 4, 3, 1, 0)</text:p>
          </table:table-cell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HAND" table:style-name="ta5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Bhand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2, 2, 0, 5, 4, 1, 0)</text:p>
          </table:table-cell>
          <table:table-cell office:value-type="string">
            <text:p>DarthCJ8</text:p>
          </table:table-cell>
          <table:table-cell office:value-type="string">
            <text:p>(2, 2, 0, 5, 4, 1, 0)</text:p>
          </table:table-cell>
          <table:table-cell table:number-columns-repeated="1020"/>
        </table:table-row>
        <table:table-row table:style-name="ro1">
          <table:table-cell office:value-type="string">
            <text:p>GUNSLINGING GATOS</text:p>
          </table:table-cell>
          <table:table-cell office:value-type="string">
            <text:p>(1, 0, 1, 2, 0, 2, 0)</text:p>
          </table:table-cell>
          <table:table-cell office:value-type="string">
            <text:p>GUNSLINGING GATO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rNubs</text:p>
          </table:table-cell>
          <table:table-cell office:value-type="string">
            <text:p>(1, 1, 0, 2, 2, 0, 0)</text:p>
          </table:table-cell>
          <table:table-cell office:value-type="string">
            <text:p>MrNub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(1, 1, 0, 3, 2, 1, 0)</text:p>
          </table:table-cell>
          <table:table-cell office:value-type="string">
            <text:p>Dingodile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Goblin</text:p>
          </table:table-cell>
          <table:table-cell office:value-type="string">
            <text:p>(1, 0, 1, 2, 0, 2, 0)</text:p>
          </table:table-cell>
          <table:table-cell office:value-type="string">
            <text:p>Gobli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picywingz11</text:p>
          </table:table-cell>
          <table:table-cell office:value-type="string">
            <text:p>(1, 0, 1, 2, 0, 2, 0)</text:p>
          </table:table-cell>
          <table:table-cell office:value-type="string">
            <text:p>spicywingz11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Ryeiscool</text:p>
          </table:table-cell>
          <table:table-cell office:value-type="string">
            <text:p>(1, 1, 0, 2, 2, 0, 0)</text:p>
          </table:table-cell>
          <table:table-cell office:value-type="string">
            <text:p>Ryeiscoo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!Mama_Mia!</text:p>
          </table:table-cell>
          <table:table-cell office:value-type="string">
            <text:p>(1, 1, 0, 2, 2, 0, 0)</text:p>
          </table:table-cell>
          <table:table-cell office:value-type="string">
            <text:p>!Mama_Mia!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Oki</text:p>
          </table:table-cell>
          <table:table-cell office:value-type="string">
            <text:p>(2, 0, 2, 4, 0, 4, 0)</text:p>
          </table:table-cell>
          <table:table-cell office:value-type="string">
            <text:p>Oki</text:p>
          </table:table-cell>
          <table:table-cell office:value-type="string">
            <text:p>(2, 0, 2, 4, 0, 4, 0)</text:p>
          </table:table-cell>
          <table:table-cell table:number-columns-repeated="1020"/>
        </table:table-row>
        <table:table-row table:style-name="ro1">
          <table:table-cell office:value-type="string">
            <text:p>Hiddekel</text:p>
          </table:table-cell>
          <table:table-cell office:value-type="string">
            <text:p>(1, 1, 0, 2, 2, 0, 0)</text:p>
          </table:table-cell>
          <table:table-cell office:value-type="string">
            <text:p>Hiddeke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icccy</text:p>
          </table:table-cell>
          <table:table-cell office:value-type="string">
            <text:p>(1, 0, 1, 2, 0, 2, 0)</text:p>
          </table:table-cell>
          <table:table-cell office:value-type="string">
            <text:p>Sticcc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lack Lemonade</text:p>
          </table:table-cell>
          <table:table-cell office:value-type="string">
            <text:p>(3, 0, 3, 8, 2, 6, 0)</text:p>
          </table:table-cell>
          <table:table-cell office:value-type="string">
            <text:p>Black Lemonade</text:p>
          </table:table-cell>
          <table:table-cell office:value-type="string">
            <text:p>(3, 0, 3, 8, 2, 6, 0)</text:p>
          </table:table-cell>
          <table:table-cell table:number-columns-repeated="1020"/>
        </table:table-row>
        <table:table-row table:style-name="ro1">
          <table:table-cell office:value-type="string">
            <text:p>Yunaka</text:p>
          </table:table-cell>
          <table:table-cell office:value-type="string">
            <text:p>(1, 1, 0, 2, 2, 0, 0)</text:p>
          </table:table-cell>
          <table:table-cell office:value-type="string">
            <text:p>Yunak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Wiccan</text:p>
          </table:table-cell>
          <table:table-cell office:value-type="string">
            <text:p>(1, 1, 0, 3, 2, 1, 0)</text:p>
          </table:table-cell>
          <table:table-cell office:value-type="string">
            <text:p>Wiccan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1, 0, 1, 2, 0, 2, 0)</text:p>
          </table:table-cell>
          <table:table-cell office:value-type="string">
            <text:p>WonderBrea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ooBell</text:p>
          </table:table-cell>
          <table:table-cell office:value-type="string">
            <text:p>(1, 1, 0, 2, 2, 0, 0)</text:p>
          </table:table-cell>
          <table:table-cell office:value-type="string">
            <text:p>BooBel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asterqz</text:p>
          </table:table-cell>
          <table:table-cell office:value-type="string">
            <text:p>(1, 1, 0, 2, 2, 0, 0)</text:p>
          </table:table-cell>
          <table:table-cell office:value-type="string">
            <text:p>masterqz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eal King Barbaros</text:p>
          </table:table-cell>
          <table:table-cell office:value-type="string">
            <text:p>(1, 1, 0, 2, 2, 0, 0)</text:p>
          </table:table-cell>
          <table:table-cell office:value-type="string">
            <text:p>Seal King Barbaro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Viri</text:p>
          </table:table-cell>
          <table:table-cell office:value-type="string">
            <text:p>(1, 0, 1, 2, 0, 2, 0)</text:p>
          </table:table-cell>
          <table:table-cell office:value-type="string">
            <text:p>Vir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lucida</text:p>
          </table:table-cell>
          <table:table-cell office:value-type="string">
            <text:p>(1, 1, 0, 2, 2, 0, 0)</text:p>
          </table:table-cell>
          <table:table-cell office:value-type="string">
            <text:p>lucid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1, 1, 0, 3, 2, 1, 0)</text:p>
          </table:table-cell>
          <table:table-cell office:value-type="string">
            <text:p>McFunny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Grymlynn</text:p>
          </table:table-cell>
          <table:table-cell office:value-type="string">
            <text:p>(1, 0, 1, 2, 0, 2, 0)</text:p>
          </table:table-cell>
          <table:table-cell office:value-type="string">
            <text:p>Grymlyn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r. J</text:p>
          </table:table-cell>
          <table:table-cell office:value-type="string">
            <text:p>(1, 1, 0, 2, 2, 0, 0)</text:p>
          </table:table-cell>
          <table:table-cell office:value-type="string">
            <text:p>Mr. J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PH</text:p>
          </table:table-cell>
          <table:table-cell office:value-type="string">
            <text:p>(1, 1, 0, 2, 2, 0, 0)</text:p>
          </table:table-cell>
          <table:table-cell office:value-type="string">
            <text:p>MP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NSLINGING GATOS" table:style-name="ta5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GUNSLINGING GATOS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Pendragon</text:p>
          </table:table-cell>
          <table:table-cell office:value-type="string">
            <text:p>(1, 1, 0, 2, 2, 0, 0)</text:p>
          </table:table-cell>
          <table:table-cell office:value-type="string">
            <text:p>Pendrago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1, 1, 0, 2, 2, 0, 0)</text:p>
          </table:table-cell>
          <table:table-cell office:value-type="string">
            <text:p>Bhan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1, 1, 0, 2, 2, 0, 0)</text:p>
          </table:table-cell>
          <table:table-cell office:value-type="string">
            <text:p>Vinny, The Lic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oblin</text:p>
          </table:table-cell>
          <table:table-cell office:value-type="string">
            <text:p>(1, 0, 1, 2, 0, 2, 0)</text:p>
          </table:table-cell>
          <table:table-cell office:value-type="string">
            <text:p>Gobli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IMROD69</text:p>
          </table:table-cell>
          <table:table-cell office:value-type="string">
            <text:p>(0, 0, 0, 0, 0, 0, 1)</text:p>
          </table:table-cell>
          <table:table-cell office:value-type="string">
            <text:p>NIMROD69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eel</text:p>
          </table:table-cell>
          <table:table-cell office:value-type="string">
            <text:p>(0, 0, 0, 0, 0, 0, 1)</text:p>
          </table:table-cell>
          <table:table-cell office:value-type="string">
            <text:p>Seel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O" table:style-name="ta5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Newo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hunning</text:p>
          </table:table-cell>
          <table:table-cell office:value-type="string">
            <text:p>(1, 1, 0, 2, 2, 0, 0)</text:p>
          </table:table-cell>
          <table:table-cell office:value-type="string">
            <text:p>Shunning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ayo</text:p>
          </table:table-cell>
          <table:table-cell office:value-type="string">
            <text:p>(1, 1, 0, 3, 2, 1, 0)</text:p>
          </table:table-cell>
          <table:table-cell office:value-type="string">
            <text:p>Mayo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chpstks</text:p>
          </table:table-cell>
          <table:table-cell office:value-type="string">
            <text:p>(1, 1, 0, 3, 2, 1, 0)</text:p>
          </table:table-cell>
          <table:table-cell office:value-type="string">
            <text:p>chpstks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3, 0, 3, 9, 1, 8, 0)</text:p>
          </table:table-cell>
          <table:table-cell office:value-type="string">
            <text:p>BeastModePaul</text:p>
          </table:table-cell>
          <table:table-cell office:value-type="string">
            <text:p>(3, 0, 3, 9, 1, 8, 0)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1, 1, 0, 2, 2, 0, 0)</text:p>
          </table:table-cell>
          <table:table-cell office:value-type="string">
            <text:p>Squishy~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oblin</text:p>
          </table:table-cell>
          <table:table-cell office:value-type="string">
            <text:p>(1, 0, 1, 5, 2, 3, 0)</text:p>
          </table:table-cell>
          <table:table-cell office:value-type="string">
            <text:p>Goblin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Sneakers O'Toole</text:p>
          </table:table-cell>
          <table:table-cell office:value-type="string">
            <text:p>(1, 1, 0, 2, 2, 0, 0)</text:p>
          </table:table-cell>
          <table:table-cell office:value-type="string">
            <text:p>Sneakers O'Tool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1, 1, 0, 3, 2, 1, 0)</text:p>
          </table:table-cell>
          <table:table-cell office:value-type="string">
            <text:p>HaydenEatsShrimp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Koloax</text:p>
          </table:table-cell>
          <table:table-cell office:value-type="string">
            <text:p>(2, 2, 0, 6, 5, 1, 0)</text:p>
          </table:table-cell>
          <table:table-cell office:value-type="string">
            <text:p>Koloax</text:p>
          </table:table-cell>
          <table:table-cell office:value-type="string">
            <text:p>(2, 2, 0, 6, 5, 1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1, 0, 3, 2, 1, 0)</text:p>
          </table:table-cell>
          <table:table-cell office:value-type="string">
            <text:p>Epic_Gabriel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2, 1, 1, 6, 3, 3, 0)</text:p>
          </table:table-cell>
          <table:table-cell office:value-type="string">
            <text:p>Shaine</text:p>
          </table:table-cell>
          <table:table-cell office:value-type="string">
            <text:p>(2, 1, 1, 6, 3, 3, 0)</text:p>
          </table:table-cell>
          <table:table-cell table:number-columns-repeated="1020"/>
        </table:table-row>
        <table:table-row table:style-name="ro1">
          <table:table-cell office:value-type="string">
            <text:p>DM</text:p>
          </table:table-cell>
          <table:table-cell office:value-type="string">
            <text:p>(1, 0, 1, 3, 0, 3, 0)</text:p>
          </table:table-cell>
          <table:table-cell office:value-type="string">
            <text:p>DM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JediSmash</text:p>
          </table:table-cell>
          <table:table-cell office:value-type="string">
            <text:p>(1, 1, 0, 2, 2, 0, 0)</text:p>
          </table:table-cell>
          <table:table-cell office:value-type="string">
            <text:p>JediSmas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1, 1, 0, 2, 2, 0, 0)</text:p>
          </table:table-cell>
          <table:table-cell office:value-type="string">
            <text:p>xXx_PeterGokuGriffin_xX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1, 1, 0, 3, 2, 1, 0)</text:p>
          </table:table-cell>
          <table:table-cell office:value-type="string">
            <text:p>Plummet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Viri</text:p>
          </table:table-cell>
          <table:table-cell office:value-type="string">
            <text:p>(2, 2, 0, 8, 5, 3, 0)</text:p>
          </table:table-cell>
          <table:table-cell office:value-type="string">
            <text:p>Viri</text:p>
          </table:table-cell>
          <table:table-cell office:value-type="string">
            <text:p>(2, 2, 0, 8, 5, 3, 0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1, 1, 0, 5, 3, 2, 0)</text:p>
          </table:table-cell>
          <table:table-cell office:value-type="string">
            <text:p>WonderBread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NGODILE" table:style-name="ta5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Dingodile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Mayo</text:p>
          </table:table-cell>
          <table:table-cell office:value-type="string">
            <text:p>(1, 0, 1, 3, 1, 2, 0)</text:p>
          </table:table-cell>
          <table:table-cell office:value-type="string">
            <text:p>Mayo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sev7x</text:p>
          </table:table-cell>
          <table:table-cell office:value-type="string">
            <text:p>(1, 1, 0, 2, 2, 0, 0)</text:p>
          </table:table-cell>
          <table:table-cell office:value-type="string">
            <text:p>sev7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hunning</text:p>
          </table:table-cell>
          <table:table-cell office:value-type="string">
            <text:p>(1, 1, 0, 2, 2, 0, 0)</text:p>
          </table:table-cell>
          <table:table-cell office:value-type="string">
            <text:p>Shunning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1, 1, 0, 3, 2, 1, 0)</text:p>
          </table:table-cell>
          <table:table-cell office:value-type="string">
            <text:p>Twilight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1, 0, 1, 3, 1, 2, 0)</text:p>
          </table:table-cell>
          <table:table-cell office:value-type="string">
            <text:p>Bhand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Breezy 400</text:p>
          </table:table-cell>
          <table:table-cell office:value-type="string">
            <text:p>(1, 0, 1, 3, 1, 2, 0)</text:p>
          </table:table-cell>
          <table:table-cell office:value-type="string">
            <text:p>Breezy 400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elite</text:p>
          </table:table-cell>
          <table:table-cell office:value-type="string">
            <text:p>(1, 1, 0, 2, 2, 0, 0)</text:p>
          </table:table-cell>
          <table:table-cell office:value-type="string">
            <text:p>elit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_Slam</text:p>
          </table:table-cell>
          <table:table-cell office:value-type="string">
            <text:p>(1, 1, 0, 2, 2, 0, 0)</text:p>
          </table:table-cell>
          <table:table-cell office:value-type="string">
            <text:p>B_Slam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Jean Papitas</text:p>
          </table:table-cell>
          <table:table-cell office:value-type="string">
            <text:p>(1, 0, 1, 3, 1, 2, 0)</text:p>
          </table:table-cell>
          <table:table-cell office:value-type="string">
            <text:p>Jean Papitas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1, 1, 0, 2, 2, 0, 0)</text:p>
          </table:table-cell>
          <table:table-cell office:value-type="string">
            <text:p>Chavalav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he Chuckster</text:p>
          </table:table-cell>
          <table:table-cell office:value-type="string">
            <text:p>(1, 1, 0, 2, 2, 0, 0)</text:p>
          </table:table-cell>
          <table:table-cell office:value-type="string">
            <text:p>The Chuckste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rymlynn</text:p>
          </table:table-cell>
          <table:table-cell office:value-type="string">
            <text:p>(1, 1, 0, 3, 2, 1, 0)</text:p>
          </table:table-cell>
          <table:table-cell office:value-type="string">
            <text:p>Grymlynn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Koloax</text:p>
          </table:table-cell>
          <table:table-cell office:value-type="string">
            <text:p>(1, 0, 1, 2, 0, 2, 0)</text:p>
          </table:table-cell>
          <table:table-cell office:value-type="string">
            <text:p>Koloa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Livan the Amnesty</text:p>
          </table:table-cell>
          <table:table-cell office:value-type="string">
            <text:p>(1, 0, 1, 2, 0, 2, 0)</text:p>
          </table:table-cell>
          <table:table-cell office:value-type="string">
            <text:p>Livan the Amnest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eiryuSDVX</text:p>
          </table:table-cell>
          <table:table-cell office:value-type="string">
            <text:p>(0, 0, 0, 0, 0, 0, 1)</text:p>
          </table:table-cell>
          <table:table-cell office:value-type="string">
            <text:p>SeiryuSDVX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KRilL</text:p>
          </table:table-cell>
          <table:table-cell office:value-type="string">
            <text:p>(1, 0, 1, 2, 0, 2, 0)</text:p>
          </table:table-cell>
          <table:table-cell office:value-type="string">
            <text:p>KRil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rNubs</text:p>
          </table:table-cell>
          <table:table-cell office:value-type="string">
            <text:p>(1, 1, 0, 3, 2, 1, 0)</text:p>
          </table:table-cell>
          <table:table-cell office:value-type="string">
            <text:p>MrNubs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1, 0, 1, 3, 1, 2, 0)</text:p>
          </table:table-cell>
          <table:table-cell office:value-type="string">
            <text:p>DarthCJ8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Caz</text:p>
          </table:table-cell>
          <table:table-cell office:value-type="string">
            <text:p>(1, 1, 0, 2, 2, 0, 0)</text:p>
          </table:table-cell>
          <table:table-cell office:value-type="string">
            <text:p>Caz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cdrizz</text:p>
          </table:table-cell>
          <table:table-cell office:value-type="string">
            <text:p>(0, 0, 0, 0, 0, 0, 1)</text:p>
          </table:table-cell>
          <table:table-cell office:value-type="string">
            <text:p>Mcdrizz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0, 1, 3, 1, 2, 0)</text:p>
          </table:table-cell>
          <table:table-cell office:value-type="string">
            <text:p>Epic_Gabriel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Portals</text:p>
          </table:table-cell>
          <table:table-cell office:value-type="string">
            <text:p>(1, 1, 0, 2, 2, 0, 0)</text:p>
          </table:table-cell>
          <table:table-cell office:value-type="string">
            <text:p>Portal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adou</text:p>
          </table:table-cell>
          <table:table-cell office:value-type="string">
            <text:p>(1, 1, 0, 2, 2, 0, 0)</text:p>
          </table:table-cell>
          <table:table-cell office:value-type="string">
            <text:p>Hadou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D</text:p>
          </table:table-cell>
          <table:table-cell office:value-type="string">
            <text:p>(1, 0, 1, 2, 0, 2, 0)</text:p>
          </table:table-cell>
          <table:table-cell office:value-type="string">
            <text:p>C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PSTKS" table:style-name="ta5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chpstks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MrNubs</text:p>
          </table:table-cell>
          <table:table-cell office:value-type="string">
            <text:p>(1, 1, 0, 2, 2, 0, 0)</text:p>
          </table:table-cell>
          <table:table-cell office:value-type="string">
            <text:p>MrNub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(1, 1, 0, 2, 2, 0, 0)</text:p>
          </table:table-cell>
          <table:table-cell office:value-type="string">
            <text:p>Samerson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ewo</text:p>
          </table:table-cell>
          <table:table-cell office:value-type="string">
            <text:p>(1, 0, 1, 3, 1, 2, 0)</text:p>
          </table:table-cell>
          <table:table-cell office:value-type="string">
            <text:p>Newo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1, 0, 1, 3, 1, 2, 0)</text:p>
          </table:table-cell>
          <table:table-cell office:value-type="string">
            <text:p>Benji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Shawnbd3</text:p>
          </table:table-cell>
          <table:table-cell office:value-type="string">
            <text:p>(1, 1, 0, 2, 2, 0, 0)</text:p>
          </table:table-cell>
          <table:table-cell office:value-type="string">
            <text:p>Shawnbd3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avé</text:p>
          </table:table-cell>
          <table:table-cell office:value-type="string">
            <text:p>(1, 1, 0, 2, 2, 0, 0)</text:p>
          </table:table-cell>
          <table:table-cell office:value-type="string">
            <text:p>Navé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1, 1, 0, 2, 2, 0, 0)</text:p>
          </table:table-cell>
          <table:table-cell office:value-type="string">
            <text:p>LuMiSaD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anzana</text:p>
          </table:table-cell>
          <table:table-cell office:value-type="string">
            <text:p>(1, 0, 1, 3, 1, 2, 0)</text:p>
          </table:table-cell>
          <table:table-cell office:value-type="string">
            <text:p>Manzana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World Jade Center</text:p>
          </table:table-cell>
          <table:table-cell office:value-type="string">
            <text:p>(1, 1, 0, 2, 2, 0, 0)</text:p>
          </table:table-cell>
          <table:table-cell office:value-type="string">
            <text:p>World Jade Cente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Oki</text:p>
          </table:table-cell>
          <table:table-cell office:value-type="string">
            <text:p>(1, 1, 0, 3, 2, 1, 0)</text:p>
          </table:table-cell>
          <table:table-cell office:value-type="string">
            <text:p>Oki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LightningCam</text:p>
          </table:table-cell>
          <table:table-cell office:value-type="string">
            <text:p>(1, 1, 0, 3, 2, 1, 0)</text:p>
          </table:table-cell>
          <table:table-cell office:value-type="string">
            <text:p>LightningCam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Karu!</text:p>
          </table:table-cell>
          <table:table-cell office:value-type="string">
            <text:p>(1, 0, 1, 2, 0, 2, 0)</text:p>
          </table:table-cell>
          <table:table-cell office:value-type="string">
            <text:p>Karu!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Lucky</text:p>
          </table:table-cell>
          <table:table-cell office:value-type="string">
            <text:p>(1, 1, 0, 2, 2, 0, 0)</text:p>
          </table:table-cell>
          <table:table-cell office:value-type="string">
            <text:p>Luck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1, 1, 0, 2, 2, 0, 0)</text:p>
          </table:table-cell>
          <table:table-cell office:value-type="string">
            <text:p>Plumme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Riku</text:p>
          </table:table-cell>
          <table:table-cell office:value-type="string">
            <text:p>(1, 0, 1, 2, 0, 2, 0)</text:p>
          </table:table-cell>
          <table:table-cell office:value-type="string">
            <text:p>Riku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ESP" table:style-name="ta5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zesp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(0, 0, 0, 0, 0, 0, 1)</text:p>
          </table:table-cell>
          <table:table-cell office:value-type="string">
            <text:p>SamersonT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Olsen</text:p>
          </table:table-cell>
          <table:table-cell office:value-type="string">
            <text:p>(0, 0, 0, 0, 0, 0, 1)</text:p>
          </table:table-cell>
          <table:table-cell office:value-type="string">
            <text:p>Olse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NIEL" table:style-name="ta6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Zaniel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roan ling</text:p>
          </table:table-cell>
          <table:table-cell office:value-type="string">
            <text:p>(0, 0, 0, 0, 0, 0, 1)</text:p>
          </table:table-cell>
          <table:table-cell office:value-type="string">
            <text:p>roan ling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a_Successor</text:p>
          </table:table-cell>
          <table:table-cell office:value-type="string">
            <text:p>(1, 1, 0, 2, 2, 0, 0)</text:p>
          </table:table-cell>
          <table:table-cell office:value-type="string">
            <text:p>a_Successo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iRT</text:p>
          </table:table-cell>
          <table:table-cell office:value-type="string">
            <text:p>(1, 1, 0, 2, 2, 0, 0)</text:p>
          </table:table-cell>
          <table:table-cell office:value-type="string">
            <text:p>DiR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owlin</text:p>
          </table:table-cell>
          <table:table-cell office:value-type="string">
            <text:p>(1, 0, 1, 2, 0, 2, 0)</text:p>
          </table:table-cell>
          <table:table-cell office:value-type="string">
            <text:p>Bowli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AN LING" table:style-name="ta6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roan ling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Zaniel</text:p>
          </table:table-cell>
          <table:table-cell office:value-type="string">
            <text:p>(0, 0, 0, 0, 0, 0, 1)</text:p>
          </table:table-cell>
          <table:table-cell office:value-type="string">
            <text:p>Zaniel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omehowNerdy</text:p>
          </table:table-cell>
          <table:table-cell office:value-type="string">
            <text:p>(0, 0, 0, 0, 0, 0, 1)</text:p>
          </table:table-cell>
          <table:table-cell office:value-type="string">
            <text:p>SomehowNerd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VY" table:style-name="ta6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ynvy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Wiccan</text:p>
          </table:table-cell>
          <table:table-cell office:value-type="string">
            <text:p>(1, 0, 1, 2, 0, 2, 1)</text:p>
          </table:table-cell>
          <table:table-cell office:value-type="string">
            <text:p>Wiccan</text:p>
          </table:table-cell>
          <table:table-cell office:value-type="string">
            <text:p>(1, 0, 1, 2, 0, 2, 1)</text:p>
          </table:table-cell>
          <table:table-cell table:number-columns-repeated="1020"/>
        </table:table-row>
        <table:table-row table:style-name="ro1">
          <table:table-cell office:value-type="string">
            <text:p>My Dad</text:p>
          </table:table-cell>
          <table:table-cell office:value-type="string">
            <text:p>(0, 0, 0, 0, 0, 0, 1)</text:p>
          </table:table-cell>
          <table:table-cell office:value-type="string">
            <text:p>My Dad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DiRT</text:p>
          </table:table-cell>
          <table:table-cell office:value-type="string">
            <text:p>(0, 0, 0, 0, 0, 0, 1)</text:p>
          </table:table-cell>
          <table:table-cell office:value-type="string">
            <text:p>DiRT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tepKnightUp</text:p>
          </table:table-cell>
          <table:table-cell office:value-type="string">
            <text:p>(1, 0, 1, 2, 0, 2, 0)</text:p>
          </table:table-cell>
          <table:table-cell office:value-type="string">
            <text:p>StepKnightUp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1, 0, 1, 2, 0, 2, 0)</text:p>
          </table:table-cell>
          <table:table-cell office:value-type="string">
            <text:p>LuMiSaD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Quelity</text:p>
          </table:table-cell>
          <table:table-cell office:value-type="string">
            <text:p>(1, 0, 1, 2, 0, 2, 0)</text:p>
          </table:table-cell>
          <table:table-cell office:value-type="string">
            <text:p>Quelit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onczzz</text:p>
          </table:table-cell>
          <table:table-cell office:value-type="string">
            <text:p>(1, 0, 1, 3, 1, 2, 0)</text:p>
          </table:table-cell>
          <table:table-cell office:value-type="string">
            <text:p>Donczzz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CCAN" table:style-name="ta6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Wicca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ynvy</text:p>
          </table:table-cell>
          <table:table-cell office:value-type="string">
            <text:p>(1, 1, 0, 2, 2, 0, 1)</text:p>
          </table:table-cell>
          <table:table-cell office:value-type="string">
            <text:p>Synvy</text:p>
          </table:table-cell>
          <table:table-cell office:value-type="string">
            <text:p>(1, 1, 0, 2, 2, 0, 1)</text:p>
          </table:table-cell>
          <table:table-cell table:number-columns-repeated="1020"/>
        </table:table-row>
        <table:table-row table:style-name="ro1">
          <table:table-cell office:value-type="string">
            <text:p>Just_A_Tarrasque</text:p>
          </table:table-cell>
          <table:table-cell office:value-type="string">
            <text:p>(0, 0, 0, 0, 0, 0, 1)</text:p>
          </table:table-cell>
          <table:table-cell office:value-type="string">
            <text:p>Just_A_Tarrasqu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ChezFarach001</text:p>
          </table:table-cell>
          <table:table-cell office:value-type="string">
            <text:p>(1, 0, 1, 3, 1, 2, 0)</text:p>
          </table:table-cell>
          <table:table-cell office:value-type="string">
            <text:p>ChezFarach001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Czar</text:p>
          </table:table-cell>
          <table:table-cell office:value-type="string">
            <text:p>(1, 1, 0, 2, 2, 0, 0)</text:p>
          </table:table-cell>
          <table:table-cell office:value-type="string">
            <text:p>Cza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ainus</text:p>
          </table:table-cell>
          <table:table-cell office:value-type="string">
            <text:p>(0, 0, 0, 0, 0, 0, 1)</text:p>
          </table:table-cell>
          <table:table-cell office:value-type="string">
            <text:p>Painus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1, 0, 1, 2, 0, 2, 0)</text:p>
          </table:table-cell>
          <table:table-cell office:value-type="string">
            <text:p>HaydenEatsShrimp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adera</text:p>
          </table:table-cell>
          <table:table-cell office:value-type="string">
            <text:p>(1, 0, 1, 3, 1, 2, 0)</text:p>
          </table:table-cell>
          <table:table-cell office:value-type="string">
            <text:p>Madera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Kobe</text:p>
          </table:table-cell>
          <table:table-cell office:value-type="string">
            <text:p>(0, 0, 0, 0, 0, 0, 1)</text:p>
          </table:table-cell>
          <table:table-cell office:value-type="string">
            <text:p>Kob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Breezy 400</text:p>
          </table:table-cell>
          <table:table-cell office:value-type="string">
            <text:p>(1, 1, 0, 2, 2, 0, 0)</text:p>
          </table:table-cell>
          <table:table-cell office:value-type="string">
            <text:p>Breezy 400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avé</text:p>
          </table:table-cell>
          <table:table-cell office:value-type="string">
            <text:p>(1, 1, 0, 2, 2, 0, 0)</text:p>
          </table:table-cell>
          <table:table-cell office:value-type="string">
            <text:p>Navé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urehyper</text:p>
          </table:table-cell>
          <table:table-cell office:value-type="string">
            <text:p>(1, 0, 1, 2, 0, 2, 0)</text:p>
          </table:table-cell>
          <table:table-cell office:value-type="string">
            <text:p>Surehyper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timmyTurner</text:p>
          </table:table-cell>
          <table:table-cell office:value-type="string">
            <text:p>(1, 1, 0, 2, 2, 0, 0)</text:p>
          </table:table-cell>
          <table:table-cell office:value-type="string">
            <text:p>StimmyTurne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1, 0, 1, 2, 0, 2, 0)</text:p>
          </table:table-cell>
          <table:table-cell office:value-type="string">
            <text:p>WonderBrea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anchos</text:p>
          </table:table-cell>
          <table:table-cell office:value-type="string">
            <text:p>(1, 1, 0, 2, 2, 0, 0)</text:p>
          </table:table-cell>
          <table:table-cell office:value-type="string">
            <text:p>Pancho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1, 0, 1, 3, 1, 2, 0)</text:p>
          </table:table-cell>
          <table:table-cell office:value-type="string">
            <text:p>Bhand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DGK</text:p>
          </table:table-cell>
          <table:table-cell office:value-type="string">
            <text:p>(0, 0, 0, 0, 0, 0, 1)</text:p>
          </table:table-cell>
          <table:table-cell office:value-type="string">
            <text:p>DGK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Gameboyfreshy</text:p>
          </table:table-cell>
          <table:table-cell office:value-type="string">
            <text:p>(0, 0, 0, 0, 0, 0, 1)</text:p>
          </table:table-cell>
          <table:table-cell office:value-type="string">
            <text:p>Gameboyfresh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Lapis</text:p>
          </table:table-cell>
          <table:table-cell office:value-type="string">
            <text:p>(1, 1, 0, 2, 2, 0, 0)</text:p>
          </table:table-cell>
          <table:table-cell office:value-type="string">
            <text:p>Lapi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0, 1, 3, 1, 2, 0)</text:p>
          </table:table-cell>
          <table:table-cell office:value-type="string">
            <text:p>Hungrybox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OG Kid</text:p>
          </table:table-cell>
          <table:table-cell office:value-type="string">
            <text:p>(1, 1, 0, 2, 2, 0, 0)</text:p>
          </table:table-cell>
          <table:table-cell office:value-type="string">
            <text:p>OG Ki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ogemon</text:p>
          </table:table-cell>
          <table:table-cell office:value-type="string">
            <text:p>(1, 1, 0, 2, 2, 0, 0)</text:p>
          </table:table-cell>
          <table:table-cell office:value-type="string">
            <text:p>Gogemo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Anthzeny</text:p>
          </table:table-cell>
          <table:table-cell office:value-type="string">
            <text:p>(1, 0, 1, 3, 1, 2, 0)</text:p>
          </table:table-cell>
          <table:table-cell office:value-type="string">
            <text:p>Anthzeny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IASTAR" table:style-name="ta6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Eliastar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aibaman</text:p>
          </table:table-cell>
          <table:table-cell office:value-type="string">
            <text:p>(1, 1, 0, 2, 2, 0, 0)</text:p>
          </table:table-cell>
          <table:table-cell office:value-type="string">
            <text:p>saibama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1, 0, 1, 2, 0, 2, 0)</text:p>
          </table:table-cell>
          <table:table-cell office:value-type="string">
            <text:p>McFunn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chef</text:p>
          </table:table-cell>
          <table:table-cell office:value-type="string">
            <text:p>(1, 1, 0, 2, 2, 0, 0)</text:p>
          </table:table-cell>
          <table:table-cell office:value-type="string">
            <text:p>Schef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econd Floor Basement</text:p>
          </table:table-cell>
          <table:table-cell office:value-type="string">
            <text:p>(1, 0, 1, 2, 0, 2, 0)</text:p>
          </table:table-cell>
          <table:table-cell office:value-type="string">
            <text:p>Second Floor Basemen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he Chuckster</text:p>
          </table:table-cell>
          <table:table-cell office:value-type="string">
            <text:p>(1, 0, 1, 2, 0, 2, 0)</text:p>
          </table:table-cell>
          <table:table-cell office:value-type="string">
            <text:p>The Chuckster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1, 0, 1, 2, 0, 2, 0)</text:p>
          </table:table-cell>
          <table:table-cell office:value-type="string">
            <text:p>HaydenEatsShrimp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IBAMAN" table:style-name="ta6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aibama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Eliastar</text:p>
          </table:table-cell>
          <table:table-cell office:value-type="string">
            <text:p>(1, 0, 1, 2, 0, 2, 0)</text:p>
          </table:table-cell>
          <table:table-cell office:value-type="string">
            <text:p>Eliastar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lucida</text:p>
          </table:table-cell>
          <table:table-cell office:value-type="string">
            <text:p>(1, 0, 1, 2, 0, 2, 0)</text:p>
          </table:table-cell>
          <table:table-cell office:value-type="string">
            <text:p>lucid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litz</text:p>
          </table:table-cell>
          <table:table-cell office:value-type="string">
            <text:p>(1, 1, 0, 2, 2, 0, 0)</text:p>
          </table:table-cell>
          <table:table-cell office:value-type="string">
            <text:p>Blitz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ESAM</text:p>
          </table:table-cell>
          <table:table-cell office:value-type="string">
            <text:p>(1, 0, 1, 2, 0, 2, 0)</text:p>
          </table:table-cell>
          <table:table-cell office:value-type="string">
            <text:p>ESA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arwhal</text:p>
          </table:table-cell>
          <table:table-cell office:value-type="string">
            <text:p>(1, 0, 1, 2, 0, 2, 0)</text:p>
          </table:table-cell>
          <table:table-cell office:value-type="string">
            <text:p>Narwha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OND FLOOR BASEMENT" table:style-name="ta6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econd Floor Basement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captainLED</text:p>
          </table:table-cell>
          <table:table-cell office:value-type="string">
            <text:p>(1, 1, 0, 2, 2, 0, 0)</text:p>
          </table:table-cell>
          <table:table-cell office:value-type="string">
            <text:p>captainLE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neakers O'Toole</text:p>
          </table:table-cell>
          <table:table-cell office:value-type="string">
            <text:p>(1, 1, 0, 2, 2, 0, 0)</text:p>
          </table:table-cell>
          <table:table-cell office:value-type="string">
            <text:p>Sneakers O'Tool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Eliastar</text:p>
          </table:table-cell>
          <table:table-cell office:value-type="string">
            <text:p>(1, 1, 0, 2, 2, 0, 0)</text:p>
          </table:table-cell>
          <table:table-cell office:value-type="string">
            <text:p>Eliasta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juno</text:p>
          </table:table-cell>
          <table:table-cell office:value-type="string">
            <text:p>(1, 0, 1, 3, 1, 2, 0)</text:p>
          </table:table-cell>
          <table:table-cell office:value-type="string">
            <text:p>juno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Mr.Feeny</text:p>
          </table:table-cell>
          <table:table-cell office:value-type="string">
            <text:p>(1, 1, 0, 2, 2, 0, 0)</text:p>
          </table:table-cell>
          <table:table-cell office:value-type="string">
            <text:p>Mr.Feen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ilios</text:p>
          </table:table-cell>
          <table:table-cell office:value-type="string">
            <text:p>(1, 0, 1, 2, 0, 2, 0)</text:p>
          </table:table-cell>
          <table:table-cell office:value-type="string">
            <text:p>stilio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IRUSH</text:p>
          </table:table-cell>
          <table:table-cell office:value-type="string">
            <text:p>(1, 1, 0, 2, 2, 0, 0)</text:p>
          </table:table-cell>
          <table:table-cell office:value-type="string">
            <text:p>IRUS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1, 1, 0, 2, 2, 0, 0)</text:p>
          </table:table-cell>
          <table:table-cell office:value-type="string">
            <text:p>Chavalav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oobii</text:p>
          </table:table-cell>
          <table:table-cell office:value-type="string">
            <text:p>(1, 1, 0, 3, 2, 1, 0)</text:p>
          </table:table-cell>
          <table:table-cell office:value-type="string">
            <text:p>poobii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Zarberian</text:p>
          </table:table-cell>
          <table:table-cell office:value-type="string">
            <text:p>(1, 0, 1, 3, 1, 2, 0)</text:p>
          </table:table-cell>
          <table:table-cell office:value-type="string">
            <text:p>Zarberian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Franknbean</text:p>
          </table:table-cell>
          <table:table-cell office:value-type="string">
            <text:p>(0, 0, 0, 0, 0, 0, 1)</text:p>
          </table:table-cell>
          <table:table-cell office:value-type="string">
            <text:p>Franknbea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Viri</text:p>
          </table:table-cell>
          <table:table-cell office:value-type="string">
            <text:p>(0, 0, 0, 0, 0, 0, 1)</text:p>
          </table:table-cell>
          <table:table-cell office:value-type="string">
            <text:p>Viri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JediSmash</text:p>
          </table:table-cell>
          <table:table-cell office:value-type="string">
            <text:p>(0, 0, 0, 0, 0, 0, 1)</text:p>
          </table:table-cell>
          <table:table-cell office:value-type="string">
            <text:p>JediSmash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TAINLED" table:style-name="ta6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captainLED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econd Floor Basement</text:p>
          </table:table-cell>
          <table:table-cell office:value-type="string">
            <text:p>(1, 0, 1, 2, 0, 2, 0)</text:p>
          </table:table-cell>
          <table:table-cell office:value-type="string">
            <text:p>Second Floor Basemen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EWGF</text:p>
          </table:table-cell>
          <table:table-cell office:value-type="string">
            <text:p>(1, 0, 1, 2, 0, 2, 0)</text:p>
          </table:table-cell>
          <table:table-cell office:value-type="string">
            <text:p>EWGF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WGF" table:style-name="ta6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EWGF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neakers O'Toole</text:p>
          </table:table-cell>
          <table:table-cell office:value-type="string">
            <text:p>(1, 1, 0, 2, 2, 0, 0)</text:p>
          </table:table-cell>
          <table:table-cell office:value-type="string">
            <text:p>Sneakers O'Tool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aptainLED</text:p>
          </table:table-cell>
          <table:table-cell office:value-type="string">
            <text:p>(1, 1, 0, 2, 2, 0, 0)</text:p>
          </table:table-cell>
          <table:table-cell office:value-type="string">
            <text:p>captainLE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lucida</text:p>
          </table:table-cell>
          <table:table-cell office:value-type="string">
            <text:p>(1, 1, 0, 2, 2, 0, 0)</text:p>
          </table:table-cell>
          <table:table-cell office:value-type="string">
            <text:p>lucid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y Dad</text:p>
          </table:table-cell>
          <table:table-cell office:value-type="string">
            <text:p>(1, 0, 1, 2, 0, 2, 0)</text:p>
          </table:table-cell>
          <table:table-cell office:value-type="string">
            <text:p>My Da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EAKERS O'TOOLE" table:style-name="ta6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neakers O'Toole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EWGF</text:p>
          </table:table-cell>
          <table:table-cell office:value-type="string">
            <text:p>(1, 0, 1, 2, 0, 2, 0)</text:p>
          </table:table-cell>
          <table:table-cell office:value-type="string">
            <text:p>EWGF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econd Floor Basement</text:p>
          </table:table-cell>
          <table:table-cell office:value-type="string">
            <text:p>(1, 0, 1, 2, 0, 2, 0)</text:p>
          </table:table-cell>
          <table:table-cell office:value-type="string">
            <text:p>Second Floor Basemen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TheMan</text:p>
          </table:table-cell>
          <table:table-cell office:value-type="string">
            <text:p>(0, 0, 0, 0, 0, 0, 1)</text:p>
          </table:table-cell>
          <table:table-cell office:value-type="string">
            <text:p>DTheMa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Newo</text:p>
          </table:table-cell>
          <table:table-cell office:value-type="string">
            <text:p>(1, 0, 1, 2, 0, 2, 0)</text:p>
          </table:table-cell>
          <table:table-cell office:value-type="string">
            <text:p>Newo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Viprskreen</text:p>
          </table:table-cell>
          <table:table-cell office:value-type="string">
            <text:p>(0, 0, 0, 0, 0, 0, 1)</text:p>
          </table:table-cell>
          <table:table-cell office:value-type="string">
            <text:p>Viprskree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r-Huge</text:p>
          </table:table-cell>
          <table:table-cell office:value-type="string">
            <text:p>(1, 0, 1, 2, 0, 2, 0)</text:p>
          </table:table-cell>
          <table:table-cell office:value-type="string">
            <text:p>Sr-Hug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EternalBran</text:p>
          </table:table-cell>
          <table:table-cell office:value-type="string">
            <text:p>(1, 0, 1, 3, 1, 2, 0)</text:p>
          </table:table-cell>
          <table:table-cell office:value-type="string">
            <text:p>EternalBran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CarlJT</text:p>
          </table:table-cell>
          <table:table-cell office:value-type="string">
            <text:p>(1, 0, 1, 2, 0, 2, 0)</text:p>
          </table:table-cell>
          <table:table-cell office:value-type="string">
            <text:p>CarlJ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WLIN" table:style-name="ta7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Bowli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chef</text:p>
          </table:table-cell>
          <table:table-cell office:value-type="string">
            <text:p>(1, 1, 0, 2, 2, 0, 0)</text:p>
          </table:table-cell>
          <table:table-cell office:value-type="string">
            <text:p>Schef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lucida</text:p>
          </table:table-cell>
          <table:table-cell office:value-type="string">
            <text:p>(1, 1, 0, 2, 2, 0, 0)</text:p>
          </table:table-cell>
          <table:table-cell office:value-type="string">
            <text:p>lucid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Zaniel</text:p>
          </table:table-cell>
          <table:table-cell office:value-type="string">
            <text:p>(1, 1, 0, 2, 2, 0, 0)</text:p>
          </table:table-cell>
          <table:table-cell office:value-type="string">
            <text:p>Zanie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juno</text:p>
          </table:table-cell>
          <table:table-cell office:value-type="string">
            <text:p>(1, 1, 0, 3, 2, 1, 0)</text:p>
          </table:table-cell>
          <table:table-cell office:value-type="string">
            <text:p>juno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Seal King Barbaros</text:p>
          </table:table-cell>
          <table:table-cell office:value-type="string">
            <text:p>(1, 0, 1, 2, 0, 2, 0)</text:p>
          </table:table-cell>
          <table:table-cell office:value-type="string">
            <text:p>Seal King Barbaro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HEF" table:style-name="ta7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chef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Bowlin</text:p>
          </table:table-cell>
          <table:table-cell office:value-type="string">
            <text:p>(1, 0, 1, 2, 0, 2, 0)</text:p>
          </table:table-cell>
          <table:table-cell office:value-type="string">
            <text:p>Bowli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Eliastar</text:p>
          </table:table-cell>
          <table:table-cell office:value-type="string">
            <text:p>(1, 0, 1, 2, 0, 2, 0)</text:p>
          </table:table-cell>
          <table:table-cell office:value-type="string">
            <text:p>Eliastar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Zetsubo</text:p>
          </table:table-cell>
          <table:table-cell office:value-type="string">
            <text:p>(1, 0, 1, 2, 0, 2, 0)</text:p>
          </table:table-cell>
          <table:table-cell office:value-type="string">
            <text:p>Zetsubo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rNubs</text:p>
          </table:table-cell>
          <table:table-cell office:value-type="string">
            <text:p>(1, 0, 1, 2, 0, 2, 0)</text:p>
          </table:table-cell>
          <table:table-cell office:value-type="string">
            <text:p>MrNub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ST_A_TARRASQUE" table:style-name="ta7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Just_A_Tarrasque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DiRT</text:p>
          </table:table-cell>
          <table:table-cell office:value-type="string">
            <text:p>(1, 1, 0, 2, 2, 0, 0)</text:p>
          </table:table-cell>
          <table:table-cell office:value-type="string">
            <text:p>DiR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loax</text:p>
          </table:table-cell>
          <table:table-cell office:value-type="string">
            <text:p>(1, 0, 1, 2, 0, 2, 0)</text:p>
          </table:table-cell>
          <table:table-cell office:value-type="string">
            <text:p>Koloa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Wiccan</text:p>
          </table:table-cell>
          <table:table-cell office:value-type="string">
            <text:p>(0, 0, 0, 0, 0, 0, 1)</text:p>
          </table:table-cell>
          <table:table-cell office:value-type="string">
            <text:p>Wicca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omehowNerdy</text:p>
          </table:table-cell>
          <table:table-cell office:value-type="string">
            <text:p>(1, 0, 1, 3, 1, 2, 0)</text:p>
          </table:table-cell>
          <table:table-cell office:value-type="string">
            <text:p>SomehowNerdy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1, 0, 1, 2, 0, 2, 0)</text:p>
          </table:table-cell>
          <table:table-cell office:value-type="string">
            <text:p>xXx_PeterGokuGriffin_xX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erk</text:p>
          </table:table-cell>
          <table:table-cell office:value-type="string">
            <text:p>(1, 0, 1, 2, 0, 2, 0)</text:p>
          </table:table-cell>
          <table:table-cell office:value-type="string">
            <text:p>der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Viprskreen</text:p>
          </table:table-cell>
          <table:table-cell office:value-type="string">
            <text:p>(1, 0, 1, 2, 0, 2, 0)</text:p>
          </table:table-cell>
          <table:table-cell office:value-type="string">
            <text:p>Viprskree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AOS</text:p>
          </table:table-cell>
          <table:table-cell office:value-type="string">
            <text:p>(1, 1, 0, 2, 2, 0, 0)</text:p>
          </table:table-cell>
          <table:table-cell office:value-type="string">
            <text:p>TAO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1, 0, 1, 3, 1, 2, 0)</text:p>
          </table:table-cell>
          <table:table-cell office:value-type="string">
            <text:p>DarthCJ8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T" table:style-name="ta7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DiRT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Just_A_Tarrasque</text:p>
          </table:table-cell>
          <table:table-cell office:value-type="string">
            <text:p>(1, 0, 1, 2, 0, 2, 0)</text:p>
          </table:table-cell>
          <table:table-cell office:value-type="string">
            <text:p>Just_A_Tarrasqu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ynvy</text:p>
          </table:table-cell>
          <table:table-cell office:value-type="string">
            <text:p>(0, 0, 0, 0, 0, 0, 1)</text:p>
          </table:table-cell>
          <table:table-cell office:value-type="string">
            <text:p>Synv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Zaniel</text:p>
          </table:table-cell>
          <table:table-cell office:value-type="string">
            <text:p>(1, 0, 1, 2, 0, 2, 0)</text:p>
          </table:table-cell>
          <table:table-cell office:value-type="string">
            <text:p>Zani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UpChuck</text:p>
          </table:table-cell>
          <table:table-cell office:value-type="string">
            <text:p>(1, 0, 1, 2, 0, 2, 0)</text:p>
          </table:table-cell>
          <table:table-cell office:value-type="string">
            <text:p>UpChuc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lean</text:p>
          </table:table-cell>
          <table:table-cell office:value-type="string">
            <text:p>(1, 0, 1, 2, 0, 2, 0)</text:p>
          </table:table-cell>
          <table:table-cell office:value-type="string">
            <text:p>clea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NO" table:style-name="ta7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juno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a_Successor</text:p>
          </table:table-cell>
          <table:table-cell office:value-type="string">
            <text:p>(1, 1, 0, 2, 2, 0, 0)</text:p>
          </table:table-cell>
          <table:table-cell office:value-type="string">
            <text:p>a_Successo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omehowNerdy</text:p>
          </table:table-cell>
          <table:table-cell office:value-type="string">
            <text:p>(1, 1, 0, 3, 2, 1, 0)</text:p>
          </table:table-cell>
          <table:table-cell office:value-type="string">
            <text:p>SomehowNerdy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Koloax</text:p>
          </table:table-cell>
          <table:table-cell office:value-type="string">
            <text:p>(1, 0, 1, 2, 0, 2, 0)</text:p>
          </table:table-cell>
          <table:table-cell office:value-type="string">
            <text:p>Koloa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econd Floor Basement</text:p>
          </table:table-cell>
          <table:table-cell office:value-type="string">
            <text:p>(1, 1, 0, 3, 2, 1, 0)</text:p>
          </table:table-cell>
          <table:table-cell office:value-type="string">
            <text:p>Second Floor Basement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Bowlin</text:p>
          </table:table-cell>
          <table:table-cell office:value-type="string">
            <text:p>(1, 0, 1, 3, 1, 2, 0)</text:p>
          </table:table-cell>
          <table:table-cell office:value-type="string">
            <text:p>Bowlin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MrNubs</text:p>
          </table:table-cell>
          <table:table-cell office:value-type="string">
            <text:p>(1, 0, 1, 3, 1, 2, 0)</text:p>
          </table:table-cell>
          <table:table-cell office:value-type="string">
            <text:p>MrNubs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Fapple</text:p>
          </table:table-cell>
          <table:table-cell office:value-type="string">
            <text:p>(2, 2, 0, 4, 4, 0, 0)</text:p>
          </table:table-cell>
          <table:table-cell office:value-type="string">
            <text:p>Fapple</text:p>
          </table:table-cell>
          <table:table-cell office:value-type="string">
            <text:p>(2, 2, 0, 4, 4, 0, 0)</text:p>
          </table:table-cell>
          <table:table-cell table:number-columns-repeated="1020"/>
        </table:table-row>
        <table:table-row table:style-name="ro1">
          <table:table-cell office:value-type="string">
            <text:p>StepKnightUp</text:p>
          </table:table-cell>
          <table:table-cell office:value-type="string">
            <text:p>(1, 1, 0, 3, 2, 1, 0)</text:p>
          </table:table-cell>
          <table:table-cell office:value-type="string">
            <text:p>StepKnightUp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1, 1, 0, 3, 2, 1, 0)</text:p>
          </table:table-cell>
          <table:table-cell office:value-type="string">
            <text:p>Twilight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0, 1, 3, 1, 2, 0)</text:p>
          </table:table-cell>
          <table:table-cell office:value-type="string">
            <text:p>Hungrybox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0, 0, 0, 0, 0, 0, 1)</text:p>
          </table:table-cell>
          <table:table-cell office:value-type="string">
            <text:p>WonderBread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Manzana</text:p>
          </table:table-cell>
          <table:table-cell office:value-type="string">
            <text:p>(1, 0, 1, 3, 1, 2, 0)</text:p>
          </table:table-cell>
          <table:table-cell office:value-type="string">
            <text:p>Manzana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ChezFarach001</text:p>
          </table:table-cell>
          <table:table-cell office:value-type="string">
            <text:p>(1, 0, 1, 2, 0, 2, 0)</text:p>
          </table:table-cell>
          <table:table-cell office:value-type="string">
            <text:p>ChezFarach001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Hazywazy</text:p>
          </table:table-cell>
          <table:table-cell office:value-type="string">
            <text:p>(0, 0, 0, 0, 0, 0, 1)</text:p>
          </table:table-cell>
          <table:table-cell office:value-type="string">
            <text:p>Hazywaz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Navé</text:p>
          </table:table-cell>
          <table:table-cell office:value-type="string">
            <text:p>(1, 0, 1, 2, 0, 2, 0)</text:p>
          </table:table-cell>
          <table:table-cell office:value-type="string">
            <text:p>Navé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laine</text:p>
          </table:table-cell>
          <table:table-cell office:value-type="string">
            <text:p>(1, 1, 0, 2, 2, 0, 0)</text:p>
          </table:table-cell>
          <table:table-cell office:value-type="string">
            <text:p>Blain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Luffysupreme</text:p>
          </table:table-cell>
          <table:table-cell office:value-type="string">
            <text:p>(1, 1, 0, 2, 2, 0, 0)</text:p>
          </table:table-cell>
          <table:table-cell office:value-type="string">
            <text:p>Luffysuprem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fiend</text:p>
          </table:table-cell>
          <table:table-cell office:value-type="string">
            <text:p>(1, 0, 1, 3, 1, 2, 0)</text:p>
          </table:table-cell>
          <table:table-cell office:value-type="string">
            <text:p>fiend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_SUCCESSOR" table:style-name="ta7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a_Successor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juno</text:p>
          </table:table-cell>
          <table:table-cell office:value-type="string">
            <text:p>(1, 0, 1, 2, 0, 2, 0)</text:p>
          </table:table-cell>
          <table:table-cell office:value-type="string">
            <text:p>juno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Zaniel</text:p>
          </table:table-cell>
          <table:table-cell office:value-type="string">
            <text:p>(1, 0, 1, 2, 0, 2, 0)</text:p>
          </table:table-cell>
          <table:table-cell office:value-type="string">
            <text:p>Zani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Ginger</text:p>
          </table:table-cell>
          <table:table-cell office:value-type="string">
            <text:p>(1, 0, 1, 2, 0, 2, 1)</text:p>
          </table:table-cell>
          <table:table-cell office:value-type="string">
            <text:p>Ginger</text:p>
          </table:table-cell>
          <table:table-cell office:value-type="string">
            <text:p>(1, 0, 1, 2, 0, 2, 1)</text:p>
          </table:table-cell>
          <table:table-cell table:number-columns-repeated="1020"/>
        </table:table-row>
        <table:table-row table:style-name="ro1">
          <table:table-cell office:value-type="string">
            <text:p>Manzana</text:p>
          </table:table-cell>
          <table:table-cell office:value-type="string">
            <text:p>(1, 0, 1, 2, 0, 2, 0)</text:p>
          </table:table-cell>
          <table:table-cell office:value-type="string">
            <text:p>Manzan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0, 0, 0, 0, 0, 0, 1)</text:p>
          </table:table-cell>
          <table:table-cell office:value-type="string">
            <text:p>Chavalava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1, 0, 1, 2, 0, 2, 0)</text:p>
          </table:table-cell>
          <table:table-cell office:value-type="string">
            <text:p>McFunn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acky</text:p>
          </table:table-cell>
          <table:table-cell office:value-type="string">
            <text:p>(1, 0, 1, 3, 1, 2, 0)</text:p>
          </table:table-cell>
          <table:table-cell office:value-type="string">
            <text:p>Packy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Camdne</text:p>
          </table:table-cell>
          <table:table-cell office:value-type="string">
            <text:p>(1, 1, 0, 2, 2, 0, 0)</text:p>
          </table:table-cell>
          <table:table-cell office:value-type="string">
            <text:p>Camdn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Jredfire</text:p>
          </table:table-cell>
          <table:table-cell office:value-type="string">
            <text:p>(1, 1, 0, 2, 2, 0, 0)</text:p>
          </table:table-cell>
          <table:table-cell office:value-type="string">
            <text:p>Jredfir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PIC_GABRIEL" table:style-name="ta7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Epic_Gabriel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Zaniel</text:p>
          </table:table-cell>
          <table:table-cell office:value-type="string">
            <text:p>(1, 1, 0, 2, 2, 0, 0)</text:p>
          </table:table-cell>
          <table:table-cell office:value-type="string">
            <text:p>Zanie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y Dad</text:p>
          </table:table-cell>
          <table:table-cell office:value-type="string">
            <text:p>(1, 1, 0, 2, 2, 0, 0)</text:p>
          </table:table-cell>
          <table:table-cell office:value-type="string">
            <text:p>My Da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2, 2, 0, 4, 4, 0, 0)</text:p>
          </table:table-cell>
          <table:table-cell office:value-type="string">
            <text:p>Squishy~</text:p>
          </table:table-cell>
          <table:table-cell office:value-type="string">
            <text:p>(2, 2, 0, 4, 4, 0, 0)</text:p>
          </table:table-cell>
          <table:table-cell table:number-columns-repeated="1020"/>
        </table:table-row>
        <table:table-row table:style-name="ro1">
          <table:table-cell office:value-type="string">
            <text:p>Koloax</text:p>
          </table:table-cell>
          <table:table-cell office:value-type="string">
            <text:p>(1, 1, 0, 3, 2, 1, 0)</text:p>
          </table:table-cell>
          <table:table-cell office:value-type="string">
            <text:p>Koloax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5, 3, 2, 21, 11, 10, 0)</text:p>
          </table:table-cell>
          <table:table-cell office:value-type="string">
            <text:p>BeastModePaul</text:p>
          </table:table-cell>
          <table:table-cell office:value-type="string">
            <text:p>(5, 3, 2, 21, 11, 10, 0)</text:p>
          </table:table-cell>
          <table:table-cell table:number-columns-repeated="1020"/>
        </table:table-row>
        <table:table-row table:style-name="ro1">
          <table:table-cell office:value-type="string">
            <text:p>Zomba</text:p>
          </table:table-cell>
          <table:table-cell office:value-type="string">
            <text:p>(1, 0, 1, 4, 1, 3, 0)</text:p>
          </table:table-cell>
          <table:table-cell office:value-type="string">
            <text:p>Zomba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1, 1, 0, 3, 3, 0, 0)</text:p>
          </table:table-cell>
          <table:table-cell office:value-type="string">
            <text:p>Benji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Karu!</text:p>
          </table:table-cell>
          <table:table-cell office:value-type="string">
            <text:p>(3, 2, 1, 11, 7, 4, 0)</text:p>
          </table:table-cell>
          <table:table-cell office:value-type="string">
            <text:p>Karu!</text:p>
          </table:table-cell>
          <table:table-cell office:value-type="string">
            <text:p>(3, 2, 1, 11, 7, 4, 0)</text:p>
          </table:table-cell>
          <table:table-cell table:number-columns-repeated="1020"/>
        </table:table-row>
        <table:table-row table:style-name="ro1">
          <table:table-cell office:value-type="string">
            <text:p>Painus</text:p>
          </table:table-cell>
          <table:table-cell office:value-type="string">
            <text:p>(1, 1, 0, 2, 2, 0, 0)</text:p>
          </table:table-cell>
          <table:table-cell office:value-type="string">
            <text:p>Painu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hezFarach001</text:p>
          </table:table-cell>
          <table:table-cell office:value-type="string">
            <text:p>(1, 1, 0, 2, 2, 0, 0)</text:p>
          </table:table-cell>
          <table:table-cell office:value-type="string">
            <text:p>ChezFarach001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fiend</text:p>
          </table:table-cell>
          <table:table-cell office:value-type="string">
            <text:p>(1, 1, 0, 2, 2, 0, 0)</text:p>
          </table:table-cell>
          <table:table-cell office:value-type="string">
            <text:p>fien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ewo</text:p>
          </table:table-cell>
          <table:table-cell office:value-type="string">
            <text:p>(1, 0, 1, 3, 1, 2, 0)</text:p>
          </table:table-cell>
          <table:table-cell office:value-type="string">
            <text:p>Newo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1, 0, 2, 2, 0, 0)</text:p>
          </table:table-cell>
          <table:table-cell office:value-type="string">
            <text:p>Hungrybo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arZ</text:p>
          </table:table-cell>
          <table:table-cell office:value-type="string">
            <text:p>(1, 1, 0, 3, 3, 0, 0)</text:p>
          </table:table-cell>
          <table:table-cell office:value-type="string">
            <text:p>StarZ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DM</text:p>
          </table:table-cell>
          <table:table-cell office:value-type="string">
            <text:p>(1, 0, 1, 3, 0, 3, 0)</text:p>
          </table:table-cell>
          <table:table-cell office:value-type="string">
            <text:p>DM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Blaine</text:p>
          </table:table-cell>
          <table:table-cell office:value-type="string">
            <text:p>(1, 1, 0, 2, 2, 0, 0)</text:p>
          </table:table-cell>
          <table:table-cell office:value-type="string">
            <text:p>Blain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1, 1, 0, 2, 2, 0, 0)</text:p>
          </table:table-cell>
          <table:table-cell office:value-type="string">
            <text:p>Strobic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icccy</text:p>
          </table:table-cell>
          <table:table-cell office:value-type="string">
            <text:p>(1, 0, 1, 2, 0, 2, 0)</text:p>
          </table:table-cell>
          <table:table-cell office:value-type="string">
            <text:p>Sticcc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ominator</text:p>
          </table:table-cell>
          <table:table-cell office:value-type="string">
            <text:p>(2, 0, 2, 9, 3, 6, 0)</text:p>
          </table:table-cell>
          <table:table-cell office:value-type="string">
            <text:p>Dominator</text:p>
          </table:table-cell>
          <table:table-cell office:value-type="string">
            <text:p>(2, 0, 2, 9, 3, 6, 0)</text:p>
          </table:table-cell>
          <table:table-cell table:number-columns-repeated="1020"/>
        </table:table-row>
        <table:table-row table:style-name="ro1">
          <table:table-cell office:value-type="string">
            <text:p>Manzana</text:p>
          </table:table-cell>
          <table:table-cell office:value-type="string">
            <text:p>(1, 1, 0, 2, 2, 0, 0)</text:p>
          </table:table-cell>
          <table:table-cell office:value-type="string">
            <text:p>Manzan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adera</text:p>
          </table:table-cell>
          <table:table-cell office:value-type="string">
            <text:p>(1, 1, 0, 5, 3, 2, 0)</text:p>
          </table:table-cell>
          <table:table-cell office:value-type="string">
            <text:p>Madera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2, 2, 0, 7, 6, 1, 0)</text:p>
          </table:table-cell>
          <table:table-cell office:value-type="string">
            <text:p>Shaine</text:p>
          </table:table-cell>
          <table:table-cell office:value-type="string">
            <text:p>(2, 2, 0, 7, 6, 1, 0)</text:p>
          </table:table-cell>
          <table:table-cell table:number-columns-repeated="1020"/>
        </table:table-row>
        <table:table-row table:style-name="ro1">
          <table:table-cell office:value-type="string">
            <text:p>Aaron</text:p>
          </table:table-cell>
          <table:table-cell office:value-type="string">
            <text:p>(1, 1, 0, 3, 3, 0, 0)</text:p>
          </table:table-cell>
          <table:table-cell office:value-type="string">
            <text:p>Aaron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BooBell</text:p>
          </table:table-cell>
          <table:table-cell office:value-type="string">
            <text:p>(1, 1, 0, 2, 2, 0, 0)</text:p>
          </table:table-cell>
          <table:table-cell office:value-type="string">
            <text:p>BooBel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ellonian</text:p>
          </table:table-cell>
          <table:table-cell office:value-type="string">
            <text:p>(1, 1, 0, 2, 2, 0, 0)</text:p>
          </table:table-cell>
          <table:table-cell office:value-type="string">
            <text:p>Pellonia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1, 1, 0, 2, 2, 0, 0)</text:p>
          </table:table-cell>
          <table:table-cell office:value-type="string">
            <text:p>Plumme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reezy 400</text:p>
          </table:table-cell>
          <table:table-cell office:value-type="string">
            <text:p>(1, 1, 0, 2, 2, 0, 0)</text:p>
          </table:table-cell>
          <table:table-cell office:value-type="string">
            <text:p>Breezy 400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be</text:p>
          </table:table-cell>
          <table:table-cell office:value-type="string">
            <text:p>(1, 0, 1, 3, 0, 3, 0)</text:p>
          </table:table-cell>
          <table:table-cell office:value-type="string">
            <text:p>Kobe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Reticent</text:p>
          </table:table-cell>
          <table:table-cell office:value-type="string">
            <text:p>(1, 1, 0, 2, 2, 0, 0)</text:p>
          </table:table-cell>
          <table:table-cell office:value-type="string">
            <text:p>Reticen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(1, 1, 0, 3, 2, 1, 0)</text:p>
          </table:table-cell>
          <table:table-cell office:value-type="string">
            <text:p>Dingodile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lucida</text:p>
          </table:table-cell>
          <table:table-cell office:value-type="string">
            <text:p>(1, 1, 0, 2, 2, 0, 0)</text:p>
          </table:table-cell>
          <table:table-cell office:value-type="string">
            <text:p>lucid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1, 1, 0, 3, 2, 1, 0)</text:p>
          </table:table-cell>
          <table:table-cell office:value-type="string">
            <text:p>WonderBread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noemiglazer67</text:p>
          </table:table-cell>
          <table:table-cell office:value-type="string">
            <text:p>(1, 1, 0, 3, 2, 1, 0)</text:p>
          </table:table-cell>
          <table:table-cell office:value-type="string">
            <text:p>noemiglazer67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ESAM</text:p>
          </table:table-cell>
          <table:table-cell office:value-type="string">
            <text:p>(1, 1, 0, 5, 3, 2, 0)</text:p>
          </table:table-cell>
          <table:table-cell office:value-type="string">
            <text:p>ESAM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 DAD" table:style-name="ta7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My Dad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ynvy</text:p>
          </table:table-cell>
          <table:table-cell office:value-type="string">
            <text:p>(0, 0, 0, 0, 0, 0, 1)</text:p>
          </table:table-cell>
          <table:table-cell office:value-type="string">
            <text:p>Synv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EWGF</text:p>
          </table:table-cell>
          <table:table-cell office:value-type="string">
            <text:p>(1, 1, 0, 2, 2, 0, 0)</text:p>
          </table:table-cell>
          <table:table-cell office:value-type="string">
            <text:p>EWGF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1, 0, 1, 2, 0, 2, 0)</text:p>
          </table:table-cell>
          <table:table-cell office:value-type="string">
            <text:p>McFunn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ap</text:p>
          </table:table-cell>
          <table:table-cell office:value-type="string">
            <text:p>(1, 1, 0, 2, 2, 0, 0)</text:p>
          </table:table-cell>
          <table:table-cell office:value-type="string">
            <text:p>nap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loax</text:p>
          </table:table-cell>
          <table:table-cell office:value-type="string">
            <text:p>(1, 0, 1, 3, 1, 2, 0)</text:p>
          </table:table-cell>
          <table:table-cell office:value-type="string">
            <text:p>Koloax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Axl</text:p>
          </table:table-cell>
          <table:table-cell office:value-type="string">
            <text:p>(1, 1, 0, 2, 2, 0, 0)</text:p>
          </table:table-cell>
          <table:table-cell office:value-type="string">
            <text:p>Ax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1, 0, 1, 3, 1, 2, 0)</text:p>
          </table:table-cell>
          <table:table-cell office:value-type="string">
            <text:p>HaydenEatsShrimp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Minimaxify</text:p>
          </table:table-cell>
          <table:table-cell office:value-type="string">
            <text:p>(1, 0, 1, 2, 0, 2, 0)</text:p>
          </table:table-cell>
          <table:table-cell office:value-type="string">
            <text:p>Minimaxif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Ginger</text:p>
          </table:table-cell>
          <table:table-cell office:value-type="string">
            <text:p>(0, 0, 0, 0, 0, 0, 1)</text:p>
          </table:table-cell>
          <table:table-cell office:value-type="string">
            <text:p>Ginger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Fapple</text:p>
          </table:table-cell>
          <table:table-cell office:value-type="string">
            <text:p>(1, 1, 0, 2, 2, 0, 0)</text:p>
          </table:table-cell>
          <table:table-cell office:value-type="string">
            <text:p>Fappl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ispanic! at the Disco</text:p>
          </table:table-cell>
          <table:table-cell office:value-type="string">
            <text:p>(1, 0, 1, 2, 0, 2, 0)</text:p>
          </table:table-cell>
          <table:table-cell office:value-type="string">
            <text:p>Hispanic! at the Disco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JediSmash</text:p>
          </table:table-cell>
          <table:table-cell office:value-type="string">
            <text:p>(1, 1, 0, 2, 2, 0, 0)</text:p>
          </table:table-cell>
          <table:table-cell office:value-type="string">
            <text:p>JediSmas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rymlynn</text:p>
          </table:table-cell>
          <table:table-cell office:value-type="string">
            <text:p>(1, 0, 1, 2, 0, 2, 0)</text:p>
          </table:table-cell>
          <table:table-cell office:value-type="string">
            <text:p>Grymlyn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JDQ05</text:p>
          </table:table-cell>
          <table:table-cell office:value-type="string">
            <text:p>(1, 1, 0, 3, 2, 1, 0)</text:p>
          </table:table-cell>
          <table:table-cell office:value-type="string">
            <text:p>JDQ05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The Chuckster</text:p>
          </table:table-cell>
          <table:table-cell office:value-type="string">
            <text:p>(1, 0, 1, 2, 0, 2, 0)</text:p>
          </table:table-cell>
          <table:table-cell office:value-type="string">
            <text:p>The Chuckster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oemiglazer67</text:p>
          </table:table-cell>
          <table:table-cell office:value-type="string">
            <text:p>(1, 0, 1, 2, 0, 2, 0)</text:p>
          </table:table-cell>
          <table:table-cell office:value-type="string">
            <text:p>noemiglazer67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A-K SiN</text:p>
          </table:table-cell>
          <table:table-cell office:value-type="string">
            <text:p>(1, 1, 0, 2, 2, 0, 0)</text:p>
          </table:table-cell>
          <table:table-cell office:value-type="string">
            <text:p>A-K Si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yntax</text:p>
          </table:table-cell>
          <table:table-cell office:value-type="string">
            <text:p>(1, 1, 0, 2, 2, 0, 0)</text:p>
          </table:table-cell>
          <table:table-cell office:value-type="string">
            <text:p>synta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1, 0, 1, 2, 0, 2, 0)</text:p>
          </table:table-cell>
          <table:table-cell office:value-type="string">
            <text:p>Twiligh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CFUNNY" table:style-name="ta7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McFunny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Eliastar</text:p>
          </table:table-cell>
          <table:table-cell office:value-type="string">
            <text:p>(1, 1, 0, 2, 2, 0, 0)</text:p>
          </table:table-cell>
          <table:table-cell office:value-type="string">
            <text:p>Eliasta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2, 0, 2, 6, 2, 4, 0)</text:p>
          </table:table-cell>
          <table:table-cell office:value-type="string">
            <text:p>Squishy~</text:p>
          </table:table-cell>
          <table:table-cell office:value-type="string">
            <text:p>(2, 0, 2, 6, 2, 4, 0)</text:p>
          </table:table-cell>
          <table:table-cell table:number-columns-repeated="1020"/>
        </table:table-row>
        <table:table-row table:style-name="ro1">
          <table:table-cell office:value-type="string">
            <text:p>SomehowNerdy</text:p>
          </table:table-cell>
          <table:table-cell office:value-type="string">
            <text:p>(1, 1, 0, 3, 2, 1, 0)</text:p>
          </table:table-cell>
          <table:table-cell office:value-type="string">
            <text:p>SomehowNerdy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My Dad</text:p>
          </table:table-cell>
          <table:table-cell office:value-type="string">
            <text:p>(1, 1, 0, 2, 2, 0, 0)</text:p>
          </table:table-cell>
          <table:table-cell office:value-type="string">
            <text:p>My Da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reezy 400</text:p>
          </table:table-cell>
          <table:table-cell office:value-type="string">
            <text:p>(2, 2, 0, 5, 4, 1, 0)</text:p>
          </table:table-cell>
          <table:table-cell office:value-type="string">
            <text:p>Breezy 400</text:p>
          </table:table-cell>
          <table:table-cell office:value-type="string">
            <text:p>(2, 2, 0, 5, 4, 1, 0)</text:p>
          </table:table-cell>
          <table:table-cell table:number-columns-repeated="1020"/>
        </table:table-row>
        <table:table-row table:style-name="ro1">
          <table:table-cell office:value-type="string">
            <text:p>ChezFarach001</text:p>
          </table:table-cell>
          <table:table-cell office:value-type="string">
            <text:p>(1, 1, 0, 2, 2, 0, 0)</text:p>
          </table:table-cell>
          <table:table-cell office:value-type="string">
            <text:p>ChezFarach001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sysilex</text:p>
          </table:table-cell>
          <table:table-cell office:value-type="string">
            <text:p>(1, 0, 1, 2, 0, 2, 0)</text:p>
          </table:table-cell>
          <table:table-cell office:value-type="string">
            <text:p>Psysile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a_Successor</text:p>
          </table:table-cell>
          <table:table-cell office:value-type="string">
            <text:p>(1, 1, 0, 2, 2, 0, 0)</text:p>
          </table:table-cell>
          <table:table-cell office:value-type="string">
            <text:p>a_Successo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inimaxify</text:p>
          </table:table-cell>
          <table:table-cell office:value-type="string">
            <text:p>(1, 1, 0, 3, 2, 1, 0)</text:p>
          </table:table-cell>
          <table:table-cell office:value-type="string">
            <text:p>Minimaxify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Manzana</text:p>
          </table:table-cell>
          <table:table-cell office:value-type="string">
            <text:p>(1, 0, 1, 3, 1, 2, 0)</text:p>
          </table:table-cell>
          <table:table-cell office:value-type="string">
            <text:p>Manzana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JDQ05</text:p>
          </table:table-cell>
          <table:table-cell office:value-type="string">
            <text:p>(1, 1, 0, 2, 2, 0, 0)</text:p>
          </table:table-cell>
          <table:table-cell office:value-type="string">
            <text:p>JDQ05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loax</text:p>
          </table:table-cell>
          <table:table-cell office:value-type="string">
            <text:p>(1, 0, 1, 2, 0, 2, 0)</text:p>
          </table:table-cell>
          <table:table-cell office:value-type="string">
            <text:p>Koloa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Ginger</text:p>
          </table:table-cell>
          <table:table-cell office:value-type="string">
            <text:p>(1, 1, 0, 3, 2, 1, 0)</text:p>
          </table:table-cell>
          <table:table-cell office:value-type="string">
            <text:p>Ginger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1, 1, 0, 2, 2, 0, 0)</text:p>
          </table:table-cell>
          <table:table-cell office:value-type="string">
            <text:p>Chavalav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rymlynn</text:p>
          </table:table-cell>
          <table:table-cell office:value-type="string">
            <text:p>(1, 1, 0, 2, 2, 0, 0)</text:p>
          </table:table-cell>
          <table:table-cell office:value-type="string">
            <text:p>Grymlyn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lack Lemonade</text:p>
          </table:table-cell>
          <table:table-cell office:value-type="string">
            <text:p>(1, 1, 0, 2, 2, 0, 0)</text:p>
          </table:table-cell>
          <table:table-cell office:value-type="string">
            <text:p>Black Lemonad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Venikki</text:p>
          </table:table-cell>
          <table:table-cell office:value-type="string">
            <text:p>(1, 0, 1, 5, 2, 3, 0)</text:p>
          </table:table-cell>
          <table:table-cell office:value-type="string">
            <text:p>Venikki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World Jade Center</text:p>
          </table:table-cell>
          <table:table-cell office:value-type="string">
            <text:p>(1, 1, 0, 2, 2, 0, 0)</text:p>
          </table:table-cell>
          <table:table-cell office:value-type="string">
            <text:p>World Jade Cente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3, 3, 0, 7, 6, 1, 0)</text:p>
          </table:table-cell>
          <table:table-cell office:value-type="string">
            <text:p>HaydenEatsShrimp</text:p>
          </table:table-cell>
          <table:table-cell office:value-type="string">
            <text:p>(3, 3, 0, 7, 6, 1, 0)</text:p>
          </table:table-cell>
          <table:table-cell table:number-columns-repeated="1020"/>
        </table:table-row>
        <table:table-row table:style-name="ro1">
          <table:table-cell office:value-type="string">
            <text:p>BMoC</text:p>
          </table:table-cell>
          <table:table-cell office:value-type="string">
            <text:p>(1, 1, 0, 3, 2, 1, 0)</text:p>
          </table:table-cell>
          <table:table-cell office:value-type="string">
            <text:p>BMoC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LightningCam</text:p>
          </table:table-cell>
          <table:table-cell office:value-type="string">
            <text:p>(1, 0, 1, 2, 0, 2, 0)</text:p>
          </table:table-cell>
          <table:table-cell office:value-type="string">
            <text:p>LightningCa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1, 0, 1, 3, 1, 2, 0)</text:p>
          </table:table-cell>
          <table:table-cell office:value-type="string">
            <text:p>Bhand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TnKaos</text:p>
          </table:table-cell>
          <table:table-cell office:value-type="string">
            <text:p>(1, 1, 0, 2, 2, 0, 0)</text:p>
          </table:table-cell>
          <table:table-cell office:value-type="string">
            <text:p>TnKao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Anthzeny</text:p>
          </table:table-cell>
          <table:table-cell office:value-type="string">
            <text:p>(1, 1, 0, 3, 2, 1, 0)</text:p>
          </table:table-cell>
          <table:table-cell office:value-type="string">
            <text:p>Anthzeny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1, 0, 1, 2, 0, 2, 0)</text:p>
          </table:table-cell>
          <table:table-cell office:value-type="string">
            <text:p>Strobic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UISHY~" table:style-name="ta7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quishy~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econd Floor Basement</text:p>
          </table:table-cell>
          <table:table-cell office:value-type="string">
            <text:p>(1, 1, 0, 2, 2, 0, 0)</text:p>
          </table:table-cell>
          <table:table-cell office:value-type="string">
            <text:p>Second Floor Basemen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2, 2, 0, 6, 4, 2, 0)</text:p>
          </table:table-cell>
          <table:table-cell office:value-type="string">
            <text:p>McFunny</text:p>
          </table:table-cell>
          <table:table-cell office:value-type="string">
            <text:p>(2, 2, 0, 6, 4, 2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2, 0, 2, 4, 0, 4, 0)</text:p>
          </table:table-cell>
          <table:table-cell office:value-type="string">
            <text:p>Epic_Gabriel</text:p>
          </table:table-cell>
          <table:table-cell office:value-type="string">
            <text:p>(2, 0, 2, 4, 0, 4, 0)</text:p>
          </table:table-cell>
          <table:table-cell table:number-columns-repeated="1020"/>
        </table:table-row>
        <table:table-row table:style-name="ro1">
          <table:table-cell office:value-type="string">
            <text:p>poobii</text:p>
          </table:table-cell>
          <table:table-cell office:value-type="string">
            <text:p>(1, 1, 0, 3, 2, 1, 0)</text:p>
          </table:table-cell>
          <table:table-cell office:value-type="string">
            <text:p>poobii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Newo</text:p>
          </table:table-cell>
          <table:table-cell office:value-type="string">
            <text:p>(1, 0, 1, 2, 0, 2, 0)</text:p>
          </table:table-cell>
          <table:table-cell office:value-type="string">
            <text:p>Newo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arwhal</text:p>
          </table:table-cell>
          <table:table-cell office:value-type="string">
            <text:p>(1, 1, 0, 3, 2, 1, 0)</text:p>
          </table:table-cell>
          <table:table-cell office:value-type="string">
            <text:p>Narwhal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ESAM</text:p>
          </table:table-cell>
          <table:table-cell office:value-type="string">
            <text:p>(1, 0, 1, 2, 0, 2, 0)</text:p>
          </table:table-cell>
          <table:table-cell office:value-type="string">
            <text:p>ESA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otHbox</text:p>
          </table:table-cell>
          <table:table-cell office:value-type="string">
            <text:p>(1, 1, 0, 2, 2, 0, 0)</text:p>
          </table:table-cell>
          <table:table-cell office:value-type="string">
            <text:p>NotHbo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1, 1, 0, 2, 2, 0, 0)</text:p>
          </table:table-cell>
          <table:table-cell office:value-type="string">
            <text:p>xXx_PeterGokuGriffin_xX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essQuik</text:p>
          </table:table-cell>
          <table:table-cell office:value-type="string">
            <text:p>(1, 0, 1, 2, 0, 2, 0)</text:p>
          </table:table-cell>
          <table:table-cell office:value-type="string">
            <text:p>NessQui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ark4orce</text:p>
          </table:table-cell>
          <table:table-cell office:value-type="string">
            <text:p>(1, 1, 0, 2, 2, 0, 0)</text:p>
          </table:table-cell>
          <table:table-cell office:value-type="string">
            <text:p>Dark4orc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1, 1, 0, 2, 2, 0, 0)</text:p>
          </table:table-cell>
          <table:table-cell office:value-type="string">
            <text:p>HaydenEatsShrimp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Riku</text:p>
          </table:table-cell>
          <table:table-cell office:value-type="string">
            <text:p>(1, 0, 1, 2, 0, 2, 0)</text:p>
          </table:table-cell>
          <table:table-cell office:value-type="string">
            <text:p>Riku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rincessPopkorn</text:p>
          </table:table-cell>
          <table:table-cell office:value-type="string">
            <text:p>(1, 1, 0, 2, 2, 0, 0)</text:p>
          </table:table-cell>
          <table:table-cell office:value-type="string">
            <text:p>PrincessPopkor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urtles</text:p>
          </table:table-cell>
          <table:table-cell office:value-type="string">
            <text:p>(1, 0, 1, 3, 1, 2, 0)</text:p>
          </table:table-cell>
          <table:table-cell office:value-type="string">
            <text:p>Turtles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SundayGary</text:p>
          </table:table-cell>
          <table:table-cell office:value-type="string">
            <text:p>(1, 1, 0, 2, 2, 0, 0)</text:p>
          </table:table-cell>
          <table:table-cell office:value-type="string">
            <text:p>SundayGar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Freshness</text:p>
          </table:table-cell>
          <table:table-cell office:value-type="string">
            <text:p>(1, 1, 0, 2, 2, 0, 0)</text:p>
          </table:table-cell>
          <table:table-cell office:value-type="string">
            <text:p>Freshnes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1, 1, 0, 2, 2, 0, 0)</text:p>
          </table:table-cell>
          <table:table-cell office:value-type="string">
            <text:p>Vinny, The Lic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Zorrin</text:p>
          </table:table-cell>
          <table:table-cell office:value-type="string">
            <text:p>(1, 1, 0, 2, 2, 0, 0)</text:p>
          </table:table-cell>
          <table:table-cell office:value-type="string">
            <text:p>Zorri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Livan the Amnesty</text:p>
          </table:table-cell>
          <table:table-cell office:value-type="string">
            <text:p>(1, 0, 1, 2, 0, 2, 0)</text:p>
          </table:table-cell>
          <table:table-cell office:value-type="string">
            <text:p>Livan the Amnest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arlito</text:p>
          </table:table-cell>
          <table:table-cell office:value-type="string">
            <text:p>(1, 1, 0, 2, 2, 0, 0)</text:p>
          </table:table-cell>
          <table:table-cell office:value-type="string">
            <text:p>Carlit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1, 1, 0, 3, 2, 1, 0)</text:p>
          </table:table-cell>
          <table:table-cell office:value-type="string">
            <text:p>Benji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LightningCam</text:p>
          </table:table-cell>
          <table:table-cell office:value-type="string">
            <text:p>(1, 0, 1, 2, 0, 2, 0)</text:p>
          </table:table-cell>
          <table:table-cell office:value-type="string">
            <text:p>LightningCa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IRUSH</text:p>
          </table:table-cell>
          <table:table-cell office:value-type="string">
            <text:p>(1, 1, 0, 2, 2, 0, 0)</text:p>
          </table:table-cell>
          <table:table-cell office:value-type="string">
            <text:p>IRUS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MoC</text:p>
          </table:table-cell>
          <table:table-cell office:value-type="string">
            <text:p>(1, 1, 0, 3, 2, 1, 0)</text:p>
          </table:table-cell>
          <table:table-cell office:value-type="string">
            <text:p>BMoC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G</text:p>
          </table:table-cell>
          <table:table-cell office:value-type="string">
            <text:p>(1, 1, 0, 2, 2, 0, 0)</text:p>
          </table:table-cell>
          <table:table-cell office:value-type="string">
            <text:p>G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huckFug</text:p>
          </table:table-cell>
          <table:table-cell office:value-type="string">
            <text:p>(1, 0, 1, 2, 0, 2, 0)</text:p>
          </table:table-cell>
          <table:table-cell office:value-type="string">
            <text:p>ChuckFug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(1, 1, 0, 3, 2, 1, 0)</text:p>
          </table:table-cell>
          <table:table-cell office:value-type="string">
            <text:p>SamersonT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Lucky</text:p>
          </table:table-cell>
          <table:table-cell office:value-type="string">
            <text:p>(1, 0, 1, 2, 0, 2, 0)</text:p>
          </table:table-cell>
          <table:table-cell office:value-type="string">
            <text:p>Luck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INE" table:style-name="ta8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haine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EWGF</text:p>
          </table:table-cell>
          <table:table-cell office:value-type="string">
            <text:p>(1, 1, 0, 2, 2, 0, 0)</text:p>
          </table:table-cell>
          <table:table-cell office:value-type="string">
            <text:p>EWGF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owlin</text:p>
          </table:table-cell>
          <table:table-cell office:value-type="string">
            <text:p>(1, 1, 0, 2, 2, 0, 0)</text:p>
          </table:table-cell>
          <table:table-cell office:value-type="string">
            <text:p>Bowli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loax</text:p>
          </table:table-cell>
          <table:table-cell office:value-type="string">
            <text:p>(1, 0, 1, 2, 0, 2, 0)</text:p>
          </table:table-cell>
          <table:table-cell office:value-type="string">
            <text:p>Koloa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Zorrin</text:p>
          </table:table-cell>
          <table:table-cell office:value-type="string">
            <text:p>(1, 1, 0, 3, 2, 1, 0)</text:p>
          </table:table-cell>
          <table:table-cell office:value-type="string">
            <text:p>Zorrin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Fonica</text:p>
          </table:table-cell>
          <table:table-cell office:value-type="string">
            <text:p>(1, 1, 0, 2, 2, 0, 0)</text:p>
          </table:table-cell>
          <table:table-cell office:value-type="string">
            <text:p>Fonic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2, 1, 1, 5, 2, 3, 0)</text:p>
          </table:table-cell>
          <table:table-cell office:value-type="string">
            <text:p>WonderBread</text:p>
          </table:table-cell>
          <table:table-cell office:value-type="string">
            <text:p>(2, 1, 1, 5, 2, 3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1, 0, 1, 5, 2, 3, 0)</text:p>
          </table:table-cell>
          <table:table-cell office:value-type="string">
            <text:p>Benji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Awsmsun</text:p>
          </table:table-cell>
          <table:table-cell office:value-type="string">
            <text:p>(1, 1, 0, 2, 2, 0, 0)</text:p>
          </table:table-cell>
          <table:table-cell office:value-type="string">
            <text:p>Awsmsu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(1, 1, 0, 2, 2, 0, 0)</text:p>
          </table:table-cell>
          <table:table-cell office:value-type="string">
            <text:p>Samerson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arZ</text:p>
          </table:table-cell>
          <table:table-cell office:value-type="string">
            <text:p>(1, 1, 0, 2, 2, 0, 0)</text:p>
          </table:table-cell>
          <table:table-cell office:value-type="string">
            <text:p>StarZ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ewo</text:p>
          </table:table-cell>
          <table:table-cell office:value-type="string">
            <text:p>(2, 1, 1, 6, 3, 3, 0)</text:p>
          </table:table-cell>
          <table:table-cell office:value-type="string">
            <text:p>Newo</text:p>
          </table:table-cell>
          <table:table-cell office:value-type="string">
            <text:p>(2, 1, 1, 6, 3, 3, 0)</text:p>
          </table:table-cell>
          <table:table-cell table:number-columns-repeated="1020"/>
        </table:table-row>
        <table:table-row table:style-name="ro1">
          <table:table-cell office:value-type="string">
            <text:p>Kobe</text:p>
          </table:table-cell>
          <table:table-cell office:value-type="string">
            <text:p>(2, 2, 0, 8, 5, 3, 0)</text:p>
          </table:table-cell>
          <table:table-cell office:value-type="string">
            <text:p>Kobe</text:p>
          </table:table-cell>
          <table:table-cell office:value-type="string">
            <text:p>(2, 2, 0, 8, 5, 3, 0)</text:p>
          </table:table-cell>
          <table:table-cell table:number-columns-repeated="1020"/>
        </table:table-row>
        <table:table-row table:style-name="ro1">
          <table:table-cell office:value-type="string">
            <text:p>DM</text:p>
          </table:table-cell>
          <table:table-cell office:value-type="string">
            <text:p>(2, 1, 1, 9, 4, 5, 0)</text:p>
          </table:table-cell>
          <table:table-cell office:value-type="string">
            <text:p>DM</text:p>
          </table:table-cell>
          <table:table-cell office:value-type="string">
            <text:p>(2, 1, 1, 9, 4, 5, 0)</text:p>
          </table:table-cell>
          <table:table-cell table:number-columns-repeated="1020"/>
        </table:table-row>
        <table:table-row table:style-name="ro1">
          <table:table-cell office:value-type="string">
            <text:p>UpChuck</text:p>
          </table:table-cell>
          <table:table-cell office:value-type="string">
            <text:p>(1, 1, 0, 2, 2, 0, 0)</text:p>
          </table:table-cell>
          <table:table-cell office:value-type="string">
            <text:p>UpChuc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ispanic! at the Disco</text:p>
          </table:table-cell>
          <table:table-cell office:value-type="string">
            <text:p>(1, 1, 0, 3, 2, 1, 0)</text:p>
          </table:table-cell>
          <table:table-cell office:value-type="string">
            <text:p>Hispanic! at the Disco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Manzana</text:p>
          </table:table-cell>
          <table:table-cell office:value-type="string">
            <text:p>(1, 1, 0, 3, 2, 1, 0)</text:p>
          </table:table-cell>
          <table:table-cell office:value-type="string">
            <text:p>Manzana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Aaron</text:p>
          </table:table-cell>
          <table:table-cell office:value-type="string">
            <text:p>(1, 1, 0, 3, 2, 1, 0)</text:p>
          </table:table-cell>
          <table:table-cell office:value-type="string">
            <text:p>Aaron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Dominator</text:p>
          </table:table-cell>
          <table:table-cell office:value-type="string">
            <text:p>(1, 0, 1, 4, 1, 3, 0)</text:p>
          </table:table-cell>
          <table:table-cell office:value-type="string">
            <text:p>Dominator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2, 0, 2, 7, 1, 6, 0)</text:p>
          </table:table-cell>
          <table:table-cell office:value-type="string">
            <text:p>Epic_Gabriel</text:p>
          </table:table-cell>
          <table:table-cell office:value-type="string">
            <text:p>(2, 0, 2, 7, 1, 6, 0)</text:p>
          </table:table-cell>
          <table:table-cell table:number-columns-repeated="1020"/>
        </table:table-row>
        <table:table-row table:style-name="ro1">
          <table:table-cell office:value-type="string">
            <text:p>jarol</text:p>
          </table:table-cell>
          <table:table-cell office:value-type="string">
            <text:p>(1, 1, 0, 2, 2, 0, 0)</text:p>
          </table:table-cell>
          <table:table-cell office:value-type="string">
            <text:p>jaro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1, 1, 0, 2, 2, 0, 0)</text:p>
          </table:table-cell>
          <table:table-cell office:value-type="string">
            <text:p>DarthCJ8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lack Lemonade</text:p>
          </table:table-cell>
          <table:table-cell office:value-type="string">
            <text:p>(1, 1, 0, 2, 2, 0, 0)</text:p>
          </table:table-cell>
          <table:table-cell office:value-type="string">
            <text:p>Black Lemonad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Venikki</text:p>
          </table:table-cell>
          <table:table-cell office:value-type="string">
            <text:p>(1, 1, 0, 2, 2, 0, 0)</text:p>
          </table:table-cell>
          <table:table-cell office:value-type="string">
            <text:p>Venikk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0, 1, 4, 1, 3, 0)</text:p>
          </table:table-cell>
          <table:table-cell office:value-type="string">
            <text:p>BeastModePaul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Pingu</text:p>
          </table:table-cell>
          <table:table-cell office:value-type="string">
            <text:p>(1, 1, 0, 2, 2, 0, 0)</text:p>
          </table:table-cell>
          <table:table-cell office:value-type="string">
            <text:p>Pingu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ewiby (Entropy)</text:p>
          </table:table-cell>
          <table:table-cell office:value-type="string">
            <text:p>(1, 1, 0, 2, 2, 0, 0)</text:p>
          </table:table-cell>
          <table:table-cell office:value-type="string">
            <text:p>Newiby (Entropy)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ap</text:p>
          </table:table-cell>
          <table:table-cell office:value-type="string">
            <text:p>(1, 1, 0, 2, 2, 0, 0)</text:p>
          </table:table-cell>
          <table:table-cell office:value-type="string">
            <text:p>nap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Livan the Amnesty</text:p>
          </table:table-cell>
          <table:table-cell office:value-type="string">
            <text:p>(1, 1, 0, 2, 2, 0, 0)</text:p>
          </table:table-cell>
          <table:table-cell office:value-type="string">
            <text:p>Livan the Amnest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LightningCam</text:p>
          </table:table-cell>
          <table:table-cell office:value-type="string">
            <text:p>(1, 1, 0, 5, 3, 2, 0)</text:p>
          </table:table-cell>
          <table:table-cell office:value-type="string">
            <text:p>LightningCam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CIDA" table:style-name="ta8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lucida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Bowlin</text:p>
          </table:table-cell>
          <table:table-cell office:value-type="string">
            <text:p>(1, 0, 1, 2, 0, 2, 0)</text:p>
          </table:table-cell>
          <table:table-cell office:value-type="string">
            <text:p>Bowli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aibaman</text:p>
          </table:table-cell>
          <table:table-cell office:value-type="string">
            <text:p>(1, 1, 0, 2, 2, 0, 0)</text:p>
          </table:table-cell>
          <table:table-cell office:value-type="string">
            <text:p>saibama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EWGF</text:p>
          </table:table-cell>
          <table:table-cell office:value-type="string">
            <text:p>(1, 0, 1, 2, 0, 2, 0)</text:p>
          </table:table-cell>
          <table:table-cell office:value-type="string">
            <text:p>EWGF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FBJacob</text:p>
          </table:table-cell>
          <table:table-cell office:value-type="string">
            <text:p>(1, 1, 0, 2, 2, 0, 0)</text:p>
          </table:table-cell>
          <table:table-cell office:value-type="string">
            <text:p>NFBJacob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picywingz11</text:p>
          </table:table-cell>
          <table:table-cell office:value-type="string">
            <text:p>(1, 1, 0, 3, 2, 1, 0)</text:p>
          </table:table-cell>
          <table:table-cell office:value-type="string">
            <text:p>spicywingz11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1, 0, 1, 2, 0, 2, 0)</text:p>
          </table:table-cell>
          <table:table-cell office:value-type="string">
            <text:p>Chez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ITTR</text:p>
          </table:table-cell>
          <table:table-cell office:value-type="string">
            <text:p>(1, 1, 0, 2, 2, 0, 0)</text:p>
          </table:table-cell>
          <table:table-cell office:value-type="string">
            <text:p>BITT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1, 1, 0, 2, 2, 0, 0)</text:p>
          </table:table-cell>
          <table:table-cell office:value-type="string">
            <text:p>Plumme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1, 0, 1, 2, 0, 2, 0)</text:p>
          </table:table-cell>
          <table:table-cell office:value-type="string">
            <text:p>Bhan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re05</text:p>
          </table:table-cell>
          <table:table-cell office:value-type="string">
            <text:p>(1, 1, 0, 2, 2, 0, 0)</text:p>
          </table:table-cell>
          <table:table-cell office:value-type="string">
            <text:p>Dre05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oGo</text:p>
          </table:table-cell>
          <table:table-cell office:value-type="string">
            <text:p>(1, 1, 0, 2, 2, 0, 0)</text:p>
          </table:table-cell>
          <table:table-cell office:value-type="string">
            <text:p>GoG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1, 1, 0, 3, 2, 1, 0)</text:p>
          </table:table-cell>
          <table:table-cell office:value-type="string">
            <text:p>Twilight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Lucky</text:p>
          </table:table-cell>
          <table:table-cell office:value-type="string">
            <text:p>(1, 0, 1, 2, 0, 2, 0)</text:p>
          </table:table-cell>
          <table:table-cell office:value-type="string">
            <text:p>Luck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LOAX" table:style-name="ta8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Koloax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Just_A_Tarrasque</text:p>
          </table:table-cell>
          <table:table-cell office:value-type="string">
            <text:p>(1, 1, 0, 2, 2, 0, 0)</text:p>
          </table:table-cell>
          <table:table-cell office:value-type="string">
            <text:p>Just_A_Tarrasqu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juno</text:p>
          </table:table-cell>
          <table:table-cell office:value-type="string">
            <text:p>(1, 1, 0, 2, 2, 0, 0)</text:p>
          </table:table-cell>
          <table:table-cell office:value-type="string">
            <text:p>jun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1, 1, 0, 2, 2, 0, 0)</text:p>
          </table:table-cell>
          <table:table-cell office:value-type="string">
            <text:p>Shain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0, 1, 3, 1, 2, 0)</text:p>
          </table:table-cell>
          <table:table-cell office:value-type="string">
            <text:p>Epic_Gabriel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Goblin</text:p>
          </table:table-cell>
          <table:table-cell office:value-type="string">
            <text:p>(1, 0, 1, 2, 0, 2, 0)</text:p>
          </table:table-cell>
          <table:table-cell office:value-type="string">
            <text:p>Gobli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ev7x</text:p>
          </table:table-cell>
          <table:table-cell office:value-type="string">
            <text:p>(2, 2, 0, 4, 4, 0, 0)</text:p>
          </table:table-cell>
          <table:table-cell office:value-type="string">
            <text:p>sev7x</text:p>
          </table:table-cell>
          <table:table-cell office:value-type="string">
            <text:p>(2, 2, 0, 4, 4, 0, 0)</text:p>
          </table:table-cell>
          <table:table-cell table:number-columns-repeated="1020"/>
        </table:table-row>
        <table:table-row table:style-name="ro1">
          <table:table-cell office:value-type="string">
            <text:p>My Dad</text:p>
          </table:table-cell>
          <table:table-cell office:value-type="string">
            <text:p>(1, 1, 0, 3, 2, 1, 0)</text:p>
          </table:table-cell>
          <table:table-cell office:value-type="string">
            <text:p>My Dad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Newo</text:p>
          </table:table-cell>
          <table:table-cell office:value-type="string">
            <text:p>(2, 0, 2, 6, 1, 5, 0)</text:p>
          </table:table-cell>
          <table:table-cell office:value-type="string">
            <text:p>Newo</text:p>
          </table:table-cell>
          <table:table-cell office:value-type="string">
            <text:p>(2, 0, 2, 6, 1, 5, 0)</text:p>
          </table:table-cell>
          <table:table-cell table:number-columns-repeated="1020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1, 1, 0, 2, 2, 0, 0)</text:p>
          </table:table-cell>
          <table:table-cell office:value-type="string">
            <text:p>Plumme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Zarberian</text:p>
          </table:table-cell>
          <table:table-cell office:value-type="string">
            <text:p>(1, 1, 0, 2, 2, 0, 0)</text:p>
          </table:table-cell>
          <table:table-cell office:value-type="string">
            <text:p>Zarberia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1, 1, 0, 2, 2, 0, 0)</text:p>
          </table:table-cell>
          <table:table-cell office:value-type="string">
            <text:p>WonderBrea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eal King Barbaros</text:p>
          </table:table-cell>
          <table:table-cell office:value-type="string">
            <text:p>(1, 1, 0, 3, 3, 0, 0)</text:p>
          </table:table-cell>
          <table:table-cell office:value-type="string">
            <text:p>Seal King Barbaros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S. Phantm</text:p>
          </table:table-cell>
          <table:table-cell office:value-type="string">
            <text:p>(1, 1, 0, 3, 2, 1, 0)</text:p>
          </table:table-cell>
          <table:table-cell office:value-type="string">
            <text:p>S. Phantm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Venikki</text:p>
          </table:table-cell>
          <table:table-cell office:value-type="string">
            <text:p>(2, 0, 2, 6, 1, 5, 0)</text:p>
          </table:table-cell>
          <table:table-cell office:value-type="string">
            <text:p>Venikki</text:p>
          </table:table-cell>
          <table:table-cell office:value-type="string">
            <text:p>(2, 0, 2, 6, 1, 5, 0)</text:p>
          </table:table-cell>
          <table:table-cell table:number-columns-repeated="1020"/>
        </table:table-row>
        <table:table-row table:style-name="ro1">
          <table:table-cell office:value-type="string">
            <text:p>D0g3</text:p>
          </table:table-cell>
          <table:table-cell office:value-type="string">
            <text:p>(1, 0, 1, 2, 0, 2, 0)</text:p>
          </table:table-cell>
          <table:table-cell office:value-type="string">
            <text:p>D0g3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1, 1, 0, 2, 2, 0, 0)</text:p>
          </table:table-cell>
          <table:table-cell office:value-type="string">
            <text:p>HaydenEatsShrimp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1, 1, 0, 2, 2, 0, 0)</text:p>
          </table:table-cell>
          <table:table-cell office:value-type="string">
            <text:p>McFunn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1, 0, 2, 2, 0, 0)</text:p>
          </table:table-cell>
          <table:table-cell office:value-type="string">
            <text:p>BeastModePau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(1, 1, 0, 2, 2, 0, 0)</text:p>
          </table:table-cell>
          <table:table-cell office:value-type="string">
            <text:p>Dingodil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be</text:p>
          </table:table-cell>
          <table:table-cell office:value-type="string">
            <text:p>(1, 0, 1, 3, 0, 3, 0)</text:p>
          </table:table-cell>
          <table:table-cell office:value-type="string">
            <text:p>Kobe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MEHOWNERDY" table:style-name="ta8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omehowNerdy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juno</text:p>
          </table:table-cell>
          <table:table-cell office:value-type="string">
            <text:p>(1, 0, 1, 3, 1, 2, 0)</text:p>
          </table:table-cell>
          <table:table-cell office:value-type="string">
            <text:p>juno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roan ling</text:p>
          </table:table-cell>
          <table:table-cell office:value-type="string">
            <text:p>(0, 0, 0, 0, 0, 0, 1)</text:p>
          </table:table-cell>
          <table:table-cell office:value-type="string">
            <text:p>roan ling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Just_A_Tarrasque</text:p>
          </table:table-cell>
          <table:table-cell office:value-type="string">
            <text:p>(1, 1, 0, 3, 2, 1, 0)</text:p>
          </table:table-cell>
          <table:table-cell office:value-type="string">
            <text:p>Just_A_Tarrasque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1, 0, 1, 3, 1, 2, 0)</text:p>
          </table:table-cell>
          <table:table-cell office:value-type="string">
            <text:p>McFunny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YEISCOOL" table:style-name="ta8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Ryeiscool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R3M1X</text:p>
          </table:table-cell>
          <table:table-cell office:value-type="string">
            <text:p>(0, 0, 0, 0, 0, 0, 1)</text:p>
          </table:table-cell>
          <table:table-cell office:value-type="string">
            <text:p>R3M1X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Karu!</text:p>
          </table:table-cell>
          <table:table-cell office:value-type="string">
            <text:p>(1, 0, 1, 2, 0, 2, 0)</text:p>
          </table:table-cell>
          <table:table-cell office:value-type="string">
            <text:p>Karu!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erph</text:p>
          </table:table-cell>
          <table:table-cell office:value-type="string">
            <text:p>(1, 0, 1, 2, 0, 2, 0)</text:p>
          </table:table-cell>
          <table:table-cell office:value-type="string">
            <text:p>Serph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Awsmsun</text:p>
          </table:table-cell>
          <table:table-cell office:value-type="string">
            <text:p>(1, 0, 1, 2, 0, 2, 0)</text:p>
          </table:table-cell>
          <table:table-cell office:value-type="string">
            <text:p>Awsmsu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yamaokai</text:p>
          </table:table-cell>
          <table:table-cell office:value-type="string">
            <text:p>(1, 1, 0, 2, 2, 0, 0)</text:p>
          </table:table-cell>
          <table:table-cell office:value-type="string">
            <text:p>yamaoka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1, 0, 1, 2, 0, 2, 0)</text:p>
          </table:table-cell>
          <table:table-cell office:value-type="string">
            <text:p>Bhan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guayo.sv</text:p>
          </table:table-cell>
          <table:table-cell office:value-type="string">
            <text:p>(1, 0, 1, 2, 0, 2, 0)</text:p>
          </table:table-cell>
          <table:table-cell office:value-type="string">
            <text:p>guayo.sv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uckMark</text:p>
          </table:table-cell>
          <table:table-cell office:value-type="string">
            <text:p>(1, 0, 1, 2, 0, 2, 0)</text:p>
          </table:table-cell>
          <table:table-cell office:value-type="string">
            <text:p>DuckMar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3M1X" table:style-name="ta8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R3M1X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Ryeiscool</text:p>
          </table:table-cell>
          <table:table-cell office:value-type="string">
            <text:p>(0, 0, 0, 0, 0, 0, 1)</text:p>
          </table:table-cell>
          <table:table-cell office:value-type="string">
            <text:p>Ryeiscool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Kryon</text:p>
          </table:table-cell>
          <table:table-cell office:value-type="string">
            <text:p>(0, 0, 0, 0, 0, 0, 1)</text:p>
          </table:table-cell>
          <table:table-cell office:value-type="string">
            <text:p>Kryo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ZFARACH001" table:style-name="ta8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ChezFarach001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Mana</text:p>
          </table:table-cell>
          <table:table-cell office:value-type="string">
            <text:p>(1, 1, 0, 2, 2, 0, 0)</text:p>
          </table:table-cell>
          <table:table-cell office:value-type="string">
            <text:p>Man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1, 0, 1, 2, 0, 2, 0)</text:p>
          </table:table-cell>
          <table:table-cell office:value-type="string">
            <text:p>xXx_PeterGokuGriffin_xX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rincessPopkorn</text:p>
          </table:table-cell>
          <table:table-cell office:value-type="string">
            <text:p>(1, 1, 0, 2, 2, 0, 0)</text:p>
          </table:table-cell>
          <table:table-cell office:value-type="string">
            <text:p>PrincessPopkor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erph</text:p>
          </table:table-cell>
          <table:table-cell office:value-type="string">
            <text:p>(1, 0, 1, 2, 0, 2, 0)</text:p>
          </table:table-cell>
          <table:table-cell office:value-type="string">
            <text:p>Serph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Wiccan</text:p>
          </table:table-cell>
          <table:table-cell office:value-type="string">
            <text:p>(1, 1, 0, 3, 2, 1, 0)</text:p>
          </table:table-cell>
          <table:table-cell office:value-type="string">
            <text:p>Wiccan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r-Huge</text:p>
          </table:table-cell>
          <table:table-cell office:value-type="string">
            <text:p>(1, 0, 1, 3, 1, 2, 0)</text:p>
          </table:table-cell>
          <table:table-cell office:value-type="string">
            <text:p>Sr-Huge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G00MBA</text:p>
          </table:table-cell>
          <table:table-cell office:value-type="string">
            <text:p>(1, 1, 0, 2, 2, 0, 0)</text:p>
          </table:table-cell>
          <table:table-cell office:value-type="string">
            <text:p>G00MB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1, 0, 1, 2, 0, 2, 0)</text:p>
          </table:table-cell>
          <table:table-cell office:value-type="string">
            <text:p>McFunn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aClg0d</text:p>
          </table:table-cell>
          <table:table-cell office:value-type="string">
            <text:p>(1, 1, 0, 3, 2, 1, 0)</text:p>
          </table:table-cell>
          <table:table-cell office:value-type="string">
            <text:p>NaClg0d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VileSpecter</text:p>
          </table:table-cell>
          <table:table-cell office:value-type="string">
            <text:p>(1, 1, 0, 2, 2, 0, 0)</text:p>
          </table:table-cell>
          <table:table-cell office:value-type="string">
            <text:p>VileSpecte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juno</text:p>
          </table:table-cell>
          <table:table-cell office:value-type="string">
            <text:p>(1, 1, 0, 2, 2, 0, 0)</text:p>
          </table:table-cell>
          <table:table-cell office:value-type="string">
            <text:p>jun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ispanic! at the Disco</text:p>
          </table:table-cell>
          <table:table-cell office:value-type="string">
            <text:p>(1, 0, 1, 2, 0, 2, 0)</text:p>
          </table:table-cell>
          <table:table-cell office:value-type="string">
            <text:p>Hispanic! at the Disco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NA" table:style-name="ta8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Mana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ChezFarach001</text:p>
          </table:table-cell>
          <table:table-cell office:value-type="string">
            <text:p>(1, 0, 1, 2, 0, 2, 0)</text:p>
          </table:table-cell>
          <table:table-cell office:value-type="string">
            <text:p>ChezFarach001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1, 0, 1, 2, 0, 2, 0)</text:p>
          </table:table-cell>
          <table:table-cell office:value-type="string">
            <text:p>Chavalav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yamaokai</text:p>
          </table:table-cell>
          <table:table-cell office:value-type="string">
            <text:p>(1, 0, 1, 2, 0, 2, 0)</text:p>
          </table:table-cell>
          <table:table-cell office:value-type="string">
            <text:p>yamaoka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Awsmsun</text:p>
          </table:table-cell>
          <table:table-cell office:value-type="string">
            <text:p>(1, 0, 1, 2, 0, 2, 0)</text:p>
          </table:table-cell>
          <table:table-cell office:value-type="string">
            <text:p>Awsmsu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Zorrin</text:p>
          </table:table-cell>
          <table:table-cell office:value-type="string">
            <text:p>(1, 0, 1, 2, 0, 2, 1)</text:p>
          </table:table-cell>
          <table:table-cell office:value-type="string">
            <text:p>Zorrin</text:p>
          </table:table-cell>
          <table:table-cell office:value-type="string">
            <text:p>(1, 0, 1, 2, 0, 2, 1)</text:p>
          </table:table-cell>
          <table:table-cell table:number-columns-repeated="1020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hitKho</text:p>
          </table:table-cell>
          <table:table-cell office:value-type="string">
            <text:p>(1, 0, 1, 3, 1, 2, 0)</text:p>
          </table:table-cell>
          <table:table-cell office:value-type="string">
            <text:p>ThitKho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MESSKYY" table:style-name="ta8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Namesskyy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Papi</text:p>
          </table:table-cell>
          <table:table-cell office:value-type="string">
            <text:p>(0, 0, 0, 0, 0, 0, 1)</text:p>
          </table:table-cell>
          <table:table-cell office:value-type="string">
            <text:p>Papi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0, 0, 0, 0, 0, 0, 1)</text:p>
          </table:table-cell>
          <table:table-cell office:value-type="string">
            <text:p>Benji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altstorm</text:p>
          </table:table-cell>
          <table:table-cell office:value-type="string">
            <text:p>(0, 0, 0, 0, 0, 0, 1)</text:p>
          </table:table-cell>
          <table:table-cell office:value-type="string">
            <text:p>Saltstorm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PI" table:style-name="ta8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Papi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Namesskyy</text:p>
          </table:table-cell>
          <table:table-cell office:value-type="string">
            <text:p>(0, 0, 0, 0, 0, 0, 1)</text:p>
          </table:table-cell>
          <table:table-cell office:value-type="string">
            <text:p>Namessky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0, 0, 0, 0, 0, 0, 1)</text:p>
          </table:table-cell>
          <table:table-cell office:value-type="string">
            <text:p>HaydenEatsShrimp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1, 0, 1, 2, 0, 2, 0)</text:p>
          </table:table-cell>
          <table:table-cell office:value-type="string">
            <text:p>Twiligh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Rondon</text:p>
          </table:table-cell>
          <table:table-cell office:value-type="string">
            <text:p>(1, 0, 1, 2, 0, 2, 0)</text:p>
          </table:table-cell>
          <table:table-cell office:value-type="string">
            <text:p>Rondo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Jonin</text:p>
          </table:table-cell>
          <table:table-cell office:value-type="string">
            <text:p>(0, 0, 0, 0, 0, 0, 1)</text:p>
          </table:table-cell>
          <table:table-cell office:value-type="string">
            <text:p>Joni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JDQ05</text:p>
          </table:table-cell>
          <table:table-cell office:value-type="string">
            <text:p>(0, 0, 0, 0, 0, 0, 1)</text:p>
          </table:table-cell>
          <table:table-cell office:value-type="string">
            <text:p>JDQ05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Viprskreen</text:p>
          </table:table-cell>
          <table:table-cell office:value-type="string">
            <text:p>(1, 1, 0, 3, 2, 1, 0)</text:p>
          </table:table-cell>
          <table:table-cell office:value-type="string">
            <text:p>Viprskreen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1, 0, 1, 2, 0, 2, 0)</text:p>
          </table:table-cell>
          <table:table-cell office:value-type="string">
            <text:p>Benj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acket</text:p>
          </table:table-cell>
          <table:table-cell office:value-type="string">
            <text:p>(0, 0, 0, 0, 0, 0, 1)</text:p>
          </table:table-cell>
          <table:table-cell office:value-type="string">
            <text:p>Packet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derk</text:p>
          </table:table-cell>
          <table:table-cell office:value-type="string">
            <text:p>(1, 1, 0, 2, 2, 0, 0)</text:p>
          </table:table-cell>
          <table:table-cell office:value-type="string">
            <text:p>der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fiend</text:p>
          </table:table-cell>
          <table:table-cell office:value-type="string">
            <text:p>(1, 0, 1, 2, 0, 2, 0)</text:p>
          </table:table-cell>
          <table:table-cell office:value-type="string">
            <text:p>fien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HBOX" table:style-name="ta9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NotHbox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World Jade Center</text:p>
          </table:table-cell>
          <table:table-cell office:value-type="string">
            <text:p>(1, 1, 0, 2, 2, 0, 0)</text:p>
          </table:table-cell>
          <table:table-cell office:value-type="string">
            <text:p>World Jade Cente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eal King Barbaros</text:p>
          </table:table-cell>
          <table:table-cell office:value-type="string">
            <text:p>(1, 0, 1, 2, 0, 2, 0)</text:p>
          </table:table-cell>
          <table:table-cell office:value-type="string">
            <text:p>Seal King Barbaro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GoldenDark</text:p>
          </table:table-cell>
          <table:table-cell office:value-type="string">
            <text:p>(1, 1, 0, 2, 2, 0, 0)</text:p>
          </table:table-cell>
          <table:table-cell office:value-type="string">
            <text:p>GoldenDar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altstorm</text:p>
          </table:table-cell>
          <table:table-cell office:value-type="string">
            <text:p>(1, 1, 0, 3, 2, 1, 0)</text:p>
          </table:table-cell>
          <table:table-cell office:value-type="string">
            <text:p>Saltstorm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fiend</text:p>
          </table:table-cell>
          <table:table-cell office:value-type="string">
            <text:p>(1, 0, 1, 2, 0, 2, 0)</text:p>
          </table:table-cell>
          <table:table-cell office:value-type="string">
            <text:p>fien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Zarberian</text:p>
          </table:table-cell>
          <table:table-cell office:value-type="string">
            <text:p>(1, 0, 1, 3, 1, 2, 0)</text:p>
          </table:table-cell>
          <table:table-cell office:value-type="string">
            <text:p>Zarberian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LXIX</text:p>
          </table:table-cell>
          <table:table-cell office:value-type="string">
            <text:p>(1, 1, 0, 2, 2, 0, 0)</text:p>
          </table:table-cell>
          <table:table-cell office:value-type="string">
            <text:p>LXI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r.Feeny</text:p>
          </table:table-cell>
          <table:table-cell office:value-type="string">
            <text:p>(1, 1, 0, 2, 2, 0, 0)</text:p>
          </table:table-cell>
          <table:table-cell office:value-type="string">
            <text:p>Mr.Feen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anchos</text:p>
          </table:table-cell>
          <table:table-cell office:value-type="string">
            <text:p>(1, 0, 1, 3, 1, 2, 0)</text:p>
          </table:table-cell>
          <table:table-cell office:value-type="string">
            <text:p>Panchos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jarol</text:p>
          </table:table-cell>
          <table:table-cell office:value-type="string">
            <text:p>(1, 1, 0, 1, 1, 0, 0)</text:p>
          </table:table-cell>
          <table:table-cell office:value-type="string">
            <text:p>jarol</text:p>
          </table:table-cell>
          <table:table-cell office:value-type="string">
            <text:p>(1, 1, 0, 1, 1, 0, 0)</text:p>
          </table:table-cell>
          <table:table-cell table:number-columns-repeated="1020"/>
        </table:table-row>
        <table:table-row table:style-name="ro1">
          <table:table-cell office:value-type="string">
            <text:p>sev7x</text:p>
          </table:table-cell>
          <table:table-cell office:value-type="string">
            <text:p>(1, 0, 1, 3, 1, 2, 0)</text:p>
          </table:table-cell>
          <table:table-cell office:value-type="string">
            <text:p>sev7x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Kryon</text:p>
          </table:table-cell>
          <table:table-cell office:value-type="string">
            <text:p>(1, 1, 0, 2, 2, 0, 0)</text:p>
          </table:table-cell>
          <table:table-cell office:value-type="string">
            <text:p>Kryo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1, 0, 1, 2, 0, 2, 0)</text:p>
          </table:table-cell>
          <table:table-cell office:value-type="string">
            <text:p>WonderBrea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nKaos</text:p>
          </table:table-cell>
          <table:table-cell office:value-type="string">
            <text:p>(1, 1, 0, 2, 2, 0, 0)</text:p>
          </table:table-cell>
          <table:table-cell office:value-type="string">
            <text:p>TnKao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arlJT</text:p>
          </table:table-cell>
          <table:table-cell office:value-type="string">
            <text:p>(1, 1, 0, 2, 2, 0, 0)</text:p>
          </table:table-cell>
          <table:table-cell office:value-type="string">
            <text:p>CarlJ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ap</text:p>
          </table:table-cell>
          <table:table-cell office:value-type="string">
            <text:p>(1, 1, 0, 2, 2, 0, 0)</text:p>
          </table:table-cell>
          <table:table-cell office:value-type="string">
            <text:p>nap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ori</text:p>
          </table:table-cell>
          <table:table-cell office:value-type="string">
            <text:p>(1, 0, 1, 2, 0, 2, 0)</text:p>
          </table:table-cell>
          <table:table-cell office:value-type="string">
            <text:p>Nor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amdne</text:p>
          </table:table-cell>
          <table:table-cell office:value-type="string">
            <text:p>(1, 1, 0, 2, 2, 0, 0)</text:p>
          </table:table-cell>
          <table:table-cell office:value-type="string">
            <text:p>Camdn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WiFi warrior</text:p>
          </table:table-cell>
          <table:table-cell office:value-type="string">
            <text:p>(1, 0, 1, 2, 0, 2, 0)</text:p>
          </table:table-cell>
          <table:table-cell office:value-type="string">
            <text:p>WiFi warrior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av</text:p>
          </table:table-cell>
          <table:table-cell office:value-type="string">
            <text:p>(1, 1, 0, 2, 2, 0, 0)</text:p>
          </table:table-cell>
          <table:table-cell office:value-type="string">
            <text:p>Mav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VileSpecter</text:p>
          </table:table-cell>
          <table:table-cell office:value-type="string">
            <text:p>(1, 1, 0, 2, 2, 0, 0)</text:p>
          </table:table-cell>
          <table:table-cell office:value-type="string">
            <text:p>VileSpecte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MoC</text:p>
          </table:table-cell>
          <table:table-cell office:value-type="string">
            <text:p>(1, 0, 1, 3, 1, 2, 0)</text:p>
          </table:table-cell>
          <table:table-cell office:value-type="string">
            <text:p>BMoC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LD JADE CENTER" table:style-name="ta9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World Jade Center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NotHbox</text:p>
          </table:table-cell>
          <table:table-cell office:value-type="string">
            <text:p>(1, 0, 1, 2, 0, 2, 0)</text:p>
          </table:table-cell>
          <table:table-cell office:value-type="string">
            <text:p>NotHbo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oc Shock</text:p>
          </table:table-cell>
          <table:table-cell office:value-type="string">
            <text:p>(1, 0, 1, 2, 0, 2, 0)</text:p>
          </table:table-cell>
          <table:table-cell office:value-type="string">
            <text:p>Doc Shoc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1, 0, 1, 2, 0, 2, 0)</text:p>
          </table:table-cell>
          <table:table-cell office:value-type="string">
            <text:p>McFunn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Yukoa</text:p>
          </table:table-cell>
          <table:table-cell office:value-type="string">
            <text:p>(0, 0, 0, 0, 0, 0, 1)</text:p>
          </table:table-cell>
          <table:table-cell office:value-type="string">
            <text:p>Yukoa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IRUSH</text:p>
          </table:table-cell>
          <table:table-cell office:value-type="string">
            <text:p>(1, 0, 1, 2, 0, 2, 0)</text:p>
          </table:table-cell>
          <table:table-cell office:value-type="string">
            <text:p>IRUSH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Rudy568</text:p>
          </table:table-cell>
          <table:table-cell office:value-type="string">
            <text:p>(1, 1, 0, 2, 2, 0, 0)</text:p>
          </table:table-cell>
          <table:table-cell office:value-type="string">
            <text:p>Rudy568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hpstks</text:p>
          </table:table-cell>
          <table:table-cell office:value-type="string">
            <text:p>(1, 0, 1, 2, 0, 2, 0)</text:p>
          </table:table-cell>
          <table:table-cell office:value-type="string">
            <text:p>chpstk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lilzach</text:p>
          </table:table-cell>
          <table:table-cell office:value-type="string">
            <text:p>(0, 0, 0, 0, 0, 0, 1)</text:p>
          </table:table-cell>
          <table:table-cell office:value-type="string">
            <text:p>lilzach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Colt</text:p>
          </table:table-cell>
          <table:table-cell office:value-type="string">
            <text:p>(1, 1, 0, 3, 2, 1, 0)</text:p>
          </table:table-cell>
          <table:table-cell office:value-type="string">
            <text:p>Colt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1, 0, 1, 2, 0, 2, 0)</text:p>
          </table:table-cell>
          <table:table-cell office:value-type="string">
            <text:p>LuMiSaD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 SHOCK" table:style-name="ta9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Doc Shock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GoldenDark</text:p>
          </table:table-cell>
          <table:table-cell office:value-type="string">
            <text:p>(1, 1, 0, 2, 2, 0, 0)</text:p>
          </table:table-cell>
          <table:table-cell office:value-type="string">
            <text:p>GoldenDar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oblin</text:p>
          </table:table-cell>
          <table:table-cell office:value-type="string">
            <text:p>(1, 0, 1, 2, 0, 2, 0)</text:p>
          </table:table-cell>
          <table:table-cell office:value-type="string">
            <text:p>Gobli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World Jade Center</text:p>
          </table:table-cell>
          <table:table-cell office:value-type="string">
            <text:p>(1, 1, 0, 2, 2, 0, 0)</text:p>
          </table:table-cell>
          <table:table-cell office:value-type="string">
            <text:p>World Jade Cente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1, 0, 1, 2, 0, 2, 0)</text:p>
          </table:table-cell>
          <table:table-cell office:value-type="string">
            <text:p>HaydenEatsShrimp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READ</text:p>
          </table:table-cell>
          <table:table-cell office:value-type="string">
            <text:p>(1, 1, 0, 3, 2, 1, 0)</text:p>
          </table:table-cell>
          <table:table-cell office:value-type="string">
            <text:p>DREAD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Venikki</text:p>
          </table:table-cell>
          <table:table-cell office:value-type="string">
            <text:p>(1, 0, 1, 2, 0, 2, 0)</text:p>
          </table:table-cell>
          <table:table-cell office:value-type="string">
            <text:p>Venikk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Justeezy</text:p>
          </table:table-cell>
          <table:table-cell office:value-type="string">
            <text:p>(0, 0, 0, 0, 0, 0, 1)</text:p>
          </table:table-cell>
          <table:table-cell office:value-type="string">
            <text:p>Justeez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Kryon</text:p>
          </table:table-cell>
          <table:table-cell office:value-type="string">
            <text:p>(1, 0, 1, 3, 1, 2, 0)</text:p>
          </table:table-cell>
          <table:table-cell office:value-type="string">
            <text:p>Kryon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0, 0, 0, 0, 0, 0, 1)</text:p>
          </table:table-cell>
          <table:table-cell office:value-type="string">
            <text:p>Chez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GreatSpence</text:p>
          </table:table-cell>
          <table:table-cell office:value-type="string">
            <text:p>(0, 0, 0, 0, 0, 0, 1)</text:p>
          </table:table-cell>
          <table:table-cell office:value-type="string">
            <text:p>GreatSpenc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aidanbobaidan</text:p>
          </table:table-cell>
          <table:table-cell office:value-type="string">
            <text:p>(1, 0, 1, 2, 0, 2, 0)</text:p>
          </table:table-cell>
          <table:table-cell office:value-type="string">
            <text:p>aidanbobaida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Gogemon</text:p>
          </table:table-cell>
          <table:table-cell office:value-type="string">
            <text:p>(1, 0, 1, 2, 0, 2, 0)</text:p>
          </table:table-cell>
          <table:table-cell office:value-type="string">
            <text:p>Gogemo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LDENDARK" table:style-name="ta9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GoldenDark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Doc Shock</text:p>
          </table:table-cell>
          <table:table-cell office:value-type="string">
            <text:p>(1, 0, 1, 2, 0, 2, 0)</text:p>
          </table:table-cell>
          <table:table-cell office:value-type="string">
            <text:p>Doc Shoc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otHbox</text:p>
          </table:table-cell>
          <table:table-cell office:value-type="string">
            <text:p>(1, 0, 1, 2, 0, 2, 0)</text:p>
          </table:table-cell>
          <table:table-cell office:value-type="string">
            <text:p>NotHbo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Jean Papitas</text:p>
          </table:table-cell>
          <table:table-cell office:value-type="string">
            <text:p>(1, 0, 1, 2, 0, 2, 0)</text:p>
          </table:table-cell>
          <table:table-cell office:value-type="string">
            <text:p>Jean Papita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hawnbd3</text:p>
          </table:table-cell>
          <table:table-cell office:value-type="string">
            <text:p>(1, 1, 0, 2, 2, 0, 0)</text:p>
          </table:table-cell>
          <table:table-cell office:value-type="string">
            <text:p>Shawnbd3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1, 0, 1, 2, 0, 2, 0)</text:p>
          </table:table-cell>
          <table:table-cell office:value-type="string">
            <text:p>LuMiSaD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YDENEATSSHRIMP" table:style-name="ta9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HaydenEatsShrimp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altstorm</text:p>
          </table:table-cell>
          <table:table-cell office:value-type="string">
            <text:p>(1, 1, 0, 2, 2, 0, 0)</text:p>
          </table:table-cell>
          <table:table-cell office:value-type="string">
            <text:p>Saltstorm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oobii</text:p>
          </table:table-cell>
          <table:table-cell office:value-type="string">
            <text:p>(1, 0, 1, 3, 1, 2, 0)</text:p>
          </table:table-cell>
          <table:table-cell office:value-type="string">
            <text:p>poobii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Papi</text:p>
          </table:table-cell>
          <table:table-cell office:value-type="string">
            <text:p>(0, 0, 0, 0, 0, 0, 1)</text:p>
          </table:table-cell>
          <table:table-cell office:value-type="string">
            <text:p>Papi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Doc Shock</text:p>
          </table:table-cell>
          <table:table-cell office:value-type="string">
            <text:p>(1, 1, 0, 2, 2, 0, 0)</text:p>
          </table:table-cell>
          <table:table-cell office:value-type="string">
            <text:p>Doc Shoc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1, 1, 0, 2, 2, 0, 0)</text:p>
          </table:table-cell>
          <table:table-cell office:value-type="string">
            <text:p>xXx_PeterGokuGriffin_xX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1, 0, 1, 3, 1, 2, 0)</text:p>
          </table:table-cell>
          <table:table-cell office:value-type="string">
            <text:p>Benji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Sr-Huge</text:p>
          </table:table-cell>
          <table:table-cell office:value-type="string">
            <text:p>(1, 1, 0, 2, 2, 0, 0)</text:p>
          </table:table-cell>
          <table:table-cell office:value-type="string">
            <text:p>Sr-Hug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ewo</text:p>
          </table:table-cell>
          <table:table-cell office:value-type="string">
            <text:p>(1, 0, 1, 3, 1, 2, 0)</text:p>
          </table:table-cell>
          <table:table-cell office:value-type="string">
            <text:p>Newo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Wiccan</text:p>
          </table:table-cell>
          <table:table-cell office:value-type="string">
            <text:p>(1, 1, 0, 2, 2, 0, 0)</text:p>
          </table:table-cell>
          <table:table-cell office:value-type="string">
            <text:p>Wicca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y Dad</text:p>
          </table:table-cell>
          <table:table-cell office:value-type="string">
            <text:p>(1, 1, 0, 3, 2, 1, 0)</text:p>
          </table:table-cell>
          <table:table-cell office:value-type="string">
            <text:p>My Dad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fiend</text:p>
          </table:table-cell>
          <table:table-cell office:value-type="string">
            <text:p>(1, 0, 1, 2, 0, 2, 0)</text:p>
          </table:table-cell>
          <table:table-cell office:value-type="string">
            <text:p>fien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anta</text:p>
          </table:table-cell>
          <table:table-cell office:value-type="string">
            <text:p>(1, 1, 0, 2, 2, 0, 0)</text:p>
          </table:table-cell>
          <table:table-cell office:value-type="string">
            <text:p>Mant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lack Lemonade</text:p>
          </table:table-cell>
          <table:table-cell office:value-type="string">
            <text:p>(1, 1, 0, 3, 2, 1, 0)</text:p>
          </table:table-cell>
          <table:table-cell office:value-type="string">
            <text:p>Black Lemonade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1, 0, 1, 3, 1, 2, 0)</text:p>
          </table:table-cell>
          <table:table-cell office:value-type="string">
            <text:p>Strobics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Hiddekel</text:p>
          </table:table-cell>
          <table:table-cell office:value-type="string">
            <text:p>(1, 1, 0, 3, 2, 1, 0)</text:p>
          </table:table-cell>
          <table:table-cell office:value-type="string">
            <text:p>Hiddekel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hnissugah</text:p>
          </table:table-cell>
          <table:table-cell office:value-type="string">
            <text:p>(1, 1, 0, 2, 2, 0, 0)</text:p>
          </table:table-cell>
          <table:table-cell office:value-type="string">
            <text:p>Shnissuga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loax</text:p>
          </table:table-cell>
          <table:table-cell office:value-type="string">
            <text:p>(1, 0, 1, 2, 0, 2, 0)</text:p>
          </table:table-cell>
          <table:table-cell office:value-type="string">
            <text:p>Koloa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Eliastar</text:p>
          </table:table-cell>
          <table:table-cell office:value-type="string">
            <text:p>(1, 1, 0, 2, 2, 0, 0)</text:p>
          </table:table-cell>
          <table:table-cell office:value-type="string">
            <text:p>Eliasta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JDQ05</text:p>
          </table:table-cell>
          <table:table-cell office:value-type="string">
            <text:p>(2, 1, 1, 4, 2, 2, 0)</text:p>
          </table:table-cell>
          <table:table-cell office:value-type="string">
            <text:p>JDQ05</text:p>
          </table:table-cell>
          <table:table-cell office:value-type="string">
            <text:p>(2, 1, 1, 4, 2, 2, 0)</text:p>
          </table:table-cell>
          <table:table-cell table:number-columns-repeated="1020"/>
        </table:table-row>
        <table:table-row table:style-name="ro1">
          <table:table-cell office:value-type="string">
            <text:p>Yukoa</text:p>
          </table:table-cell>
          <table:table-cell office:value-type="string">
            <text:p>(0, 0, 0, 0, 0, 0, 1)</text:p>
          </table:table-cell>
          <table:table-cell office:value-type="string">
            <text:p>Yukoa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3, 0, 3, 7, 1, 6, 0)</text:p>
          </table:table-cell>
          <table:table-cell office:value-type="string">
            <text:p>McFunny</text:p>
          </table:table-cell>
          <table:table-cell office:value-type="string">
            <text:p>(3, 0, 3, 7, 1, 6, 0)</text:p>
          </table:table-cell>
          <table:table-cell table:number-columns-repeated="1020"/>
        </table:table-row>
        <table:table-row table:style-name="ro1">
          <table:table-cell office:value-type="string">
            <text:p>Jlaw</text:p>
          </table:table-cell>
          <table:table-cell office:value-type="string">
            <text:p>(0, 0, 0, 0, 0, 0, 1)</text:p>
          </table:table-cell>
          <table:table-cell office:value-type="string">
            <text:p>Jlaw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Mario Circuit 3</text:p>
          </table:table-cell>
          <table:table-cell office:value-type="string">
            <text:p>(1, 1, 0, 3, 2, 1, 0)</text:p>
          </table:table-cell>
          <table:table-cell office:value-type="string">
            <text:p>Mario Circuit 3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Keegore</text:p>
          </table:table-cell>
          <table:table-cell office:value-type="string">
            <text:p>(1, 1, 0, 2, 2, 0, 0)</text:p>
          </table:table-cell>
          <table:table-cell office:value-type="string">
            <text:p>Keegor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uayo.sv</text:p>
          </table:table-cell>
          <table:table-cell office:value-type="string">
            <text:p>(1, 1, 0, 3, 2, 1, 0)</text:p>
          </table:table-cell>
          <table:table-cell office:value-type="string">
            <text:p>guayo.sv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aidanbobaidan</text:p>
          </table:table-cell>
          <table:table-cell office:value-type="string">
            <text:p>(1, 1, 0, 2, 2, 0, 0)</text:p>
          </table:table-cell>
          <table:table-cell office:value-type="string">
            <text:p>aidanbobaida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Franknbean</text:p>
          </table:table-cell>
          <table:table-cell office:value-type="string">
            <text:p>(1, 1, 0, 3, 2, 1, 0)</text:p>
          </table:table-cell>
          <table:table-cell office:value-type="string">
            <text:p>Franknbean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0, 0, 0, 0, 0, 0, 1)</text:p>
          </table:table-cell>
          <table:table-cell office:value-type="string">
            <text:p>Hungrybox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quish</text:p>
          </table:table-cell>
          <table:table-cell office:value-type="string">
            <text:p>(1, 0, 1, 3, 1, 2, 0)</text:p>
          </table:table-cell>
          <table:table-cell office:value-type="string">
            <text:p>Squish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TSTORM" table:style-name="ta9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altstorm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1, 0, 1, 2, 0, 2, 0)</text:p>
          </table:table-cell>
          <table:table-cell office:value-type="string">
            <text:p>HaydenEatsShrimp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amesskyy</text:p>
          </table:table-cell>
          <table:table-cell office:value-type="string">
            <text:p>(0, 0, 0, 0, 0, 0, 1)</text:p>
          </table:table-cell>
          <table:table-cell office:value-type="string">
            <text:p>Namessky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NotHbox</text:p>
          </table:table-cell>
          <table:table-cell office:value-type="string">
            <text:p>(1, 0, 1, 3, 1, 2, 0)</text:p>
          </table:table-cell>
          <table:table-cell office:value-type="string">
            <text:p>NotHbox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VALAVA" table:style-name="ta9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Chavalava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PrincessPopkorn</text:p>
          </table:table-cell>
          <table:table-cell office:value-type="string">
            <text:p>(0, 0, 0, 0, 0, 0, 1)</text:p>
          </table:table-cell>
          <table:table-cell office:value-type="string">
            <text:p>PrincessPopkor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1, 0, 1, 2, 0, 2, 1)</text:p>
          </table:table-cell>
          <table:table-cell office:value-type="string">
            <text:p>WonderBread</text:p>
          </table:table-cell>
          <table:table-cell office:value-type="string">
            <text:p>(1, 0, 1, 2, 0, 2, 1)</text:p>
          </table:table-cell>
          <table:table-cell table:number-columns-repeated="1020"/>
        </table:table-row>
        <table:table-row table:style-name="ro1">
          <table:table-cell office:value-type="string">
            <text:p>Mana</text:p>
          </table:table-cell>
          <table:table-cell office:value-type="string">
            <text:p>(1, 1, 0, 2, 2, 0, 0)</text:p>
          </table:table-cell>
          <table:table-cell office:value-type="string">
            <text:p>Man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ryon</text:p>
          </table:table-cell>
          <table:table-cell office:value-type="string">
            <text:p>(1, 0, 1, 2, 0, 2, 0)</text:p>
          </table:table-cell>
          <table:table-cell office:value-type="string">
            <text:p>Kryo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LXIX</text:p>
          </table:table-cell>
          <table:table-cell office:value-type="string">
            <text:p>(1, 1, 0, 2, 2, 0, 0)</text:p>
          </table:table-cell>
          <table:table-cell office:value-type="string">
            <text:p>LXI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Anthzeny</text:p>
          </table:table-cell>
          <table:table-cell office:value-type="string">
            <text:p>(1, 0, 1, 2, 0, 2, 0)</text:p>
          </table:table-cell>
          <table:table-cell office:value-type="string">
            <text:p>Anthzen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econd Floor Basement</text:p>
          </table:table-cell>
          <table:table-cell office:value-type="string">
            <text:p>(1, 0, 1, 2, 0, 2, 0)</text:p>
          </table:table-cell>
          <table:table-cell office:value-type="string">
            <text:p>Second Floor Basemen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tepKnightUp</text:p>
          </table:table-cell>
          <table:table-cell office:value-type="string">
            <text:p>(1, 1, 0, 2, 2, 0, 1)</text:p>
          </table:table-cell>
          <table:table-cell office:value-type="string">
            <text:p>StepKnightUp</text:p>
          </table:table-cell>
          <table:table-cell office:value-type="string">
            <text:p>(1, 1, 0, 2, 2, 0, 1)</text:p>
          </table:table-cell>
          <table:table-cell table:number-columns-repeated="1020"/>
        </table:table-row>
        <table:table-row table:style-name="ro1">
          <table:table-cell office:value-type="string">
            <text:p>a_Successor</text:p>
          </table:table-cell>
          <table:table-cell office:value-type="string">
            <text:p>(0, 0, 0, 0, 0, 0, 1)</text:p>
          </table:table-cell>
          <table:table-cell office:value-type="string">
            <text:p>a_Successor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RedPik</text:p>
          </table:table-cell>
          <table:table-cell office:value-type="string">
            <text:p>(1, 1, 0, 2, 2, 0, 0)</text:p>
          </table:table-cell>
          <table:table-cell office:value-type="string">
            <text:p>RedPi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(1, 0, 1, 2, 0, 2, 0)</text:p>
          </table:table-cell>
          <table:table-cell office:value-type="string">
            <text:p>Dingodil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omingo</text:p>
          </table:table-cell>
          <table:table-cell office:value-type="string">
            <text:p>(1, 1, 0, 2, 2, 0, 0)</text:p>
          </table:table-cell>
          <table:table-cell office:value-type="string">
            <text:p>Doming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hnissugah</text:p>
          </table:table-cell>
          <table:table-cell office:value-type="string">
            <text:p>(1, 1, 0, 2, 2, 0, 0)</text:p>
          </table:table-cell>
          <table:table-cell office:value-type="string">
            <text:p>Shnissuga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yntax</text:p>
          </table:table-cell>
          <table:table-cell office:value-type="string">
            <text:p>(1, 1, 0, 2, 2, 0, 0)</text:p>
          </table:table-cell>
          <table:table-cell office:value-type="string">
            <text:p>synta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1, 0, 1, 2, 0, 2, 0)</text:p>
          </table:table-cell>
          <table:table-cell office:value-type="string">
            <text:p>McFunn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ewiby (Entropy)</text:p>
          </table:table-cell>
          <table:table-cell office:value-type="string">
            <text:p>(1, 0, 1, 2, 0, 2, 0)</text:p>
          </table:table-cell>
          <table:table-cell office:value-type="string">
            <text:p>Newiby (Entropy)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ingu</text:p>
          </table:table-cell>
          <table:table-cell office:value-type="string">
            <text:p>(1, 1, 0, 2, 2, 0, 0)</text:p>
          </table:table-cell>
          <table:table-cell office:value-type="string">
            <text:p>Pingu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piker</text:p>
          </table:table-cell>
          <table:table-cell office:value-type="string">
            <text:p>(1, 1, 0, 3, 2, 1, 0)</text:p>
          </table:table-cell>
          <table:table-cell office:value-type="string">
            <text:p>Spiker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Nori</text:p>
          </table:table-cell>
          <table:table-cell office:value-type="string">
            <text:p>(1, 0, 1, 2, 0, 2, 0)</text:p>
          </table:table-cell>
          <table:table-cell office:value-type="string">
            <text:p>Nor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wonny</text:p>
          </table:table-cell>
          <table:table-cell office:value-type="string">
            <text:p>(1, 1, 0, 2, 2, 0, 0)</text:p>
          </table:table-cell>
          <table:table-cell office:value-type="string">
            <text:p>Twonn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alestine</text:p>
          </table:table-cell>
          <table:table-cell office:value-type="string">
            <text:p>(0, 0, 0, 0, 0, 0, 1)</text:p>
          </table:table-cell>
          <table:table-cell office:value-type="string">
            <text:p>Palestin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. Phantm</text:p>
          </table:table-cell>
          <table:table-cell office:value-type="string">
            <text:p>(1, 0, 1, 2, 0, 2, 0)</text:p>
          </table:table-cell>
          <table:table-cell office:value-type="string">
            <text:p>S. Phant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Quelity</text:p>
          </table:table-cell>
          <table:table-cell office:value-type="string">
            <text:p>(1, 1, 0, 2, 2, 0, 0)</text:p>
          </table:table-cell>
          <table:table-cell office:value-type="string">
            <text:p>Quelit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uckMark</text:p>
          </table:table-cell>
          <table:table-cell office:value-type="string">
            <text:p>(1, 1, 0, 2, 2, 0, 0)</text:p>
          </table:table-cell>
          <table:table-cell office:value-type="string">
            <text:p>DuckMar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1, 0, 1, 2, 0, 2, 0)</text:p>
          </table:table-cell>
          <table:table-cell office:value-type="string">
            <text:p>Strobic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CESSPOPKORN" table:style-name="ta9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PrincessPopkor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0, 0, 0, 0, 0, 0, 1)</text:p>
          </table:table-cell>
          <table:table-cell office:value-type="string">
            <text:p>Chavalava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ChezFarach001</text:p>
          </table:table-cell>
          <table:table-cell office:value-type="string">
            <text:p>(1, 0, 1, 2, 0, 2, 0)</text:p>
          </table:table-cell>
          <table:table-cell office:value-type="string">
            <text:p>ChezFarach001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Hiddekel</text:p>
          </table:table-cell>
          <table:table-cell office:value-type="string">
            <text:p>(1, 0, 1, 2, 0, 2, 0)</text:p>
          </table:table-cell>
          <table:table-cell office:value-type="string">
            <text:p>Hiddek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laine</text:p>
          </table:table-cell>
          <table:table-cell office:value-type="string">
            <text:p>(1, 0, 1, 3, 1, 2, 0)</text:p>
          </table:table-cell>
          <table:table-cell office:value-type="string">
            <text:p>Blaine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ooBell</text:p>
          </table:table-cell>
          <table:table-cell office:value-type="string">
            <text:p>(1, 0, 1, 2, 0, 2, 0)</text:p>
          </table:table-cell>
          <table:table-cell office:value-type="string">
            <text:p>BooBel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RYON" table:style-name="ta9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Kryo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erph</text:p>
          </table:table-cell>
          <table:table-cell office:value-type="string">
            <text:p>(1, 1, 0, 3, 2, 1, 0)</text:p>
          </table:table-cell>
          <table:table-cell office:value-type="string">
            <text:p>Serph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fiend</text:p>
          </table:table-cell>
          <table:table-cell office:value-type="string">
            <text:p>(1, 0, 1, 2, 0, 2, 0)</text:p>
          </table:table-cell>
          <table:table-cell office:value-type="string">
            <text:p>fien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R3M1X</text:p>
          </table:table-cell>
          <table:table-cell office:value-type="string">
            <text:p>(0, 0, 0, 0, 0, 0, 1)</text:p>
          </table:table-cell>
          <table:table-cell office:value-type="string">
            <text:p>R3M1X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1, 1, 0, 2, 2, 0, 0)</text:p>
          </table:table-cell>
          <table:table-cell office:value-type="string">
            <text:p>Chavalav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1, 0, 1, 2, 0, 2, 0)</text:p>
          </table:table-cell>
          <table:table-cell office:value-type="string">
            <text:p>Benj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tepKnightUp</text:p>
          </table:table-cell>
          <table:table-cell office:value-type="string">
            <text:p>(1, 1, 0, 2, 2, 0, 0)</text:p>
          </table:table-cell>
          <table:table-cell office:value-type="string">
            <text:p>StepKnightUp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0, 1, 2, 0, 2, 0)</text:p>
          </table:table-cell>
          <table:table-cell office:value-type="string">
            <text:p>Hungrybo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ommySN</text:p>
          </table:table-cell>
          <table:table-cell office:value-type="string">
            <text:p>(0, 0, 0, 0, 0, 0, 1)</text:p>
          </table:table-cell>
          <table:table-cell office:value-type="string">
            <text:p>TommyS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Doc Shock</text:p>
          </table:table-cell>
          <table:table-cell office:value-type="string">
            <text:p>(1, 1, 0, 3, 2, 1, 0)</text:p>
          </table:table-cell>
          <table:table-cell office:value-type="string">
            <text:p>Doc Shock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1, 0, 1, 2, 0, 2, 0)</text:p>
          </table:table-cell>
          <table:table-cell office:value-type="string">
            <text:p>DarthCJ8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otHbox</text:p>
          </table:table-cell>
          <table:table-cell office:value-type="string">
            <text:p>(1, 0, 1, 2, 0, 2, 0)</text:p>
          </table:table-cell>
          <table:table-cell office:value-type="string">
            <text:p>NotHbo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tubbaloo</text:p>
          </table:table-cell>
          <table:table-cell office:value-type="string">
            <text:p>(1, 1, 0, 2, 2, 0, 0)</text:p>
          </table:table-cell>
          <table:table-cell office:value-type="string">
            <text:p>Stubbalo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1, 0, 1, 2, 0, 2, 0)</text:p>
          </table:table-cell>
          <table:table-cell office:value-type="string">
            <text:p>LuMiSaD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RPH" table:style-name="ta9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erph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Kryon</text:p>
          </table:table-cell>
          <table:table-cell office:value-type="string">
            <text:p>(1, 0, 1, 3, 1, 2, 0)</text:p>
          </table:table-cell>
          <table:table-cell office:value-type="string">
            <text:p>Kryon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Ryeiscool</text:p>
          </table:table-cell>
          <table:table-cell office:value-type="string">
            <text:p>(1, 1, 0, 2, 2, 0, 0)</text:p>
          </table:table-cell>
          <table:table-cell office:value-type="string">
            <text:p>Ryeiscoo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hezFarach001</text:p>
          </table:table-cell>
          <table:table-cell office:value-type="string">
            <text:p>(1, 1, 0, 2, 2, 0, 0)</text:p>
          </table:table-cell>
          <table:table-cell office:value-type="string">
            <text:p>ChezFarach001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oobii</text:p>
          </table:table-cell>
          <table:table-cell office:value-type="string">
            <text:p>(1, 0, 1, 2, 0, 2, 0)</text:p>
          </table:table-cell>
          <table:table-cell office:value-type="string">
            <text:p>poobi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Kakarot</text:p>
          </table:table-cell>
          <table:table-cell office:value-type="string">
            <text:p>(1, 1, 0, 2, 2, 0, 0)</text:p>
          </table:table-cell>
          <table:table-cell office:value-type="string">
            <text:p>Kakaro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elite</text:p>
          </table:table-cell>
          <table:table-cell office:value-type="string">
            <text:p>(0, 0, 0, 0, 0, 0, 1)</text:p>
          </table:table-cell>
          <table:table-cell office:value-type="string">
            <text:p>elit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1, 0, 1, 3, 1, 2, 0)</text:p>
          </table:table-cell>
          <table:table-cell office:value-type="string">
            <text:p>Chez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tjnikhazy</text:p>
          </table:table-cell>
          <table:table-cell office:value-type="string">
            <text:p>(1, 1, 0, 2, 2, 0, 0)</text:p>
          </table:table-cell>
          <table:table-cell office:value-type="string">
            <text:p>tjnikhaz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anzana</text:p>
          </table:table-cell>
          <table:table-cell office:value-type="string">
            <text:p>(1, 0, 1, 2, 0, 2, 0)</text:p>
          </table:table-cell>
          <table:table-cell office:value-type="string">
            <text:p>Manzan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arlJT</text:p>
          </table:table-cell>
          <table:table-cell office:value-type="string">
            <text:p>(1, 0, 1, 2, 0, 2, 0)</text:p>
          </table:table-cell>
          <table:table-cell office:value-type="string">
            <text:p>CarlJ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U!" table:style-name="ta10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Karu!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Ryeiscool</text:p>
          </table:table-cell>
          <table:table-cell office:value-type="string">
            <text:p>(1, 1, 0, 2, 2, 0, 0)</text:p>
          </table:table-cell>
          <table:table-cell office:value-type="string">
            <text:p>Ryeiscoo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1, 1, 0, 2, 2, 0, 0)</text:p>
          </table:table-cell>
          <table:table-cell office:value-type="string">
            <text:p>xXx_PeterGokuGriffin_xX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eal King Barbaros</text:p>
          </table:table-cell>
          <table:table-cell office:value-type="string">
            <text:p>(1, 1, 0, 2, 2, 0, 0)</text:p>
          </table:table-cell>
          <table:table-cell office:value-type="string">
            <text:p>Seal King Barbaro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1, 1, 0, 2, 2, 0, 0)</text:p>
          </table:table-cell>
          <table:table-cell office:value-type="string">
            <text:p>WonderBrea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Zomba</text:p>
          </table:table-cell>
          <table:table-cell office:value-type="string">
            <text:p>(1, 0, 1, 4, 1, 3, 0)</text:p>
          </table:table-cell>
          <table:table-cell office:value-type="string">
            <text:p>Zomba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Goblin</text:p>
          </table:table-cell>
          <table:table-cell office:value-type="string">
            <text:p>(1, 1, 0, 3, 3, 0, 0)</text:p>
          </table:table-cell>
          <table:table-cell office:value-type="string">
            <text:p>Goblin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3, 1, 2, 11, 4, 7, 0)</text:p>
          </table:table-cell>
          <table:table-cell office:value-type="string">
            <text:p>Epic_Gabriel</text:p>
          </table:table-cell>
          <table:table-cell office:value-type="string">
            <text:p>(3, 1, 2, 11, 4, 7, 0)</text:p>
          </table:table-cell>
          <table:table-cell table:number-columns-repeated="1020"/>
        </table:table-row>
        <table:table-row table:style-name="ro1">
          <table:table-cell office:value-type="string">
            <text:p>Mario Circuit 3</text:p>
          </table:table-cell>
          <table:table-cell office:value-type="string">
            <text:p>(1, 1, 0, 2, 2, 0, 0)</text:p>
          </table:table-cell>
          <table:table-cell office:value-type="string">
            <text:p>Mario Circuit 3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itrobone</text:p>
          </table:table-cell>
          <table:table-cell office:value-type="string">
            <text:p>(1, 1, 0, 2, 2, 0, 0)</text:p>
          </table:table-cell>
          <table:table-cell office:value-type="string">
            <text:p>Nitrobon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he Chuckster</text:p>
          </table:table-cell>
          <table:table-cell office:value-type="string">
            <text:p>(1, 1, 0, 2, 2, 0, 0)</text:p>
          </table:table-cell>
          <table:table-cell office:value-type="string">
            <text:p>The Chuckste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hpstks</text:p>
          </table:table-cell>
          <table:table-cell office:value-type="string">
            <text:p>(1, 1, 0, 2, 2, 0, 0)</text:p>
          </table:table-cell>
          <table:table-cell office:value-type="string">
            <text:p>chpstk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urtles</text:p>
          </table:table-cell>
          <table:table-cell office:value-type="string">
            <text:p>(1, 1, 0, 2, 2, 0, 0)</text:p>
          </table:table-cell>
          <table:table-cell office:value-type="string">
            <text:p>Turtle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ominator</text:p>
          </table:table-cell>
          <table:table-cell office:value-type="string">
            <text:p>(1, 0, 1, 4, 1, 3, 0)</text:p>
          </table:table-cell>
          <table:table-cell office:value-type="string">
            <text:p>Dominator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XX_PETERGOKUGRIFFIN_XXX" table:style-name="ta10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xXx_PeterGokuGriffin_xXx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ChezFarach001</text:p>
          </table:table-cell>
          <table:table-cell office:value-type="string">
            <text:p>(1, 1, 0, 2, 2, 0, 0)</text:p>
          </table:table-cell>
          <table:table-cell office:value-type="string">
            <text:p>ChezFarach001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aru!</text:p>
          </table:table-cell>
          <table:table-cell office:value-type="string">
            <text:p>(1, 0, 1, 2, 0, 2, 0)</text:p>
          </table:table-cell>
          <table:table-cell office:value-type="string">
            <text:p>Karu!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1, 0, 1, 2, 0, 2, 0)</text:p>
          </table:table-cell>
          <table:table-cell office:value-type="string">
            <text:p>HaydenEatsShrimp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oobii</text:p>
          </table:table-cell>
          <table:table-cell office:value-type="string">
            <text:p>(2, 0, 2, 5, 1, 4, 0)</text:p>
          </table:table-cell>
          <table:table-cell office:value-type="string">
            <text:p>poobii</text:p>
          </table:table-cell>
          <table:table-cell office:value-type="string">
            <text:p>(2, 0, 2, 5, 1, 4, 0)</text:p>
          </table:table-cell>
          <table:table-cell table:number-columns-repeated="1020"/>
        </table:table-row>
        <table:table-row table:style-name="ro1">
          <table:table-cell office:value-type="string">
            <text:p>Blitz</text:p>
          </table:table-cell>
          <table:table-cell office:value-type="string">
            <text:p>(1, 1, 0, 2, 2, 0, 0)</text:p>
          </table:table-cell>
          <table:table-cell office:value-type="string">
            <text:p>Blitz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yperLuvsGod</text:p>
          </table:table-cell>
          <table:table-cell office:value-type="string">
            <text:p>(1, 1, 0, 2, 2, 0, 0)</text:p>
          </table:table-cell>
          <table:table-cell office:value-type="string">
            <text:p>HyperLuvsGo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ilios</text:p>
          </table:table-cell>
          <table:table-cell office:value-type="string">
            <text:p>(1, 1, 0, 3, 2, 1, 0)</text:p>
          </table:table-cell>
          <table:table-cell office:value-type="string">
            <text:p>stilios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OTO_PINK</text:p>
          </table:table-cell>
          <table:table-cell office:value-type="string">
            <text:p>(1, 0, 1, 3, 1, 2, 0)</text:p>
          </table:table-cell>
          <table:table-cell office:value-type="string">
            <text:p>TOTO_PINK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DGK</text:p>
          </table:table-cell>
          <table:table-cell office:value-type="string">
            <text:p>(1, 1, 0, 3, 2, 1, 0)</text:p>
          </table:table-cell>
          <table:table-cell office:value-type="string">
            <text:p>DGK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1, 1, 0, 3, 2, 1, 0)</text:p>
          </table:table-cell>
          <table:table-cell office:value-type="string">
            <text:p>Vinny, The Lick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S. Phantm</text:p>
          </table:table-cell>
          <table:table-cell office:value-type="string">
            <text:p>(2, 0, 2, 4, 0, 4, 0)</text:p>
          </table:table-cell>
          <table:table-cell office:value-type="string">
            <text:p>S. Phantm</text:p>
          </table:table-cell>
          <table:table-cell office:value-type="string">
            <text:p>(2, 0, 2, 4, 0, 4, 0)</text:p>
          </table:table-cell>
          <table:table-cell table:number-columns-repeated="1020"/>
        </table:table-row>
        <table:table-row table:style-name="ro1">
          <table:table-cell office:value-type="string">
            <text:p>Just_A_Tarrasque</text:p>
          </table:table-cell>
          <table:table-cell office:value-type="string">
            <text:p>(1, 1, 0, 2, 2, 0, 0)</text:p>
          </table:table-cell>
          <table:table-cell office:value-type="string">
            <text:p>Just_A_Tarrasqu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Viprskreen</text:p>
          </table:table-cell>
          <table:table-cell office:value-type="string">
            <text:p>(1, 1, 0, 2, 2, 0, 0)</text:p>
          </table:table-cell>
          <table:table-cell office:value-type="string">
            <text:p>Viprskree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uff</text:p>
          </table:table-cell>
          <table:table-cell office:value-type="string">
            <text:p>(0, 0, 0, 0, 0, 0, 1)</text:p>
          </table:table-cell>
          <table:table-cell office:value-type="string">
            <text:p>puff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Newo</text:p>
          </table:table-cell>
          <table:table-cell office:value-type="string">
            <text:p>(1, 0, 1, 2, 0, 2, 0)</text:p>
          </table:table-cell>
          <table:table-cell office:value-type="string">
            <text:p>Newo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Fapple</text:p>
          </table:table-cell>
          <table:table-cell office:value-type="string">
            <text:p>(1, 1, 0, 2, 2, 0, 0)</text:p>
          </table:table-cell>
          <table:table-cell office:value-type="string">
            <text:p>Fappl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uckMark</text:p>
          </table:table-cell>
          <table:table-cell office:value-type="string">
            <text:p>(1, 1, 0, 2, 2, 0, 0)</text:p>
          </table:table-cell>
          <table:table-cell office:value-type="string">
            <text:p>DuckMar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eal King Barbaros</text:p>
          </table:table-cell>
          <table:table-cell office:value-type="string">
            <text:p>(1, 1, 0, 3, 2, 1, 0)</text:p>
          </table:table-cell>
          <table:table-cell office:value-type="string">
            <text:p>Seal King Barbaros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Hiddekel</text:p>
          </table:table-cell>
          <table:table-cell office:value-type="string">
            <text:p>(1, 0, 1, 2, 0, 2, 0)</text:p>
          </table:table-cell>
          <table:table-cell office:value-type="string">
            <text:p>Hiddek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asterqz</text:p>
          </table:table-cell>
          <table:table-cell office:value-type="string">
            <text:p>(1, 0, 1, 2, 0, 2, 0)</text:p>
          </table:table-cell>
          <table:table-cell office:value-type="string">
            <text:p>masterqz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JonConBoi</text:p>
          </table:table-cell>
          <table:table-cell office:value-type="string">
            <text:p>(1, 1, 0, 2, 2, 0, 0)</text:p>
          </table:table-cell>
          <table:table-cell office:value-type="string">
            <text:p>JonConBo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ig</text:p>
          </table:table-cell>
          <table:table-cell office:value-type="string">
            <text:p>(0, 0, 0, 0, 0, 0, 1)</text:p>
          </table:table-cell>
          <table:table-cell office:value-type="string">
            <text:p>Big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Lucky</text:p>
          </table:table-cell>
          <table:table-cell office:value-type="string">
            <text:p>(1, 0, 1, 2, 0, 2, 0)</text:p>
          </table:table-cell>
          <table:table-cell office:value-type="string">
            <text:p>Luck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I" table:style-name="ta10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Benji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Namesskyy</text:p>
          </table:table-cell>
          <table:table-cell office:value-type="string">
            <text:p>(0, 0, 0, 0, 0, 0, 1)</text:p>
          </table:table-cell>
          <table:table-cell office:value-type="string">
            <text:p>Namessky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eal King Barbaros</text:p>
          </table:table-cell>
          <table:table-cell office:value-type="string">
            <text:p>(2, 1, 1, 5, 2, 3, 0)</text:p>
          </table:table-cell>
          <table:table-cell office:value-type="string">
            <text:p>Seal King Barbaros</text:p>
          </table:table-cell>
          <table:table-cell office:value-type="string">
            <text:p>(2, 1, 1, 5, 2, 3, 0)</text:p>
          </table:table-cell>
          <table:table-cell table:number-columns-repeated="1020"/>
        </table:table-row>
        <table:table-row table:style-name="ro1">
          <table:table-cell office:value-type="string">
            <text:p>Kryon</text:p>
          </table:table-cell>
          <table:table-cell office:value-type="string">
            <text:p>(1, 1, 0, 2, 2, 0, 0)</text:p>
          </table:table-cell>
          <table:table-cell office:value-type="string">
            <text:p>Kryo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1, 1, 0, 3, 2, 1, 0)</text:p>
          </table:table-cell>
          <table:table-cell office:value-type="string">
            <text:p>HaydenEatsShrimp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chpstks</text:p>
          </table:table-cell>
          <table:table-cell office:value-type="string">
            <text:p>(1, 1, 0, 3, 2, 1, 0)</text:p>
          </table:table-cell>
          <table:table-cell office:value-type="string">
            <text:p>chpstks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Kiki</text:p>
          </table:table-cell>
          <table:table-cell office:value-type="string">
            <text:p>(1, 1, 0, 2, 2, 0, 0)</text:p>
          </table:table-cell>
          <table:table-cell office:value-type="string">
            <text:p>Kik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1, 1, 0, 5, 3, 2, 0)</text:p>
          </table:table-cell>
          <table:table-cell office:value-type="string">
            <text:p>Shaine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0, 1, 3, 0, 3, 0)</text:p>
          </table:table-cell>
          <table:table-cell office:value-type="string">
            <text:p>Epic_Gabriel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Riku</text:p>
          </table:table-cell>
          <table:table-cell office:value-type="string">
            <text:p>(1, 0, 1, 2, 0, 2, 0)</text:p>
          </table:table-cell>
          <table:table-cell office:value-type="string">
            <text:p>Riku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ark4orce</text:p>
          </table:table-cell>
          <table:table-cell office:value-type="string">
            <text:p>(1, 1, 0, 2, 2, 0, 0)</text:p>
          </table:table-cell>
          <table:table-cell office:value-type="string">
            <text:p>Dark4orc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lack Lemonade</text:p>
          </table:table-cell>
          <table:table-cell office:value-type="string">
            <text:p>(1, 1, 0, 3, 2, 1, 0)</text:p>
          </table:table-cell>
          <table:table-cell office:value-type="string">
            <text:p>Black Lemonade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1, 1, 0, 3, 2, 1, 0)</text:p>
          </table:table-cell>
          <table:table-cell office:value-type="string">
            <text:p>Strobics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D0g3</text:p>
          </table:table-cell>
          <table:table-cell office:value-type="string">
            <text:p>(1, 1, 0, 2, 2, 0, 0)</text:p>
          </table:table-cell>
          <table:table-cell office:value-type="string">
            <text:p>D0g3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adera</text:p>
          </table:table-cell>
          <table:table-cell office:value-type="string">
            <text:p>(1, 0, 1, 3, 1, 2, 0)</text:p>
          </table:table-cell>
          <table:table-cell office:value-type="string">
            <text:p>Madera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Papi</text:p>
          </table:table-cell>
          <table:table-cell office:value-type="string">
            <text:p>(1, 1, 0, 2, 2, 0, 0)</text:p>
          </table:table-cell>
          <table:table-cell office:value-type="string">
            <text:p>Pap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Oki</text:p>
          </table:table-cell>
          <table:table-cell office:value-type="string">
            <text:p>(2, 2, 0, 6, 4, 2, 0)</text:p>
          </table:table-cell>
          <table:table-cell office:value-type="string">
            <text:p>Oki</text:p>
          </table:table-cell>
          <table:table-cell office:value-type="string">
            <text:p>(2, 2, 0, 6, 4, 2, 0)</text:p>
          </table:table-cell>
          <table:table-cell table:number-columns-repeated="1020"/>
        </table:table-row>
        <table:table-row table:style-name="ro1">
          <table:table-cell office:value-type="string">
            <text:p>Navé</text:p>
          </table:table-cell>
          <table:table-cell office:value-type="string">
            <text:p>(1, 0, 1, 3, 1, 2, 0)</text:p>
          </table:table-cell>
          <table:table-cell office:value-type="string">
            <text:p>Navé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fiend</text:p>
          </table:table-cell>
          <table:table-cell office:value-type="string">
            <text:p>(1, 1, 0, 2, 2, 0, 0)</text:p>
          </table:table-cell>
          <table:table-cell office:value-type="string">
            <text:p>fien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2, 1, 1, 5, 3, 2, 0)</text:p>
          </table:table-cell>
          <table:table-cell office:value-type="string">
            <text:p>Plummet</text:p>
          </table:table-cell>
          <table:table-cell office:value-type="string">
            <text:p>(2, 1, 1, 5, 3, 2, 0)</text:p>
          </table:table-cell>
          <table:table-cell table:number-columns-repeated="1020"/>
        </table:table-row>
        <table:table-row table:style-name="ro1">
          <table:table-cell office:value-type="string">
            <text:p>Venikki</text:p>
          </table:table-cell>
          <table:table-cell office:value-type="string">
            <text:p>(1, 0, 1, 2, 0, 2, 0)</text:p>
          </table:table-cell>
          <table:table-cell office:value-type="string">
            <text:p>Venikk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mar3</text:p>
          </table:table-cell>
          <table:table-cell office:value-type="string">
            <text:p>(1, 1, 0, 2, 2, 0, 0)</text:p>
          </table:table-cell>
          <table:table-cell office:value-type="string">
            <text:p>Dmar3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1, 0, 1, 3, 1, 2, 0)</text:p>
          </table:table-cell>
          <table:table-cell office:value-type="string">
            <text:p>Squishy~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RadioActiv</text:p>
          </table:table-cell>
          <table:table-cell office:value-type="string">
            <text:p>(1, 1, 0, 2, 2, 0, 0)</text:p>
          </table:table-cell>
          <table:table-cell office:value-type="string">
            <text:p>RadioActiv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laine</text:p>
          </table:table-cell>
          <table:table-cell office:value-type="string">
            <text:p>(1, 0, 1, 2, 0, 2, 0)</text:p>
          </table:table-cell>
          <table:table-cell office:value-type="string">
            <text:p>Blain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inclair</text:p>
          </table:table-cell>
          <table:table-cell office:value-type="string">
            <text:p>(1, 1, 0, 2, 2, 0, 0)</text:p>
          </table:table-cell>
          <table:table-cell office:value-type="string">
            <text:p>Sinclai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iddekel</text:p>
          </table:table-cell>
          <table:table-cell office:value-type="string">
            <text:p>(1, 1, 0, 2, 2, 0, 0)</text:p>
          </table:table-cell>
          <table:table-cell office:value-type="string">
            <text:p>Hiddeke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oemiglazer67</text:p>
          </table:table-cell>
          <table:table-cell office:value-type="string">
            <text:p>(1, 0, 1, 3, 1, 2, 0)</text:p>
          </table:table-cell>
          <table:table-cell office:value-type="string">
            <text:p>noemiglazer67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SuperStatic</text:p>
          </table:table-cell>
          <table:table-cell office:value-type="string">
            <text:p>(1, 1, 0, 2, 2, 0, 0)</text:p>
          </table:table-cell>
          <table:table-cell office:value-type="string">
            <text:p>SuperStatic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AL KING BARBAROS" table:style-name="ta10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eal King Barbaros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NotHbox</text:p>
          </table:table-cell>
          <table:table-cell office:value-type="string">
            <text:p>(1, 1, 0, 2, 2, 0, 0)</text:p>
          </table:table-cell>
          <table:table-cell office:value-type="string">
            <text:p>NotHbo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2, 1, 1, 5, 3, 2, 0)</text:p>
          </table:table-cell>
          <table:table-cell office:value-type="string">
            <text:p>Benji</text:p>
          </table:table-cell>
          <table:table-cell office:value-type="string">
            <text:p>(2, 1, 1, 5, 3, 2, 0)</text:p>
          </table:table-cell>
          <table:table-cell table:number-columns-repeated="1020"/>
        </table:table-row>
        <table:table-row table:style-name="ro1">
          <table:table-cell office:value-type="string">
            <text:p>Karu!</text:p>
          </table:table-cell>
          <table:table-cell office:value-type="string">
            <text:p>(1, 0, 1, 2, 0, 2, 0)</text:p>
          </table:table-cell>
          <table:table-cell office:value-type="string">
            <text:p>Karu!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owlin</text:p>
          </table:table-cell>
          <table:table-cell office:value-type="string">
            <text:p>(1, 1, 0, 2, 2, 0, 0)</text:p>
          </table:table-cell>
          <table:table-cell office:value-type="string">
            <text:p>Bowli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oormatt</text:p>
          </table:table-cell>
          <table:table-cell office:value-type="string">
            <text:p>(1, 1, 0, 2, 2, 0, 0)</text:p>
          </table:table-cell>
          <table:table-cell office:value-type="string">
            <text:p>Doormat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1, 0, 2, 2, 0, 0)</text:p>
          </table:table-cell>
          <table:table-cell office:value-type="string">
            <text:p>Hungrybo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1, 1, 0, 2, 2, 0, 0)</text:p>
          </table:table-cell>
          <table:table-cell office:value-type="string">
            <text:p>Vinny, The Lic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lean</text:p>
          </table:table-cell>
          <table:table-cell office:value-type="string">
            <text:p>(1, 1, 0, 3, 2, 1, 0)</text:p>
          </table:table-cell>
          <table:table-cell office:value-type="string">
            <text:p>clean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ESAM</text:p>
          </table:table-cell>
          <table:table-cell office:value-type="string">
            <text:p>(1, 1, 0, 3, 2, 1, 0)</text:p>
          </table:table-cell>
          <table:table-cell office:value-type="string">
            <text:p>ESAM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Koloax</text:p>
          </table:table-cell>
          <table:table-cell office:value-type="string">
            <text:p>(1, 0, 1, 3, 0, 3, 0)</text:p>
          </table:table-cell>
          <table:table-cell office:value-type="string">
            <text:p>Koloax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Chicken Parm</text:p>
          </table:table-cell>
          <table:table-cell office:value-type="string">
            <text:p>(1, 1, 0, 2, 2, 0, 0)</text:p>
          </table:table-cell>
          <table:table-cell office:value-type="string">
            <text:p>Chicken Parm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fiend</text:p>
          </table:table-cell>
          <table:table-cell office:value-type="string">
            <text:p>(1, 1, 0, 2, 2, 0, 0)</text:p>
          </table:table-cell>
          <table:table-cell office:value-type="string">
            <text:p>fien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1, 0, 1, 2, 0, 2, 0)</text:p>
          </table:table-cell>
          <table:table-cell office:value-type="string">
            <text:p>Bhan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1, 0, 1, 3, 1, 2, 0)</text:p>
          </table:table-cell>
          <table:table-cell office:value-type="string">
            <text:p>xXx_PeterGokuGriffin_xXx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BLIN" table:style-name="ta10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Gobli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Doc Shock</text:p>
          </table:table-cell>
          <table:table-cell office:value-type="string">
            <text:p>(1, 1, 0, 2, 2, 0, 0)</text:p>
          </table:table-cell>
          <table:table-cell office:value-type="string">
            <text:p>Doc Shoc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oobii</text:p>
          </table:table-cell>
          <table:table-cell office:value-type="string">
            <text:p>(1, 1, 0, 2, 2, 0, 0)</text:p>
          </table:table-cell>
          <table:table-cell office:value-type="string">
            <text:p>poobi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1, 0, 1, 2, 0, 2, 0)</text:p>
          </table:table-cell>
          <table:table-cell office:value-type="string">
            <text:p>WonderBrea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1, 1, 0, 2, 2, 0, 0)</text:p>
          </table:table-cell>
          <table:table-cell office:value-type="string">
            <text:p>Bhan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UNSLINGING GATOS</text:p>
          </table:table-cell>
          <table:table-cell office:value-type="string">
            <text:p>(1, 1, 0, 2, 2, 0, 0)</text:p>
          </table:table-cell>
          <table:table-cell office:value-type="string">
            <text:p>GUNSLINGING GATO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loax</text:p>
          </table:table-cell>
          <table:table-cell office:value-type="string">
            <text:p>(1, 1, 0, 2, 2, 0, 0)</text:p>
          </table:table-cell>
          <table:table-cell office:value-type="string">
            <text:p>Koloa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ewo</text:p>
          </table:table-cell>
          <table:table-cell office:value-type="string">
            <text:p>(1, 1, 0, 5, 3, 2, 0)</text:p>
          </table:table-cell>
          <table:table-cell office:value-type="string">
            <text:p>Newo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Karu!</text:p>
          </table:table-cell>
          <table:table-cell office:value-type="string">
            <text:p>(1, 0, 1, 3, 0, 3, 0)</text:p>
          </table:table-cell>
          <table:table-cell office:value-type="string">
            <text:p>Karu!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OBII" table:style-name="ta10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poobii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1, 1, 0, 3, 2, 1, 0)</text:p>
          </table:table-cell>
          <table:table-cell office:value-type="string">
            <text:p>HaydenEatsShrimp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Goblin</text:p>
          </table:table-cell>
          <table:table-cell office:value-type="string">
            <text:p>(1, 0, 1, 2, 0, 2, 0)</text:p>
          </table:table-cell>
          <table:table-cell office:value-type="string">
            <text:p>Gobli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erph</text:p>
          </table:table-cell>
          <table:table-cell office:value-type="string">
            <text:p>(1, 1, 0, 2, 2, 0, 0)</text:p>
          </table:table-cell>
          <table:table-cell office:value-type="string">
            <text:p>Serp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fiend</text:p>
          </table:table-cell>
          <table:table-cell office:value-type="string">
            <text:p>(1, 1, 0, 3, 2, 1, 0)</text:p>
          </table:table-cell>
          <table:table-cell office:value-type="string">
            <text:p>fiend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1, 0, 1, 3, 1, 2, 0)</text:p>
          </table:table-cell>
          <table:table-cell office:value-type="string">
            <text:p>Squishy~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2, 2, 0, 5, 4, 1, 0)</text:p>
          </table:table-cell>
          <table:table-cell office:value-type="string">
            <text:p>xXx_PeterGokuGriffin_xXx</text:p>
          </table:table-cell>
          <table:table-cell office:value-type="string">
            <text:p>(2, 2, 0, 5, 4, 1, 0)</text:p>
          </table:table-cell>
          <table:table-cell table:number-columns-repeated="1020"/>
        </table:table-row>
        <table:table-row table:style-name="ro1">
          <table:table-cell office:value-type="string">
            <text:p>NessQuik</text:p>
          </table:table-cell>
          <table:table-cell office:value-type="string">
            <text:p>(1, 0, 1, 2, 0, 2, 0)</text:p>
          </table:table-cell>
          <table:table-cell office:value-type="string">
            <text:p>NessQui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econd Floor Basement</text:p>
          </table:table-cell>
          <table:table-cell office:value-type="string">
            <text:p>(1, 0, 1, 3, 1, 2, 0)</text:p>
          </table:table-cell>
          <table:table-cell office:value-type="string">
            <text:p>Second Floor Basement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Tunic</text:p>
          </table:table-cell>
          <table:table-cell office:value-type="string">
            <text:p>(1, 1, 0, 2, 2, 0, 0)</text:p>
          </table:table-cell>
          <table:table-cell office:value-type="string">
            <text:p>Tunic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ominator</text:p>
          </table:table-cell>
          <table:table-cell office:value-type="string">
            <text:p>(1, 0, 1, 2, 0, 2, 0)</text:p>
          </table:table-cell>
          <table:table-cell office:value-type="string">
            <text:p>Dominator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1, 0, 1, 2, 0, 2, 0)</text:p>
          </table:table-cell>
          <table:table-cell office:value-type="string">
            <text:p>Twiligh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laine</text:p>
          </table:table-cell>
          <table:table-cell office:value-type="string">
            <text:p>(1, 1, 0, 3, 2, 1, 0)</text:p>
          </table:table-cell>
          <table:table-cell office:value-type="string">
            <text:p>Blaine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Navé</text:p>
          </table:table-cell>
          <table:table-cell office:value-type="string">
            <text:p>(1, 0, 1, 3, 1, 2, 0)</text:p>
          </table:table-cell>
          <table:table-cell office:value-type="string">
            <text:p>Navé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. Phantm</text:p>
          </table:table-cell>
          <table:table-cell office:value-type="string">
            <text:p>(1, 0, 1, 2, 0, 2, 0)</text:p>
          </table:table-cell>
          <table:table-cell office:value-type="string">
            <text:p>S. Phant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Redpik</text:p>
          </table:table-cell>
          <table:table-cell office:value-type="string">
            <text:p>(1, 1, 0, 2, 2, 0, 0)</text:p>
          </table:table-cell>
          <table:table-cell office:value-type="string">
            <text:p>Redpi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less</text:p>
          </table:table-cell>
          <table:table-cell office:value-type="string">
            <text:p>(1, 1, 0, 3, 2, 1, 0)</text:p>
          </table:table-cell>
          <table:table-cell office:value-type="string">
            <text:p>Cless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1, 0, 1, 2, 0, 2, 0)</text:p>
          </table:table-cell>
          <table:table-cell office:value-type="string">
            <text:p>WonderBrea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Lucky</text:p>
          </table:table-cell>
          <table:table-cell office:value-type="string">
            <text:p>(1, 0, 1, 2, 0, 2, 0)</text:p>
          </table:table-cell>
          <table:table-cell office:value-type="string">
            <text:p>Luck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NDERBREAD" table:style-name="ta10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WonderBread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1, 1, 0, 2, 2, 0, 1)</text:p>
          </table:table-cell>
          <table:table-cell office:value-type="string">
            <text:p>Chavalava</text:p>
          </table:table-cell>
          <table:table-cell office:value-type="string">
            <text:p>(1, 1, 0, 2, 2, 0, 1)</text:p>
          </table:table-cell>
          <table:table-cell table:number-columns-repeated="1020"/>
        </table:table-row>
        <table:table-row table:style-name="ro1">
          <table:table-cell office:value-type="string">
            <text:p>fiend</text:p>
          </table:table-cell>
          <table:table-cell office:value-type="string">
            <text:p>(1, 1, 0, 2, 2, 0, 0)</text:p>
          </table:table-cell>
          <table:table-cell office:value-type="string">
            <text:p>fien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oblin</text:p>
          </table:table-cell>
          <table:table-cell office:value-type="string">
            <text:p>(1, 1, 0, 2, 2, 0, 0)</text:p>
          </table:table-cell>
          <table:table-cell office:value-type="string">
            <text:p>Gobli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aru!</text:p>
          </table:table-cell>
          <table:table-cell office:value-type="string">
            <text:p>(1, 0, 1, 2, 0, 2, 0)</text:p>
          </table:table-cell>
          <table:table-cell office:value-type="string">
            <text:p>Karu!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2, 1, 1, 5, 3, 2, 0)</text:p>
          </table:table-cell>
          <table:table-cell office:value-type="string">
            <text:p>Shaine</text:p>
          </table:table-cell>
          <table:table-cell office:value-type="string">
            <text:p>(2, 1, 1, 5, 3, 2, 0)</text:p>
          </table:table-cell>
          <table:table-cell table:number-columns-repeated="1020"/>
        </table:table-row>
        <table:table-row table:style-name="ro1">
          <table:table-cell office:value-type="string">
            <text:p>JediSmash</text:p>
          </table:table-cell>
          <table:table-cell office:value-type="string">
            <text:p>(1, 1, 0, 2, 2, 0, 0)</text:p>
          </table:table-cell>
          <table:table-cell office:value-type="string">
            <text:p>JediSmas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ellonian</text:p>
          </table:table-cell>
          <table:table-cell office:value-type="string">
            <text:p>(1, 1, 0, 2, 2, 0, 0)</text:p>
          </table:table-cell>
          <table:table-cell office:value-type="string">
            <text:p>Pellonia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Venikki</text:p>
          </table:table-cell>
          <table:table-cell office:value-type="string">
            <text:p>(2, 1, 1, 5, 2, 3, 0)</text:p>
          </table:table-cell>
          <table:table-cell office:value-type="string">
            <text:p>Venikki</text:p>
          </table:table-cell>
          <table:table-cell office:value-type="string">
            <text:p>(2, 1, 1, 5, 2, 3, 0)</text:p>
          </table:table-cell>
          <table:table-cell table:number-columns-repeated="1020"/>
        </table:table-row>
        <table:table-row table:style-name="ro1"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Koloax</text:p>
          </table:table-cell>
          <table:table-cell office:value-type="string">
            <text:p>(1, 0, 1, 2, 0, 2, 0)</text:p>
          </table:table-cell>
          <table:table-cell office:value-type="string">
            <text:p>Koloa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juno</text:p>
          </table:table-cell>
          <table:table-cell office:value-type="string">
            <text:p>(0, 0, 0, 0, 0, 0, 1)</text:p>
          </table:table-cell>
          <table:table-cell office:value-type="string">
            <text:p>juno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Wiccan</text:p>
          </table:table-cell>
          <table:table-cell office:value-type="string">
            <text:p>(1, 1, 0, 2, 2, 0, 0)</text:p>
          </table:table-cell>
          <table:table-cell office:value-type="string">
            <text:p>Wicca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1, 1, 0, 2, 2, 0, 0)</text:p>
          </table:table-cell>
          <table:table-cell office:value-type="string">
            <text:p>Twiligh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1, 1, 0, 2, 2, 0, 0)</text:p>
          </table:table-cell>
          <table:table-cell office:value-type="string">
            <text:p>Bhan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2, 0, 2, 6, 1, 5, 0)</text:p>
          </table:table-cell>
          <table:table-cell office:value-type="string">
            <text:p>BeastModePaul</text:p>
          </table:table-cell>
          <table:table-cell office:value-type="string">
            <text:p>(2, 0, 2, 6, 1, 5, 0)</text:p>
          </table:table-cell>
          <table:table-cell table:number-columns-repeated="1020"/>
        </table:table-row>
        <table:table-row table:style-name="ro1">
          <table:table-cell office:value-type="string">
            <text:p>Stubbaloo</text:p>
          </table:table-cell>
          <table:table-cell office:value-type="string">
            <text:p>(1, 1, 0, 2, 2, 0, 0)</text:p>
          </table:table-cell>
          <table:table-cell office:value-type="string">
            <text:p>Stubbalo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otHbox</text:p>
          </table:table-cell>
          <table:table-cell office:value-type="string">
            <text:p>(1, 1, 0, 2, 2, 0, 0)</text:p>
          </table:table-cell>
          <table:table-cell office:value-type="string">
            <text:p>NotHbo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IMROD69</text:p>
          </table:table-cell>
          <table:table-cell office:value-type="string">
            <text:p>(1, 1, 0, 2, 2, 0, 0)</text:p>
          </table:table-cell>
          <table:table-cell office:value-type="string">
            <text:p>NIMROD69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ilios</text:p>
          </table:table-cell>
          <table:table-cell office:value-type="string">
            <text:p>(1, 1, 0, 3, 2, 1, 0)</text:p>
          </table:table-cell>
          <table:table-cell office:value-type="string">
            <text:p>stilios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1, 1, 0, 3, 3, 0, 0)</text:p>
          </table:table-cell>
          <table:table-cell office:value-type="string">
            <text:p>Strobics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Newo</text:p>
          </table:table-cell>
          <table:table-cell office:value-type="string">
            <text:p>(1, 0, 1, 5, 2, 3, 0)</text:p>
          </table:table-cell>
          <table:table-cell office:value-type="string">
            <text:p>Newo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apachesavage</text:p>
          </table:table-cell>
          <table:table-cell office:value-type="string">
            <text:p>(1, 1, 0, 2, 2, 0, 0)</text:p>
          </table:table-cell>
          <table:table-cell office:value-type="string">
            <text:p>apachesavag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1, 1, 0, 3, 2, 1, 0)</text:p>
          </table:table-cell>
          <table:table-cell office:value-type="string">
            <text:p>LuMiSaDi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poobii</text:p>
          </table:table-cell>
          <table:table-cell office:value-type="string">
            <text:p>(1, 1, 0, 2, 2, 0, 0)</text:p>
          </table:table-cell>
          <table:table-cell office:value-type="string">
            <text:p>poobi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0, 1, 3, 1, 2, 0)</text:p>
          </table:table-cell>
          <table:table-cell office:value-type="string">
            <text:p>Epic_Gabriel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LightningCam</text:p>
          </table:table-cell>
          <table:table-cell office:value-type="string">
            <text:p>(0, 0, 0, 0, 0, 0, 1)</text:p>
          </table:table-cell>
          <table:table-cell office:value-type="string">
            <text:p>LightningCam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ND" table:style-name="ta10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fiend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Kryon</text:p>
          </table:table-cell>
          <table:table-cell office:value-type="string">
            <text:p>(1, 1, 0, 2, 2, 0, 0)</text:p>
          </table:table-cell>
          <table:table-cell office:value-type="string">
            <text:p>Kryo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1, 0, 1, 2, 0, 2, 0)</text:p>
          </table:table-cell>
          <table:table-cell office:value-type="string">
            <text:p>WonderBrea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otHbox</text:p>
          </table:table-cell>
          <table:table-cell office:value-type="string">
            <text:p>(1, 1, 0, 2, 2, 0, 0)</text:p>
          </table:table-cell>
          <table:table-cell office:value-type="string">
            <text:p>NotHbo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oobii</text:p>
          </table:table-cell>
          <table:table-cell office:value-type="string">
            <text:p>(1, 0, 1, 3, 1, 2, 0)</text:p>
          </table:table-cell>
          <table:table-cell office:value-type="string">
            <text:p>poobii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EL Pingu</text:p>
          </table:table-cell>
          <table:table-cell office:value-type="string">
            <text:p>(1, 1, 0, 2, 2, 0, 0)</text:p>
          </table:table-cell>
          <table:table-cell office:value-type="string">
            <text:p>EL Pingu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2, 1, 1, 4, 2, 2, 0)</text:p>
          </table:table-cell>
          <table:table-cell office:value-type="string">
            <text:p>Plummet</text:p>
          </table:table-cell>
          <table:table-cell office:value-type="string">
            <text:p>(2, 1, 1, 4, 2, 2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1, 1, 0, 2, 2, 0, 0)</text:p>
          </table:table-cell>
          <table:table-cell office:value-type="string">
            <text:p>HaydenEatsShrimp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essQuik</text:p>
          </table:table-cell>
          <table:table-cell office:value-type="string">
            <text:p>(1, 0, 1, 2, 0, 2, 0)</text:p>
          </table:table-cell>
          <table:table-cell office:value-type="string">
            <text:p>NessQui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he Chuckster</text:p>
          </table:table-cell>
          <table:table-cell office:value-type="string">
            <text:p>(1, 1, 0, 2, 2, 0, 0)</text:p>
          </table:table-cell>
          <table:table-cell office:value-type="string">
            <text:p>The Chuckste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urehyper</text:p>
          </table:table-cell>
          <table:table-cell office:value-type="string">
            <text:p>(1, 0, 1, 2, 0, 2, 0)</text:p>
          </table:table-cell>
          <table:table-cell office:value-type="string">
            <text:p>Surehyper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1, 0, 1, 2, 0, 2, 0)</text:p>
          </table:table-cell>
          <table:table-cell office:value-type="string">
            <text:p>LuMiSaD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api</text:p>
          </table:table-cell>
          <table:table-cell office:value-type="string">
            <text:p>(1, 1, 0, 2, 2, 0, 0)</text:p>
          </table:table-cell>
          <table:table-cell office:value-type="string">
            <text:p>Pap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juno</text:p>
          </table:table-cell>
          <table:table-cell office:value-type="string">
            <text:p>(1, 1, 0, 3, 2, 1, 0)</text:p>
          </table:table-cell>
          <table:table-cell office:value-type="string">
            <text:p>juno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1, 0, 1, 2, 0, 2, 0)</text:p>
          </table:table-cell>
          <table:table-cell office:value-type="string">
            <text:p>Benj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unktastic</text:p>
          </table:table-cell>
          <table:table-cell office:value-type="string">
            <text:p>(1, 1, 0, 2, 2, 0, 0)</text:p>
          </table:table-cell>
          <table:table-cell office:value-type="string">
            <text:p>dunktastic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eal King Barbaros</text:p>
          </table:table-cell>
          <table:table-cell office:value-type="string">
            <text:p>(1, 0, 1, 2, 0, 2, 0)</text:p>
          </table:table-cell>
          <table:table-cell office:value-type="string">
            <text:p>Seal King Barbaro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GreatSpence</text:p>
          </table:table-cell>
          <table:table-cell office:value-type="string">
            <text:p>(0, 0, 0, 0, 0, 0, 1)</text:p>
          </table:table-cell>
          <table:table-cell office:value-type="string">
            <text:p>GreatSpenc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masterqz</text:p>
          </table:table-cell>
          <table:table-cell office:value-type="string">
            <text:p>(1, 1, 0, 2, 2, 0, 0)</text:p>
          </table:table-cell>
          <table:table-cell office:value-type="string">
            <text:p>masterqz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ARDVARK" table:style-name="ta10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Frardvark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Olsen</text:p>
          </table:table-cell>
          <table:table-cell office:value-type="string">
            <text:p>(1, 0, 1, 3, 0, 3, 0)</text:p>
          </table:table-cell>
          <table:table-cell office:value-type="string">
            <text:p>Olsen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SandBag</text:p>
          </table:table-cell>
          <table:table-cell office:value-type="string">
            <text:p>(1, 0, 1, 3, 0, 3, 0)</text:p>
          </table:table-cell>
          <table:table-cell office:value-type="string">
            <text:p>SandBag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Howie</text:p>
          </table:table-cell>
          <table:table-cell office:value-type="string">
            <text:p>(1, 0, 1, 2, 0, 2, 0)</text:p>
          </table:table-cell>
          <table:table-cell office:value-type="string">
            <text:p>Howi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ed.</text:p>
          </table:table-cell>
          <table:table-cell office:value-type="string">
            <text:p>(1, 0, 1, 4, 1, 3, 0)</text:p>
          </table:table-cell>
          <table:table-cell office:value-type="string">
            <text:p>ted.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Proto</text:p>
          </table:table-cell>
          <table:table-cell office:value-type="string">
            <text:p>(1, 0, 1, 4, 1, 3, 0)</text:p>
          </table:table-cell>
          <table:table-cell office:value-type="string">
            <text:p>Proto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(1, 0, 1, 4, 1, 3, 0)</text:p>
          </table:table-cell>
          <table:table-cell office:value-type="string">
            <text:p>Hod Strat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OKENYEW" table:style-name="ta10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brokenyew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Jovian</text:p>
          </table:table-cell>
          <table:table-cell office:value-type="string">
            <text:p>(2, 2, 0, 5, 5, 0, 0)</text:p>
          </table:table-cell>
          <table:table-cell office:value-type="string">
            <text:p>Jovian</text:p>
          </table:table-cell>
          <table:table-cell office:value-type="string">
            <text:p>(2, 2, 0, 5, 5, 0, 0)</text:p>
          </table:table-cell>
          <table:table-cell table:number-columns-repeated="1020"/>
        </table:table-row>
        <table:table-row table:style-name="ro1">
          <table:table-cell office:value-type="string">
            <text:p>Yeti</text:p>
          </table:table-cell>
          <table:table-cell office:value-type="string">
            <text:p>(2, 2, 0, 8, 6, 2, 0)</text:p>
          </table:table-cell>
          <table:table-cell office:value-type="string">
            <text:p>Yeti</text:p>
          </table:table-cell>
          <table:table-cell office:value-type="string">
            <text:p>(2, 2, 0, 8, 6, 2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2, 0, 2, 6, 0, 6, 0)</text:p>
          </table:table-cell>
          <table:table-cell office:value-type="string">
            <text:p>Hungrybox</text:p>
          </table:table-cell>
          <table:table-cell office:value-type="string">
            <text:p>(2, 0, 2, 6, 0, 6, 0)</text:p>
          </table:table-cell>
          <table:table-cell table:number-columns-repeated="1020"/>
        </table:table-row>
        <table:table-row table:style-name="ro1">
          <table:table-cell office:value-type="string">
            <text:p>Proto</text:p>
          </table:table-cell>
          <table:table-cell office:value-type="string">
            <text:p>(1, 1, 0, 3, 3, 0, 0)</text:p>
          </table:table-cell>
          <table:table-cell office:value-type="string">
            <text:p>Proto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Gahtzu</text:p>
          </table:table-cell>
          <table:table-cell office:value-type="string">
            <text:p>(2, 2, 0, 10, 6, 4, 0)</text:p>
          </table:table-cell>
          <table:table-cell office:value-type="string">
            <text:p>Gahtzu</text:p>
          </table:table-cell>
          <table:table-cell office:value-type="string">
            <text:p>(2, 2, 0, 10, 6, 4, 0)</text:p>
          </table:table-cell>
          <table:table-cell table:number-columns-repeated="1020"/>
        </table:table-row>
        <table:table-row table:style-name="ro1">
          <table:table-cell office:value-type="string">
            <text:p>Krudo</text:p>
          </table:table-cell>
          <table:table-cell office:value-type="string">
            <text:p>(1, 0, 1, 4, 1, 3, 0)</text:p>
          </table:table-cell>
          <table:table-cell office:value-type="string">
            <text:p>Krudo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Jfalco</text:p>
          </table:table-cell>
          <table:table-cell office:value-type="string">
            <text:p>(1, 1, 0, 3, 3, 0, 0)</text:p>
          </table:table-cell>
          <table:table-cell office:value-type="string">
            <text:p>Jfalco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1, 1, 0, 3, 3, 0, 0)</text:p>
          </table:table-cell>
          <table:table-cell office:value-type="string">
            <text:p>Slowpez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Komodo</text:p>
          </table:table-cell>
          <table:table-cell office:value-type="string">
            <text:p>(1, 0, 1, 3, 0, 3, 0)</text:p>
          </table:table-cell>
          <table:table-cell office:value-type="string">
            <text:p>Komodo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Kip</text:p>
          </table:table-cell>
          <table:table-cell office:value-type="string">
            <text:p>(1, 1, 0, 3, 3, 0, 0)</text:p>
          </table:table-cell>
          <table:table-cell office:value-type="string">
            <text:p>Kip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Equilateral</text:p>
          </table:table-cell>
          <table:table-cell office:value-type="string">
            <text:p>(1, 0, 1, 3, 0, 3, 0)</text:p>
          </table:table-cell>
          <table:table-cell office:value-type="string">
            <text:p>Equilateral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(1, 0, 1, 4, 1, 3, 0)</text:p>
          </table:table-cell>
          <table:table-cell office:value-type="string">
            <text:p>Hod Strat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baggu</text:p>
          </table:table-cell>
          <table:table-cell office:value-type="string">
            <text:p>(1, 1, 0, 3, 3, 0, 0)</text:p>
          </table:table-cell>
          <table:table-cell office:value-type="string">
            <text:p>baggu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OG Kid</text:p>
          </table:table-cell>
          <table:table-cell office:value-type="string">
            <text:p>(2, 0, 2, 8, 2, 6, 0)</text:p>
          </table:table-cell>
          <table:table-cell office:value-type="string">
            <text:p>OG Kid</text:p>
          </table:table-cell>
          <table:table-cell office:value-type="string">
            <text:p>(2, 0, 2, 8, 2, 6, 0)</text:p>
          </table:table-cell>
          <table:table-cell table:number-columns-repeated="1020"/>
        </table:table-row>
        <table:table-row table:style-name="ro1">
          <table:table-cell office:value-type="string">
            <text:p>Hordan</text:p>
          </table:table-cell>
          <table:table-cell office:value-type="string">
            <text:p>(2, 2, 0, 6, 6, 0, 0)</text:p>
          </table:table-cell>
          <table:table-cell office:value-type="string">
            <text:p>Hordan</text:p>
          </table:table-cell>
          <table:table-cell office:value-type="string">
            <text:p>(2, 2, 0, 6, 6, 0, 0)</text:p>
          </table:table-cell>
          <table:table-cell table:number-columns-repeated="1020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1, 0, 1, 4, 1, 3, 0)</text:p>
          </table:table-cell>
          <table:table-cell office:value-type="string">
            <text:p>Captain G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OncomingTraffic</text:p>
          </table:table-cell>
          <table:table-cell office:value-type="string">
            <text:p>(1, 1, 0, 2, 2, 0, 0)</text:p>
          </table:table-cell>
          <table:table-cell office:value-type="string">
            <text:p>OncomingTraffic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Franco</text:p>
          </table:table-cell>
          <table:table-cell office:value-type="string">
            <text:p>(1, 0, 1, 5, 2, 3, 0)</text:p>
          </table:table-cell>
          <table:table-cell office:value-type="string">
            <text:p>Franco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Wild Bill</text:p>
          </table:table-cell>
          <table:table-cell office:value-type="string">
            <text:p>(1, 1, 0, 3, 3, 0, 0)</text:p>
          </table:table-cell>
          <table:table-cell office:value-type="string">
            <text:p>Wild Bill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ADMJ</text:p>
          </table:table-cell>
          <table:table-cell office:value-type="string">
            <text:p>(1, 1, 0, 4, 3, 1, 0)</text:p>
          </table:table-cell>
          <table:table-cell office:value-type="string">
            <text:p>ADMJ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VIAN" table:style-name="ta11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Jovian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brokenyew</text:p>
          </table:table-cell>
          <table:table-cell office:value-type="string">
            <text:p>(2, 0, 2, 5, 0, 5, 0)</text:p>
          </table:table-cell>
          <table:table-cell office:value-type="string">
            <text:p>brokenyew</text:p>
          </table:table-cell>
          <table:table-cell office:value-type="string">
            <text:p>(2, 0, 2, 5, 0, 5, 0)</text:p>
          </table:table-cell>
          <table:table-cell table:number-columns-repeated="1020"/>
        </table:table-row>
        <table:table-row table:style-name="ro1">
          <table:table-cell office:value-type="string">
            <text:p>Lapi</text:p>
          </table:table-cell>
          <table:table-cell office:value-type="string">
            <text:p>(1, 0, 1, 4, 1, 3, 0)</text:p>
          </table:table-cell>
          <table:table-cell office:value-type="string">
            <text:p>Lapi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pSh4rky</text:p>
          </table:table-cell>
          <table:table-cell office:value-type="string">
            <text:p>(0, 0, 0, 0, 0, 0, 1)</text:p>
          </table:table-cell>
          <table:table-cell office:value-type="string">
            <text:p>pSh4rk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0, 1, 3, 0, 3, 0)</text:p>
          </table:table-cell>
          <table:table-cell office:value-type="string">
            <text:p>Hungrybox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Hungry Pigeon</text:p>
          </table:table-cell>
          <table:table-cell office:value-type="string">
            <text:p>(1, 0, 1, 3, 0, 3, 0)</text:p>
          </table:table-cell>
          <table:table-cell office:value-type="string">
            <text:p>Hungry Pigeon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ted.</text:p>
          </table:table-cell>
          <table:table-cell office:value-type="string">
            <text:p>(1, 0, 1, 2, 0, 2, 0)</text:p>
          </table:table-cell>
          <table:table-cell office:value-type="string">
            <text:p>ted.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Howie</text:p>
          </table:table-cell>
          <table:table-cell office:value-type="string">
            <text:p>(1, 0, 1, 3, 0, 3, 0)</text:p>
          </table:table-cell>
          <table:table-cell office:value-type="string">
            <text:p>Howie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ThatOneGuy</text:p>
          </table:table-cell>
          <table:table-cell office:value-type="string">
            <text:p>(1, 1, 0, 4, 3, 1, 0)</text:p>
          </table:table-cell>
          <table:table-cell office:value-type="string">
            <text:p>ThatOneGuy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Sneakywill</text:p>
          </table:table-cell>
          <table:table-cell office:value-type="string">
            <text:p>(0, 0, 0, 0, 0, 0, 1)</text:p>
          </table:table-cell>
          <table:table-cell office:value-type="string">
            <text:p>Sneakywill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1, 0, 1, 3, 0, 3, 0)</text:p>
          </table:table-cell>
          <table:table-cell office:value-type="string">
            <text:p>Captain G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uhline</text:p>
          </table:table-cell>
          <table:table-cell office:value-type="string">
            <text:p>(1, 1, 0, 3, 3, 0, 0)</text:p>
          </table:table-cell>
          <table:table-cell office:value-type="string">
            <text:p>uhline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1, 0, 1, 3, 0, 3, 0)</text:p>
          </table:table-cell>
          <table:table-cell office:value-type="string">
            <text:p>Slowpez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baggu</text:p>
          </table:table-cell>
          <table:table-cell office:value-type="string">
            <text:p>(1, 0, 1, 3, 1, 2, 0)</text:p>
          </table:table-cell>
          <table:table-cell office:value-type="string">
            <text:p>baggu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ETI" table:style-name="ta11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Yeti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Lapi</text:p>
          </table:table-cell>
          <table:table-cell office:value-type="string">
            <text:p>(1, 1, 0, 3, 3, 0, 0)</text:p>
          </table:table-cell>
          <table:table-cell office:value-type="string">
            <text:p>Lapi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brokenyew</text:p>
          </table:table-cell>
          <table:table-cell office:value-type="string">
            <text:p>(2, 0, 2, 8, 2, 6, 0)</text:p>
          </table:table-cell>
          <table:table-cell office:value-type="string">
            <text:p>brokenyew</text:p>
          </table:table-cell>
          <table:table-cell office:value-type="string">
            <text:p>(2, 0, 2, 8, 2, 6, 0)</text:p>
          </table:table-cell>
          <table:table-cell table:number-columns-repeated="1020"/>
        </table:table-row>
        <table:table-row table:style-name="ro1">
          <table:table-cell office:value-type="string">
            <text:p>Cloak</text:p>
          </table:table-cell>
          <table:table-cell office:value-type="string">
            <text:p>(1, 1, 0, 3, 3, 0, 0)</text:p>
          </table:table-cell>
          <table:table-cell office:value-type="string">
            <text:p>Cloak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Olsen</text:p>
          </table:table-cell>
          <table:table-cell office:value-type="string">
            <text:p>(1, 1, 0, 3, 3, 0, 0)</text:p>
          </table:table-cell>
          <table:table-cell office:value-type="string">
            <text:p>Olsen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King Momo</text:p>
          </table:table-cell>
          <table:table-cell office:value-type="string">
            <text:p>(1, 0, 1, 3, 0, 3, 0)</text:p>
          </table:table-cell>
          <table:table-cell office:value-type="string">
            <text:p>King Momo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Howie</text:p>
          </table:table-cell>
          <table:table-cell office:value-type="string">
            <text:p>(1, 1, 0, 3, 3, 0, 0)</text:p>
          </table:table-cell>
          <table:table-cell office:value-type="string">
            <text:p>Howie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JChu</text:p>
          </table:table-cell>
          <table:table-cell office:value-type="string">
            <text:p>(1, 0, 1, 3, 0, 3, 0)</text:p>
          </table:table-cell>
          <table:table-cell office:value-type="string">
            <text:p>JChu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Abraham</text:p>
          </table:table-cell>
          <table:table-cell office:value-type="string">
            <text:p>(2, 2, 0, 7, 6, 1, 0)</text:p>
          </table:table-cell>
          <table:table-cell office:value-type="string">
            <text:p>Abraham</text:p>
          </table:table-cell>
          <table:table-cell office:value-type="string">
            <text:p>(2, 2, 0, 7, 6, 1, 0)</text:p>
          </table:table-cell>
          <table:table-cell table:number-columns-repeated="1020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2, 1, 1, 10, 5, 5, 0)</text:p>
          </table:table-cell>
          <table:table-cell office:value-type="string">
            <text:p>Slowpez</text:p>
          </table:table-cell>
          <table:table-cell office:value-type="string">
            <text:p>(2, 1, 1, 10, 5, 5, 0)</text:p>
          </table:table-cell>
          <table:table-cell table:number-columns-repeated="1020"/>
        </table:table-row>
        <table:table-row table:style-name="ro1">
          <table:table-cell office:value-type="string">
            <text:p>Jape</text:p>
          </table:table-cell>
          <table:table-cell office:value-type="string">
            <text:p>(2, 2, 0, 5, 5, 0, 0)</text:p>
          </table:table-cell>
          <table:table-cell office:value-type="string">
            <text:p>Jape</text:p>
          </table:table-cell>
          <table:table-cell office:value-type="string">
            <text:p>(2, 2, 0, 5, 5, 0, 0)</text:p>
          </table:table-cell>
          <table:table-cell table:number-columns-repeated="1020"/>
        </table:table-row>
        <table:table-row table:style-name="ro1">
          <table:table-cell office:value-type="string">
            <text:p>OG Kid</text:p>
          </table:table-cell>
          <table:table-cell office:value-type="string">
            <text:p>(1, 0, 1, 4, 1, 3, 0)</text:p>
          </table:table-cell>
          <table:table-cell office:value-type="string">
            <text:p>OG Kid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Ricky6</text:p>
          </table:table-cell>
          <table:table-cell office:value-type="string">
            <text:p>(1, 1, 0, 5, 3, 2, 0)</text:p>
          </table:table-cell>
          <table:table-cell office:value-type="string">
            <text:p>Ricky6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1, 0, 1, 3, 0, 3, 0)</text:p>
          </table:table-cell>
          <table:table-cell office:value-type="string">
            <text:p>Captain G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(2, 1, 1, 6, 3, 3, 0)</text:p>
          </table:table-cell>
          <table:table-cell office:value-type="string">
            <text:p>Hod Strat</text:p>
          </table:table-cell>
          <table:table-cell office:value-type="string">
            <text:p>(2, 1, 1, 6, 3, 3, 0)</text:p>
          </table:table-cell>
          <table:table-cell table:number-columns-repeated="1020"/>
        </table:table-row>
        <table:table-row table:style-name="ro1">
          <table:table-cell office:value-type="string">
            <text:p>Panda</text:p>
          </table:table-cell>
          <table:table-cell office:value-type="string">
            <text:p>(1, 0, 1, 5, 2, 3, 0)</text:p>
          </table:table-cell>
          <table:table-cell office:value-type="string">
            <text:p>Panda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ThatOneGuy</text:p>
          </table:table-cell>
          <table:table-cell office:value-type="string">
            <text:p>(1, 1, 0, 2, 2, 0, 0)</text:p>
          </table:table-cell>
          <table:table-cell office:value-type="string">
            <text:p>ThatOneGu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ADMJ</text:p>
          </table:table-cell>
          <table:table-cell office:value-type="string">
            <text:p>(1, 0, 1, 4, 1, 3, 0)</text:p>
          </table:table-cell>
          <table:table-cell office:value-type="string">
            <text:p>ADMJ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PI" table:style-name="ta11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Lapi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Yeti</text:p>
          </table:table-cell>
          <table:table-cell office:value-type="string">
            <text:p>(1, 0, 1, 3, 0, 3, 0)</text:p>
          </table:table-cell>
          <table:table-cell office:value-type="string">
            <text:p>Yeti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Jovian</text:p>
          </table:table-cell>
          <table:table-cell office:value-type="string">
            <text:p>(1, 1, 0, 4, 3, 1, 0)</text:p>
          </table:table-cell>
          <table:table-cell office:value-type="string">
            <text:p>Jovian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Howie</text:p>
          </table:table-cell>
          <table:table-cell office:value-type="string">
            <text:p>(1, 0, 1, 4, 0, 4, 0)</text:p>
          </table:table-cell>
          <table:table-cell office:value-type="string">
            <text:p>Howie</text:p>
          </table:table-cell>
          <table:table-cell office:value-type="string">
            <text:p>(1, 0, 1, 4, 0, 4, 0)</text:p>
          </table:table-cell>
          <table:table-cell table:number-columns-repeated="1020"/>
        </table:table-row>
        <table:table-row table:style-name="ro1">
          <table:table-cell office:value-type="string">
            <text:p>Abraham</text:p>
          </table:table-cell>
          <table:table-cell office:value-type="string">
            <text:p>(1, 0, 1, 3, 0, 3, 0)</text:p>
          </table:table-cell>
          <table:table-cell office:value-type="string">
            <text:p>Abraham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tgags</text:p>
          </table:table-cell>
          <table:table-cell office:value-type="string">
            <text:p>(1, 1, 0, 4, 3, 1, 0)</text:p>
          </table:table-cell>
          <table:table-cell office:value-type="string">
            <text:p>tgags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uhline</text:p>
          </table:table-cell>
          <table:table-cell office:value-type="string">
            <text:p>(1, 0, 1, 5, 2, 3, 0)</text:p>
          </table:table-cell>
          <table:table-cell office:value-type="string">
            <text:p>uhline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Jape</text:p>
          </table:table-cell>
          <table:table-cell office:value-type="string">
            <text:p>(1, 0, 1, 2, 0, 2, 0)</text:p>
          </table:table-cell>
          <table:table-cell office:value-type="string">
            <text:p>Jap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hatOneGuy</text:p>
          </table:table-cell>
          <table:table-cell office:value-type="string">
            <text:p>(1, 1, 0, 2, 2, 0, 0)</text:p>
          </table:table-cell>
          <table:table-cell office:value-type="string">
            <text:p>ThatOneGu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ESTIKYLE</text:p>
          </table:table-cell>
          <table:table-cell office:value-type="string">
            <text:p>(1, 0, 1, 4, 1, 3, 0)</text:p>
          </table:table-cell>
          <table:table-cell office:value-type="string">
            <text:p>TESTIKYLE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HTZU" table:style-name="ta11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Gahtzu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0, 0, 0, 0, 0, 0, 1)</text:p>
          </table:table-cell>
          <table:table-cell office:value-type="string">
            <text:p>Slowpez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Ricky6</text:p>
          </table:table-cell>
          <table:table-cell office:value-type="string">
            <text:p>(1, 1, 0, 3, 3, 0, 0)</text:p>
          </table:table-cell>
          <table:table-cell office:value-type="string">
            <text:p>Ricky6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2, 0, 2, 9, 3, 6, 0)</text:p>
          </table:table-cell>
          <table:table-cell office:value-type="string">
            <text:p>Captain G</text:p>
          </table:table-cell>
          <table:table-cell office:value-type="string">
            <text:p>(2, 0, 2, 9, 3, 6, 0)</text:p>
          </table:table-cell>
          <table:table-cell table:number-columns-repeated="1020"/>
        </table:table-row>
        <table:table-row table:style-name="ro1">
          <table:table-cell office:value-type="string">
            <text:p>SandBag</text:p>
          </table:table-cell>
          <table:table-cell office:value-type="string">
            <text:p>(2, 2, 0, 7, 6, 1, 0)</text:p>
          </table:table-cell>
          <table:table-cell office:value-type="string">
            <text:p>SandBag</text:p>
          </table:table-cell>
          <table:table-cell office:value-type="string">
            <text:p>(2, 2, 0, 7, 6, 1, 0)</text:p>
          </table:table-cell>
          <table:table-cell table:number-columns-repeated="1020"/>
        </table:table-row>
        <table:table-row table:style-name="ro1">
          <table:table-cell office:value-type="string">
            <text:p>brokenyew</text:p>
          </table:table-cell>
          <table:table-cell office:value-type="string">
            <text:p>(2, 0, 2, 10, 4, 6, 0)</text:p>
          </table:table-cell>
          <table:table-cell office:value-type="string">
            <text:p>brokenyew</text:p>
          </table:table-cell>
          <table:table-cell office:value-type="string">
            <text:p>(2, 0, 2, 10, 4, 6, 0)</text:p>
          </table:table-cell>
          <table:table-cell table:number-columns-repeated="1020"/>
        </table:table-row>
        <table:table-row table:style-name="ro1">
          <table:table-cell office:value-type="string">
            <text:p>Olsen</text:p>
          </table:table-cell>
          <table:table-cell office:value-type="string">
            <text:p>(1, 1, 0, 3, 3, 0, 0)</text:p>
          </table:table-cell>
          <table:table-cell office:value-type="string">
            <text:p>Olsen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Proto</text:p>
          </table:table-cell>
          <table:table-cell office:value-type="string">
            <text:p>(1, 1, 0, 3, 3, 0, 0)</text:p>
          </table:table-cell>
          <table:table-cell office:value-type="string">
            <text:p>Proto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OG Kid</text:p>
          </table:table-cell>
          <table:table-cell office:value-type="string">
            <text:p>(2, 2, 0, 10, 6, 4, 0)</text:p>
          </table:table-cell>
          <table:table-cell office:value-type="string">
            <text:p>OG Kid</text:p>
          </table:table-cell>
          <table:table-cell office:value-type="string">
            <text:p>(2, 2, 0, 10, 6, 4, 0)</text:p>
          </table:table-cell>
          <table:table-cell table:number-columns-repeated="1020"/>
        </table:table-row>
        <table:table-row table:style-name="ro1">
          <table:table-cell office:value-type="string">
            <text:p>Hordan</text:p>
          </table:table-cell>
          <table:table-cell office:value-type="string">
            <text:p>(1, 1, 0, 3, 3, 0, 0)</text:p>
          </table:table-cell>
          <table:table-cell office:value-type="string">
            <text:p>Hordan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Forrest</text:p>
          </table:table-cell>
          <table:table-cell office:value-type="string">
            <text:p>(1, 0, 1, 3, 0, 3, 0)</text:p>
          </table:table-cell>
          <table:table-cell office:value-type="string">
            <text:p>Forrest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Howie</text:p>
          </table:table-cell>
          <table:table-cell office:value-type="string">
            <text:p>(1, 1, 0, 3, 3, 0, 0)</text:p>
          </table:table-cell>
          <table:table-cell office:value-type="string">
            <text:p>Howie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(1, 1, 0, 4, 3, 1, 0)</text:p>
          </table:table-cell>
          <table:table-cell office:value-type="string">
            <text:p>Hod Strat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Komodo</text:p>
          </table:table-cell>
          <table:table-cell office:value-type="string">
            <text:p>(1, 1, 0, 4, 3, 1, 0)</text:p>
          </table:table-cell>
          <table:table-cell office:value-type="string">
            <text:p>Komodo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0, 1, 3, 0, 3, 0)</text:p>
          </table:table-cell>
          <table:table-cell office:value-type="string">
            <text:p>Hungrybox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WPEZ" table:style-name="ta11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lowpez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18"/>
        </table:table-row>
        <table:table-row table:style-name="ro1">
          <table:table-cell office:value-type="string">
            <text:p>Gahtzu</text:p>
          </table:table-cell>
          <table:table-cell office:value-type="string">
            <text:p>(0, 0, 0, 0, 0, 0, 1)</text:p>
          </table:table-cell>
          <table:table-cell office:value-type="string">
            <text:p>tjnikhazy</text:p>
          </table:table-cell>
          <table:table-cell office:value-type="string">
            <text:p>(1, 0, 1, 2, 0, 2, 0)</text:p>
          </table:table-cell>
          <table:table-cell office:value-type="string">
            <text:p>Gahtzu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office:value-type="string">
            <text:p>Quelity</text:p>
          </table:table-cell>
          <table:table-cell office:value-type="string">
            <text:p>(0, 0, 0, 0, 0, 0, 1)</text:p>
          </table:table-cell>
          <table:table-cell office:value-type="string">
            <text:p>OG Kid</text:p>
          </table:table-cell>
          <table:table-cell office:value-type="string">
            <text:p>(1, 0, 1, 3, 1, 2, 0)</text:p>
          </table:table-cell>
          <table:table-cell office:value-type="string">
            <text:p>Quelity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office:value-type="string">
            <text:p>Jape</text:p>
          </table:table-cell>
          <table:table-cell office:value-type="string">
            <text:p>(1, 0, 1, 4, 1, 3, 0)</text:p>
          </table:table-cell>
          <table:table-cell table:number-columns-repeated="2"/>
          <table:table-cell office:value-type="string">
            <text:p>Jape</text:p>
          </table:table-cell>
          <table:table-cell office:value-type="string">
            <text:p>(1, 0, 1, 4, 1, 3, 0)</text:p>
          </table:table-cell>
          <table:table-cell table:number-columns-repeated="1018"/>
        </table:table-row>
        <table:table-row table:style-name="ro1">
          <table:table-cell office:value-type="string">
            <text:p>tgags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tgags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Litt</text:p>
          </table:table-cell>
          <table:table-cell office:value-type="string">
            <text:p>(1, 1, 0, 4, 3, 1, 0)</text:p>
          </table:table-cell>
          <table:table-cell table:number-columns-repeated="2"/>
          <table:table-cell office:value-type="string">
            <text:p>Litt</text:p>
          </table:table-cell>
          <table:table-cell office:value-type="string">
            <text:p>(1, 1, 0, 4, 3, 1, 0)</text:p>
          </table:table-cell>
          <table:table-cell table:number-columns-repeated="1018"/>
        </table:table-row>
        <table:table-row table:style-name="ro1">
          <table:table-cell office:value-type="string">
            <text:p>ESAM</text:p>
          </table:table-cell>
          <table:table-cell office:value-type="string">
            <text:p>(1, 1, 0, 4, 3, 1, 0)</text:p>
          </table:table-cell>
          <table:table-cell table:number-columns-repeated="2"/>
          <table:table-cell office:value-type="string">
            <text:p>ESAM</text:p>
          </table:table-cell>
          <table:table-cell office:value-type="string">
            <text:p>(1, 1, 0, 4, 3, 1, 0)</text:p>
          </table:table-cell>
          <table:table-cell table:number-columns-repeated="1018"/>
        </table:table-row>
        <table:table-row table:style-name="ro1">
          <table:table-cell office:value-type="string">
            <text:p>Yeti</text:p>
          </table:table-cell>
          <table:table-cell office:value-type="string">
            <text:p>(2, 1, 1, 10, 5, 5, 0)</text:p>
          </table:table-cell>
          <table:table-cell table:number-columns-repeated="2"/>
          <table:table-cell office:value-type="string">
            <text:p>Yeti</text:p>
          </table:table-cell>
          <table:table-cell office:value-type="string">
            <text:p>(2, 1, 1, 10, 5, 5, 0)</text:p>
          </table:table-cell>
          <table:table-cell table:number-columns-repeated="1018"/>
        </table:table-row>
        <table:table-row table:style-name="ro1">
          <table:table-cell office:value-type="string">
            <text:p>brokenyew</text:p>
          </table:table-cell>
          <table:table-cell office:value-type="string">
            <text:p>(1, 0, 1, 3, 0, 3, 0)</text:p>
          </table:table-cell>
          <table:table-cell table:number-columns-repeated="2"/>
          <table:table-cell office:value-type="string">
            <text:p>brokenyew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Howie</text:p>
          </table:table-cell>
          <table:table-cell office:value-type="string">
            <text:p>(2, 2, 0, 6, 5, 1, 0)</text:p>
          </table:table-cell>
          <table:table-cell table:number-columns-repeated="2"/>
          <table:table-cell office:value-type="string">
            <text:p>Howie</text:p>
          </table:table-cell>
          <table:table-cell office:value-type="string">
            <text:p>(2, 2, 0, 6, 5, 1, 0)</text:p>
          </table:table-cell>
          <table:table-cell table:number-columns-repeated="1018"/>
        </table:table-row>
        <table:table-row table:style-name="ro1">
          <table:table-cell office:value-type="string">
            <text:p>Panda</text:p>
          </table:table-cell>
          <table:table-cell office:value-type="string">
            <text:p>(1, 0, 1, 4, 1, 3, 0)</text:p>
          </table:table-cell>
          <table:table-cell table:number-columns-repeated="2"/>
          <table:table-cell office:value-type="string">
            <text:p>Panda</text:p>
          </table:table-cell>
          <table:table-cell office:value-type="string">
            <text:p>(1, 0, 1, 4, 1, 3, 0)</text:p>
          </table:table-cell>
          <table:table-cell table:number-columns-repeated="1018"/>
        </table:table-row>
        <table:table-row table:style-name="ro1">
          <table:table-cell office:value-type="string">
            <text:p>Cappuccino</text:p>
          </table:table-cell>
          <table:table-cell office:value-type="string">
            <text:p>(1, 1, 0, 5, 3, 2, 0)</text:p>
          </table:table-cell>
          <table:table-cell table:number-columns-repeated="2"/>
          <table:table-cell office:value-type="string">
            <text:p>Cappuccino</text:p>
          </table:table-cell>
          <table:table-cell office:value-type="string">
            <text:p>(1, 1, 0, 5, 3, 2, 0)</text:p>
          </table:table-cell>
          <table:table-cell table:number-columns-repeated="1018"/>
        </table:table-row>
        <table:table-row table:style-name="ro1">
          <table:table-cell office:value-type="string">
            <text:p>AzLu</text:p>
          </table:table-cell>
          <table:table-cell office:value-type="string">
            <text:p>(1, 1, 0, 5, 3, 2, 0)</text:p>
          </table:table-cell>
          <table:table-cell table:number-columns-repeated="2"/>
          <table:table-cell office:value-type="string">
            <text:p>AzLu</text:p>
          </table:table-cell>
          <table:table-cell office:value-type="string">
            <text:p>(1, 1, 0, 5, 3, 2, 0)</text:p>
          </table:table-cell>
          <table:table-cell table:number-columns-repeated="1018"/>
        </table:table-row>
        <table:table-row table:style-name="ro1">
          <table:table-cell office:value-type="string">
            <text:p>Krudo</text:p>
          </table:table-cell>
          <table:table-cell office:value-type="string">
            <text:p>(1, 0, 1, 3, 0, 3, 0)</text:p>
          </table:table-cell>
          <table:table-cell table:number-columns-repeated="2"/>
          <table:table-cell office:value-type="string">
            <text:p>Krudo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Isosceles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Isosceles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Jovian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Jovian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OG Kid</text:p>
          </table:table-cell>
          <table:table-cell office:value-type="string">
            <text:p>(1, 0, 1, 4, 1, 3, 0)</text:p>
          </table:table-cell>
          <table:table-cell table:number-columns-repeated="2"/>
          <table:table-cell office:value-type="string">
            <text:p>OG Kid</text:p>
          </table:table-cell>
          <table:table-cell office:value-type="string">
            <text:p>(2, 0, 2, 7, 2, 5, 0)</text:p>
          </table:table-cell>
          <table:table-cell table:number-columns-repeated="1018"/>
        </table:table-row>
        <table:table-row table:style-name="ro1">
          <table:table-cell office:value-type="string">
            <text:p>drc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drc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King Momo</text:p>
          </table:table-cell>
          <table:table-cell office:value-type="string">
            <text:p>(1, 0, 1, 5, 2, 3, 0)</text:p>
          </table:table-cell>
          <table:table-cell table:number-columns-repeated="2"/>
          <table:table-cell office:value-type="string">
            <text:p>King Momo</text:p>
          </table:table-cell>
          <table:table-cell office:value-type="string">
            <text:p>(1, 0, 1, 5, 2, 3, 0)</text:p>
          </table:table-cell>
          <table:table-cell table:number-columns-repeated="1018"/>
        </table:table-row>
        <table:table-row table:style-name="ro1">
          <table:table-cell office:value-type="string">
            <text:p>Bustopher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Bustopher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SandBag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SandBag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Komodo</text:p>
          </table:table-cell>
          <table:table-cell office:value-type="string">
            <text:p>(1, 0, 1, 3, 0, 3, 0)</text:p>
          </table:table-cell>
          <table:table-cell table:number-columns-repeated="2"/>
          <table:table-cell office:value-type="string">
            <text:p>Komodo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tjnikhazy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CKY6" table:style-name="ta11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Ricky6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Quelity</text:p>
          </table:table-cell>
          <table:table-cell office:value-type="string">
            <text:p>(2, 2, 0, 6, 6, 0, 0)</text:p>
          </table:table-cell>
          <table:table-cell office:value-type="string">
            <text:p>Quelity</text:p>
          </table:table-cell>
          <table:table-cell office:value-type="string">
            <text:p>(2, 2, 0, 6, 6, 0, 0)</text:p>
          </table:table-cell>
          <table:table-cell table:number-columns-repeated="1020"/>
        </table:table-row>
        <table:table-row table:style-name="ro1">
          <table:table-cell office:value-type="string">
            <text:p>Gahtzu</text:p>
          </table:table-cell>
          <table:table-cell office:value-type="string">
            <text:p>(1, 0, 1, 3, 0, 3, 0)</text:p>
          </table:table-cell>
          <table:table-cell office:value-type="string">
            <text:p>Gahtzu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NotTony</text:p>
          </table:table-cell>
          <table:table-cell office:value-type="string">
            <text:p>(1, 1, 0, 3, 3, 0, 0)</text:p>
          </table:table-cell>
          <table:table-cell office:value-type="string">
            <text:p>NotTony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(1, 1, 0, 3, 3, 0, 0)</text:p>
          </table:table-cell>
          <table:table-cell office:value-type="string">
            <text:p>Hod Strat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OG Kid</text:p>
          </table:table-cell>
          <table:table-cell office:value-type="string">
            <text:p>(1, 0, 1, 3, 0, 3, 0)</text:p>
          </table:table-cell>
          <table:table-cell office:value-type="string">
            <text:p>OG Kid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ESAM</text:p>
          </table:table-cell>
          <table:table-cell office:value-type="string">
            <text:p>(1, 0, 1, 5, 2, 3, 0)</text:p>
          </table:table-cell>
          <table:table-cell office:value-type="string">
            <text:p>ESAM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pSh4rky</text:p>
          </table:table-cell>
          <table:table-cell office:value-type="string">
            <text:p>(0, 0, 0, 0, 0, 0, 1)</text:p>
          </table:table-cell>
          <table:table-cell office:value-type="string">
            <text:p>pSh4rk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Titan</text:p>
          </table:table-cell>
          <table:table-cell office:value-type="string">
            <text:p>(2, 2, 0, 6, 6, 0, 0)</text:p>
          </table:table-cell>
          <table:table-cell office:value-type="string">
            <text:p>Titan</text:p>
          </table:table-cell>
          <table:table-cell office:value-type="string">
            <text:p>(2, 2, 0, 6, 6, 0, 0)</text:p>
          </table:table-cell>
          <table:table-cell table:number-columns-repeated="1020"/>
        </table:table-row>
        <table:table-row table:style-name="ro1">
          <table:table-cell office:value-type="string">
            <text:p>Jape</text:p>
          </table:table-cell>
          <table:table-cell office:value-type="string">
            <text:p>(1, 1, 0, 4, 3, 1, 0)</text:p>
          </table:table-cell>
          <table:table-cell office:value-type="string">
            <text:p>Jape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Sneakywill</text:p>
          </table:table-cell>
          <table:table-cell office:value-type="string">
            <text:p>(1, 0, 1, 3, 0, 3, 0)</text:p>
          </table:table-cell>
          <table:table-cell office:value-type="string">
            <text:p>Sneakywill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CCgrabs</text:p>
          </table:table-cell>
          <table:table-cell office:value-type="string">
            <text:p>(1, 1, 0, 2, 2, 0, 0)</text:p>
          </table:table-cell>
          <table:table-cell office:value-type="string">
            <text:p>CCgrab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Franco</text:p>
          </table:table-cell>
          <table:table-cell office:value-type="string">
            <text:p>(1, 0, 1, 3, 0, 3, 0)</text:p>
          </table:table-cell>
          <table:table-cell office:value-type="string">
            <text:p>Franco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Yeti</text:p>
          </table:table-cell>
          <table:table-cell office:value-type="string">
            <text:p>(1, 0, 1, 5, 2, 3, 0)</text:p>
          </table:table-cell>
          <table:table-cell office:value-type="string">
            <text:p>Yeti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LITY" table:style-name="ta11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Quelity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18"/>
        </table:table-row>
        <table:table-row table:style-name="ro1">
          <table:table-cell office:value-type="string">
            <text:p>Ricky6</text:p>
          </table:table-cell>
          <table:table-cell office:value-type="string">
            <text:p>(2, 0, 2, 6, 0, 6, 0)</text:p>
          </table:table-cell>
          <table:table-cell office:value-type="string">
            <text:p>Synvy</text:p>
          </table:table-cell>
          <table:table-cell office:value-type="string">
            <text:p>(1, 1, 0, 2, 2, 0, 0)</text:p>
          </table:table-cell>
          <table:table-cell office:value-type="string">
            <text:p>Ricky6</text:p>
          </table:table-cell>
          <table:table-cell office:value-type="string">
            <text:p>(2, 0, 2, 6, 0, 6, 0)</text:p>
          </table:table-cell>
          <table:table-cell table:number-columns-repeated="1018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0, 0, 0, 0, 0, 0, 1)</text:p>
          </table:table-cell>
          <table:table-cell office:value-type="string">
            <text:p>Hungrybox</text:p>
          </table:table-cell>
          <table:table-cell office:value-type="string">
            <text:p>(1, 0, 1, 2, 0, 2, 0)</text:p>
          </table:table-cell>
          <table:table-cell office:value-type="string">
            <text:p>Slowpez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office:value-type="string">
            <text:p>Benny</text:p>
          </table:table-cell>
          <table:table-cell office:value-type="string">
            <text:p>(1, 0, 1, 4, 1, 3, 0)</text:p>
          </table:table-cell>
          <table:table-cell office:value-type="string">
            <text:p>Stubbaloo</text:p>
          </table:table-cell>
          <table:table-cell office:value-type="string">
            <text:p>(1, 1, 0, 2, 2, 0, 0)</text:p>
          </table:table-cell>
          <table:table-cell office:value-type="string">
            <text:p>Benny</text:p>
          </table:table-cell>
          <table:table-cell office:value-type="string">
            <text:p>(1, 0, 1, 4, 1, 3, 0)</text:p>
          </table:table-cell>
          <table:table-cell table:number-columns-repeated="1018"/>
        </table:table-row>
        <table:table-row table:style-name="ro1">
          <table:table-cell office:value-type="string">
            <text:p>NotTony</text:p>
          </table:table-cell>
          <table:table-cell office:value-type="string">
            <text:p>(1, 1, 0, 3, 3, 0, 0)</text:p>
          </table:table-cell>
          <table:table-cell office:value-type="string">
            <text:p>Lapis</text:p>
          </table:table-cell>
          <table:table-cell office:value-type="string">
            <text:p>(1, 1, 0, 3, 2, 1, 0)</text:p>
          </table:table-cell>
          <table:table-cell office:value-type="string">
            <text:p>NotTony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JChu</text:p>
          </table:table-cell>
          <table:table-cell office:value-type="string">
            <text:p>(1, 0, 1, 3, 0, 3, 0)</text:p>
          </table:table-cell>
          <table:table-cell office:value-type="string">
            <text:p>Chavalava</text:p>
          </table:table-cell>
          <table:table-cell office:value-type="string">
            <text:p>(1, 0, 1, 2, 0, 2, 0)</text:p>
          </table:table-cell>
          <table:table-cell office:value-type="string">
            <text:p>JChu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Howie</text:p>
          </table:table-cell>
          <table:table-cell office:value-type="string">
            <text:p>(2, 0, 2, 5, 0, 5, 0)</text:p>
          </table:table-cell>
          <table:table-cell table:number-columns-repeated="2"/>
          <table:table-cell office:value-type="string">
            <text:p>Howie</text:p>
          </table:table-cell>
          <table:table-cell office:value-type="string">
            <text:p>(2, 0, 2, 5, 0, 5, 0)</text:p>
          </table:table-cell>
          <table:table-cell table:number-columns-repeated="1018"/>
        </table:table-row>
        <table:table-row table:style-name="ro1">
          <table:table-cell office:value-type="string">
            <text:p>Yho!</text:p>
          </table:table-cell>
          <table:table-cell office:value-type="string">
            <text:p>(1, 0, 1, 4, 1, 3, 0)</text:p>
          </table:table-cell>
          <table:table-cell table:number-columns-repeated="2"/>
          <table:table-cell office:value-type="string">
            <text:p>Yho!</text:p>
          </table:table-cell>
          <table:table-cell office:value-type="string">
            <text:p>(1, 0, 1, 4, 1, 3, 0)</text:p>
          </table:table-cell>
          <table:table-cell table:number-columns-repeated="1018"/>
        </table:table-row>
        <table:table-row table:style-name="ro1">
          <table:table-cell office:value-type="string">
            <text:p>Bobateatime</text:p>
          </table:table-cell>
          <table:table-cell office:value-type="string">
            <text:p>(1, 0, 1, 4, 1, 3, 0)</text:p>
          </table:table-cell>
          <table:table-cell table:number-columns-repeated="2"/>
          <table:table-cell office:value-type="string">
            <text:p>Bobateatime</text:p>
          </table:table-cell>
          <table:table-cell office:value-type="string">
            <text:p>(1, 0, 1, 4, 1, 3, 0)</text:p>
          </table:table-cell>
          <table:table-cell table:number-columns-repeated="1018"/>
        </table:table-row>
        <table:table-row table:style-name="ro1">
          <table:table-cell office:value-type="string">
            <text:p>Sneakywill</text:p>
          </table:table-cell>
          <table:table-cell office:value-type="string">
            <text:p>(0, 0, 0, 0, 0, 0, 1)</text:p>
          </table:table-cell>
          <table:table-cell table:number-columns-repeated="2"/>
          <table:table-cell office:value-type="string">
            <text:p>Sneakywill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office:value-type="string">
            <text:p>Proto</text:p>
          </table:table-cell>
          <table:table-cell office:value-type="string">
            <text:p>(1, 0, 1, 3, 0, 3, 0)</text:p>
          </table:table-cell>
          <table:table-cell table:number-columns-repeated="2"/>
          <table:table-cell office:value-type="string">
            <text:p>Proto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Soy Juan</text:p>
          </table:table-cell>
          <table:table-cell office:value-type="string">
            <text:p>(0, 0, 0, 0, 0, 0, 1)</text:p>
          </table:table-cell>
          <table:table-cell table:number-columns-repeated="2"/>
          <table:table-cell office:value-type="string">
            <text:p>Soy Juan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office:value-type="string">
            <text:p>drc</text:p>
          </table:table-cell>
          <table:table-cell office:value-type="string">
            <text:p>(1, 0, 1, 3, 1, 2, 0)</text:p>
          </table:table-cell>
          <table:table-cell table:number-columns-repeated="2"/>
          <table:table-cell office:value-type="string">
            <text:p>drc</text:p>
          </table:table-cell>
          <table:table-cell office:value-type="string">
            <text:p>(1, 0, 1, 3, 1, 2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ynvy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Hungrybox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tubbaloo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apis</text:p>
          </table:table-cell>
          <table:table-cell office:value-type="string">
            <text:p>(1, 1, 0, 3, 2, 1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Chavalava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TAIN G" table:style-name="ta11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Captain G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tgags</text:p>
          </table:table-cell>
          <table:table-cell office:value-type="string">
            <text:p>(1, 1, 0, 3, 3, 0, 0)</text:p>
          </table:table-cell>
          <table:table-cell office:value-type="string">
            <text:p>tgags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(1, 1, 0, 3, 3, 0, 0)</text:p>
          </table:table-cell>
          <table:table-cell office:value-type="string">
            <text:p>Hod Strat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Gahtzu</text:p>
          </table:table-cell>
          <table:table-cell office:value-type="string">
            <text:p>(2, 2, 0, 9, 6, 3, 0)</text:p>
          </table:table-cell>
          <table:table-cell office:value-type="string">
            <text:p>Gahtzu</text:p>
          </table:table-cell>
          <table:table-cell office:value-type="string">
            <text:p>(2, 2, 0, 9, 6, 3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2, 0, 2, 8, 2, 6, 0)</text:p>
          </table:table-cell>
          <table:table-cell office:value-type="string">
            <text:p>Hungrybox</text:p>
          </table:table-cell>
          <table:table-cell office:value-type="string">
            <text:p>(2, 0, 2, 8, 2, 6, 0)</text:p>
          </table:table-cell>
          <table:table-cell table:number-columns-repeated="1020"/>
        </table:table-row>
        <table:table-row table:style-name="ro1">
          <table:table-cell office:value-type="string">
            <text:p>King Momo</text:p>
          </table:table-cell>
          <table:table-cell office:value-type="string">
            <text:p>(1, 0, 1, 5, 2, 3, 0)</text:p>
          </table:table-cell>
          <table:table-cell office:value-type="string">
            <text:p>King Momo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Ahimelec Velez</text:p>
          </table:table-cell>
          <table:table-cell office:value-type="string">
            <text:p>(1, 1, 0, 3, 3, 0, 0)</text:p>
          </table:table-cell>
          <table:table-cell office:value-type="string">
            <text:p>Ahimelec Velez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Komodo</text:p>
          </table:table-cell>
          <table:table-cell office:value-type="string">
            <text:p>(2, 2, 0, 10, 6, 4, 0)</text:p>
          </table:table-cell>
          <table:table-cell office:value-type="string">
            <text:p>Komodo</text:p>
          </table:table-cell>
          <table:table-cell office:value-type="string">
            <text:p>(2, 2, 0, 10, 6, 4, 0)</text:p>
          </table:table-cell>
          <table:table-cell table:number-columns-repeated="1020"/>
        </table:table-row>
        <table:table-row table:style-name="ro1">
          <table:table-cell office:value-type="string">
            <text:p>Krudo</text:p>
          </table:table-cell>
          <table:table-cell office:value-type="string">
            <text:p>(3, 0, 3, 10, 1, 9, 0)</text:p>
          </table:table-cell>
          <table:table-cell office:value-type="string">
            <text:p>Krudo</text:p>
          </table:table-cell>
          <table:table-cell office:value-type="string">
            <text:p>(3, 0, 3, 10, 1, 9, 0)</text:p>
          </table:table-cell>
          <table:table-cell table:number-columns-repeated="1020"/>
        </table:table-row>
        <table:table-row table:style-name="ro1">
          <table:table-cell office:value-type="string">
            <text:p>Sneakywill</text:p>
          </table:table-cell>
          <table:table-cell office:value-type="string">
            <text:p>(1, 1, 0, 5, 3, 2, 0)</text:p>
          </table:table-cell>
          <table:table-cell office:value-type="string">
            <text:p>Sneakywill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Panda</text:p>
          </table:table-cell>
          <table:table-cell office:value-type="string">
            <text:p>(3, 0, 3, 14, 5, 9, 0)</text:p>
          </table:table-cell>
          <table:table-cell office:value-type="string">
            <text:p>Panda</text:p>
          </table:table-cell>
          <table:table-cell office:value-type="string">
            <text:p>(3, 0, 3, 14, 5, 9, 0)</text:p>
          </table:table-cell>
          <table:table-cell table:number-columns-repeated="1020"/>
        </table:table-row>
        <table:table-row table:style-name="ro1">
          <table:table-cell office:value-type="string">
            <text:p>ted.</text:p>
          </table:table-cell>
          <table:table-cell office:value-type="string">
            <text:p>(2, 2, 0, 5, 5, 0, 0)</text:p>
          </table:table-cell>
          <table:table-cell office:value-type="string">
            <text:p>ted.</text:p>
          </table:table-cell>
          <table:table-cell office:value-type="string">
            <text:p>(2, 2, 0, 5, 5, 0, 0)</text:p>
          </table:table-cell>
          <table:table-cell table:number-columns-repeated="1020"/>
        </table:table-row>
        <table:table-row table:style-name="ro1">
          <table:table-cell office:value-type="string">
            <text:p>pace</text:p>
          </table:table-cell>
          <table:table-cell office:value-type="string">
            <text:p>(1, 1, 0, 4, 3, 1, 0)</text:p>
          </table:table-cell>
          <table:table-cell office:value-type="string">
            <text:p>pace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Yeti</text:p>
          </table:table-cell>
          <table:table-cell office:value-type="string">
            <text:p>(1, 1, 0, 3, 3, 0, 0)</text:p>
          </table:table-cell>
          <table:table-cell office:value-type="string">
            <text:p>Yeti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Franco</text:p>
          </table:table-cell>
          <table:table-cell office:value-type="string">
            <text:p>(1, 1, 0, 4, 3, 1, 0)</text:p>
          </table:table-cell>
          <table:table-cell office:value-type="string">
            <text:p>Franco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Proto</text:p>
          </table:table-cell>
          <table:table-cell office:value-type="string">
            <text:p>(1, 1, 0, 3, 3, 0, 0)</text:p>
          </table:table-cell>
          <table:table-cell office:value-type="string">
            <text:p>Proto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Jovian</text:p>
          </table:table-cell>
          <table:table-cell office:value-type="string">
            <text:p>(1, 1, 0, 3, 3, 0, 0)</text:p>
          </table:table-cell>
          <table:table-cell office:value-type="string">
            <text:p>Jovian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brokenyew</text:p>
          </table:table-cell>
          <table:table-cell office:value-type="string">
            <text:p>(1, 1, 0, 4, 3, 1, 0)</text:p>
          </table:table-cell>
          <table:table-cell office:value-type="string">
            <text:p>brokenyew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Forrest</text:p>
          </table:table-cell>
          <table:table-cell office:value-type="string">
            <text:p>(1, 0, 1, 4, 1, 3, 0)</text:p>
          </table:table-cell>
          <table:table-cell office:value-type="string">
            <text:p>Forrest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NotTony</text:p>
          </table:table-cell>
          <table:table-cell office:value-type="string">
            <text:p>(1, 1, 0, 2, 2, 0, 0)</text:p>
          </table:table-cell>
          <table:table-cell office:value-type="string">
            <text:p>NotTon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appuccino</text:p>
          </table:table-cell>
          <table:table-cell office:value-type="string">
            <text:p>(1, 1, 0, 3, 3, 0, 0)</text:p>
          </table:table-cell>
          <table:table-cell office:value-type="string">
            <text:p>Cappuccino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OG Kid</text:p>
          </table:table-cell>
          <table:table-cell office:value-type="string">
            <text:p>(1, 1, 0, 3, 3, 0, 0)</text:p>
          </table:table-cell>
          <table:table-cell office:value-type="string">
            <text:p>OG Kid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GAGS" table:style-name="ta11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tgags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1, 0, 1, 3, 0, 3, 0)</text:p>
          </table:table-cell>
          <table:table-cell office:value-type="string">
            <text:p>Captain G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CCgrabs</text:p>
          </table:table-cell>
          <table:table-cell office:value-type="string">
            <text:p>(2, 0, 2, 8, 2, 6, 0)</text:p>
          </table:table-cell>
          <table:table-cell office:value-type="string">
            <text:p>CCgrabs</text:p>
          </table:table-cell>
          <table:table-cell office:value-type="string">
            <text:p>(2, 0, 2, 8, 2, 6, 0)</text:p>
          </table:table-cell>
          <table:table-cell table:number-columns-repeated="1020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1, 0, 1, 3, 0, 3, 0)</text:p>
          </table:table-cell>
          <table:table-cell office:value-type="string">
            <text:p>Slowpez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Titan</text:p>
          </table:table-cell>
          <table:table-cell office:value-type="string">
            <text:p>(1, 0, 1, 2, 0, 2, 0)</text:p>
          </table:table-cell>
          <table:table-cell office:value-type="string">
            <text:p>Tita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20xQuest</text:p>
          </table:table-cell>
          <table:table-cell office:value-type="string">
            <text:p>(1, 0, 1, 3, 0, 3, 0)</text:p>
          </table:table-cell>
          <table:table-cell office:value-type="string">
            <text:p>20xQuest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Hazywazy</text:p>
          </table:table-cell>
          <table:table-cell office:value-type="string">
            <text:p>(0, 0, 0, 0, 0, 0, 1)</text:p>
          </table:table-cell>
          <table:table-cell office:value-type="string">
            <text:p>Hazywaz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Profanity</text:p>
          </table:table-cell>
          <table:table-cell office:value-type="string">
            <text:p>(1, 0, 1, 3, 0, 3, 0)</text:p>
          </table:table-cell>
          <table:table-cell office:value-type="string">
            <text:p>Profanity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Lapi</text:p>
          </table:table-cell>
          <table:table-cell office:value-type="string">
            <text:p>(1, 0, 1, 4, 1, 3, 0)</text:p>
          </table:table-cell>
          <table:table-cell office:value-type="string">
            <text:p>Lapi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SandBag</text:p>
          </table:table-cell>
          <table:table-cell office:value-type="string">
            <text:p>(1, 0, 1, 2, 0, 2, 0)</text:p>
          </table:table-cell>
          <table:table-cell office:value-type="string">
            <text:p>SandBag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onn Man</text:p>
          </table:table-cell>
          <table:table-cell office:value-type="string">
            <text:p>(1, 0, 1, 2, 0, 2, 0)</text:p>
          </table:table-cell>
          <table:table-cell office:value-type="string">
            <text:p>Conn Ma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D STRAT" table:style-name="ta11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Hod Strat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18"/>
        </table:table-row>
        <table:table-row table:style-name="ro1">
          <table:table-cell office:value-type="string">
            <text:p>CCgrabs</text:p>
          </table:table-cell>
          <table:table-cell office:value-type="string">
            <text:p>(1, 1, 0, 3, 3, 0, 0)</text:p>
          </table:table-cell>
          <table:table-cell office:value-type="string">
            <text:p>bball</text:p>
          </table:table-cell>
          <table:table-cell office:value-type="string">
            <text:p>(0, 0, 0, 0, 0, 0, 1)</text:p>
          </table:table-cell>
          <table:table-cell office:value-type="string">
            <text:p>CCgrabs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1, 0, 1, 3, 0, 3, 0)</text:p>
          </table:table-cell>
          <table:table-cell office:value-type="string">
            <text:p>Squish</text:p>
          </table:table-cell>
          <table:table-cell office:value-type="string">
            <text:p>(0, 0, 0, 0, 0, 0, 1)</text:p>
          </table:table-cell>
          <table:table-cell office:value-type="string">
            <text:p>Captain G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drc</text:p>
          </table:table-cell>
          <table:table-cell office:value-type="string">
            <text:p>(2, 2, 0, 5, 5, 0, 0)</text:p>
          </table:table-cell>
          <table:table-cell table:number-columns-repeated="2"/>
          <table:table-cell office:value-type="string">
            <text:p>drc</text:p>
          </table:table-cell>
          <table:table-cell office:value-type="string">
            <text:p>(2, 2, 0, 5, 5, 0, 0)</text:p>
          </table:table-cell>
          <table:table-cell table:number-columns-repeated="1018"/>
        </table:table-row>
        <table:table-row table:style-name="ro1">
          <table:table-cell office:value-type="string">
            <text:p>Ricky6</text:p>
          </table:table-cell>
          <table:table-cell office:value-type="string">
            <text:p>(1, 0, 1, 3, 0, 3, 0)</text:p>
          </table:table-cell>
          <table:table-cell table:number-columns-repeated="2"/>
          <table:table-cell office:value-type="string">
            <text:p>Ricky6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pace</text:p>
          </table:table-cell>
          <table:table-cell office:value-type="string">
            <text:p>(1, 0, 1, 4, 1, 3, 0)</text:p>
          </table:table-cell>
          <table:table-cell table:number-columns-repeated="2"/>
          <table:table-cell office:value-type="string">
            <text:p>pace</text:p>
          </table:table-cell>
          <table:table-cell office:value-type="string">
            <text:p>(1, 0, 1, 4, 1, 3, 0)</text:p>
          </table:table-cell>
          <table:table-cell table:number-columns-repeated="1018"/>
        </table:table-row>
        <table:table-row table:style-name="ro1">
          <table:table-cell office:value-type="string">
            <text:p>Stylish thug slayer</text:p>
          </table:table-cell>
          <table:table-cell office:value-type="string">
            <text:p>(0, 0, 0, 0, 0, 0, 1)</text:p>
          </table:table-cell>
          <table:table-cell table:number-columns-repeated="2"/>
          <table:table-cell office:value-type="string">
            <text:p>Stylish thug slayer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office:value-type="string">
            <text:p>ted.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ted.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brokenyew</text:p>
          </table:table-cell>
          <table:table-cell office:value-type="string">
            <text:p>(1, 1, 0, 4, 3, 1, 0)</text:p>
          </table:table-cell>
          <table:table-cell table:number-columns-repeated="2"/>
          <table:table-cell office:value-type="string">
            <text:p>brokenyew</text:p>
          </table:table-cell>
          <table:table-cell office:value-type="string">
            <text:p>(1, 1, 0, 4, 3, 1, 0)</text:p>
          </table:table-cell>
          <table:table-cell table:number-columns-repeated="1018"/>
        </table:table-row>
        <table:table-row table:style-name="ro1">
          <table:table-cell office:value-type="string">
            <text:p>Kuya</text:p>
          </table:table-cell>
          <table:table-cell office:value-type="string">
            <text:p>(1, 0, 1, 4, 1, 3, 0)</text:p>
          </table:table-cell>
          <table:table-cell table:number-columns-repeated="2"/>
          <table:table-cell office:value-type="string">
            <text:p>Kuya</text:p>
          </table:table-cell>
          <table:table-cell office:value-type="string">
            <text:p>(1, 0, 1, 4, 1, 3, 0)</text:p>
          </table:table-cell>
          <table:table-cell table:number-columns-repeated="1018"/>
        </table:table-row>
        <table:table-row table:style-name="ro1">
          <table:table-cell office:value-type="string">
            <text:p>King Momo</text:p>
          </table:table-cell>
          <table:table-cell office:value-type="string">
            <text:p>(0, 0, 0, 0, 0, 0, 1)</text:p>
          </table:table-cell>
          <table:table-cell table:number-columns-repeated="2"/>
          <table:table-cell office:value-type="string">
            <text:p>King Momo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office:value-type="string">
            <text:p>Yeti</text:p>
          </table:table-cell>
          <table:table-cell office:value-type="string">
            <text:p>(2, 1, 1, 6, 3, 3, 0)</text:p>
          </table:table-cell>
          <table:table-cell table:number-columns-repeated="2"/>
          <table:table-cell office:value-type="string">
            <text:p>Yeti</text:p>
          </table:table-cell>
          <table:table-cell office:value-type="string">
            <text:p>(2, 1, 1, 6, 3, 3, 0)</text:p>
          </table:table-cell>
          <table:table-cell table:number-columns-repeated="1018"/>
        </table:table-row>
        <table:table-row table:style-name="ro1">
          <table:table-cell office:value-type="string">
            <text:p>Frardvark</text:p>
          </table:table-cell>
          <table:table-cell office:value-type="string">
            <text:p>(1, 1, 0, 4, 3, 1, 0)</text:p>
          </table:table-cell>
          <table:table-cell table:number-columns-repeated="2"/>
          <table:table-cell office:value-type="string">
            <text:p>Frardvark</text:p>
          </table:table-cell>
          <table:table-cell office:value-type="string">
            <text:p>(1, 1, 0, 4, 3, 1, 0)</text:p>
          </table:table-cell>
          <table:table-cell table:number-columns-repeated="1018"/>
        </table:table-row>
        <table:table-row table:style-name="ro1">
          <table:table-cell office:value-type="string">
            <text:p>Bobateatime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Bobateatime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SandBag</text:p>
          </table:table-cell>
          <table:table-cell office:value-type="string">
            <text:p>(1, 1, 0, 4, 3, 1, 0)</text:p>
          </table:table-cell>
          <table:table-cell table:number-columns-repeated="2"/>
          <table:table-cell office:value-type="string">
            <text:p>SandBag</text:p>
          </table:table-cell>
          <table:table-cell office:value-type="string">
            <text:p>(1, 1, 0, 4, 3, 1, 0)</text:p>
          </table:table-cell>
          <table:table-cell table:number-columns-repeated="1018"/>
        </table:table-row>
        <table:table-row table:style-name="ro1">
          <table:table-cell office:value-type="string">
            <text:p>Gahtzu</text:p>
          </table:table-cell>
          <table:table-cell office:value-type="string">
            <text:p>(1, 0, 1, 4, 1, 3, 0)</text:p>
          </table:table-cell>
          <table:table-cell table:number-columns-repeated="2"/>
          <table:table-cell office:value-type="string">
            <text:p>Gahtzu</text:p>
          </table:table-cell>
          <table:table-cell office:value-type="string">
            <text:p>(1, 0, 1, 4, 1, 3, 0)</text:p>
          </table:table-cell>
          <table:table-cell table:number-columns-repeated="1018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1, 1, 0, 3, 2, 1, 0)</text:p>
          </table:table-cell>
          <table:table-cell table:number-columns-repeated="2"/>
          <table:table-cell office:value-type="string">
            <text:p>LuMiSaDi</text:p>
          </table:table-cell>
          <table:table-cell office:value-type="string">
            <text:p>(1, 1, 0, 3, 2, 1, 0)</text:p>
          </table:table-cell>
          <table:table-cell table:number-columns-repeated="1018"/>
        </table:table-row>
        <table:table-row table:style-name="ro1">
          <table:table-cell office:value-type="string">
            <text:p>Komodo</text:p>
          </table:table-cell>
          <table:table-cell office:value-type="string">
            <text:p>(1, 0, 1, 2, 0, 2, 0)</text:p>
          </table:table-cell>
          <table:table-cell table:number-columns-repeated="2"/>
          <table:table-cell office:value-type="string">
            <text:p>Komodo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office:value-type="string">
            <text:p>Klondike64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Klondike64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Conn Man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Conn Man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AzLu</text:p>
          </table:table-cell>
          <table:table-cell office:value-type="string">
            <text:p>(1, 0, 1, 5, 2, 3, 0)</text:p>
          </table:table-cell>
          <table:table-cell table:number-columns-repeated="2"/>
          <table:table-cell office:value-type="string">
            <text:p>AzLu</text:p>
          </table:table-cell>
          <table:table-cell office:value-type="string">
            <text:p>(1, 0, 1, 5, 2, 3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bball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quish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GRABS" table:style-name="ta12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CCgrabs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(1, 0, 1, 3, 0, 3, 0)</text:p>
          </table:table-cell>
          <table:table-cell office:value-type="string">
            <text:p>Hod Strat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tgags</text:p>
          </table:table-cell>
          <table:table-cell office:value-type="string">
            <text:p>(2, 2, 0, 8, 6, 2, 0)</text:p>
          </table:table-cell>
          <table:table-cell office:value-type="string">
            <text:p>tgags</text:p>
          </table:table-cell>
          <table:table-cell office:value-type="string">
            <text:p>(2, 2, 0, 8, 6, 2, 0)</text:p>
          </table:table-cell>
          <table:table-cell table:number-columns-repeated="1020"/>
        </table:table-row>
        <table:table-row table:style-name="ro1">
          <table:table-cell office:value-type="string">
            <text:p>Proto</text:p>
          </table:table-cell>
          <table:table-cell office:value-type="string">
            <text:p>(1, 0, 1, 4, 1, 3, 0)</text:p>
          </table:table-cell>
          <table:table-cell office:value-type="string">
            <text:p>Proto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Krudo</text:p>
          </table:table-cell>
          <table:table-cell office:value-type="string">
            <text:p>(1, 0, 1, 3, 0, 3, 0)</text:p>
          </table:table-cell>
          <table:table-cell office:value-type="string">
            <text:p>Krudo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ted.</text:p>
          </table:table-cell>
          <table:table-cell office:value-type="string">
            <text:p>(1, 0, 1, 3, 0, 3, 0)</text:p>
          </table:table-cell>
          <table:table-cell office:value-type="string">
            <text:p>ted.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Ricky6</text:p>
          </table:table-cell>
          <table:table-cell office:value-type="string">
            <text:p>(1, 0, 1, 2, 0, 2, 0)</text:p>
          </table:table-cell>
          <table:table-cell office:value-type="string">
            <text:p>Ricky6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Yho!</text:p>
          </table:table-cell>
          <table:table-cell office:value-type="string">
            <text:p>(1, 0, 1, 5, 2, 3, 0)</text:p>
          </table:table-cell>
          <table:table-cell office:value-type="string">
            <text:p>Yho!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OncomingTraffic</text:p>
          </table:table-cell>
          <table:table-cell office:value-type="string">
            <text:p>(1, 0, 1, 3, 0, 3, 0)</text:p>
          </table:table-cell>
          <table:table-cell office:value-type="string">
            <text:p>OncomingTraffic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Hordan</text:p>
          </table:table-cell>
          <table:table-cell office:value-type="string">
            <text:p>(1, 0, 1, 3, 0, 3, 0)</text:p>
          </table:table-cell>
          <table:table-cell office:value-type="string">
            <text:p>Hordan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O" table:style-name="ta12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Proto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18"/>
        </table:table-row>
        <table:table-row table:style-name="ro1">
          <table:table-cell office:value-type="string">
            <text:p>drc</text:p>
          </table:table-cell>
          <table:table-cell office:value-type="string">
            <text:p>(1, 1, 0, 3, 3, 0, 0)</text:p>
          </table:table-cell>
          <table:table-cell office:value-type="string">
            <text:p>Greenvenom20</text:p>
          </table:table-cell>
          <table:table-cell office:value-type="string">
            <text:p>(0, 0, 0, 0, 0, 0, 1)</text:p>
          </table:table-cell>
          <table:table-cell office:value-type="string">
            <text:p>drc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Krudo</text:p>
          </table:table-cell>
          <table:table-cell office:value-type="string">
            <text:p>(2, 0, 2, 6, 0, 6, 0)</text:p>
          </table:table-cell>
          <table:table-cell office:value-type="string">
            <text:p>Ryzakyn</text:p>
          </table:table-cell>
          <table:table-cell office:value-type="string">
            <text:p>(0, 0, 0, 0, 0, 0, 1)</text:p>
          </table:table-cell>
          <table:table-cell office:value-type="string">
            <text:p>Krudo</text:p>
          </table:table-cell>
          <table:table-cell office:value-type="string">
            <text:p>(2, 0, 2, 6, 0, 6, 0)</text:p>
          </table:table-cell>
          <table:table-cell table:number-columns-repeated="1018"/>
        </table:table-row>
        <table:table-row table:style-name="ro1">
          <table:table-cell office:value-type="string">
            <text:p>CCgrabs</text:p>
          </table:table-cell>
          <table:table-cell office:value-type="string">
            <text:p>(1, 1, 0, 4, 3, 1, 0)</text:p>
          </table:table-cell>
          <table:table-cell office:value-type="string">
            <text:p>Turbo</text:p>
          </table:table-cell>
          <table:table-cell office:value-type="string">
            <text:p>(0, 0, 0, 0, 0, 0, 1)</text:p>
          </table:table-cell>
          <table:table-cell office:value-type="string">
            <text:p>CCgrabs</text:p>
          </table:table-cell>
          <table:table-cell office:value-type="string">
            <text:p>(1, 1, 0, 4, 3, 1, 0)</text:p>
          </table:table-cell>
          <table:table-cell table:number-columns-repeated="1018"/>
        </table:table-row>
        <table:table-row table:style-name="ro1">
          <table:table-cell office:value-type="string">
            <text:p>Benny</text:p>
          </table:table-cell>
          <table:table-cell office:value-type="string">
            <text:p>(0, 0, 0, 0, 0, 0, 1)</text:p>
          </table:table-cell>
          <table:table-cell table:number-columns-repeated="2"/>
          <table:table-cell office:value-type="string">
            <text:p>Benny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office:value-type="string">
            <text:p>brokenyew</text:p>
          </table:table-cell>
          <table:table-cell office:value-type="string">
            <text:p>(1, 0, 1, 3, 0, 3, 0)</text:p>
          </table:table-cell>
          <table:table-cell table:number-columns-repeated="2"/>
          <table:table-cell office:value-type="string">
            <text:p>brokenyew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Swiftspank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Swiftspank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Komodo</text:p>
          </table:table-cell>
          <table:table-cell office:value-type="string">
            <text:p>(1, 0, 1, 3, 0, 3, 0)</text:p>
          </table:table-cell>
          <table:table-cell table:number-columns-repeated="2"/>
          <table:table-cell office:value-type="string">
            <text:p>Komodo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Ahimelec Velez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Ahimelec Velez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Gahtzu</text:p>
          </table:table-cell>
          <table:table-cell office:value-type="string">
            <text:p>(1, 0, 1, 3, 0, 3, 0)</text:p>
          </table:table-cell>
          <table:table-cell table:number-columns-repeated="2"/>
          <table:table-cell office:value-type="string">
            <text:p>Gahtzu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Cloak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Cloak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A-K SiN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A-K SiN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SandBag</text:p>
          </table:table-cell>
          <table:table-cell office:value-type="string">
            <text:p>(1, 0, 1, 3, 0, 3, 0)</text:p>
          </table:table-cell>
          <table:table-cell table:number-columns-repeated="2"/>
          <table:table-cell office:value-type="string">
            <text:p>SandBag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Frardvark</text:p>
          </table:table-cell>
          <table:table-cell office:value-type="string">
            <text:p>(1, 1, 0, 4, 3, 1, 0)</text:p>
          </table:table-cell>
          <table:table-cell table:number-columns-repeated="2"/>
          <table:table-cell office:value-type="string">
            <text:p>Frardvark</text:p>
          </table:table-cell>
          <table:table-cell office:value-type="string">
            <text:p>(1, 1, 0, 4, 3, 1, 0)</text:p>
          </table:table-cell>
          <table:table-cell table:number-columns-repeated="1018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1, 0, 1, 3, 0, 3, 0)</text:p>
          </table:table-cell>
          <table:table-cell table:number-columns-repeated="2"/>
          <table:table-cell office:value-type="string">
            <text:p>Captain G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King Momo</text:p>
          </table:table-cell>
          <table:table-cell office:value-type="string">
            <text:p>(0, 0, 0, 0, 0, 0, 1)</text:p>
          </table:table-cell>
          <table:table-cell table:number-columns-repeated="2"/>
          <table:table-cell office:value-type="string">
            <text:p>King Momo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office:value-type="string">
            <text:p>Quelity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Quelity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Profanity</text:p>
          </table:table-cell>
          <table:table-cell office:value-type="string">
            <text:p>(1, 0, 1, 4, 1, 3, 0)</text:p>
          </table:table-cell>
          <table:table-cell table:number-columns-repeated="2"/>
          <table:table-cell office:value-type="string">
            <text:p>Profanity</text:p>
          </table:table-cell>
          <table:table-cell office:value-type="string">
            <text:p>(1, 0, 1, 4, 1, 3, 0)</text:p>
          </table:table-cell>
          <table:table-cell table:number-columns-repeated="1018"/>
        </table:table-row>
        <table:table-row table:style-name="ro1">
          <table:table-cell office:value-type="string">
            <text:p>Sneakywill</text:p>
          </table:table-cell>
          <table:table-cell office:value-type="string">
            <text:p>(1, 0, 1, 2, 0, 2, 0)</text:p>
          </table:table-cell>
          <table:table-cell table:number-columns-repeated="2"/>
          <table:table-cell office:value-type="string">
            <text:p>Sneakywill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office:value-type="string">
            <text:p>Kairos</text:p>
          </table:table-cell>
          <table:table-cell office:value-type="string">
            <text:p>(0, 0, 0, 0, 0, 0, 1)</text:p>
          </table:table-cell>
          <table:table-cell table:number-columns-repeated="2"/>
          <table:table-cell office:value-type="string">
            <text:p>Kairos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office:value-type="string">
            <text:p>Hordan</text:p>
          </table:table-cell>
          <table:table-cell office:value-type="string">
            <text:p>(1, 0, 1, 3, 1, 2, 0)</text:p>
          </table:table-cell>
          <table:table-cell table:number-columns-repeated="2"/>
          <table:table-cell office:value-type="string">
            <text:p>Hordan</text:p>
          </table:table-cell>
          <table:table-cell office:value-type="string">
            <text:p>(1, 0, 1, 3, 1, 2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Greenvenom20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yzakyn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Turbo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C" table:style-name="ta12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drc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Proto</text:p>
          </table:table-cell>
          <table:table-cell office:value-type="string">
            <text:p>(1, 0, 1, 3, 0, 3, 0)</text:p>
          </table:table-cell>
          <table:table-cell office:value-type="string">
            <text:p>Proto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(2, 0, 2, 5, 0, 5, 0)</text:p>
          </table:table-cell>
          <table:table-cell office:value-type="string">
            <text:p>Hod Strat</text:p>
          </table:table-cell>
          <table:table-cell office:value-type="string">
            <text:p>(2, 0, 2, 5, 0, 5, 0)</text:p>
          </table:table-cell>
          <table:table-cell table:number-columns-repeated="1020"/>
        </table:table-row>
        <table:table-row table:style-name="ro1">
          <table:table-cell office:value-type="string">
            <text:p>240p</text:p>
          </table:table-cell>
          <table:table-cell office:value-type="string">
            <text:p>(1, 0, 1, 3, 0, 3, 0)</text:p>
          </table:table-cell>
          <table:table-cell office:value-type="string">
            <text:p>240p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pancake</text:p>
          </table:table-cell>
          <table:table-cell office:value-type="string">
            <text:p>(1, 1, 0, 3, 3, 0, 0)</text:p>
          </table:table-cell>
          <table:table-cell office:value-type="string">
            <text:p>pancake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Krudo</text:p>
          </table:table-cell>
          <table:table-cell office:value-type="string">
            <text:p>(1, 0, 1, 3, 0, 3, 0)</text:p>
          </table:table-cell>
          <table:table-cell office:value-type="string">
            <text:p>Krudo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Cloak</text:p>
          </table:table-cell>
          <table:table-cell office:value-type="string">
            <text:p>(1, 1, 0, 5, 3, 2, 0)</text:p>
          </table:table-cell>
          <table:table-cell office:value-type="string">
            <text:p>Cloak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AzLu</text:p>
          </table:table-cell>
          <table:table-cell office:value-type="string">
            <text:p>(1, 0, 1, 3, 0, 3, 0)</text:p>
          </table:table-cell>
          <table:table-cell office:value-type="string">
            <text:p>AzLu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1, 0, 1, 2, 0, 2, 0)</text:p>
          </table:table-cell>
          <table:table-cell office:value-type="string">
            <text:p>Slowpez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Quelity</text:p>
          </table:table-cell>
          <table:table-cell office:value-type="string">
            <text:p>(1, 1, 0, 3, 2, 1, 0)</text:p>
          </table:table-cell>
          <table:table-cell office:value-type="string">
            <text:p>Quelity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bardon</text:p>
          </table:table-cell>
          <table:table-cell office:value-type="string">
            <text:p>(1, 0, 1, 2, 0, 2, 0)</text:p>
          </table:table-cell>
          <table:table-cell office:value-type="string">
            <text:p>bardo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NG MOMO" table:style-name="ta12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King Momo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NotTony</text:p>
          </table:table-cell>
          <table:table-cell office:value-type="string">
            <text:p>(1, 1, 0, 3, 3, 0, 0)</text:p>
          </table:table-cell>
          <table:table-cell office:value-type="string">
            <text:p>NotTony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Benny</text:p>
          </table:table-cell>
          <table:table-cell office:value-type="string">
            <text:p>(1, 1, 0, 3, 3, 0, 0)</text:p>
          </table:table-cell>
          <table:table-cell office:value-type="string">
            <text:p>Benny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Krudo</text:p>
          </table:table-cell>
          <table:table-cell office:value-type="string">
            <text:p>(2, 0, 2, 6, 0, 6, 0)</text:p>
          </table:table-cell>
          <table:table-cell office:value-type="string">
            <text:p>Krudo</text:p>
          </table:table-cell>
          <table:table-cell office:value-type="string">
            <text:p>(2, 0, 2, 6, 0, 6, 0)</text:p>
          </table:table-cell>
          <table:table-cell table:number-columns-repeated="1020"/>
        </table:table-row>
        <table:table-row table:style-name="ro1">
          <table:table-cell office:value-type="string">
            <text:p>Yeti</text:p>
          </table:table-cell>
          <table:table-cell office:value-type="string">
            <text:p>(1, 1, 0, 3, 3, 0, 0)</text:p>
          </table:table-cell>
          <table:table-cell office:value-type="string">
            <text:p>Yeti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OG Kid</text:p>
          </table:table-cell>
          <table:table-cell office:value-type="string">
            <text:p>(2, 2, 0, 8, 6, 2, 0)</text:p>
          </table:table-cell>
          <table:table-cell office:value-type="string">
            <text:p>OG Kid</text:p>
          </table:table-cell>
          <table:table-cell office:value-type="string">
            <text:p>(2, 2, 0, 8, 6, 2, 0)</text:p>
          </table:table-cell>
          <table:table-cell table:number-columns-repeated="1020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1, 1, 0, 5, 3, 2, 0)</text:p>
          </table:table-cell>
          <table:table-cell office:value-type="string">
            <text:p>Captain G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Litt</text:p>
          </table:table-cell>
          <table:table-cell office:value-type="string">
            <text:p>(1, 1, 0, 3, 3, 0, 0)</text:p>
          </table:table-cell>
          <table:table-cell office:value-type="string">
            <text:p>Litt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Jape</text:p>
          </table:table-cell>
          <table:table-cell office:value-type="string">
            <text:p>(1, 1, 0, 3, 3, 0, 0)</text:p>
          </table:table-cell>
          <table:table-cell office:value-type="string">
            <text:p>Jape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Panda</text:p>
          </table:table-cell>
          <table:table-cell office:value-type="string">
            <text:p>(3, 1, 2, 13, 5, 8, 0)</text:p>
          </table:table-cell>
          <table:table-cell office:value-type="string">
            <text:p>Panda</text:p>
          </table:table-cell>
          <table:table-cell office:value-type="string">
            <text:p>(3, 1, 2, 13, 5, 8, 0)</text:p>
          </table:table-cell>
          <table:table-cell table:number-columns-repeated="1020"/>
        </table:table-row>
        <table:table-row table:style-name="ro1">
          <table:table-cell office:value-type="string">
            <text:p>Komodo</text:p>
          </table:table-cell>
          <table:table-cell office:value-type="string">
            <text:p>(1, 0, 1, 4, 1, 3, 0)</text:p>
          </table:table-cell>
          <table:table-cell office:value-type="string">
            <text:p>Komodo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(0, 0, 0, 0, 0, 0, 1)</text:p>
          </table:table-cell>
          <table:table-cell office:value-type="string">
            <text:p>Hod Strat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Proto</text:p>
          </table:table-cell>
          <table:table-cell office:value-type="string">
            <text:p>(0, 0, 0, 0, 0, 0, 1)</text:p>
          </table:table-cell>
          <table:table-cell office:value-type="string">
            <text:p>Proto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A-K SiN</text:p>
          </table:table-cell>
          <table:table-cell office:value-type="string">
            <text:p>(1, 1, 0, 2, 2, 0, 0)</text:p>
          </table:table-cell>
          <table:table-cell office:value-type="string">
            <text:p>A-K Si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ip</text:p>
          </table:table-cell>
          <table:table-cell office:value-type="string">
            <text:p>(1, 1, 0, 2, 2, 0, 0)</text:p>
          </table:table-cell>
          <table:table-cell office:value-type="string">
            <text:p>Kip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1, 1, 0, 5, 3, 2, 0)</text:p>
          </table:table-cell>
          <table:table-cell office:value-type="string">
            <text:p>Slowpez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0, 1, 4, 1, 3, 0)</text:p>
          </table:table-cell>
          <table:table-cell office:value-type="string">
            <text:p>Hungrybox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TONY" table:style-name="ta12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NotTony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King Momo</text:p>
          </table:table-cell>
          <table:table-cell office:value-type="string">
            <text:p>(1, 0, 1, 3, 0, 3, 0)</text:p>
          </table:table-cell>
          <table:table-cell office:value-type="string">
            <text:p>King Momo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okusuii</text:p>
          </table:table-cell>
          <table:table-cell office:value-type="string">
            <text:p>(1, 1, 0, 4, 3, 1, 0)</text:p>
          </table:table-cell>
          <table:table-cell office:value-type="string">
            <text:p>okusuii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Ricky6</text:p>
          </table:table-cell>
          <table:table-cell office:value-type="string">
            <text:p>(1, 0, 1, 3, 0, 3, 0)</text:p>
          </table:table-cell>
          <table:table-cell office:value-type="string">
            <text:p>Ricky6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Quelity</text:p>
          </table:table-cell>
          <table:table-cell office:value-type="string">
            <text:p>(1, 0, 1, 3, 0, 3, 0)</text:p>
          </table:table-cell>
          <table:table-cell office:value-type="string">
            <text:p>Quelity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Jfalco</text:p>
          </table:table-cell>
          <table:table-cell office:value-type="string">
            <text:p>(1, 0, 1, 3, 0, 3, 0)</text:p>
          </table:table-cell>
          <table:table-cell office:value-type="string">
            <text:p>Jfalco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Kip</text:p>
          </table:table-cell>
          <table:table-cell office:value-type="string">
            <text:p>(2, 0, 2, 4, 0, 4, 0)</text:p>
          </table:table-cell>
          <table:table-cell office:value-type="string">
            <text:p>Kip</text:p>
          </table:table-cell>
          <table:table-cell office:value-type="string">
            <text:p>(2, 0, 2, 4, 0, 4, 0)</text:p>
          </table:table-cell>
          <table:table-cell table:number-columns-repeated="1020"/>
        </table:table-row>
        <table:table-row table:style-name="ro1">
          <table:table-cell office:value-type="string">
            <text:p>Checkmate</text:p>
          </table:table-cell>
          <table:table-cell office:value-type="string">
            <text:p>(1, 0, 1, 3, 0, 3, 0)</text:p>
          </table:table-cell>
          <table:table-cell office:value-type="string">
            <text:p>Checkmate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A-K SiN</text:p>
          </table:table-cell>
          <table:table-cell office:value-type="string">
            <text:p>(0, 0, 0, 0, 0, 0, 1)</text:p>
          </table:table-cell>
          <table:table-cell office:value-type="string">
            <text:p>A-K Si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Forrest</text:p>
          </table:table-cell>
          <table:table-cell office:value-type="string">
            <text:p>(1, 0, 1, 3, 0, 3, 0)</text:p>
          </table:table-cell>
          <table:table-cell office:value-type="string">
            <text:p>Forrest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Stylish thug slayer</text:p>
          </table:table-cell>
          <table:table-cell office:value-type="string">
            <text:p>(1, 0, 1, 3, 0, 3, 0)</text:p>
          </table:table-cell>
          <table:table-cell office:value-type="string">
            <text:p>Stylish thug slayer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1, 0, 1, 2, 0, 2, 0)</text:p>
          </table:table-cell>
          <table:table-cell office:value-type="string">
            <text:p>Captain G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Vision</text:p>
          </table:table-cell>
          <table:table-cell office:value-type="string">
            <text:p>(0, 0, 0, 0, 0, 0, 1)</text:p>
          </table:table-cell>
          <table:table-cell office:value-type="string">
            <text:p>Visio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NY" table:style-name="ta12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Benny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okusuii</text:p>
          </table:table-cell>
          <table:table-cell office:value-type="string">
            <text:p>(1, 1, 0, 3, 3, 0, 0)</text:p>
          </table:table-cell>
          <table:table-cell office:value-type="string">
            <text:p>okusuii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King Momo</text:p>
          </table:table-cell>
          <table:table-cell office:value-type="string">
            <text:p>(1, 0, 1, 3, 0, 3, 0)</text:p>
          </table:table-cell>
          <table:table-cell office:value-type="string">
            <text:p>King Momo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Quelity</text:p>
          </table:table-cell>
          <table:table-cell office:value-type="string">
            <text:p>(1, 1, 0, 4, 3, 1, 0)</text:p>
          </table:table-cell>
          <table:table-cell office:value-type="string">
            <text:p>Quelity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Proto</text:p>
          </table:table-cell>
          <table:table-cell office:value-type="string">
            <text:p>(0, 0, 0, 0, 0, 0, 1)</text:p>
          </table:table-cell>
          <table:table-cell office:value-type="string">
            <text:p>Proto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Bustopher</text:p>
          </table:table-cell>
          <table:table-cell office:value-type="string">
            <text:p>(0, 0, 0, 0, 0, 0, 1)</text:p>
          </table:table-cell>
          <table:table-cell office:value-type="string">
            <text:p>Bustopher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andBag</text:p>
          </table:table-cell>
          <table:table-cell office:value-type="string">
            <text:p>(0, 0, 0, 0, 0, 0, 1)</text:p>
          </table:table-cell>
          <table:table-cell office:value-type="string">
            <text:p>SandBag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Chichi Pumpa</text:p>
          </table:table-cell>
          <table:table-cell office:value-type="string">
            <text:p>(0, 0, 0, 0, 0, 0, 1)</text:p>
          </table:table-cell>
          <table:table-cell office:value-type="string">
            <text:p>Chichi Pumpa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KUSUII" table:style-name="ta12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okusuii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Benny</text:p>
          </table:table-cell>
          <table:table-cell office:value-type="string">
            <text:p>(1, 0, 1, 3, 0, 3, 0)</text:p>
          </table:table-cell>
          <table:table-cell office:value-type="string">
            <text:p>Benny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NotTony</text:p>
          </table:table-cell>
          <table:table-cell office:value-type="string">
            <text:p>(1, 0, 1, 4, 1, 3, 0)</text:p>
          </table:table-cell>
          <table:table-cell office:value-type="string">
            <text:p>NotTony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A-K SiN</text:p>
          </table:table-cell>
          <table:table-cell office:value-type="string">
            <text:p>(0, 0, 0, 0, 0, 0, 1)</text:p>
          </table:table-cell>
          <table:table-cell office:value-type="string">
            <text:p>A-K Si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Panda</text:p>
          </table:table-cell>
          <table:table-cell office:value-type="string">
            <text:p>(1, 0, 1, 3, 0, 3, 0)</text:p>
          </table:table-cell>
          <table:table-cell office:value-type="string">
            <text:p>Panda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Abraham</text:p>
          </table:table-cell>
          <table:table-cell office:value-type="string">
            <text:p>(1, 0, 1, 3, 0, 3, 0)</text:p>
          </table:table-cell>
          <table:table-cell office:value-type="string">
            <text:p>Abraham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Cappuccino</text:p>
          </table:table-cell>
          <table:table-cell office:value-type="string">
            <text:p>(1, 0, 1, 2, 0, 2, 0)</text:p>
          </table:table-cell>
          <table:table-cell office:value-type="string">
            <text:p>Cappuccino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uhline</text:p>
          </table:table-cell>
          <table:table-cell office:value-type="string">
            <text:p>(1, 0, 1, 3, 0, 3, 0)</text:p>
          </table:table-cell>
          <table:table-cell office:value-type="string">
            <text:p>uhline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WIE" table:style-name="ta12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Howie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Cloak</text:p>
          </table:table-cell>
          <table:table-cell office:value-type="string">
            <text:p>(1, 1, 0, 3, 3, 0, 0)</text:p>
          </table:table-cell>
          <table:table-cell office:value-type="string">
            <text:p>Cloak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Panda</text:p>
          </table:table-cell>
          <table:table-cell office:value-type="string">
            <text:p>(1, 0, 1, 3, 0, 3, 0)</text:p>
          </table:table-cell>
          <table:table-cell office:value-type="string">
            <text:p>Panda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Lapi</text:p>
          </table:table-cell>
          <table:table-cell office:value-type="string">
            <text:p>(1, 1, 0, 4, 4, 0, 0)</text:p>
          </table:table-cell>
          <table:table-cell office:value-type="string">
            <text:p>Lapi</text:p>
          </table:table-cell>
          <table:table-cell office:value-type="string">
            <text:p>(1, 1, 0, 4, 4, 0, 0)</text:p>
          </table:table-cell>
          <table:table-cell table:number-columns-repeated="1020"/>
        </table:table-row>
        <table:table-row table:style-name="ro1">
          <table:table-cell office:value-type="string">
            <text:p>SandBag</text:p>
          </table:table-cell>
          <table:table-cell office:value-type="string">
            <text:p>(1, 0, 1, 3, 0, 3, 0)</text:p>
          </table:table-cell>
          <table:table-cell office:value-type="string">
            <text:p>SandBag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Yeti</text:p>
          </table:table-cell>
          <table:table-cell office:value-type="string">
            <text:p>(1, 0, 1, 3, 0, 3, 0)</text:p>
          </table:table-cell>
          <table:table-cell office:value-type="string">
            <text:p>Yeti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Vintner</text:p>
          </table:table-cell>
          <table:table-cell office:value-type="string">
            <text:p>(1, 1, 0, 3, 3, 0, 0)</text:p>
          </table:table-cell>
          <table:table-cell office:value-type="string">
            <text:p>Vintner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Quelity</text:p>
          </table:table-cell>
          <table:table-cell office:value-type="string">
            <text:p>(2, 2, 0, 5, 5, 0, 0)</text:p>
          </table:table-cell>
          <table:table-cell office:value-type="string">
            <text:p>Quelity</text:p>
          </table:table-cell>
          <table:table-cell office:value-type="string">
            <text:p>(2, 2, 0, 5, 5, 0, 0)</text:p>
          </table:table-cell>
          <table:table-cell table:number-columns-repeated="1020"/>
        </table:table-row>
        <table:table-row table:style-name="ro1">
          <table:table-cell office:value-type="string">
            <text:p>Sneakywill</text:p>
          </table:table-cell>
          <table:table-cell office:value-type="string">
            <text:p>(1, 0, 1, 3, 0, 3, 0)</text:p>
          </table:table-cell>
          <table:table-cell office:value-type="string">
            <text:p>Sneakywill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Frardvark</text:p>
          </table:table-cell>
          <table:table-cell office:value-type="string">
            <text:p>(1, 1, 0, 2, 2, 0, 0)</text:p>
          </table:table-cell>
          <table:table-cell office:value-type="string">
            <text:p>Frardvar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2, 0, 2, 6, 1, 5, 0)</text:p>
          </table:table-cell>
          <table:table-cell office:value-type="string">
            <text:p>Slowpez</text:p>
          </table:table-cell>
          <table:table-cell office:value-type="string">
            <text:p>(2, 0, 2, 6, 1, 5, 0)</text:p>
          </table:table-cell>
          <table:table-cell table:number-columns-repeated="1020"/>
        </table:table-row>
        <table:table-row table:style-name="ro1">
          <table:table-cell office:value-type="string">
            <text:p>Jovian</text:p>
          </table:table-cell>
          <table:table-cell office:value-type="string">
            <text:p>(1, 1, 0, 3, 3, 0, 0)</text:p>
          </table:table-cell>
          <table:table-cell office:value-type="string">
            <text:p>Jovian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240p</text:p>
          </table:table-cell>
          <table:table-cell office:value-type="string">
            <text:p>(1, 1, 0, 4, 3, 1, 0)</text:p>
          </table:table-cell>
          <table:table-cell office:value-type="string">
            <text:p>240p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AzLu</text:p>
          </table:table-cell>
          <table:table-cell office:value-type="string">
            <text:p>(2, 0, 2, 6, 0, 6, 0)</text:p>
          </table:table-cell>
          <table:table-cell office:value-type="string">
            <text:p>AzLu</text:p>
          </table:table-cell>
          <table:table-cell office:value-type="string">
            <text:p>(2, 0, 2, 6, 0, 6, 0)</text:p>
          </table:table-cell>
          <table:table-cell table:number-columns-repeated="1020"/>
        </table:table-row>
        <table:table-row table:style-name="ro1">
          <table:table-cell office:value-type="string">
            <text:p>ted.</text:p>
          </table:table-cell>
          <table:table-cell office:value-type="string">
            <text:p>(1, 1, 0, 3, 3, 0, 0)</text:p>
          </table:table-cell>
          <table:table-cell office:value-type="string">
            <text:p>ted.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baggu</text:p>
          </table:table-cell>
          <table:table-cell office:value-type="string">
            <text:p>(1, 1, 0, 5, 3, 2, 0)</text:p>
          </table:table-cell>
          <table:table-cell office:value-type="string">
            <text:p>baggu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Gahtzu</text:p>
          </table:table-cell>
          <table:table-cell office:value-type="string">
            <text:p>(1, 0, 1, 3, 0, 3, 0)</text:p>
          </table:table-cell>
          <table:table-cell office:value-type="string">
            <text:p>Gahtzu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rndy</text:p>
          </table:table-cell>
          <table:table-cell office:value-type="string">
            <text:p>(1, 1, 0, 2, 2, 0, 0)</text:p>
          </table:table-cell>
          <table:table-cell office:value-type="string">
            <text:p>rnd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ip</text:p>
          </table:table-cell>
          <table:table-cell office:value-type="string">
            <text:p>(1, 0, 1, 3, 1, 2, 0)</text:p>
          </table:table-cell>
          <table:table-cell office:value-type="string">
            <text:p>Kip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OAK" table:style-name="ta12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Cloak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Howie</text:p>
          </table:table-cell>
          <table:table-cell office:value-type="string">
            <text:p>(1, 0, 1, 3, 0, 3, 0)</text:p>
          </table:table-cell>
          <table:table-cell office:value-type="string">
            <text:p>Howie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Yeti</text:p>
          </table:table-cell>
          <table:table-cell office:value-type="string">
            <text:p>(1, 0, 1, 3, 0, 3, 0)</text:p>
          </table:table-cell>
          <table:table-cell office:value-type="string">
            <text:p>Yeti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Proto</text:p>
          </table:table-cell>
          <table:table-cell office:value-type="string">
            <text:p>(1, 0, 1, 2, 0, 2, 0)</text:p>
          </table:table-cell>
          <table:table-cell office:value-type="string">
            <text:p>Proto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Jape</text:p>
          </table:table-cell>
          <table:table-cell office:value-type="string">
            <text:p>(1, 0, 1, 3, 0, 3, 0)</text:p>
          </table:table-cell>
          <table:table-cell office:value-type="string">
            <text:p>Jape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baggu</text:p>
          </table:table-cell>
          <table:table-cell office:value-type="string">
            <text:p>(1, 0, 1, 3, 0, 3, 0)</text:p>
          </table:table-cell>
          <table:table-cell office:value-type="string">
            <text:p>baggu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drc</text:p>
          </table:table-cell>
          <table:table-cell office:value-type="string">
            <text:p>(1, 0, 1, 5, 2, 3, 0)</text:p>
          </table:table-cell>
          <table:table-cell office:value-type="string">
            <text:p>drc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Franco</text:p>
          </table:table-cell>
          <table:table-cell office:value-type="string">
            <text:p>(0, 0, 0, 0, 0, 0, 1)</text:p>
          </table:table-cell>
          <table:table-cell office:value-type="string">
            <text:p>Franco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Baby Carrot</text:p>
          </table:table-cell>
          <table:table-cell office:value-type="string">
            <text:p>(0, 0, 0, 0, 0, 0, 1)</text:p>
          </table:table-cell>
          <table:table-cell office:value-type="string">
            <text:p>Baby Carrot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G KID" table:style-name="ta12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OG Kid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18"/>
        </table:table-row>
        <table:table-row table:style-name="ro1">
          <table:table-cell office:value-type="string">
            <text:p>ThatOneGuy</text:p>
          </table:table-cell>
          <table:table-cell office:value-type="string">
            <text:p>(1, 1, 0, 3, 3, 0, 0)</text:p>
          </table:table-cell>
          <table:table-cell office:value-type="string">
            <text:p>BeefCalculator</text:p>
          </table:table-cell>
          <table:table-cell office:value-type="string">
            <text:p>(1, 1, 0, 2, 2, 0, 0)</text:p>
          </table:table-cell>
          <table:table-cell office:value-type="string">
            <text:p>ThatOneGuy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SandBag</text:p>
          </table:table-cell>
          <table:table-cell office:value-type="string">
            <text:p>(2, 2, 0, 6, 6, 0, 0)</text:p>
          </table:table-cell>
          <table:table-cell office:value-type="string">
            <text:p>S. Phantm</text:p>
          </table:table-cell>
          <table:table-cell office:value-type="string">
            <text:p>(1, 0, 1, 2, 0, 2, 0)</text:p>
          </table:table-cell>
          <table:table-cell office:value-type="string">
            <text:p>SandBag</text:p>
          </table:table-cell>
          <table:table-cell office:value-type="string">
            <text:p>(2, 2, 0, 6, 6, 0, 0)</text:p>
          </table:table-cell>
          <table:table-cell table:number-columns-repeated="1018"/>
        </table:table-row>
        <table:table-row table:style-name="ro1">
          <table:table-cell office:value-type="string">
            <text:p>Panda</text:p>
          </table:table-cell>
          <table:table-cell office:value-type="string">
            <text:p>(3, 0, 3, 12, 3, 9, 0)</text:p>
          </table:table-cell>
          <table:table-cell office:value-type="string">
            <text:p>Slowpez</text:p>
          </table:table-cell>
          <table:table-cell office:value-type="string">
            <text:p>(1, 1, 0, 3, 2, 1, 0)</text:p>
          </table:table-cell>
          <table:table-cell office:value-type="string">
            <text:p>Panda</text:p>
          </table:table-cell>
          <table:table-cell office:value-type="string">
            <text:p>(3, 0, 3, 12, 3, 9, 0)</text:p>
          </table:table-cell>
          <table:table-cell table:number-columns-repeated="1018"/>
        </table:table-row>
        <table:table-row table:style-name="ro1">
          <table:table-cell office:value-type="string">
            <text:p>Ricky6</text:p>
          </table:table-cell>
          <table:table-cell office:value-type="string">
            <text:p>(1, 1, 0, 3, 3, 0, 0)</text:p>
          </table:table-cell>
          <table:table-cell office:value-type="string">
            <text:p>FallenAries6</text:p>
          </table:table-cell>
          <table:table-cell office:value-type="string">
            <text:p>(1, 1, 0, 2, 2, 0, 0)</text:p>
          </table:table-cell>
          <table:table-cell office:value-type="string">
            <text:p>Ricky6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King Momo</text:p>
          </table:table-cell>
          <table:table-cell office:value-type="string">
            <text:p>(2, 0, 2, 8, 2, 6, 0)</text:p>
          </table:table-cell>
          <table:table-cell office:value-type="string">
            <text:p>Wiccan</text:p>
          </table:table-cell>
          <table:table-cell office:value-type="string">
            <text:p>(1, 0, 1, 2, 0, 2, 0)</text:p>
          </table:table-cell>
          <table:table-cell office:value-type="string">
            <text:p>King Momo</text:p>
          </table:table-cell>
          <table:table-cell office:value-type="string">
            <text:p>(2, 0, 2, 8, 2, 6, 0)</text:p>
          </table:table-cell>
          <table:table-cell table:number-columns-repeated="1018"/>
        </table:table-row>
        <table:table-row table:style-name="ro1">
          <table:table-cell office:value-type="string">
            <text:p>Titan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Titan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ESAM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ESAM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JChu</text:p>
          </table:table-cell>
          <table:table-cell office:value-type="string">
            <text:p>(1, 0, 1, 4, 1, 3, 0)</text:p>
          </table:table-cell>
          <table:table-cell table:number-columns-repeated="2"/>
          <table:table-cell office:value-type="string">
            <text:p>JChu</text:p>
          </table:table-cell>
          <table:table-cell office:value-type="string">
            <text:p>(1, 0, 1, 4, 1, 3, 0)</text:p>
          </table:table-cell>
          <table:table-cell table:number-columns-repeated="1018"/>
        </table:table-row>
        <table:table-row table:style-name="ro1">
          <table:table-cell office:value-type="string">
            <text:p>Gahtzu</text:p>
          </table:table-cell>
          <table:table-cell office:value-type="string">
            <text:p>(2, 0, 2, 10, 4, 6, 0)</text:p>
          </table:table-cell>
          <table:table-cell table:number-columns-repeated="2"/>
          <table:table-cell office:value-type="string">
            <text:p>Gahtzu</text:p>
          </table:table-cell>
          <table:table-cell office:value-type="string">
            <text:p>(2, 0, 2, 10, 4, 6, 0)</text:p>
          </table:table-cell>
          <table:table-cell table:number-columns-repeated="1018"/>
        </table:table-row>
        <table:table-row table:style-name="ro1">
          <table:table-cell office:value-type="string">
            <text:p>A1.exe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A1.exe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Yeti</text:p>
          </table:table-cell>
          <table:table-cell office:value-type="string">
            <text:p>(1, 1, 0, 4, 3, 1, 0)</text:p>
          </table:table-cell>
          <table:table-cell table:number-columns-repeated="2"/>
          <table:table-cell office:value-type="string">
            <text:p>Yeti</text:p>
          </table:table-cell>
          <table:table-cell office:value-type="string">
            <text:p>(1, 1, 0, 4, 3, 1, 0)</text:p>
          </table:table-cell>
          <table:table-cell table:number-columns-repeated="1018"/>
        </table:table-row>
        <table:table-row table:style-name="ro1">
          <table:table-cell office:value-type="string">
            <text:p>pace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pace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Equilateral</text:p>
          </table:table-cell>
          <table:table-cell office:value-type="string">
            <text:p>(1, 1, 0, 5, 3, 2, 0)</text:p>
          </table:table-cell>
          <table:table-cell table:number-columns-repeated="2"/>
          <table:table-cell office:value-type="string">
            <text:p>Equilateral</text:p>
          </table:table-cell>
          <table:table-cell office:value-type="string">
            <text:p>(1, 1, 0, 5, 3, 2, 0)</text:p>
          </table:table-cell>
          <table:table-cell table:number-columns-repeated="1018"/>
        </table:table-row>
        <table:table-row table:style-name="ro1">
          <table:table-cell office:value-type="string">
            <text:p>Wizzrobe</text:p>
          </table:table-cell>
          <table:table-cell office:value-type="string">
            <text:p>(1, 0, 1, 5, 2, 3, 0)</text:p>
          </table:table-cell>
          <table:table-cell table:number-columns-repeated="2"/>
          <table:table-cell office:value-type="string">
            <text:p>Wizzrobe</text:p>
          </table:table-cell>
          <table:table-cell office:value-type="string">
            <text:p>(1, 0, 1, 5, 2, 3, 0)</text:p>
          </table:table-cell>
          <table:table-cell table:number-columns-repeated="1018"/>
        </table:table-row>
        <table:table-row table:style-name="ro1">
          <table:table-cell office:value-type="string">
            <text:p>ted.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ted.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brokenyew</text:p>
          </table:table-cell>
          <table:table-cell office:value-type="string">
            <text:p>(2, 2, 0, 8, 6, 2, 0)</text:p>
          </table:table-cell>
          <table:table-cell table:number-columns-repeated="2"/>
          <table:table-cell office:value-type="string">
            <text:p>brokenyew</text:p>
          </table:table-cell>
          <table:table-cell office:value-type="string">
            <text:p>(2, 2, 0, 8, 6, 2, 0)</text:p>
          </table:table-cell>
          <table:table-cell table:number-columns-repeated="1018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1, 1, 0, 4, 3, 1, 0)</text:p>
          </table:table-cell>
          <table:table-cell table:number-columns-repeated="2"/>
          <table:table-cell office:value-type="string">
            <text:p>Slowpez</text:p>
          </table:table-cell>
          <table:table-cell office:value-type="string">
            <text:p>(2, 2, 0, 7, 5, 2, 0)</text:p>
          </table:table-cell>
          <table:table-cell table:number-columns-repeated="1018"/>
        </table:table-row>
        <table:table-row table:style-name="ro1">
          <table:table-cell office:value-type="string">
            <text:p>Klondike64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Klondike64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Navé</text:p>
          </table:table-cell>
          <table:table-cell office:value-type="string">
            <text:p>(0, 0, 0, 0, 0, 0, 1)</text:p>
          </table:table-cell>
          <table:table-cell table:number-columns-repeated="2"/>
          <table:table-cell office:value-type="string">
            <text:p>Navé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office:value-type="string">
            <text:p>Cappuccino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Cappuccino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1, 0, 1, 3, 0, 3, 0)</text:p>
          </table:table-cell>
          <table:table-cell table:number-columns-repeated="2"/>
          <table:table-cell office:value-type="string">
            <text:p>Captain G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BeefCalculator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. Phantm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FallenAries6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Wiccan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ATONEGUY" table:style-name="ta13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ThatOneGuy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18"/>
        </table:table-row>
        <table:table-row table:style-name="ro1">
          <table:table-cell office:value-type="string">
            <text:p>OG Kid</text:p>
          </table:table-cell>
          <table:table-cell office:value-type="string">
            <text:p>(1, 0, 1, 3, 0, 3, 0)</text:p>
          </table:table-cell>
          <table:table-cell office:value-type="string">
            <text:p>AngelStatue</text:p>
          </table:table-cell>
          <table:table-cell office:value-type="string">
            <text:p>(1, 0, 1, 2, 0, 2, 0)</text:p>
          </table:table-cell>
          <table:table-cell office:value-type="string">
            <text:p>OG Kid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pSh4rky</text:p>
          </table:table-cell>
          <table:table-cell office:value-type="string">
            <text:p>(1, 0, 1, 3, 0, 3, 0)</text:p>
          </table:table-cell>
          <table:table-cell office:value-type="string">
            <text:p>Doormatt</text:p>
          </table:table-cell>
          <table:table-cell office:value-type="string">
            <text:p>(1, 0, 1, 2, 0, 2, 0)</text:p>
          </table:table-cell>
          <table:table-cell office:value-type="string">
            <text:p>pSh4rky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SandBag</text:p>
          </table:table-cell>
          <table:table-cell office:value-type="string">
            <text:p>(1, 0, 1, 2, 0, 2, 0)</text:p>
          </table:table-cell>
          <table:table-cell table:number-columns-repeated="2"/>
          <table:table-cell office:value-type="string">
            <text:p>SandBag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office:value-type="string">
            <text:p>jitmasterswag</text:p>
          </table:table-cell>
          <table:table-cell office:value-type="string">
            <text:p>(0, 0, 0, 0, 0, 0, 1)</text:p>
          </table:table-cell>
          <table:table-cell table:number-columns-repeated="2"/>
          <table:table-cell office:value-type="string">
            <text:p>jitmasterswag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office:value-type="string">
            <text:p>A1.exe</text:p>
          </table:table-cell>
          <table:table-cell office:value-type="string">
            <text:p>(1, 0, 1, 3, 0, 3, 0)</text:p>
          </table:table-cell>
          <table:table-cell table:number-columns-repeated="2"/>
          <table:table-cell office:value-type="string">
            <text:p>A1.exe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Jovian</text:p>
          </table:table-cell>
          <table:table-cell office:value-type="string">
            <text:p>(1, 0, 1, 4, 1, 3, 0)</text:p>
          </table:table-cell>
          <table:table-cell table:number-columns-repeated="2"/>
          <table:table-cell office:value-type="string">
            <text:p>Jovian</text:p>
          </table:table-cell>
          <table:table-cell office:value-type="string">
            <text:p>(1, 0, 1, 4, 1, 3, 0)</text:p>
          </table:table-cell>
          <table:table-cell table:number-columns-repeated="1018"/>
        </table:table-row>
        <table:table-row table:style-name="ro1">
          <table:table-cell office:value-type="string">
            <text:p>Bobateatime</text:p>
          </table:table-cell>
          <table:table-cell office:value-type="string">
            <text:p>(1, 0, 1, 3, 0, 3, 0)</text:p>
          </table:table-cell>
          <table:table-cell table:number-columns-repeated="2"/>
          <table:table-cell office:value-type="string">
            <text:p>Bobateatime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Yeti</text:p>
          </table:table-cell>
          <table:table-cell office:value-type="string">
            <text:p>(1, 0, 1, 2, 0, 2, 0)</text:p>
          </table:table-cell>
          <table:table-cell table:number-columns-repeated="2"/>
          <table:table-cell office:value-type="string">
            <text:p>Yeti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office:value-type="string">
            <text:p>Lapi</text:p>
          </table:table-cell>
          <table:table-cell office:value-type="string">
            <text:p>(1, 0, 1, 2, 0, 2, 0)</text:p>
          </table:table-cell>
          <table:table-cell table:number-columns-repeated="2"/>
          <table:table-cell office:value-type="string">
            <text:p>Lapi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ngelStatue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Doormatt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NDBAG" table:style-name="ta13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andBag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pSh4rky</text:p>
          </table:table-cell>
          <table:table-cell office:value-type="string">
            <text:p>(0, 0, 0, 0, 0, 0, 1)</text:p>
          </table:table-cell>
          <table:table-cell office:value-type="string">
            <text:p>pSh4rk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OG Kid</text:p>
          </table:table-cell>
          <table:table-cell office:value-type="string">
            <text:p>(2, 0, 2, 6, 0, 6, 0)</text:p>
          </table:table-cell>
          <table:table-cell office:value-type="string">
            <text:p>OG Kid</text:p>
          </table:table-cell>
          <table:table-cell office:value-type="string">
            <text:p>(2, 0, 2, 6, 0, 6, 0)</text:p>
          </table:table-cell>
          <table:table-cell table:number-columns-repeated="1020"/>
        </table:table-row>
        <table:table-row table:style-name="ro1">
          <table:table-cell office:value-type="string">
            <text:p>Frardvark</text:p>
          </table:table-cell>
          <table:table-cell office:value-type="string">
            <text:p>(1, 1, 0, 3, 3, 0, 0)</text:p>
          </table:table-cell>
          <table:table-cell office:value-type="string">
            <text:p>Frardvark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Howie</text:p>
          </table:table-cell>
          <table:table-cell office:value-type="string">
            <text:p>(1, 1, 0, 3, 3, 0, 0)</text:p>
          </table:table-cell>
          <table:table-cell office:value-type="string">
            <text:p>Howie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Gahtzu</text:p>
          </table:table-cell>
          <table:table-cell office:value-type="string">
            <text:p>(2, 0, 2, 7, 1, 6, 0)</text:p>
          </table:table-cell>
          <table:table-cell office:value-type="string">
            <text:p>Gahtzu</text:p>
          </table:table-cell>
          <table:table-cell office:value-type="string">
            <text:p>(2, 0, 2, 7, 1, 6, 0)</text:p>
          </table:table-cell>
          <table:table-cell table:number-columns-repeated="1020"/>
        </table:table-row>
        <table:table-row table:style-name="ro1">
          <table:table-cell office:value-type="string">
            <text:p>Hungry Pigeon</text:p>
          </table:table-cell>
          <table:table-cell office:value-type="string">
            <text:p>(1, 1, 0, 5, 3, 2, 0)</text:p>
          </table:table-cell>
          <table:table-cell office:value-type="string">
            <text:p>Hungry Pigeon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2, 0, 2, 6, 0, 6, 0)</text:p>
          </table:table-cell>
          <table:table-cell office:value-type="string">
            <text:p>Hungrybox</text:p>
          </table:table-cell>
          <table:table-cell office:value-type="string">
            <text:p>(2, 0, 2, 6, 0, 6, 0)</text:p>
          </table:table-cell>
          <table:table-cell table:number-columns-repeated="1020"/>
        </table:table-row>
        <table:table-row table:style-name="ro1">
          <table:table-cell office:value-type="string">
            <text:p>ted.</text:p>
          </table:table-cell>
          <table:table-cell office:value-type="string">
            <text:p>(1, 1, 0, 5, 3, 2, 0)</text:p>
          </table:table-cell>
          <table:table-cell office:value-type="string">
            <text:p>ted.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ThatOneGuy</text:p>
          </table:table-cell>
          <table:table-cell office:value-type="string">
            <text:p>(1, 1, 0, 2, 2, 0, 0)</text:p>
          </table:table-cell>
          <table:table-cell office:value-type="string">
            <text:p>ThatOneGu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neakywill</text:p>
          </table:table-cell>
          <table:table-cell office:value-type="string">
            <text:p>(1, 0, 1, 5, 2, 3, 0)</text:p>
          </table:table-cell>
          <table:table-cell office:value-type="string">
            <text:p>Sneakywill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Bobateatime</text:p>
          </table:table-cell>
          <table:table-cell office:value-type="string">
            <text:p>(1, 1, 0, 3, 3, 0, 0)</text:p>
          </table:table-cell>
          <table:table-cell office:value-type="string">
            <text:p>Bobateatime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Proto</text:p>
          </table:table-cell>
          <table:table-cell office:value-type="string">
            <text:p>(1, 1, 0, 3, 3, 0, 0)</text:p>
          </table:table-cell>
          <table:table-cell office:value-type="string">
            <text:p>Proto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Kuya</text:p>
          </table:table-cell>
          <table:table-cell office:value-type="string">
            <text:p>(1, 0, 1, 4, 1, 3, 0)</text:p>
          </table:table-cell>
          <table:table-cell office:value-type="string">
            <text:p>Kuya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Ban</text:p>
          </table:table-cell>
          <table:table-cell office:value-type="string">
            <text:p>(0, 0, 0, 0, 0, 0, 1)</text:p>
          </table:table-cell>
          <table:table-cell office:value-type="string">
            <text:p>Ba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Benny</text:p>
          </table:table-cell>
          <table:table-cell office:value-type="string">
            <text:p>(0, 0, 0, 0, 0, 0, 1)</text:p>
          </table:table-cell>
          <table:table-cell office:value-type="string">
            <text:p>Benn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(1, 0, 1, 4, 1, 3, 0)</text:p>
          </table:table-cell>
          <table:table-cell office:value-type="string">
            <text:p>Hod Strat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tgags</text:p>
          </table:table-cell>
          <table:table-cell office:value-type="string">
            <text:p>(1, 1, 0, 2, 2, 0, 0)</text:p>
          </table:table-cell>
          <table:table-cell office:value-type="string">
            <text:p>tgag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ordan</text:p>
          </table:table-cell>
          <table:table-cell office:value-type="string">
            <text:p>(1, 1, 0, 2, 2, 0, 0)</text:p>
          </table:table-cell>
          <table:table-cell office:value-type="string">
            <text:p>Horda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OncomingTraffic</text:p>
          </table:table-cell>
          <table:table-cell office:value-type="string">
            <text:p>(1, 1, 0, 4, 3, 1, 0)</text:p>
          </table:table-cell>
          <table:table-cell office:value-type="string">
            <text:p>OncomingTraffic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1, 0, 1, 3, 0, 3, 0)</text:p>
          </table:table-cell>
          <table:table-cell office:value-type="string">
            <text:p>Slowpez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SH4RKY" table:style-name="ta13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pSh4rky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andBag</text:p>
          </table:table-cell>
          <table:table-cell office:value-type="string">
            <text:p>(0, 0, 0, 0, 0, 0, 1)</text:p>
          </table:table-cell>
          <table:table-cell office:value-type="string">
            <text:p>SandBag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ThatOneGuy</text:p>
          </table:table-cell>
          <table:table-cell office:value-type="string">
            <text:p>(1, 1, 0, 3, 3, 0, 0)</text:p>
          </table:table-cell>
          <table:table-cell office:value-type="string">
            <text:p>ThatOneGuy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Olsen</text:p>
          </table:table-cell>
          <table:table-cell office:value-type="string">
            <text:p>(1, 0, 1, 3, 0, 3, 0)</text:p>
          </table:table-cell>
          <table:table-cell office:value-type="string">
            <text:p>Olsen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Jovian</text:p>
          </table:table-cell>
          <table:table-cell office:value-type="string">
            <text:p>(0, 0, 0, 0, 0, 0, 1)</text:p>
          </table:table-cell>
          <table:table-cell office:value-type="string">
            <text:p>Jovia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Ricky6</text:p>
          </table:table-cell>
          <table:table-cell office:value-type="string">
            <text:p>(0, 0, 0, 0, 0, 0, 1)</text:p>
          </table:table-cell>
          <table:table-cell office:value-type="string">
            <text:p>Ricky6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RUDO" table:style-name="ta13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Krudo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Proto</text:p>
          </table:table-cell>
          <table:table-cell office:value-type="string">
            <text:p>(2, 2, 0, 6, 6, 0, 0)</text:p>
          </table:table-cell>
          <table:table-cell office:value-type="string">
            <text:p>Proto</text:p>
          </table:table-cell>
          <table:table-cell office:value-type="string">
            <text:p>(2, 2, 0, 6, 6, 0, 0)</text:p>
          </table:table-cell>
          <table:table-cell table:number-columns-repeated="1020"/>
        </table:table-row>
        <table:table-row table:style-name="ro1">
          <table:table-cell office:value-type="string">
            <text:p>King Momo</text:p>
          </table:table-cell>
          <table:table-cell office:value-type="string">
            <text:p>(2, 2, 0, 6, 6, 0, 0)</text:p>
          </table:table-cell>
          <table:table-cell office:value-type="string">
            <text:p>King Momo</text:p>
          </table:table-cell>
          <table:table-cell office:value-type="string">
            <text:p>(2, 2, 0, 6, 6, 0, 0)</text:p>
          </table:table-cell>
          <table:table-cell table:number-columns-repeated="1020"/>
        </table:table-row>
        <table:table-row table:style-name="ro1">
          <table:table-cell office:value-type="string">
            <text:p>Panda</text:p>
          </table:table-cell>
          <table:table-cell office:value-type="string">
            <text:p>(3, 2, 1, 10, 7, 3, 0)</text:p>
          </table:table-cell>
          <table:table-cell office:value-type="string">
            <text:p>Panda</text:p>
          </table:table-cell>
          <table:table-cell office:value-type="string">
            <text:p>(3, 2, 1, 10, 7, 3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5, 1, 4, 19, 6, 13, 0)</text:p>
          </table:table-cell>
          <table:table-cell office:value-type="string">
            <text:p>Hungrybox</text:p>
          </table:table-cell>
          <table:table-cell office:value-type="string">
            <text:p>(5, 1, 4, 19, 6, 13, 0)</text:p>
          </table:table-cell>
          <table:table-cell table:number-columns-repeated="1020"/>
        </table:table-row>
        <table:table-row table:style-name="ro1">
          <table:table-cell office:value-type="string">
            <text:p>brokenyew</text:p>
          </table:table-cell>
          <table:table-cell office:value-type="string">
            <text:p>(1, 1, 0, 4, 3, 1, 0)</text:p>
          </table:table-cell>
          <table:table-cell office:value-type="string">
            <text:p>brokenyew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CCgrabs</text:p>
          </table:table-cell>
          <table:table-cell office:value-type="string">
            <text:p>(1, 1, 0, 3, 3, 0, 0)</text:p>
          </table:table-cell>
          <table:table-cell office:value-type="string">
            <text:p>CCgrabs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AzLu</text:p>
          </table:table-cell>
          <table:table-cell office:value-type="string">
            <text:p>(1, 1, 0, 4, 3, 1, 0)</text:p>
          </table:table-cell>
          <table:table-cell office:value-type="string">
            <text:p>AzLu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3, 3, 0, 10, 9, 1, 0)</text:p>
          </table:table-cell>
          <table:table-cell office:value-type="string">
            <text:p>Captain G</text:p>
          </table:table-cell>
          <table:table-cell office:value-type="string">
            <text:p>(3, 3, 0, 10, 9, 1, 0)</text:p>
          </table:table-cell>
          <table:table-cell table:number-columns-repeated="1020"/>
        </table:table-row>
        <table:table-row table:style-name="ro1">
          <table:table-cell office:value-type="string">
            <text:p>JChu</text:p>
          </table:table-cell>
          <table:table-cell office:value-type="string">
            <text:p>(1, 1, 0, 5, 3, 2, 0)</text:p>
          </table:table-cell>
          <table:table-cell office:value-type="string">
            <text:p>JChu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Sneakywill</text:p>
          </table:table-cell>
          <table:table-cell office:value-type="string">
            <text:p>(1, 1, 0, 3, 3, 0, 0)</text:p>
          </table:table-cell>
          <table:table-cell office:value-type="string">
            <text:p>Sneakywill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Wizzrobe</text:p>
          </table:table-cell>
          <table:table-cell office:value-type="string">
            <text:p>(4, 3, 1, 17, 11, 6, 0)</text:p>
          </table:table-cell>
          <table:table-cell office:value-type="string">
            <text:p>Wizzrobe</text:p>
          </table:table-cell>
          <table:table-cell office:value-type="string">
            <text:p>(4, 3, 1, 17, 11, 6, 0)</text:p>
          </table:table-cell>
          <table:table-cell table:number-columns-repeated="1020"/>
        </table:table-row>
        <table:table-row table:style-name="ro1">
          <table:table-cell office:value-type="string">
            <text:p>drc</text:p>
          </table:table-cell>
          <table:table-cell office:value-type="string">
            <text:p>(1, 1, 0, 3, 3, 0, 0)</text:p>
          </table:table-cell>
          <table:table-cell office:value-type="string">
            <text:p>drc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1, 1, 0, 3, 3, 0, 0)</text:p>
          </table:table-cell>
          <table:table-cell office:value-type="string">
            <text:p>Slowpez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DA" table:style-name="ta13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Panda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Howie</text:p>
          </table:table-cell>
          <table:table-cell office:value-type="string">
            <text:p>(1, 1, 0, 3, 3, 0, 0)</text:p>
          </table:table-cell>
          <table:table-cell office:value-type="string">
            <text:p>Howie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OG Kid</text:p>
          </table:table-cell>
          <table:table-cell office:value-type="string">
            <text:p>(3, 3, 0, 12, 9, 3, 0)</text:p>
          </table:table-cell>
          <table:table-cell office:value-type="string">
            <text:p>OG Kid</text:p>
          </table:table-cell>
          <table:table-cell office:value-type="string">
            <text:p>(3, 3, 0, 12, 9, 3, 0)</text:p>
          </table:table-cell>
          <table:table-cell table:number-columns-repeated="1020"/>
        </table:table-row>
        <table:table-row table:style-name="ro1">
          <table:table-cell office:value-type="string">
            <text:p>Krudo</text:p>
          </table:table-cell>
          <table:table-cell office:value-type="string">
            <text:p>(3, 1, 2, 10, 3, 7, 0)</text:p>
          </table:table-cell>
          <table:table-cell office:value-type="string">
            <text:p>Krudo</text:p>
          </table:table-cell>
          <table:table-cell office:value-type="string">
            <text:p>(3, 1, 2, 10, 3, 7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4, 0, 4, 14, 2, 12, 0)</text:p>
          </table:table-cell>
          <table:table-cell office:value-type="string">
            <text:p>Hungrybox</text:p>
          </table:table-cell>
          <table:table-cell office:value-type="string">
            <text:p>(4, 0, 4, 14, 2, 12, 0)</text:p>
          </table:table-cell>
          <table:table-cell table:number-columns-repeated="1020"/>
        </table:table-row>
        <table:table-row table:style-name="ro1">
          <table:table-cell office:value-type="string">
            <text:p>okusuii</text:p>
          </table:table-cell>
          <table:table-cell office:value-type="string">
            <text:p>(1, 1, 0, 3, 3, 0, 0)</text:p>
          </table:table-cell>
          <table:table-cell office:value-type="string">
            <text:p>okusuii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Sneakywill</text:p>
          </table:table-cell>
          <table:table-cell office:value-type="string">
            <text:p>(1, 1, 0, 5, 3, 2, 0)</text:p>
          </table:table-cell>
          <table:table-cell office:value-type="string">
            <text:p>Sneakywill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King Momo</text:p>
          </table:table-cell>
          <table:table-cell office:value-type="string">
            <text:p>(3, 2, 1, 13, 8, 5, 0)</text:p>
          </table:table-cell>
          <table:table-cell office:value-type="string">
            <text:p>King Momo</text:p>
          </table:table-cell>
          <table:table-cell office:value-type="string">
            <text:p>(3, 2, 1, 13, 8, 5, 0)</text:p>
          </table:table-cell>
          <table:table-cell table:number-columns-repeated="1020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3, 3, 0, 14, 9, 5, 0)</text:p>
          </table:table-cell>
          <table:table-cell office:value-type="string">
            <text:p>Captain G</text:p>
          </table:table-cell>
          <table:table-cell office:value-type="string">
            <text:p>(3, 3, 0, 14, 9, 5, 0)</text:p>
          </table:table-cell>
          <table:table-cell table:number-columns-repeated="1020"/>
        </table:table-row>
        <table:table-row table:style-name="ro1">
          <table:table-cell office:value-type="string">
            <text:p>JChu</text:p>
          </table:table-cell>
          <table:table-cell office:value-type="string">
            <text:p>(1, 1, 0, 5, 3, 2, 0)</text:p>
          </table:table-cell>
          <table:table-cell office:value-type="string">
            <text:p>JChu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240p</text:p>
          </table:table-cell>
          <table:table-cell office:value-type="string">
            <text:p>(1, 1, 0, 3, 3, 0, 0)</text:p>
          </table:table-cell>
          <table:table-cell office:value-type="string">
            <text:p>240p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1, 1, 0, 4, 3, 1, 0)</text:p>
          </table:table-cell>
          <table:table-cell office:value-type="string">
            <text:p>Slowpez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Wizzrobe</text:p>
          </table:table-cell>
          <table:table-cell office:value-type="string">
            <text:p>(2, 0, 2, 8, 2, 6, 0)</text:p>
          </table:table-cell>
          <table:table-cell office:value-type="string">
            <text:p>Wizzrobe</text:p>
          </table:table-cell>
          <table:table-cell office:value-type="string">
            <text:p>(2, 0, 2, 8, 2, 6, 0)</text:p>
          </table:table-cell>
          <table:table-cell table:number-columns-repeated="1020"/>
        </table:table-row>
        <table:table-row table:style-name="ro1">
          <table:table-cell office:value-type="string">
            <text:p>Bobateatime</text:p>
          </table:table-cell>
          <table:table-cell office:value-type="string">
            <text:p>(1, 1, 0, 3, 3, 0, 0)</text:p>
          </table:table-cell>
          <table:table-cell office:value-type="string">
            <text:p>Bobateatime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Yeti</text:p>
          </table:table-cell>
          <table:table-cell office:value-type="string">
            <text:p>(1, 1, 0, 5, 3, 2, 0)</text:p>
          </table:table-cell>
          <table:table-cell office:value-type="string">
            <text:p>Yeti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Forrest</text:p>
          </table:table-cell>
          <table:table-cell office:value-type="string">
            <text:p>(1, 0, 1, 5, 2, 3, 0)</text:p>
          </table:table-cell>
          <table:table-cell office:value-type="string">
            <text:p>Forrest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bag</text:p>
          </table:table-cell>
          <table:table-cell office:value-type="string">
            <text:p>(0, 0, 0, 0, 0, 0, 1)</text:p>
          </table:table-cell>
          <table:table-cell office:value-type="string">
            <text:p>bag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yungxgucci</text:p>
          </table:table-cell>
          <table:table-cell office:value-type="string">
            <text:p>(1, 1, 0, 2, 2, 0, 0)</text:p>
          </table:table-cell>
          <table:table-cell office:value-type="string">
            <text:p>yungxgucc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AzLu</text:p>
          </table:table-cell>
          <table:table-cell office:value-type="string">
            <text:p>(1, 1, 0, 3, 3, 0, 0)</text:p>
          </table:table-cell>
          <table:table-cell office:value-type="string">
            <text:p>AzLu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ADMJ</text:p>
          </table:table-cell>
          <table:table-cell office:value-type="string">
            <text:p>(1, 1, 0, 3, 3, 0, 0)</text:p>
          </table:table-cell>
          <table:table-cell office:value-type="string">
            <text:p>ADMJ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Komodo</text:p>
          </table:table-cell>
          <table:table-cell office:value-type="string">
            <text:p>(1, 1, 0, 5, 3, 2, 0)</text:p>
          </table:table-cell>
          <table:table-cell office:value-type="string">
            <text:p>Komodo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WIFTSPANK" table:style-name="ta13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wiftspank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Proto</text:p>
          </table:table-cell>
          <table:table-cell office:value-type="string">
            <text:p>(1, 0, 1, 3, 0, 3, 0)</text:p>
          </table:table-cell>
          <table:table-cell office:value-type="string">
            <text:p>Proto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Kip</text:p>
          </table:table-cell>
          <table:table-cell office:value-type="string">
            <text:p>(1, 0, 1, 3, 0, 3, 0)</text:p>
          </table:table-cell>
          <table:table-cell office:value-type="string">
            <text:p>Kip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HIMELEC VELEZ" table:style-name="ta13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Ahimelec Velez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Abraham</text:p>
          </table:table-cell>
          <table:table-cell office:value-type="string">
            <text:p>(1, 1, 0, 5, 3, 2, 0)</text:p>
          </table:table-cell>
          <table:table-cell office:value-type="string">
            <text:p>Abraham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1, 0, 1, 3, 0, 3, 0)</text:p>
          </table:table-cell>
          <table:table-cell office:value-type="string">
            <text:p>Captain G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A-K SiN</text:p>
          </table:table-cell>
          <table:table-cell office:value-type="string">
            <text:p>(0, 0, 0, 0, 0, 0, 1)</text:p>
          </table:table-cell>
          <table:table-cell office:value-type="string">
            <text:p>A-K Si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Proto</text:p>
          </table:table-cell>
          <table:table-cell office:value-type="string">
            <text:p>(1, 0, 1, 3, 0, 3, 0)</text:p>
          </table:table-cell>
          <table:table-cell office:value-type="string">
            <text:p>Proto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RAHAM" table:style-name="ta13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Abraham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Ahimelec Velez</text:p>
          </table:table-cell>
          <table:table-cell office:value-type="string">
            <text:p>(1, 0, 1, 5, 2, 3, 0)</text:p>
          </table:table-cell>
          <table:table-cell office:value-type="string">
            <text:p>Ahimelec Velez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okusuii</text:p>
          </table:table-cell>
          <table:table-cell office:value-type="string">
            <text:p>(1, 1, 0, 3, 3, 0, 0)</text:p>
          </table:table-cell>
          <table:table-cell office:value-type="string">
            <text:p>okusuii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Kip</text:p>
          </table:table-cell>
          <table:table-cell office:value-type="string">
            <text:p>(2, 1, 1, 5, 3, 2, 1)</text:p>
          </table:table-cell>
          <table:table-cell office:value-type="string">
            <text:p>Kip</text:p>
          </table:table-cell>
          <table:table-cell office:value-type="string">
            <text:p>(2, 1, 1, 5, 3, 2, 1)</text:p>
          </table:table-cell>
          <table:table-cell table:number-columns-repeated="1020"/>
        </table:table-row>
        <table:table-row table:style-name="ro1">
          <table:table-cell office:value-type="string">
            <text:p>Yeti</text:p>
          </table:table-cell>
          <table:table-cell office:value-type="string">
            <text:p>(2, 0, 2, 7, 1, 6, 0)</text:p>
          </table:table-cell>
          <table:table-cell office:value-type="string">
            <text:p>Yeti</text:p>
          </table:table-cell>
          <table:table-cell office:value-type="string">
            <text:p>(2, 0, 2, 7, 1, 6, 0)</text:p>
          </table:table-cell>
          <table:table-cell table:number-columns-repeated="1020"/>
        </table:table-row>
        <table:table-row table:style-name="ro1">
          <table:table-cell office:value-type="string">
            <text:p>Checkmate</text:p>
          </table:table-cell>
          <table:table-cell office:value-type="string">
            <text:p>(0, 0, 0, 0, 0, 0, 1)</text:p>
          </table:table-cell>
          <table:table-cell office:value-type="string">
            <text:p>Checkmat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Lapi</text:p>
          </table:table-cell>
          <table:table-cell office:value-type="string">
            <text:p>(1, 1, 0, 3, 3, 0, 0)</text:p>
          </table:table-cell>
          <table:table-cell office:value-type="string">
            <text:p>Lapi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0, 1, 3, 0, 3, 0)</text:p>
          </table:table-cell>
          <table:table-cell office:value-type="string">
            <text:p>Hungrybox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Hazywazy</text:p>
          </table:table-cell>
          <table:table-cell office:value-type="string">
            <text:p>(0, 0, 0, 0, 0, 0, 1)</text:p>
          </table:table-cell>
          <table:table-cell office:value-type="string">
            <text:p>Hazywaz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Chichi Pumpa</text:p>
          </table:table-cell>
          <table:table-cell office:value-type="string">
            <text:p>(1, 1, 0, 3, 3, 0, 0)</text:p>
          </table:table-cell>
          <table:table-cell office:value-type="string">
            <text:p>Chichi Pumpa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A-K SiN</text:p>
          </table:table-cell>
          <table:table-cell office:value-type="string">
            <text:p>(1, 1, 0, 2, 2, 0, 0)</text:p>
          </table:table-cell>
          <table:table-cell office:value-type="string">
            <text:p>A-K Si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ed.</text:p>
          </table:table-cell>
          <table:table-cell office:value-type="string">
            <text:p>(1, 1, 0, 3, 2, 1, 0)</text:p>
          </table:table-cell>
          <table:table-cell office:value-type="string">
            <text:p>ted.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bardon</text:p>
          </table:table-cell>
          <table:table-cell office:value-type="string">
            <text:p>(1, 0, 1, 5, 2, 3, 0)</text:p>
          </table:table-cell>
          <table:table-cell office:value-type="string">
            <text:p>bardon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TAN" table:style-name="ta13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Titan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that0neguy</text:p>
          </table:table-cell>
          <table:table-cell office:value-type="string">
            <text:p>(1, 1, 0, 3, 3, 0, 0)</text:p>
          </table:table-cell>
          <table:table-cell office:value-type="string">
            <text:p>that0neguy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OG Kid</text:p>
          </table:table-cell>
          <table:table-cell office:value-type="string">
            <text:p>(1, 0, 1, 3, 0, 3, 0)</text:p>
          </table:table-cell>
          <table:table-cell office:value-type="string">
            <text:p>OG Kid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Ricky6</text:p>
          </table:table-cell>
          <table:table-cell office:value-type="string">
            <text:p>(2, 0, 2, 6, 0, 6, 0)</text:p>
          </table:table-cell>
          <table:table-cell office:value-type="string">
            <text:p>Ricky6</text:p>
          </table:table-cell>
          <table:table-cell office:value-type="string">
            <text:p>(2, 0, 2, 6, 0, 6, 0)</text:p>
          </table:table-cell>
          <table:table-cell table:number-columns-repeated="1020"/>
        </table:table-row>
        <table:table-row table:style-name="ro1">
          <table:table-cell office:value-type="string">
            <text:p>tgags</text:p>
          </table:table-cell>
          <table:table-cell office:value-type="string">
            <text:p>(1, 1, 0, 2, 2, 0, 0)</text:p>
          </table:table-cell>
          <table:table-cell office:value-type="string">
            <text:p>tgag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modo</text:p>
          </table:table-cell>
          <table:table-cell office:value-type="string">
            <text:p>(1, 0, 1, 3, 0, 3, 0)</text:p>
          </table:table-cell>
          <table:table-cell office:value-type="string">
            <text:p>Komodo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Sentinel</text:p>
          </table:table-cell>
          <table:table-cell office:value-type="string">
            <text:p>(1, 1, 0, 3, 3, 0, 0)</text:p>
          </table:table-cell>
          <table:table-cell office:value-type="string">
            <text:p>Sentinel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party animal</text:p>
          </table:table-cell>
          <table:table-cell office:value-type="string">
            <text:p>(0, 0, 0, 0, 0, 0, 1)</text:p>
          </table:table-cell>
          <table:table-cell office:value-type="string">
            <text:p>party animal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0, 1, 2, 0, 2, 0)</text:p>
          </table:table-cell>
          <table:table-cell office:value-type="string">
            <text:p>Hungrybo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Whif</text:p>
          </table:table-cell>
          <table:table-cell office:value-type="string">
            <text:p>(0, 0, 0, 0, 0, 0, 1)</text:p>
          </table:table-cell>
          <table:table-cell office:value-type="string">
            <text:p>Whif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Bustopher</text:p>
          </table:table-cell>
          <table:table-cell office:value-type="string">
            <text:p>(1, 0, 1, 2, 0, 2, 0)</text:p>
          </table:table-cell>
          <table:table-cell office:value-type="string">
            <text:p>Bustopher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AT0NEGUY" table:style-name="ta13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that0neguy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Titan</text:p>
          </table:table-cell>
          <table:table-cell office:value-type="string">
            <text:p>(1, 0, 1, 3, 0, 3, 0)</text:p>
          </table:table-cell>
          <table:table-cell office:value-type="string">
            <text:p>Titan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Hungry Pigeon</text:p>
          </table:table-cell>
          <table:table-cell office:value-type="string">
            <text:p>(1, 0, 1, 3, 0, 3, 0)</text:p>
          </table:table-cell>
          <table:table-cell office:value-type="string">
            <text:p>Hungry Pigeon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NTNER" table:style-name="ta14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Vintner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Olsen</text:p>
          </table:table-cell>
          <table:table-cell office:value-type="string">
            <text:p>(1, 0, 1, 3, 0, 3, 0)</text:p>
          </table:table-cell>
          <table:table-cell office:value-type="string">
            <text:p>Olsen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Howie</text:p>
          </table:table-cell>
          <table:table-cell office:value-type="string">
            <text:p>(1, 0, 1, 3, 0, 3, 0)</text:p>
          </table:table-cell>
          <table:table-cell office:value-type="string">
            <text:p>Howie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-K SIN" table:style-name="ta14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A-K SiN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18"/>
        </table:table-row>
        <table:table-row table:style-name="ro1">
          <table:table-cell office:value-type="string">
            <text:p>okusuii</text:p>
          </table:table-cell>
          <table:table-cell office:value-type="string">
            <text:p>(0, 0, 0, 0, 0, 0, 1)</text:p>
          </table:table-cell>
          <table:table-cell office:value-type="string">
            <text:p>Nitrobone</text:p>
          </table:table-cell>
          <table:table-cell office:value-type="string">
            <text:p>(1, 0, 1, 2, 0, 2, 0)</text:p>
          </table:table-cell>
          <table:table-cell office:value-type="string">
            <text:p>okusuii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office:value-type="string">
            <text:p>Ahimelec Velez</text:p>
          </table:table-cell>
          <table:table-cell office:value-type="string">
            <text:p>(0, 0, 0, 0, 0, 0, 1)</text:p>
          </table:table-cell>
          <table:table-cell office:value-type="string">
            <text:p>Danraj</text:p>
          </table:table-cell>
          <table:table-cell office:value-type="string">
            <text:p>(0, 0, 0, 0, 0, 0, 1)</text:p>
          </table:table-cell>
          <table:table-cell office:value-type="string">
            <text:p>Ahimelec Velez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office:value-type="string">
            <text:p>Jape</text:p>
          </table:table-cell>
          <table:table-cell office:value-type="string">
            <text:p>(1, 0, 1, 2, 0, 2, 0)</text:p>
          </table:table-cell>
          <table:table-cell office:value-type="string">
            <text:p>My Dad</text:p>
          </table:table-cell>
          <table:table-cell office:value-type="string">
            <text:p>(1, 0, 1, 2, 0, 2, 0)</text:p>
          </table:table-cell>
          <table:table-cell office:value-type="string">
            <text:p>Jape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office:value-type="string">
            <text:p>Proto</text:p>
          </table:table-cell>
          <table:table-cell office:value-type="string">
            <text:p>(1, 0, 1, 3, 0, 3, 0)</text:p>
          </table:table-cell>
          <table:table-cell table:number-columns-repeated="2"/>
          <table:table-cell office:value-type="string">
            <text:p>Proto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NotTony</text:p>
          </table:table-cell>
          <table:table-cell office:value-type="string">
            <text:p>(0, 0, 0, 0, 0, 0, 1)</text:p>
          </table:table-cell>
          <table:table-cell table:number-columns-repeated="2"/>
          <table:table-cell office:value-type="string">
            <text:p>NotTony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office:value-type="string">
            <text:p>Isosceles</text:p>
          </table:table-cell>
          <table:table-cell office:value-type="string">
            <text:p>(0, 0, 0, 0, 0, 0, 1)</text:p>
          </table:table-cell>
          <table:table-cell table:number-columns-repeated="2"/>
          <table:table-cell office:value-type="string">
            <text:p>Isosceles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office:value-type="string">
            <text:p>King Momo</text:p>
          </table:table-cell>
          <table:table-cell office:value-type="string">
            <text:p>(1, 0, 1, 2, 0, 2, 0)</text:p>
          </table:table-cell>
          <table:table-cell table:number-columns-repeated="2"/>
          <table:table-cell office:value-type="string">
            <text:p>King Momo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office:value-type="string">
            <text:p>Abraham</text:p>
          </table:table-cell>
          <table:table-cell office:value-type="string">
            <text:p>(1, 0, 1, 2, 0, 2, 0)</text:p>
          </table:table-cell>
          <table:table-cell table:number-columns-repeated="2"/>
          <table:table-cell office:value-type="string">
            <text:p>Abraham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Nitrobone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Danraj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My Dad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TT" table:style-name="ta14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Litt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ted.</text:p>
          </table:table-cell>
          <table:table-cell office:value-type="string">
            <text:p>(1, 1, 0, 3, 3, 0, 0)</text:p>
          </table:table-cell>
          <table:table-cell office:value-type="string">
            <text:p>ted.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King Momo</text:p>
          </table:table-cell>
          <table:table-cell office:value-type="string">
            <text:p>(1, 0, 1, 3, 0, 3, 0)</text:p>
          </table:table-cell>
          <table:table-cell office:value-type="string">
            <text:p>King Momo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1, 0, 1, 4, 1, 3, 0)</text:p>
          </table:table-cell>
          <table:table-cell office:value-type="string">
            <text:p>Slowpez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D." table:style-name="ta14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ted.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Litt</text:p>
          </table:table-cell>
          <table:table-cell office:value-type="string">
            <text:p>(1, 0, 1, 3, 0, 3, 0)</text:p>
          </table:table-cell>
          <table:table-cell office:value-type="string">
            <text:p>Litt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Peele</text:p>
          </table:table-cell>
          <table:table-cell office:value-type="string">
            <text:p>(0, 0, 0, 0, 0, 0, 1)</text:p>
          </table:table-cell>
          <table:table-cell office:value-type="string">
            <text:p>Peel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CCgrabs</text:p>
          </table:table-cell>
          <table:table-cell office:value-type="string">
            <text:p>(1, 1, 0, 3, 3, 0, 0)</text:p>
          </table:table-cell>
          <table:table-cell office:value-type="string">
            <text:p>CCgrabs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SandBag</text:p>
          </table:table-cell>
          <table:table-cell office:value-type="string">
            <text:p>(1, 0, 1, 5, 2, 3, 0)</text:p>
          </table:table-cell>
          <table:table-cell office:value-type="string">
            <text:p>SandBag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Jovian</text:p>
          </table:table-cell>
          <table:table-cell office:value-type="string">
            <text:p>(1, 1, 0, 2, 2, 0, 0)</text:p>
          </table:table-cell>
          <table:table-cell office:value-type="string">
            <text:p>Jovia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2, 0, 2, 5, 0, 5, 0)</text:p>
          </table:table-cell>
          <table:table-cell office:value-type="string">
            <text:p>Captain G</text:p>
          </table:table-cell>
          <table:table-cell office:value-type="string">
            <text:p>(2, 0, 2, 5, 0, 5, 0)</text:p>
          </table:table-cell>
          <table:table-cell table:number-columns-repeated="1020"/>
        </table:table-row>
        <table:table-row table:style-name="ro1">
          <table:table-cell office:value-type="string">
            <text:p>Frardvark</text:p>
          </table:table-cell>
          <table:table-cell office:value-type="string">
            <text:p>(1, 1, 0, 4, 3, 1, 0)</text:p>
          </table:table-cell>
          <table:table-cell office:value-type="string">
            <text:p>Frardvark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(1, 0, 1, 3, 0, 3, 0)</text:p>
          </table:table-cell>
          <table:table-cell office:value-type="string">
            <text:p>Hod Strat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Jacktheragingbull</text:p>
          </table:table-cell>
          <table:table-cell office:value-type="string">
            <text:p>(1, 1, 0, 3, 3, 0, 0)</text:p>
          </table:table-cell>
          <table:table-cell office:value-type="string">
            <text:p>Jacktheragingbull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OG Kid</text:p>
          </table:table-cell>
          <table:table-cell office:value-type="string">
            <text:p>(1, 0, 1, 3, 0, 3, 0)</text:p>
          </table:table-cell>
          <table:table-cell office:value-type="string">
            <text:p>OG Kid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Howie</text:p>
          </table:table-cell>
          <table:table-cell office:value-type="string">
            <text:p>(1, 0, 1, 3, 0, 3, 0)</text:p>
          </table:table-cell>
          <table:table-cell office:value-type="string">
            <text:p>Howie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Vision</text:p>
          </table:table-cell>
          <table:table-cell office:value-type="string">
            <text:p>(0, 0, 0, 0, 0, 0, 1)</text:p>
          </table:table-cell>
          <table:table-cell office:value-type="string">
            <text:p>Visio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Abraham</text:p>
          </table:table-cell>
          <table:table-cell office:value-type="string">
            <text:p>(1, 0, 1, 3, 1, 2, 0)</text:p>
          </table:table-cell>
          <table:table-cell office:value-type="string">
            <text:p>Abraham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ZLU" table:style-name="ta14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AzLu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18"/>
        </table:table-row>
        <table:table-row table:style-name="ro1">
          <table:table-cell office:value-type="string">
            <text:p>Peele</text:p>
          </table:table-cell>
          <table:table-cell office:value-type="string">
            <text:p>(1, 1, 0, 2, 2, 0, 1)</text:p>
          </table:table-cell>
          <table:table-cell office:value-type="string">
            <text:p>Turbo</text:p>
          </table:table-cell>
          <table:table-cell office:value-type="string">
            <text:p>(1, 1, 0, 2, 2, 0, 0)</text:p>
          </table:table-cell>
          <table:table-cell office:value-type="string">
            <text:p>Peele</text:p>
          </table:table-cell>
          <table:table-cell office:value-type="string">
            <text:p>(1, 1, 0, 2, 2, 0, 1)</text:p>
          </table:table-cell>
          <table:table-cell table:number-columns-repeated="1018"/>
        </table:table-row>
        <table:table-row table:style-name="ro1">
          <table:table-cell office:value-type="string">
            <text:p>Krudo</text:p>
          </table:table-cell>
          <table:table-cell office:value-type="string">
            <text:p>(1, 0, 1, 4, 1, 3, 0)</text:p>
          </table:table-cell>
          <table:table-cell office:value-type="string">
            <text:p>Ginger</text:p>
          </table:table-cell>
          <table:table-cell office:value-type="string">
            <text:p>(1, 0, 1, 2, 0, 2, 0)</text:p>
          </table:table-cell>
          <table:table-cell office:value-type="string">
            <text:p>Krudo</text:p>
          </table:table-cell>
          <table:table-cell office:value-type="string">
            <text:p>(1, 0, 1, 4, 1, 3, 0)</text:p>
          </table:table-cell>
          <table:table-cell table:number-columns-repeated="1018"/>
        </table:table-row>
        <table:table-row table:style-name="ro1">
          <table:table-cell office:value-type="string">
            <text:p>Hungry Pigeon</text:p>
          </table:table-cell>
          <table:table-cell office:value-type="string">
            <text:p>(1, 1, 0, 3, 3, 0, 0)</text:p>
          </table:table-cell>
          <table:table-cell office:value-type="string">
            <text:p>Greenvenom20</text:p>
          </table:table-cell>
          <table:table-cell office:value-type="string">
            <text:p>(0, 0, 0, 0, 0, 0, 1)</text:p>
          </table:table-cell>
          <table:table-cell office:value-type="string">
            <text:p>Hungry Pigeon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Komodo</text:p>
          </table:table-cell>
          <table:table-cell office:value-type="string">
            <text:p>(2, 0, 2, 7, 1, 6, 0)</text:p>
          </table:table-cell>
          <table:table-cell office:value-type="string">
            <text:p>Mav</text:p>
          </table:table-cell>
          <table:table-cell office:value-type="string">
            <text:p>(1, 0, 1, 3, 1, 2, 0)</text:p>
          </table:table-cell>
          <table:table-cell office:value-type="string">
            <text:p>Komodo</text:p>
          </table:table-cell>
          <table:table-cell office:value-type="string">
            <text:p>(2, 0, 2, 7, 1, 6, 0)</text:p>
          </table:table-cell>
          <table:table-cell table:number-columns-repeated="1018"/>
        </table:table-row>
        <table:table-row table:style-name="ro1">
          <table:table-cell office:value-type="string">
            <text:p>uhline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uhline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Cappuccino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Cappuccino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Wizzrobe</text:p>
          </table:table-cell>
          <table:table-cell office:value-type="string">
            <text:p>(1, 0, 1, 3, 0, 3, 0)</text:p>
          </table:table-cell>
          <table:table-cell table:number-columns-repeated="2"/>
          <table:table-cell office:value-type="string">
            <text:p>Wizzrobe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Howie</text:p>
          </table:table-cell>
          <table:table-cell office:value-type="string">
            <text:p>(2, 2, 0, 6, 6, 0, 0)</text:p>
          </table:table-cell>
          <table:table-cell table:number-columns-repeated="2"/>
          <table:table-cell office:value-type="string">
            <text:p>Howie</text:p>
          </table:table-cell>
          <table:table-cell office:value-type="string">
            <text:p>(2, 2, 0, 6, 6, 0, 0)</text:p>
          </table:table-cell>
          <table:table-cell table:number-columns-repeated="1018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1, 0, 1, 5, 2, 3, 0)</text:p>
          </table:table-cell>
          <table:table-cell table:number-columns-repeated="2"/>
          <table:table-cell office:value-type="string">
            <text:p>Slowpez</text:p>
          </table:table-cell>
          <table:table-cell office:value-type="string">
            <text:p>(1, 0, 1, 5, 2, 3, 0)</text:p>
          </table:table-cell>
          <table:table-cell table:number-columns-repeated="1018"/>
        </table:table-row>
        <table:table-row table:style-name="ro1">
          <table:table-cell office:value-type="string">
            <text:p>Jacktheragingbull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Jacktheragingbull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drc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drc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Franco</text:p>
          </table:table-cell>
          <table:table-cell office:value-type="string">
            <text:p>(2, 0, 2, 8, 2, 6, 0)</text:p>
          </table:table-cell>
          <table:table-cell table:number-columns-repeated="2"/>
          <table:table-cell office:value-type="string">
            <text:p>Franco</text:p>
          </table:table-cell>
          <table:table-cell office:value-type="string">
            <text:p>(2, 0, 2, 8, 2, 6, 0)</text:p>
          </table:table-cell>
          <table:table-cell table:number-columns-repeated="1018"/>
        </table:table-row>
        <table:table-row table:style-name="ro1">
          <table:table-cell office:value-type="string">
            <text:p>jamV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jamV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Panda</text:p>
          </table:table-cell>
          <table:table-cell office:value-type="string">
            <text:p>(1, 0, 1, 3, 0, 3, 0)</text:p>
          </table:table-cell>
          <table:table-cell table:number-columns-repeated="2"/>
          <table:table-cell office:value-type="string">
            <text:p>Panda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bardon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bardon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(1, 1, 0, 5, 3, 2, 0)</text:p>
          </table:table-cell>
          <table:table-cell table:number-columns-repeated="2"/>
          <table:table-cell office:value-type="string">
            <text:p>Hod Strat</text:p>
          </table:table-cell>
          <table:table-cell office:value-type="string">
            <text:p>(1, 1, 0, 5, 3, 2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Turbo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Ginger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Greenvenom20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Mav</text:p>
          </table:table-cell>
          <table:table-cell office:value-type="string">
            <text:p>(1, 0, 1, 3, 1, 2, 0)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ELE" table:style-name="ta14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Peele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AzLu</text:p>
          </table:table-cell>
          <table:table-cell office:value-type="string">
            <text:p>(1, 0, 1, 2, 0, 2, 1)</text:p>
          </table:table-cell>
          <table:table-cell office:value-type="string">
            <text:p>AzLu</text:p>
          </table:table-cell>
          <table:table-cell office:value-type="string">
            <text:p>(1, 0, 1, 2, 0, 2, 1)</text:p>
          </table:table-cell>
          <table:table-cell table:number-columns-repeated="1020"/>
        </table:table-row>
        <table:table-row table:style-name="ro1">
          <table:table-cell office:value-type="string">
            <text:p>ted.</text:p>
          </table:table-cell>
          <table:table-cell office:value-type="string">
            <text:p>(0, 0, 0, 0, 0, 0, 1)</text:p>
          </table:table-cell>
          <table:table-cell office:value-type="string">
            <text:p>ted.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quattingxBear</text:p>
          </table:table-cell>
          <table:table-cell office:value-type="string">
            <text:p>(1, 1, 0, 2, 2, 0, 0)</text:p>
          </table:table-cell>
          <table:table-cell office:value-type="string">
            <text:p>SquattingxBea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igh</text:p>
          </table:table-cell>
          <table:table-cell office:value-type="string">
            <text:p>(1, 1, 0, 2, 2, 0, 0)</text:p>
          </table:table-cell>
          <table:table-cell office:value-type="string">
            <text:p>Sig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yungxgucci</text:p>
          </table:table-cell>
          <table:table-cell office:value-type="string">
            <text:p>(1, 1, 0, 4, 3, 1, 0)</text:p>
          </table:table-cell>
          <table:table-cell office:value-type="string">
            <text:p>yungxgucci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Cappuccino</text:p>
          </table:table-cell>
          <table:table-cell office:value-type="string">
            <text:p>(1, 0, 1, 3, 0, 3, 0)</text:p>
          </table:table-cell>
          <table:table-cell office:value-type="string">
            <text:p>Cappuccino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MODO" table:style-name="ta14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Komodo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Proto</text:p>
          </table:table-cell>
          <table:table-cell office:value-type="string">
            <text:p>(1, 1, 0, 3, 3, 0, 0)</text:p>
          </table:table-cell>
          <table:table-cell office:value-type="string">
            <text:p>Proto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2, 0, 2, 10, 4, 6, 0)</text:p>
          </table:table-cell>
          <table:table-cell office:value-type="string">
            <text:p>Captain G</text:p>
          </table:table-cell>
          <table:table-cell office:value-type="string">
            <text:p>(2, 0, 2, 10, 4, 6, 0)</text:p>
          </table:table-cell>
          <table:table-cell table:number-columns-repeated="1020"/>
        </table:table-row>
        <table:table-row table:style-name="ro1">
          <table:table-cell office:value-type="string">
            <text:p>Olsen</text:p>
          </table:table-cell>
          <table:table-cell office:value-type="string">
            <text:p>(1, 1, 0, 3, 3, 0, 0)</text:p>
          </table:table-cell>
          <table:table-cell office:value-type="string">
            <text:p>Olsen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AzLu</text:p>
          </table:table-cell>
          <table:table-cell office:value-type="string">
            <text:p>(2, 2, 0, 7, 6, 1, 0)</text:p>
          </table:table-cell>
          <table:table-cell office:value-type="string">
            <text:p>AzLu</text:p>
          </table:table-cell>
          <table:table-cell office:value-type="string">
            <text:p>(2, 2, 0, 7, 6, 1, 0)</text:p>
          </table:table-cell>
          <table:table-cell table:number-columns-repeated="1020"/>
        </table:table-row>
        <table:table-row table:style-name="ro1">
          <table:table-cell office:value-type="string">
            <text:p>King Momo</text:p>
          </table:table-cell>
          <table:table-cell office:value-type="string">
            <text:p>(1, 1, 0, 4, 3, 1, 0)</text:p>
          </table:table-cell>
          <table:table-cell office:value-type="string">
            <text:p>King Momo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brokenyew</text:p>
          </table:table-cell>
          <table:table-cell office:value-type="string">
            <text:p>(1, 1, 0, 3, 3, 0, 0)</text:p>
          </table:table-cell>
          <table:table-cell office:value-type="string">
            <text:p>brokenyew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JChu</text:p>
          </table:table-cell>
          <table:table-cell office:value-type="string">
            <text:p>(1, 0, 1, 3, 0, 3, 0)</text:p>
          </table:table-cell>
          <table:table-cell office:value-type="string">
            <text:p>JChu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Titan</text:p>
          </table:table-cell>
          <table:table-cell office:value-type="string">
            <text:p>(1, 1, 0, 3, 3, 0, 0)</text:p>
          </table:table-cell>
          <table:table-cell office:value-type="string">
            <text:p>Titan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Franco</text:p>
          </table:table-cell>
          <table:table-cell office:value-type="string">
            <text:p>(2, 1, 1, 9, 5, 4, 0)</text:p>
          </table:table-cell>
          <table:table-cell office:value-type="string">
            <text:p>Franco</text:p>
          </table:table-cell>
          <table:table-cell office:value-type="string">
            <text:p>(2, 1, 1, 9, 5, 4, 0)</text:p>
          </table:table-cell>
          <table:table-cell table:number-columns-repeated="1020"/>
        </table:table-row>
        <table:table-row table:style-name="ro1">
          <table:table-cell office:value-type="string">
            <text:p>Jape</text:p>
          </table:table-cell>
          <table:table-cell office:value-type="string">
            <text:p>(1, 1, 0, 4, 3, 1, 0)</text:p>
          </table:table-cell>
          <table:table-cell office:value-type="string">
            <text:p>Jape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Equilateral</text:p>
          </table:table-cell>
          <table:table-cell office:value-type="string">
            <text:p>(1, 0, 1, 3, 0, 3, 0)</text:p>
          </table:table-cell>
          <table:table-cell office:value-type="string">
            <text:p>Equilateral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uhline</text:p>
          </table:table-cell>
          <table:table-cell office:value-type="string">
            <text:p>(1, 1, 0, 3, 3, 0, 0)</text:p>
          </table:table-cell>
          <table:table-cell office:value-type="string">
            <text:p>uhline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Profanity</text:p>
          </table:table-cell>
          <table:table-cell office:value-type="string">
            <text:p>(1, 1, 0, 3, 3, 0, 0)</text:p>
          </table:table-cell>
          <table:table-cell office:value-type="string">
            <text:p>Profanity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Wizzrobe</text:p>
          </table:table-cell>
          <table:table-cell office:value-type="string">
            <text:p>(1, 0, 1, 3, 0, 3, 0)</text:p>
          </table:table-cell>
          <table:table-cell office:value-type="string">
            <text:p>Wizzrobe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Gahtzu</text:p>
          </table:table-cell>
          <table:table-cell office:value-type="string">
            <text:p>(1, 0, 1, 4, 1, 3, 0)</text:p>
          </table:table-cell>
          <table:table-cell office:value-type="string">
            <text:p>Gahtzu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masterqz</text:p>
          </table:table-cell>
          <table:table-cell office:value-type="string">
            <text:p>(0, 0, 0, 0, 0, 0, 1)</text:p>
          </table:table-cell>
          <table:table-cell office:value-type="string">
            <text:p>masterqz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(1, 1, 0, 2, 2, 0, 0)</text:p>
          </table:table-cell>
          <table:table-cell office:value-type="string">
            <text:p>Hod Stra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neakywill</text:p>
          </table:table-cell>
          <table:table-cell office:value-type="string">
            <text:p>(1, 1, 0, 3, 3, 0, 0)</text:p>
          </table:table-cell>
          <table:table-cell office:value-type="string">
            <text:p>Sneakywill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1, 1, 0, 3, 3, 0, 0)</text:p>
          </table:table-cell>
          <table:table-cell office:value-type="string">
            <text:p>Slowpez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Panda</text:p>
          </table:table-cell>
          <table:table-cell office:value-type="string">
            <text:p>(1, 0, 1, 5, 2, 3, 0)</text:p>
          </table:table-cell>
          <table:table-cell office:value-type="string">
            <text:p>Panda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CHU" table:style-name="ta14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JChu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Quelity</text:p>
          </table:table-cell>
          <table:table-cell office:value-type="string">
            <text:p>(1, 1, 0, 3, 3, 0, 0)</text:p>
          </table:table-cell>
          <table:table-cell office:value-type="string">
            <text:p>Quelity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Yeti</text:p>
          </table:table-cell>
          <table:table-cell office:value-type="string">
            <text:p>(1, 1, 0, 3, 3, 0, 0)</text:p>
          </table:table-cell>
          <table:table-cell office:value-type="string">
            <text:p>Yeti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OG Kid</text:p>
          </table:table-cell>
          <table:table-cell office:value-type="string">
            <text:p>(1, 1, 0, 4, 3, 1, 0)</text:p>
          </table:table-cell>
          <table:table-cell office:value-type="string">
            <text:p>OG Kid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Krudo</text:p>
          </table:table-cell>
          <table:table-cell office:value-type="string">
            <text:p>(1, 0, 1, 5, 2, 3, 0)</text:p>
          </table:table-cell>
          <table:table-cell office:value-type="string">
            <text:p>Krudo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Komodo</text:p>
          </table:table-cell>
          <table:table-cell office:value-type="string">
            <text:p>(1, 1, 0, 3, 3, 0, 0)</text:p>
          </table:table-cell>
          <table:table-cell office:value-type="string">
            <text:p>Komodo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Panda</text:p>
          </table:table-cell>
          <table:table-cell office:value-type="string">
            <text:p>(1, 0, 1, 5, 2, 3, 0)</text:p>
          </table:table-cell>
          <table:table-cell office:value-type="string">
            <text:p>Panda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AM" table:style-name="ta14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ESAM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18"/>
        </table:table-row>
        <table:table-row table:style-name="ro1">
          <table:table-cell office:value-type="string">
            <text:p>Ricky6</text:p>
          </table:table-cell>
          <table:table-cell office:value-type="string">
            <text:p>(1, 1, 0, 5, 3, 2, 0)</text:p>
          </table:table-cell>
          <table:table-cell office:value-type="string">
            <text:p>saibaman</text:p>
          </table:table-cell>
          <table:table-cell office:value-type="string">
            <text:p>(1, 1, 0, 2, 2, 0, 0)</text:p>
          </table:table-cell>
          <table:table-cell office:value-type="string">
            <text:p>Ricky6</text:p>
          </table:table-cell>
          <table:table-cell office:value-type="string">
            <text:p>(1, 1, 0, 5, 3, 2, 0)</text:p>
          </table:table-cell>
          <table:table-cell table:number-columns-repeated="1018"/>
        </table:table-row>
        <table:table-row table:style-name="ro1">
          <table:table-cell office:value-type="string">
            <text:p>OG Kid</text:p>
          </table:table-cell>
          <table:table-cell office:value-type="string">
            <text:p>(1, 0, 1, 3, 0, 3, 0)</text:p>
          </table:table-cell>
          <table:table-cell office:value-type="string">
            <text:p>Squishy~</text:p>
          </table:table-cell>
          <table:table-cell office:value-type="string">
            <text:p>(1, 1, 0, 2, 2, 0, 0)</text:p>
          </table:table-cell>
          <table:table-cell office:value-type="string">
            <text:p>OG Kid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1, 0, 1, 4, 1, 3, 0)</text:p>
          </table:table-cell>
          <table:table-cell office:value-type="string">
            <text:p>Anthzeny</text:p>
          </table:table-cell>
          <table:table-cell office:value-type="string">
            <text:p>(1, 1, 0, 2, 2, 0, 0)</text:p>
          </table:table-cell>
          <table:table-cell office:value-type="string">
            <text:p>Slowpez</text:p>
          </table:table-cell>
          <table:table-cell office:value-type="string">
            <text:p>(1, 0, 1, 4, 1, 3, 0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M</text:p>
          </table:table-cell>
          <table:table-cell office:value-type="string">
            <text:p>(1, 0, 1, 3, 1, 2, 0)</text:p>
          </table:table-cell>
          <table:table-cell office:value-type="string">
            <text:p>saibaman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eal King Barbaros</text:p>
          </table:table-cell>
          <table:table-cell office:value-type="string">
            <text:p>(1, 0, 1, 3, 1, 2, 0)</text:p>
          </table:table-cell>
          <table:table-cell office:value-type="string">
            <text:p>Squishy~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uckMark</text:p>
          </table:table-cell>
          <table:table-cell office:value-type="string">
            <text:p>(1, 1, 0, 2, 2, 0, 0)</text:p>
          </table:table-cell>
          <table:table-cell office:value-type="string">
            <text:p>Anthzeny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vipertoo</text:p>
          </table:table-cell>
          <table:table-cell office:value-type="string">
            <text:p>(1, 1, 0, 2, 2, 0, 0)</text:p>
          </table:table-cell>
          <table:table-cell office:value-type="string">
            <text:p>DM</text:p>
          </table:table-cell>
          <table:table-cell office:value-type="string">
            <text:p>(1, 0, 1, 3, 1, 2, 0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Hungrybox</text:p>
          </table:table-cell>
          <table:table-cell office:value-type="string">
            <text:p>(1, 1, 0, 3, 2, 1, 0)</text:p>
          </table:table-cell>
          <table:table-cell office:value-type="string">
            <text:p>Seal King Barbaros</text:p>
          </table:table-cell>
          <table:table-cell office:value-type="string">
            <text:p>(1, 0, 1, 3, 1, 2, 0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JMxfia</text:p>
          </table:table-cell>
          <table:table-cell office:value-type="string">
            <text:p>(1, 1, 0, 2, 2, 0, 0)</text:p>
          </table:table-cell>
          <table:table-cell office:value-type="string">
            <text:p>DuckMark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ominator</text:p>
          </table:table-cell>
          <table:table-cell office:value-type="string">
            <text:p>(1, 0, 1, 3, 1, 2, 0)</text:p>
          </table:table-cell>
          <table:table-cell office:value-type="string">
            <text:p>vipertoo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LightningCam</text:p>
          </table:table-cell>
          <table:table-cell office:value-type="string">
            <text:p>(1, 1, 0, 3, 2, 1, 0)</text:p>
          </table:table-cell>
          <table:table-cell office:value-type="string">
            <text:p>Hungrybox</text:p>
          </table:table-cell>
          <table:table-cell office:value-type="string">
            <text:p>(1, 1, 0, 3, 2, 1, 0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iku</text:p>
          </table:table-cell>
          <table:table-cell office:value-type="string">
            <text:p>(1, 1, 0, 4, 3, 1, 0)</text:p>
          </table:table-cell>
          <table:table-cell office:value-type="string">
            <text:p>JMxfia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pic_Gabriel</text:p>
          </table:table-cell>
          <table:table-cell office:value-type="string">
            <text:p>(1, 0, 1, 5, 2, 3, 0)</text:p>
          </table:table-cell>
          <table:table-cell office:value-type="string">
            <text:p>Dominator</text:p>
          </table:table-cell>
          <table:table-cell office:value-type="string">
            <text:p>(1, 0, 1, 3, 1, 2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ghtningCam</text:p>
          </table:table-cell>
          <table:table-cell office:value-type="string">
            <text:p>(1, 1, 0, 3, 2, 1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iku</text:p>
          </table:table-cell>
          <table:table-cell office:value-type="string">
            <text:p>(1, 1, 0, 4, 3, 1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Epic_Gabriel</text:p>
          </table:table-cell>
          <table:table-cell office:value-type="string">
            <text:p>(1, 0, 1, 5, 2, 3, 0)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UNGRY PIGEON" table:style-name="ta14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Hungry Pigeon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andBag</text:p>
          </table:table-cell>
          <table:table-cell office:value-type="string">
            <text:p>(1, 0, 1, 5, 2, 3, 0)</text:p>
          </table:table-cell>
          <table:table-cell office:value-type="string">
            <text:p>SandBag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that0neguy</text:p>
          </table:table-cell>
          <table:table-cell office:value-type="string">
            <text:p>(1, 1, 0, 3, 3, 0, 0)</text:p>
          </table:table-cell>
          <table:table-cell office:value-type="string">
            <text:p>that0neguy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Jovian</text:p>
          </table:table-cell>
          <table:table-cell office:value-type="string">
            <text:p>(1, 1, 0, 3, 3, 0, 0)</text:p>
          </table:table-cell>
          <table:table-cell office:value-type="string">
            <text:p>Jovian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AzLu</text:p>
          </table:table-cell>
          <table:table-cell office:value-type="string">
            <text:p>(1, 0, 1, 3, 0, 3, 0)</text:p>
          </table:table-cell>
          <table:table-cell office:value-type="string">
            <text:p>AzLu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ALCO" table:style-name="ta15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Jfalco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brokenyew</text:p>
          </table:table-cell>
          <table:table-cell office:value-type="string">
            <text:p>(1, 0, 1, 3, 0, 3, 0)</text:p>
          </table:table-cell>
          <table:table-cell office:value-type="string">
            <text:p>brokenyew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NotTony</text:p>
          </table:table-cell>
          <table:table-cell office:value-type="string">
            <text:p>(1, 1, 0, 3, 3, 0, 0)</text:p>
          </table:table-cell>
          <table:table-cell office:value-type="string">
            <text:p>NotTony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Olsen</text:p>
          </table:table-cell>
          <table:table-cell office:value-type="string">
            <text:p>(1, 0, 1, 3, 0, 3, 0)</text:p>
          </table:table-cell>
          <table:table-cell office:value-type="string">
            <text:p>Olsen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EAKYWILL" table:style-name="ta15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neakywill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Kip</text:p>
          </table:table-cell>
          <table:table-cell office:value-type="string">
            <text:p>(1, 1, 0, 5, 3, 2, 0)</text:p>
          </table:table-cell>
          <table:table-cell office:value-type="string">
            <text:p>Kip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Panda</text:p>
          </table:table-cell>
          <table:table-cell office:value-type="string">
            <text:p>(1, 0, 1, 5, 2, 3, 0)</text:p>
          </table:table-cell>
          <table:table-cell office:value-type="string">
            <text:p>Panda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Howie</text:p>
          </table:table-cell>
          <table:table-cell office:value-type="string">
            <text:p>(1, 1, 0, 3, 3, 0, 0)</text:p>
          </table:table-cell>
          <table:table-cell office:value-type="string">
            <text:p>Howie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Ricky6</text:p>
          </table:table-cell>
          <table:table-cell office:value-type="string">
            <text:p>(1, 1, 0, 3, 3, 0, 0)</text:p>
          </table:table-cell>
          <table:table-cell office:value-type="string">
            <text:p>Ricky6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1, 0, 1, 5, 2, 3, 0)</text:p>
          </table:table-cell>
          <table:table-cell office:value-type="string">
            <text:p>Captain G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jitmasterswag</text:p>
          </table:table-cell>
          <table:table-cell office:value-type="string">
            <text:p>(0, 0, 0, 0, 0, 0, 1)</text:p>
          </table:table-cell>
          <table:table-cell office:value-type="string">
            <text:p>jitmasterswag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andBag</text:p>
          </table:table-cell>
          <table:table-cell office:value-type="string">
            <text:p>(1, 1, 0, 5, 3, 2, 0)</text:p>
          </table:table-cell>
          <table:table-cell office:value-type="string">
            <text:p>SandBag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Krudo</text:p>
          </table:table-cell>
          <table:table-cell office:value-type="string">
            <text:p>(1, 0, 1, 3, 0, 3, 0)</text:p>
          </table:table-cell>
          <table:table-cell office:value-type="string">
            <text:p>Krudo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20xQuest</text:p>
          </table:table-cell>
          <table:table-cell office:value-type="string">
            <text:p>(1, 1, 0, 4, 3, 1, 0)</text:p>
          </table:table-cell>
          <table:table-cell office:value-type="string">
            <text:p>20xQuest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pace</text:p>
          </table:table-cell>
          <table:table-cell office:value-type="string">
            <text:p>(1, 0, 1, 5, 2, 3, 0)</text:p>
          </table:table-cell>
          <table:table-cell office:value-type="string">
            <text:p>pace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Jovian</text:p>
          </table:table-cell>
          <table:table-cell office:value-type="string">
            <text:p>(0, 0, 0, 0, 0, 0, 1)</text:p>
          </table:table-cell>
          <table:table-cell office:value-type="string">
            <text:p>Jovia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Quelity</text:p>
          </table:table-cell>
          <table:table-cell office:value-type="string">
            <text:p>(0, 0, 0, 0, 0, 0, 1)</text:p>
          </table:table-cell>
          <table:table-cell office:value-type="string">
            <text:p>Quelit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Proto</text:p>
          </table:table-cell>
          <table:table-cell office:value-type="string">
            <text:p>(1, 1, 0, 2, 2, 0, 0)</text:p>
          </table:table-cell>
          <table:table-cell office:value-type="string">
            <text:p>Prot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Jacktheragingbull</text:p>
          </table:table-cell>
          <table:table-cell office:value-type="string">
            <text:p>(1, 1, 0, 2, 2, 0, 0)</text:p>
          </table:table-cell>
          <table:table-cell office:value-type="string">
            <text:p>Jacktheragingbul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modo</text:p>
          </table:table-cell>
          <table:table-cell office:value-type="string">
            <text:p>(1, 0, 1, 3, 0, 3, 0)</text:p>
          </table:table-cell>
          <table:table-cell office:value-type="string">
            <text:p>Komodo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Jape</text:p>
          </table:table-cell>
          <table:table-cell office:value-type="string">
            <text:p>(1, 1, 0, 5, 3, 2, 0)</text:p>
          </table:table-cell>
          <table:table-cell office:value-type="string">
            <text:p>Jape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Cappuccino</text:p>
          </table:table-cell>
          <table:table-cell office:value-type="string">
            <text:p>(1, 0, 1, 3, 0, 3, 0)</text:p>
          </table:table-cell>
          <table:table-cell office:value-type="string">
            <text:p>Cappuccino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P" table:style-name="ta15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Kip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neakywill</text:p>
          </table:table-cell>
          <table:table-cell office:value-type="string">
            <text:p>(1, 0, 1, 5, 2, 3, 0)</text:p>
          </table:table-cell>
          <table:table-cell office:value-type="string">
            <text:p>Sneakywill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Swiftspank</text:p>
          </table:table-cell>
          <table:table-cell office:value-type="string">
            <text:p>(1, 1, 0, 3, 3, 0, 0)</text:p>
          </table:table-cell>
          <table:table-cell office:value-type="string">
            <text:p>Swiftspank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Abraham</text:p>
          </table:table-cell>
          <table:table-cell office:value-type="string">
            <text:p>(2, 1, 1, 5, 2, 3, 1)</text:p>
          </table:table-cell>
          <table:table-cell office:value-type="string">
            <text:p>Abraham</text:p>
          </table:table-cell>
          <table:table-cell office:value-type="string">
            <text:p>(2, 1, 1, 5, 2, 3, 1)</text:p>
          </table:table-cell>
          <table:table-cell table:number-columns-repeated="1020"/>
        </table:table-row>
        <table:table-row table:style-name="ro1">
          <table:table-cell office:value-type="string">
            <text:p>NotTony</text:p>
          </table:table-cell>
          <table:table-cell office:value-type="string">
            <text:p>(2, 2, 0, 4, 4, 0, 0)</text:p>
          </table:table-cell>
          <table:table-cell office:value-type="string">
            <text:p>NotTony</text:p>
          </table:table-cell>
          <table:table-cell office:value-type="string">
            <text:p>(2, 2, 0, 4, 4, 0, 0)</text:p>
          </table:table-cell>
          <table:table-cell table:number-columns-repeated="1020"/>
        </table:table-row>
        <table:table-row table:style-name="ro1">
          <table:table-cell office:value-type="string">
            <text:p>brokenyew</text:p>
          </table:table-cell>
          <table:table-cell office:value-type="string">
            <text:p>(1, 0, 1, 3, 0, 3, 0)</text:p>
          </table:table-cell>
          <table:table-cell office:value-type="string">
            <text:p>brokenyew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Aaron</text:p>
          </table:table-cell>
          <table:table-cell office:value-type="string">
            <text:p>(1, 0, 1, 4, 1, 3, 0)</text:p>
          </table:table-cell>
          <table:table-cell office:value-type="string">
            <text:p>Aaron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King Momo</text:p>
          </table:table-cell>
          <table:table-cell office:value-type="string">
            <text:p>(1, 0, 1, 2, 0, 2, 0)</text:p>
          </table:table-cell>
          <table:table-cell office:value-type="string">
            <text:p>King Momo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Howie</text:p>
          </table:table-cell>
          <table:table-cell office:value-type="string">
            <text:p>(1, 1, 0, 3, 2, 1, 0)</text:p>
          </table:table-cell>
          <table:table-cell office:value-type="string">
            <text:p>Howie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Wild Bill</text:p>
          </table:table-cell>
          <table:table-cell office:value-type="string">
            <text:p>(1, 0, 1, 4, 1, 3, 0)</text:p>
          </table:table-cell>
          <table:table-cell office:value-type="string">
            <text:p>Wild Bill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PE" table:style-name="ta15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Jape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1, 1, 0, 4, 3, 1, 0)</text:p>
          </table:table-cell>
          <table:table-cell office:value-type="string">
            <text:p>Slowpez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King Momo</text:p>
          </table:table-cell>
          <table:table-cell office:value-type="string">
            <text:p>(1, 0, 1, 3, 0, 3, 0)</text:p>
          </table:table-cell>
          <table:table-cell office:value-type="string">
            <text:p>King Momo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Ricky6</text:p>
          </table:table-cell>
          <table:table-cell office:value-type="string">
            <text:p>(1, 0, 1, 4, 1, 3, 0)</text:p>
          </table:table-cell>
          <table:table-cell office:value-type="string">
            <text:p>Ricky6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A-K SiN</text:p>
          </table:table-cell>
          <table:table-cell office:value-type="string">
            <text:p>(1, 1, 0, 2, 2, 0, 0)</text:p>
          </table:table-cell>
          <table:table-cell office:value-type="string">
            <text:p>A-K Si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Yeti</text:p>
          </table:table-cell>
          <table:table-cell office:value-type="string">
            <text:p>(2, 0, 2, 5, 0, 5, 0)</text:p>
          </table:table-cell>
          <table:table-cell office:value-type="string">
            <text:p>Yeti</text:p>
          </table:table-cell>
          <table:table-cell office:value-type="string">
            <text:p>(2, 0, 2, 5, 0, 5, 0)</text:p>
          </table:table-cell>
          <table:table-cell table:number-columns-repeated="1020"/>
        </table:table-row>
        <table:table-row table:style-name="ro1">
          <table:table-cell office:value-type="string">
            <text:p>Cloak</text:p>
          </table:table-cell>
          <table:table-cell office:value-type="string">
            <text:p>(1, 1, 0, 3, 3, 0, 0)</text:p>
          </table:table-cell>
          <table:table-cell office:value-type="string">
            <text:p>Cloak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A1.exe</text:p>
          </table:table-cell>
          <table:table-cell office:value-type="string">
            <text:p>(1, 1, 0, 3, 3, 0, 0)</text:p>
          </table:table-cell>
          <table:table-cell office:value-type="string">
            <text:p>A1.exe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Komodo</text:p>
          </table:table-cell>
          <table:table-cell office:value-type="string">
            <text:p>(1, 0, 1, 4, 1, 3, 0)</text:p>
          </table:table-cell>
          <table:table-cell office:value-type="string">
            <text:p>Komodo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Lapi</text:p>
          </table:table-cell>
          <table:table-cell office:value-type="string">
            <text:p>(1, 1, 0, 2, 2, 0, 0)</text:p>
          </table:table-cell>
          <table:table-cell office:value-type="string">
            <text:p>Lap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aby Carrot</text:p>
          </table:table-cell>
          <table:table-cell office:value-type="string">
            <text:p>(0, 0, 0, 0, 0, 0, 1)</text:p>
          </table:table-cell>
          <table:table-cell office:value-type="string">
            <text:p>Baby Carrot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xaninmyfaygo666</text:p>
          </table:table-cell>
          <table:table-cell office:value-type="string">
            <text:p>(1, 1, 0, 4, 3, 1, 0)</text:p>
          </table:table-cell>
          <table:table-cell office:value-type="string">
            <text:p>xaninmyfaygo666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Sneakywill</text:p>
          </table:table-cell>
          <table:table-cell office:value-type="string">
            <text:p>(1, 0, 1, 5, 2, 3, 0)</text:p>
          </table:table-cell>
          <table:table-cell office:value-type="string">
            <text:p>Sneakywill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INUS" table:style-name="ta15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Painus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Road</text:p>
          </table:table-cell>
          <table:table-cell office:value-type="string">
            <text:p>(1, 1, 0, 2, 2, 0, 0)</text:p>
          </table:table-cell>
          <table:table-cell office:value-type="string">
            <text:p>Roa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Wiccan</text:p>
          </table:table-cell>
          <table:table-cell office:value-type="string">
            <text:p>(0, 0, 0, 0, 0, 0, 1)</text:p>
          </table:table-cell>
          <table:table-cell office:value-type="string">
            <text:p>Wicca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AD" table:style-name="ta15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Road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Painus</text:p>
          </table:table-cell>
          <table:table-cell office:value-type="string">
            <text:p>(1, 0, 1, 2, 0, 2, 0)</text:p>
          </table:table-cell>
          <table:table-cell office:value-type="string">
            <text:p>Painu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ap</text:p>
          </table:table-cell>
          <table:table-cell office:value-type="string">
            <text:p>(1, 0, 1, 2, 0, 2, 0)</text:p>
          </table:table-cell>
          <table:table-cell office:value-type="string">
            <text:p>nap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XL" table:style-name="ta15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Axl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Galaxia</text:p>
          </table:table-cell>
          <table:table-cell office:value-type="string">
            <text:p>(1, 1, 0, 2, 2, 0, 0)</text:p>
          </table:table-cell>
          <table:table-cell office:value-type="string">
            <text:p>Galaxi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1, 0, 1, 2, 0, 2, 0)</text:p>
          </table:table-cell>
          <table:table-cell office:value-type="string">
            <text:p>Plumme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EL Pingu</text:p>
          </table:table-cell>
          <table:table-cell office:value-type="string">
            <text:p>(1, 1, 0, 2, 2, 0, 0)</text:p>
          </table:table-cell>
          <table:table-cell office:value-type="string">
            <text:p>EL Pingu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y Dad</text:p>
          </table:table-cell>
          <table:table-cell office:value-type="string">
            <text:p>(1, 0, 1, 2, 0, 2, 0)</text:p>
          </table:table-cell>
          <table:table-cell office:value-type="string">
            <text:p>My Da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 PINGU" table:style-name="ta15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EL Pingu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Viprskreen</text:p>
          </table:table-cell>
          <table:table-cell office:value-type="string">
            <text:p>(0, 0, 0, 0, 0, 0, 1)</text:p>
          </table:table-cell>
          <table:table-cell office:value-type="string">
            <text:p>Viprskree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fiend</text:p>
          </table:table-cell>
          <table:table-cell office:value-type="string">
            <text:p>(1, 0, 1, 2, 0, 2, 0)</text:p>
          </table:table-cell>
          <table:table-cell office:value-type="string">
            <text:p>fien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TheMan</text:p>
          </table:table-cell>
          <table:table-cell office:value-type="string">
            <text:p>(0, 0, 0, 0, 0, 0, 1)</text:p>
          </table:table-cell>
          <table:table-cell office:value-type="string">
            <text:p>DTheMa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Axl</text:p>
          </table:table-cell>
          <table:table-cell office:value-type="string">
            <text:p>(1, 0, 1, 2, 0, 2, 0)</text:p>
          </table:table-cell>
          <table:table-cell office:value-type="string">
            <text:p>Ax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PRSKREEN" table:style-name="ta15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Viprskree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EL Pingu</text:p>
          </table:table-cell>
          <table:table-cell office:value-type="string">
            <text:p>(0, 0, 0, 0, 0, 0, 1)</text:p>
          </table:table-cell>
          <table:table-cell office:value-type="string">
            <text:p>EL Pingu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neakers O'Toole</text:p>
          </table:table-cell>
          <table:table-cell office:value-type="string">
            <text:p>(0, 0, 0, 0, 0, 0, 1)</text:p>
          </table:table-cell>
          <table:table-cell office:value-type="string">
            <text:p>Sneakers O'Tool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Papi</text:p>
          </table:table-cell>
          <table:table-cell office:value-type="string">
            <text:p>(1, 0, 1, 3, 1, 2, 0)</text:p>
          </table:table-cell>
          <table:table-cell office:value-type="string">
            <text:p>Papi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D0g3</text:p>
          </table:table-cell>
          <table:table-cell office:value-type="string">
            <text:p>(0, 0, 0, 0, 0, 0, 1)</text:p>
          </table:table-cell>
          <table:table-cell office:value-type="string">
            <text:p>D0g3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1, 0, 1, 2, 0, 2, 0)</text:p>
          </table:table-cell>
          <table:table-cell office:value-type="string">
            <text:p>xXx_PeterGokuGriffin_xX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Just_A_Tarrasque</text:p>
          </table:table-cell>
          <table:table-cell office:value-type="string">
            <text:p>(1, 1, 0, 2, 2, 0, 0)</text:p>
          </table:table-cell>
          <table:table-cell office:value-type="string">
            <text:p>Just_A_Tarrasqu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acky</text:p>
          </table:table-cell>
          <table:table-cell office:value-type="string">
            <text:p>(0, 0, 0, 0, 0, 0, 1)</text:p>
          </table:table-cell>
          <table:table-cell office:value-type="string">
            <text:p>Pack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uperStatic</text:p>
          </table:table-cell>
          <table:table-cell office:value-type="string">
            <text:p>(1, 0, 1, 3, 1, 2, 0)</text:p>
          </table:table-cell>
          <table:table-cell office:value-type="string">
            <text:p>SuperStatic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THEMAN" table:style-name="ta15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DTheMa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neakers O'Toole</text:p>
          </table:table-cell>
          <table:table-cell office:value-type="string">
            <text:p>(0, 0, 0, 0, 0, 0, 1)</text:p>
          </table:table-cell>
          <table:table-cell office:value-type="string">
            <text:p>Sneakers O'Tool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EL Pingu</text:p>
          </table:table-cell>
          <table:table-cell office:value-type="string">
            <text:p>(0, 0, 0, 0, 0, 0, 1)</text:p>
          </table:table-cell>
          <table:table-cell office:value-type="string">
            <text:p>EL Pingu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P" table:style-name="ta16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nap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My Dad</text:p>
          </table:table-cell>
          <table:table-cell office:value-type="string">
            <text:p>(1, 0, 1, 2, 0, 2, 0)</text:p>
          </table:table-cell>
          <table:table-cell office:value-type="string">
            <text:p>My Da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Road</text:p>
          </table:table-cell>
          <table:table-cell office:value-type="string">
            <text:p>(1, 1, 0, 2, 2, 0, 0)</text:p>
          </table:table-cell>
          <table:table-cell office:value-type="string">
            <text:p>Roa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ev7x</text:p>
          </table:table-cell>
          <table:table-cell office:value-type="string">
            <text:p>(1, 1, 0, 2, 2, 0, 0)</text:p>
          </table:table-cell>
          <table:table-cell office:value-type="string">
            <text:p>sev7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1, 0, 1, 2, 0, 2, 0)</text:p>
          </table:table-cell>
          <table:table-cell office:value-type="string">
            <text:p>Plumme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0kujin</text:p>
          </table:table-cell>
          <table:table-cell office:value-type="string">
            <text:p>(1, 1, 0, 2, 2, 0, 0)</text:p>
          </table:table-cell>
          <table:table-cell office:value-type="string">
            <text:p>M0kuji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Oki</text:p>
          </table:table-cell>
          <table:table-cell office:value-type="string">
            <text:p>(2, 1, 1, 5, 2, 3, 0)</text:p>
          </table:table-cell>
          <table:table-cell office:value-type="string">
            <text:p>Oki</text:p>
          </table:table-cell>
          <table:table-cell office:value-type="string">
            <text:p>(2, 1, 1, 5, 2, 3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otHbox</text:p>
          </table:table-cell>
          <table:table-cell office:value-type="string">
            <text:p>(1, 0, 1, 2, 0, 2, 0)</text:p>
          </table:table-cell>
          <table:table-cell office:value-type="string">
            <text:p>NotHbo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imicx18</text:p>
          </table:table-cell>
          <table:table-cell office:value-type="string">
            <text:p>(1, 1, 0, 2, 2, 0, 0)</text:p>
          </table:table-cell>
          <table:table-cell office:value-type="string">
            <text:p>Mimicx18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less</text:p>
          </table:table-cell>
          <table:table-cell office:value-type="string">
            <text:p>(1, 0, 1, 3, 1, 2, 0)</text:p>
          </table:table-cell>
          <table:table-cell office:value-type="string">
            <text:p>Cless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Puff</text:p>
          </table:table-cell>
          <table:table-cell office:value-type="string">
            <text:p>(0, 0, 0, 0, 0, 0, 1)</text:p>
          </table:table-cell>
          <table:table-cell office:value-type="string">
            <text:p>Puff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Franco</text:p>
          </table:table-cell>
          <table:table-cell office:value-type="string">
            <text:p>(1, 1, 0, 2, 2, 0, 0)</text:p>
          </table:table-cell>
          <table:table-cell office:value-type="string">
            <text:p>Franc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r_Trollmaster7</text:p>
          </table:table-cell>
          <table:table-cell office:value-type="string">
            <text:p>(1, 1, 0, 2, 2, 0, 0)</text:p>
          </table:table-cell>
          <table:table-cell office:value-type="string">
            <text:p>Mr_Trollmaster7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OPPY_DUCK049" table:style-name="ta16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Floppy_duck049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nuoca</text:p>
          </table:table-cell>
          <table:table-cell office:value-type="string">
            <text:p>(0, 0, 0, 0, 0, 0, 1)</text:p>
          </table:table-cell>
          <table:table-cell office:value-type="string">
            <text:p>nuoca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Rondon</text:p>
          </table:table-cell>
          <table:table-cell office:value-type="string">
            <text:p>(1, 0, 1, 2, 0, 2, 0)</text:p>
          </table:table-cell>
          <table:table-cell office:value-type="string">
            <text:p>Rondo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rNubs</text:p>
          </table:table-cell>
          <table:table-cell office:value-type="string">
            <text:p>(1, 0, 1, 2, 0, 2, 0)</text:p>
          </table:table-cell>
          <table:table-cell office:value-type="string">
            <text:p>MrNub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Yunaka</text:p>
          </table:table-cell>
          <table:table-cell office:value-type="string">
            <text:p>(1, 0, 1, 2, 0, 2, 0)</text:p>
          </table:table-cell>
          <table:table-cell office:value-type="string">
            <text:p>Yunak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OCA" table:style-name="ta16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nuoca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Floppy_duck049</text:p>
          </table:table-cell>
          <table:table-cell office:value-type="string">
            <text:p>(0, 0, 0, 0, 0, 0, 1)</text:p>
          </table:table-cell>
          <table:table-cell office:value-type="string">
            <text:p>Floppy_duck049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Pendragon</text:p>
          </table:table-cell>
          <table:table-cell office:value-type="string">
            <text:p>(0, 0, 0, 0, 0, 0, 1)</text:p>
          </table:table-cell>
          <table:table-cell office:value-type="string">
            <text:p>Pendrago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ORMATT" table:style-name="ta16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Doormatt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Fapple</text:p>
          </table:table-cell>
          <table:table-cell office:value-type="string">
            <text:p>(1, 1, 0, 2, 2, 0, 0)</text:p>
          </table:table-cell>
          <table:table-cell office:value-type="string">
            <text:p>Fappl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eal King Barbaros</text:p>
          </table:table-cell>
          <table:table-cell office:value-type="string">
            <text:p>(1, 0, 1, 2, 0, 2, 0)</text:p>
          </table:table-cell>
          <table:table-cell office:value-type="string">
            <text:p>Seal King Barbaro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ightmare Fredbear</text:p>
          </table:table-cell>
          <table:table-cell office:value-type="string">
            <text:p>(0, 0, 0, 0, 0, 0, 1)</text:p>
          </table:table-cell>
          <table:table-cell office:value-type="string">
            <text:p>Nightmare Fredbear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D0g3</text:p>
          </table:table-cell>
          <table:table-cell office:value-type="string">
            <text:p>(1, 0, 1, 2, 0, 2, 0)</text:p>
          </table:table-cell>
          <table:table-cell office:value-type="string">
            <text:p>D0g3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ilkboy</text:p>
          </table:table-cell>
          <table:table-cell office:value-type="string">
            <text:p>(1, 1, 0, 3, 2, 1, 0)</text:p>
          </table:table-cell>
          <table:table-cell office:value-type="string">
            <text:p>Milkboy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Navé</text:p>
          </table:table-cell>
          <table:table-cell office:value-type="string">
            <text:p>(1, 0, 1, 2, 0, 2, 0)</text:p>
          </table:table-cell>
          <table:table-cell office:value-type="string">
            <text:p>Navé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urtleDerby</text:p>
          </table:table-cell>
          <table:table-cell office:value-type="string">
            <text:p>(0, 0, 0, 0, 0, 0, 1)</text:p>
          </table:table-cell>
          <table:table-cell office:value-type="string">
            <text:p>TurtleDerb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1, 0, 1, 3, 1, 2, 0)</text:p>
          </table:table-cell>
          <table:table-cell office:value-type="string">
            <text:p>LuMiSaDi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ThatOneGuy</text:p>
          </table:table-cell>
          <table:table-cell office:value-type="string">
            <text:p>(1, 1, 0, 2, 2, 0, 0)</text:p>
          </table:table-cell>
          <table:table-cell office:value-type="string">
            <text:p>ThatOneGu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apachesavage</text:p>
          </table:table-cell>
          <table:table-cell office:value-type="string">
            <text:p>(1, 1, 0, 2, 2, 0, 0)</text:p>
          </table:table-cell>
          <table:table-cell office:value-type="string">
            <text:p>apachesavag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Oki</text:p>
          </table:table-cell>
          <table:table-cell office:value-type="string">
            <text:p>(1, 0, 1, 3, 1, 2, 0)</text:p>
          </table:table-cell>
          <table:table-cell office:value-type="string">
            <text:p>Oki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PPLE" table:style-name="ta16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Fapple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Doormatt</text:p>
          </table:table-cell>
          <table:table-cell office:value-type="string">
            <text:p>(1, 0, 1, 2, 0, 2, 0)</text:p>
          </table:table-cell>
          <table:table-cell office:value-type="string">
            <text:p>Doormat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juno</text:p>
          </table:table-cell>
          <table:table-cell office:value-type="string">
            <text:p>(2, 0, 2, 4, 0, 4, 0)</text:p>
          </table:table-cell>
          <table:table-cell office:value-type="string">
            <text:p>juno</text:p>
          </table:table-cell>
          <table:table-cell office:value-type="string">
            <text:p>(2, 0, 2, 4, 0, 4, 0)</text:p>
          </table:table-cell>
          <table:table-cell table:number-columns-repeated="1020"/>
        </table:table-row>
        <table:table-row table:style-name="ro1">
          <table:table-cell office:value-type="string">
            <text:p>StepKnightUp</text:p>
          </table:table-cell>
          <table:table-cell office:value-type="string">
            <text:p>(1, 1, 0, 3, 2, 1, 0)</text:p>
          </table:table-cell>
          <table:table-cell office:value-type="string">
            <text:p>StepKnightUp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My Dad</text:p>
          </table:table-cell>
          <table:table-cell office:value-type="string">
            <text:p>(1, 0, 1, 2, 0, 2, 0)</text:p>
          </table:table-cell>
          <table:table-cell office:value-type="string">
            <text:p>My Da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GreatSpence</text:p>
          </table:table-cell>
          <table:table-cell office:value-type="string">
            <text:p>(0, 0, 0, 0, 0, 0, 1)</text:p>
          </table:table-cell>
          <table:table-cell office:value-type="string">
            <text:p>GreatSpenc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Viri</text:p>
          </table:table-cell>
          <table:table-cell office:value-type="string">
            <text:p>(1, 0, 1, 2, 0, 2, 0)</text:p>
          </table:table-cell>
          <table:table-cell office:value-type="string">
            <text:p>Vir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Franknbean</text:p>
          </table:table-cell>
          <table:table-cell office:value-type="string">
            <text:p>(0, 0, 0, 0, 0, 0, 1)</text:p>
          </table:table-cell>
          <table:table-cell office:value-type="string">
            <text:p>Franknbea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1, 0, 1, 2, 0, 2, 0)</text:p>
          </table:table-cell>
          <table:table-cell office:value-type="string">
            <text:p>xXx_PeterGokuGriffin_xX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PKNIGHTUP" table:style-name="ta16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tepKnightUp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aelo.plays</text:p>
          </table:table-cell>
          <table:table-cell office:value-type="string">
            <text:p>(1, 1, 0, 2, 2, 0, 0)</text:p>
          </table:table-cell>
          <table:table-cell office:value-type="string">
            <text:p>aelo.play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Venikki</text:p>
          </table:table-cell>
          <table:table-cell office:value-type="string">
            <text:p>(1, 0, 1, 2, 0, 2, 0)</text:p>
          </table:table-cell>
          <table:table-cell office:value-type="string">
            <text:p>Venikk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ynvy</text:p>
          </table:table-cell>
          <table:table-cell office:value-type="string">
            <text:p>(1, 1, 0, 2, 2, 0, 0)</text:p>
          </table:table-cell>
          <table:table-cell office:value-type="string">
            <text:p>Synv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juno</text:p>
          </table:table-cell>
          <table:table-cell office:value-type="string">
            <text:p>(1, 0, 1, 3, 1, 2, 0)</text:p>
          </table:table-cell>
          <table:table-cell office:value-type="string">
            <text:p>juno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1, 0, 1, 2, 0, 2, 1)</text:p>
          </table:table-cell>
          <table:table-cell office:value-type="string">
            <text:p>Chavalava</text:p>
          </table:table-cell>
          <table:table-cell office:value-type="string">
            <text:p>(1, 0, 1, 2, 0, 2, 1)</text:p>
          </table:table-cell>
          <table:table-cell table:number-columns-repeated="1020"/>
        </table:table-row>
        <table:table-row table:style-name="ro1">
          <table:table-cell office:value-type="string">
            <text:p>Aaron</text:p>
          </table:table-cell>
          <table:table-cell office:value-type="string">
            <text:p>(1, 0, 1, 2, 0, 2, 0)</text:p>
          </table:table-cell>
          <table:table-cell office:value-type="string">
            <text:p>Aaro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Fapple</text:p>
          </table:table-cell>
          <table:table-cell office:value-type="string">
            <text:p>(1, 0, 1, 3, 1, 2, 0)</text:p>
          </table:table-cell>
          <table:table-cell office:value-type="string">
            <text:p>Fapple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Kryon</text:p>
          </table:table-cell>
          <table:table-cell office:value-type="string">
            <text:p>(1, 0, 1, 2, 0, 2, 0)</text:p>
          </table:table-cell>
          <table:table-cell office:value-type="string">
            <text:p>Kryo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Yunaka</text:p>
          </table:table-cell>
          <table:table-cell office:value-type="string">
            <text:p>(1, 0, 1, 2, 0, 2, 0)</text:p>
          </table:table-cell>
          <table:table-cell office:value-type="string">
            <text:p>Yunak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cruffie:))</text:p>
          </table:table-cell>
          <table:table-cell office:value-type="string">
            <text:p>(0, 0, 0, 0, 0, 0, 1)</text:p>
          </table:table-cell>
          <table:table-cell office:value-type="string">
            <text:p>scruffie:))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tilios</text:p>
          </table:table-cell>
          <table:table-cell office:value-type="string">
            <text:p>(1, 0, 1, 2, 0, 2, 0)</text:p>
          </table:table-cell>
          <table:table-cell office:value-type="string">
            <text:p>stilio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Lowgun</text:p>
          </table:table-cell>
          <table:table-cell office:value-type="string">
            <text:p>(1, 1, 0, 2, 2, 0, 0)</text:p>
          </table:table-cell>
          <table:table-cell office:value-type="string">
            <text:p>Lowgu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ELO.PLAYS" table:style-name="ta16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aelo.plays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tepKnightUp</text:p>
          </table:table-cell>
          <table:table-cell office:value-type="string">
            <text:p>(1, 0, 1, 2, 0, 2, 0)</text:p>
          </table:table-cell>
          <table:table-cell office:value-type="string">
            <text:p>StepKnightUp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NDON" table:style-name="ta16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Rondo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JediSmash</text:p>
          </table:table-cell>
          <table:table-cell office:value-type="string">
            <text:p>(1, 0, 1, 3, 1, 2, 0)</text:p>
          </table:table-cell>
          <table:table-cell office:value-type="string">
            <text:p>JediSmash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Papi</text:p>
          </table:table-cell>
          <table:table-cell office:value-type="string">
            <text:p>(1, 1, 0, 2, 2, 0, 0)</text:p>
          </table:table-cell>
          <table:table-cell office:value-type="string">
            <text:p>Pap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Floppy_duck049</text:p>
          </table:table-cell>
          <table:table-cell office:value-type="string">
            <text:p>(1, 1, 0, 2, 2, 0, 0)</text:p>
          </table:table-cell>
          <table:table-cell office:value-type="string">
            <text:p>Floppy_duck049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rNubs</text:p>
          </table:table-cell>
          <table:table-cell office:value-type="string">
            <text:p>(1, 1, 0, 3, 2, 1, 0)</text:p>
          </table:table-cell>
          <table:table-cell office:value-type="string">
            <text:p>MrNubs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E" table:style-name="ta16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Kobe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Floppy_duck049</text:p>
          </table:table-cell>
          <table:table-cell office:value-type="string">
            <text:p>(1, 1, 0, 2, 2, 0, 0)</text:p>
          </table:table-cell>
          <table:table-cell office:value-type="string">
            <text:p>Floppy_duck049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1, 1, 0, 2, 2, 0, 0)</text:p>
          </table:table-cell>
          <table:table-cell office:value-type="string">
            <text:p>Twiligh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eal King Barbaros</text:p>
          </table:table-cell>
          <table:table-cell office:value-type="string">
            <text:p>(1, 1, 0, 2, 2, 0, 0)</text:p>
          </table:table-cell>
          <table:table-cell office:value-type="string">
            <text:p>Seal King Barbaro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1, 1, 0, 2, 2, 0, 0)</text:p>
          </table:table-cell>
          <table:table-cell office:value-type="string">
            <text:p>WonderBrea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M</text:p>
          </table:table-cell>
          <table:table-cell office:value-type="string">
            <text:p>(2, 1, 1, 9, 5, 4, 0)</text:p>
          </table:table-cell>
          <table:table-cell office:value-type="string">
            <text:p>DM</text:p>
          </table:table-cell>
          <table:table-cell office:value-type="string">
            <text:p>(2, 1, 1, 9, 5, 4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2, 0, 2, 8, 3, 5, 0)</text:p>
          </table:table-cell>
          <table:table-cell office:value-type="string">
            <text:p>Shaine</text:p>
          </table:table-cell>
          <table:table-cell office:value-type="string">
            <text:p>(2, 0, 2, 8, 3, 5, 0)</text:p>
          </table:table-cell>
          <table:table-cell table:number-columns-repeated="1020"/>
        </table:table-row>
        <table:table-row table:style-name="ro1">
          <table:table-cell office:value-type="string">
            <text:p>Jean Papitas</text:p>
          </table:table-cell>
          <table:table-cell office:value-type="string">
            <text:p>(0, 0, 0, 0, 0, 0, 1)</text:p>
          </table:table-cell>
          <table:table-cell office:value-type="string">
            <text:p>Jean Papitas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yntax</text:p>
          </table:table-cell>
          <table:table-cell office:value-type="string">
            <text:p>(0, 0, 0, 0, 0, 0, 1)</text:p>
          </table:table-cell>
          <table:table-cell office:value-type="string">
            <text:p>syntax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Wiccan</text:p>
          </table:table-cell>
          <table:table-cell office:value-type="string">
            <text:p>(0, 0, 0, 0, 0, 0, 1)</text:p>
          </table:table-cell>
          <table:table-cell office:value-type="string">
            <text:p>Wicca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erph</text:p>
          </table:table-cell>
          <table:table-cell office:value-type="string">
            <text:p>(1, 1, 0, 2, 2, 0, 0)</text:p>
          </table:table-cell>
          <table:table-cell office:value-type="string">
            <text:p>Serp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fiend</text:p>
          </table:table-cell>
          <table:table-cell office:value-type="string">
            <text:p>(1, 1, 0, 2, 2, 0, 0)</text:p>
          </table:table-cell>
          <table:table-cell office:value-type="string">
            <text:p>fien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. Phantm</text:p>
          </table:table-cell>
          <table:table-cell office:value-type="string">
            <text:p>(1, 1, 0, 2, 2, 0, 0)</text:p>
          </table:table-cell>
          <table:table-cell office:value-type="string">
            <text:p>S. Phantm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avé</text:p>
          </table:table-cell>
          <table:table-cell office:value-type="string">
            <text:p>(1, 1, 0, 2, 2, 0, 0)</text:p>
          </table:table-cell>
          <table:table-cell office:value-type="string">
            <text:p>Navé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loax</text:p>
          </table:table-cell>
          <table:table-cell office:value-type="string">
            <text:p>(1, 1, 0, 3, 3, 0, 0)</text:p>
          </table:table-cell>
          <table:table-cell office:value-type="string">
            <text:p>Koloax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1, 0, 3, 3, 0, 0)</text:p>
          </table:table-cell>
          <table:table-cell office:value-type="string">
            <text:p>Epic_Gabriel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2, 0, 2, 9, 3, 6, 0)</text:p>
          </table:table-cell>
          <table:table-cell office:value-type="string">
            <text:p>BeastModePaul</text:p>
          </table:table-cell>
          <table:table-cell office:value-type="string">
            <text:p>(2, 0, 2, 9, 3, 6, 0)</text:p>
          </table:table-cell>
          <table:table-cell table:number-columns-repeated="1020"/>
        </table:table-row>
        <table:table-row table:style-name="ro1">
          <table:table-cell office:value-type="string">
            <text:p>Charz</text:p>
          </table:table-cell>
          <table:table-cell office:value-type="string">
            <text:p>(1, 1, 0, 2, 2, 0, 0)</text:p>
          </table:table-cell>
          <table:table-cell office:value-type="string">
            <text:p>Charz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amashi</text:p>
          </table:table-cell>
          <table:table-cell office:value-type="string">
            <text:p>(1, 1, 0, 2, 2, 0, 0)</text:p>
          </table:table-cell>
          <table:table-cell office:value-type="string">
            <text:p>damash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JDQ05</text:p>
          </table:table-cell>
          <table:table-cell office:value-type="string">
            <text:p>(1, 1, 0, 2, 2, 0, 0)</text:p>
          </table:table-cell>
          <table:table-cell office:value-type="string">
            <text:p>JDQ05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1, 0, 1, 2, 0, 2, 0)</text:p>
          </table:table-cell>
          <table:table-cell office:value-type="string">
            <text:p>Strobic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1, 1, 0, 2, 2, 0, 0)</text:p>
          </table:table-cell>
          <table:table-cell office:value-type="string">
            <text:p>Squishy~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iddekel</text:p>
          </table:table-cell>
          <table:table-cell office:value-type="string">
            <text:p>(1, 1, 0, 2, 2, 0, 0)</text:p>
          </table:table-cell>
          <table:table-cell office:value-type="string">
            <text:p>Hiddeke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LLONIAN" table:style-name="ta16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Pellonia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Pendragon</text:p>
          </table:table-cell>
          <table:table-cell office:value-type="string">
            <text:p>(1, 1, 0, 2, 2, 0, 0)</text:p>
          </table:table-cell>
          <table:table-cell office:value-type="string">
            <text:p>Pendrago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1, 0, 1, 2, 0, 2, 0)</text:p>
          </table:table-cell>
          <table:table-cell office:value-type="string">
            <text:p>WonderBrea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office:value-type="string">
            <text:p>Vinny, The Lic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asterqz</text:p>
          </table:table-cell>
          <table:table-cell office:value-type="string">
            <text:p>(1, 1, 0, 3, 2, 1, 0)</text:p>
          </table:table-cell>
          <table:table-cell office:value-type="string">
            <text:p>masterqz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Zorrin</text:p>
          </table:table-cell>
          <table:table-cell office:value-type="string">
            <text:p>(1, 0, 1, 2, 0, 2, 0)</text:p>
          </table:table-cell>
          <table:table-cell office:value-type="string">
            <text:p>Zorri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arlJT</text:p>
          </table:table-cell>
          <table:table-cell office:value-type="string">
            <text:p>(1, 1, 0, 2, 2, 0, 0)</text:p>
          </table:table-cell>
          <table:table-cell office:value-type="string">
            <text:p>CarlJ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ori</text:p>
          </table:table-cell>
          <table:table-cell office:value-type="string">
            <text:p>(1, 0, 1, 2, 0, 2, 0)</text:p>
          </table:table-cell>
          <table:table-cell office:value-type="string">
            <text:p>Nor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Woofie87</text:p>
          </table:table-cell>
          <table:table-cell office:value-type="string">
            <text:p>(1, 1, 0, 2, 2, 0, 0)</text:p>
          </table:table-cell>
          <table:table-cell office:value-type="string">
            <text:p>Woofie87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1, 1, 0, 2, 2, 0, 0)</text:p>
          </table:table-cell>
          <table:table-cell office:value-type="string">
            <text:p>LuMiSaD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anzana</text:p>
          </table:table-cell>
          <table:table-cell office:value-type="string">
            <text:p>(1, 0, 1, 2, 0, 2, 0)</text:p>
          </table:table-cell>
          <table:table-cell office:value-type="string">
            <text:p>Manzan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ITZ" table:style-name="ta17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Blitz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aibaman</text:p>
          </table:table-cell>
          <table:table-cell office:value-type="string">
            <text:p>(1, 0, 1, 2, 0, 2, 0)</text:p>
          </table:table-cell>
          <table:table-cell office:value-type="string">
            <text:p>saibama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1, 0, 1, 2, 0, 2, 0)</text:p>
          </table:table-cell>
          <table:table-cell office:value-type="string">
            <text:p>xXx_PeterGokuGriffin_xX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R.FEENY" table:style-name="ta17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Mr.Feeny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econd Floor Basement</text:p>
          </table:table-cell>
          <table:table-cell office:value-type="string">
            <text:p>(1, 0, 1, 2, 0, 2, 0)</text:p>
          </table:table-cell>
          <table:table-cell office:value-type="string">
            <text:p>Second Floor Basemen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Octo</text:p>
          </table:table-cell>
          <table:table-cell office:value-type="string">
            <text:p>(1, 1, 0, 2, 2, 0, 0)</text:p>
          </table:table-cell>
          <table:table-cell office:value-type="string">
            <text:p>Oct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otHbox</text:p>
          </table:table-cell>
          <table:table-cell office:value-type="string">
            <text:p>(1, 0, 1, 2, 0, 2, 0)</text:p>
          </table:table-cell>
          <table:table-cell office:value-type="string">
            <text:p>NotHbo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GK</text:p>
          </table:table-cell>
          <table:table-cell office:value-type="string">
            <text:p>(1, 0, 1, 2, 0, 2, 0)</text:p>
          </table:table-cell>
          <table:table-cell office:value-type="string">
            <text:p>DG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OTO_PINK</text:p>
          </table:table-cell>
          <table:table-cell office:value-type="string">
            <text:p>(1, 0, 1, 2, 0, 2, 0)</text:p>
          </table:table-cell>
          <table:table-cell office:value-type="string">
            <text:p>TOTO_PIN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USH" table:style-name="ta17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IRUSH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Octo</text:p>
          </table:table-cell>
          <table:table-cell office:value-type="string">
            <text:p>(1, 0, 1, 2, 0, 2, 0)</text:p>
          </table:table-cell>
          <table:table-cell office:value-type="string">
            <text:p>Octo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econd Floor Basement</text:p>
          </table:table-cell>
          <table:table-cell office:value-type="string">
            <text:p>(1, 0, 1, 2, 0, 2, 0)</text:p>
          </table:table-cell>
          <table:table-cell office:value-type="string">
            <text:p>Second Floor Basemen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Fonica</text:p>
          </table:table-cell>
          <table:table-cell office:value-type="string">
            <text:p>(0, 0, 0, 0, 0, 0, 1)</text:p>
          </table:table-cell>
          <table:table-cell office:value-type="string">
            <text:p>Fonica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Keegore</text:p>
          </table:table-cell>
          <table:table-cell office:value-type="string">
            <text:p>(1, 0, 1, 3, 1, 2, 0)</text:p>
          </table:table-cell>
          <table:table-cell office:value-type="string">
            <text:p>Keegore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World Jade Center</text:p>
          </table:table-cell>
          <table:table-cell office:value-type="string">
            <text:p>(1, 1, 0, 2, 2, 0, 0)</text:p>
          </table:table-cell>
          <table:table-cell office:value-type="string">
            <text:p>World Jade Cente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Jackie Chun</text:p>
          </table:table-cell>
          <table:table-cell office:value-type="string">
            <text:p>(1, 1, 0, 2, 2, 0, 0)</text:p>
          </table:table-cell>
          <table:table-cell office:value-type="string">
            <text:p>Jackie Chu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PERLUVSGOD" table:style-name="ta17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HyperLuvsGod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BooBell</text:p>
          </table:table-cell>
          <table:table-cell office:value-type="string">
            <text:p>(0, 0, 0, 0, 0, 0, 1)</text:p>
          </table:table-cell>
          <table:table-cell office:value-type="string">
            <text:p>BooBell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NessQuik</text:p>
          </table:table-cell>
          <table:table-cell office:value-type="string">
            <text:p>(1, 0, 1, 2, 0, 2, 0)</text:p>
          </table:table-cell>
          <table:table-cell office:value-type="string">
            <text:p>NessQui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1, 0, 1, 2, 0, 2, 0)</text:p>
          </table:table-cell>
          <table:table-cell office:value-type="string">
            <text:p>xXx_PeterGokuGriffin_xX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OBELL" table:style-name="ta17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BooBell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HyperLuvsGod</text:p>
          </table:table-cell>
          <table:table-cell office:value-type="string">
            <text:p>(0, 0, 0, 0, 0, 0, 1)</text:p>
          </table:table-cell>
          <table:table-cell office:value-type="string">
            <text:p>HyperLuvsGod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Narwhal</text:p>
          </table:table-cell>
          <table:table-cell office:value-type="string">
            <text:p>(0, 0, 0, 0, 0, 0, 1)</text:p>
          </table:table-cell>
          <table:table-cell office:value-type="string">
            <text:p>Narwhal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B_Slam</text:p>
          </table:table-cell>
          <table:table-cell office:value-type="string">
            <text:p>(1, 0, 1, 2, 0, 2, 0)</text:p>
          </table:table-cell>
          <table:table-cell office:value-type="string">
            <text:p>B_Sla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he Chuckster</text:p>
          </table:table-cell>
          <table:table-cell office:value-type="string">
            <text:p>(1, 0, 1, 2, 0, 2, 0)</text:p>
          </table:table-cell>
          <table:table-cell office:value-type="string">
            <text:p>The Chuckster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undayGary</text:p>
          </table:table-cell>
          <table:table-cell office:value-type="string">
            <text:p>(1, 1, 0, 2, 2, 0, 0)</text:p>
          </table:table-cell>
          <table:table-cell office:value-type="string">
            <text:p>SundayGar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rincessPopkorn</text:p>
          </table:table-cell>
          <table:table-cell office:value-type="string">
            <text:p>(1, 1, 0, 2, 2, 0, 0)</text:p>
          </table:table-cell>
          <table:table-cell office:value-type="string">
            <text:p>PrincessPopkor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OOM!</text:p>
          </table:table-cell>
          <table:table-cell office:value-type="string">
            <text:p>(1, 0, 1, 2, 0, 2, 0)</text:p>
          </table:table-cell>
          <table:table-cell office:value-type="string">
            <text:p>DOOM!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1, 0, 1, 2, 0, 2, 0)</text:p>
          </table:table-cell>
          <table:table-cell office:value-type="string">
            <text:p>Bhan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Hiddekel</text:p>
          </table:table-cell>
          <table:table-cell office:value-type="string">
            <text:p>(1, 0, 1, 2, 0, 2, 0)</text:p>
          </table:table-cell>
          <table:table-cell office:value-type="string">
            <text:p>Hiddek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ryvate Pigeon</text:p>
          </table:table-cell>
          <table:table-cell office:value-type="string">
            <text:p>(1, 1, 0, 2, 2, 0, 0)</text:p>
          </table:table-cell>
          <table:table-cell office:value-type="string">
            <text:p>Pryvate Pigeo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ATO</text:p>
          </table:table-cell>
          <table:table-cell office:value-type="string">
            <text:p>(1, 0, 1, 2, 0, 2, 0)</text:p>
          </table:table-cell>
          <table:table-cell office:value-type="string">
            <text:p>NATO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otorious</text:p>
          </table:table-cell>
          <table:table-cell office:value-type="string">
            <text:p>(1, 1, 0, 2, 2, 0, 0)</text:p>
          </table:table-cell>
          <table:table-cell office:value-type="string">
            <text:p>Notoriou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Zetsubo</text:p>
          </table:table-cell>
          <table:table-cell office:value-type="string">
            <text:p>(1, 0, 1, 2, 0, 2, 0)</text:p>
          </table:table-cell>
          <table:table-cell office:value-type="string">
            <text:p>Zetsubo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RWHAL" table:style-name="ta17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Narwhal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1, 0, 1, 3, 1, 2, 0)</text:p>
          </table:table-cell>
          <table:table-cell office:value-type="string">
            <text:p>Squishy~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BooBell</text:p>
          </table:table-cell>
          <table:table-cell office:value-type="string">
            <text:p>(0, 0, 0, 0, 0, 0, 1)</text:p>
          </table:table-cell>
          <table:table-cell office:value-type="string">
            <text:p>BooBell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aibaman</text:p>
          </table:table-cell>
          <table:table-cell office:value-type="string">
            <text:p>(1, 1, 0, 2, 2, 0, 0)</text:p>
          </table:table-cell>
          <table:table-cell office:value-type="string">
            <text:p>saibama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Zarberian</text:p>
          </table:table-cell>
          <table:table-cell office:value-type="string">
            <text:p>(1, 0, 1, 3, 1, 2, 0)</text:p>
          </table:table-cell>
          <table:table-cell office:value-type="string">
            <text:p>Zarberian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THZENY" table:style-name="ta17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Anthzeny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1, 1, 0, 2, 2, 0, 0)</text:p>
          </table:table-cell>
          <table:table-cell office:value-type="string">
            <text:p>Chavalav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ilios</text:p>
          </table:table-cell>
          <table:table-cell office:value-type="string">
            <text:p>(1, 1, 0, 2, 2, 0, 0)</text:p>
          </table:table-cell>
          <table:table-cell office:value-type="string">
            <text:p>stilio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ESAM</text:p>
          </table:table-cell>
          <table:table-cell office:value-type="string">
            <text:p>(1, 0, 1, 2, 0, 2, 0)</text:p>
          </table:table-cell>
          <table:table-cell office:value-type="string">
            <text:p>ESA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Zarberian</text:p>
          </table:table-cell>
          <table:table-cell office:value-type="string">
            <text:p>(1, 0, 1, 3, 1, 2, 0)</text:p>
          </table:table-cell>
          <table:table-cell office:value-type="string">
            <text:p>Zarberian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CarlJT</text:p>
          </table:table-cell>
          <table:table-cell office:value-type="string">
            <text:p>(1, 1, 0, 3, 2, 1, 0)</text:p>
          </table:table-cell>
          <table:table-cell office:value-type="string">
            <text:p>CarlJT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Franknbean</text:p>
          </table:table-cell>
          <table:table-cell office:value-type="string">
            <text:p>(1, 1, 0, 2, 2, 0, 0)</text:p>
          </table:table-cell>
          <table:table-cell office:value-type="string">
            <text:p>Franknbea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1, 0, 1, 3, 1, 2, 0)</text:p>
          </table:table-cell>
          <table:table-cell office:value-type="string">
            <text:p>McFunny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Wiccan</text:p>
          </table:table-cell>
          <table:table-cell office:value-type="string">
            <text:p>(1, 1, 0, 3, 2, 1, 0)</text:p>
          </table:table-cell>
          <table:table-cell office:value-type="string">
            <text:p>Wiccan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derk</text:p>
          </table:table-cell>
          <table:table-cell office:value-type="string">
            <text:p>(1, 1, 0, 2, 2, 0, 0)</text:p>
          </table:table-cell>
          <table:table-cell office:value-type="string">
            <text:p>der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anzana</text:p>
          </table:table-cell>
          <table:table-cell office:value-type="string">
            <text:p>(1, 0, 1, 2, 0, 2, 0)</text:p>
          </table:table-cell>
          <table:table-cell office:value-type="string">
            <text:p>Manzan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ILIOS" table:style-name="ta17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tilios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econd Floor Basement</text:p>
          </table:table-cell>
          <table:table-cell office:value-type="string">
            <text:p>(1, 1, 0, 2, 2, 0, 0)</text:p>
          </table:table-cell>
          <table:table-cell office:value-type="string">
            <text:p>Second Floor Basemen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Anthzeny</text:p>
          </table:table-cell>
          <table:table-cell office:value-type="string">
            <text:p>(1, 0, 1, 2, 0, 2, 0)</text:p>
          </table:table-cell>
          <table:table-cell office:value-type="string">
            <text:p>Anthzen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1, 0, 1, 3, 1, 2, 0)</text:p>
          </table:table-cell>
          <table:table-cell office:value-type="string">
            <text:p>xXx_PeterGokuGriffin_xXx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Tabby</text:p>
          </table:table-cell>
          <table:table-cell office:value-type="string">
            <text:p>(1, 1, 0, 2, 2, 0, 0)</text:p>
          </table:table-cell>
          <table:table-cell office:value-type="string">
            <text:p>Tabb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epKnightUp</text:p>
          </table:table-cell>
          <table:table-cell office:value-type="string">
            <text:p>(1, 1, 0, 2, 2, 0, 0)</text:p>
          </table:table-cell>
          <table:table-cell office:value-type="string">
            <text:p>StepKnightUp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anzana</text:p>
          </table:table-cell>
          <table:table-cell office:value-type="string">
            <text:p>(1, 1, 0, 3, 2, 1, 0)</text:p>
          </table:table-cell>
          <table:table-cell office:value-type="string">
            <text:p>Manzana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1, 0, 1, 3, 1, 2, 0)</text:p>
          </table:table-cell>
          <table:table-cell office:value-type="string">
            <text:p>WonderBread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Nori</text:p>
          </table:table-cell>
          <table:table-cell office:value-type="string">
            <text:p>(1, 0, 1, 2, 0, 2, 0)</text:p>
          </table:table-cell>
          <table:table-cell office:value-type="string">
            <text:p>Nor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M" table:style-name="ta17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DM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Octo</text:p>
          </table:table-cell>
          <table:table-cell office:value-type="string">
            <text:p>(1, 1, 0, 2, 2, 0, 0)</text:p>
          </table:table-cell>
          <table:table-cell office:value-type="string">
            <text:p>Oct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Zarberian</text:p>
          </table:table-cell>
          <table:table-cell office:value-type="string">
            <text:p>(1, 1, 0, 2, 2, 0, 0)</text:p>
          </table:table-cell>
          <table:table-cell office:value-type="string">
            <text:p>Zarberia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essQuik</text:p>
          </table:table-cell>
          <table:table-cell office:value-type="string">
            <text:p>(1, 1, 0, 2, 2, 0, 0)</text:p>
          </table:table-cell>
          <table:table-cell office:value-type="string">
            <text:p>NessQui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ESAM</text:p>
          </table:table-cell>
          <table:table-cell office:value-type="string">
            <text:p>(1, 1, 0, 3, 2, 1, 0)</text:p>
          </table:table-cell>
          <table:table-cell office:value-type="string">
            <text:p>ESAM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Kobe</text:p>
          </table:table-cell>
          <table:table-cell office:value-type="string">
            <text:p>(2, 1, 1, 9, 4, 5, 0)</text:p>
          </table:table-cell>
          <table:table-cell office:value-type="string">
            <text:p>Kobe</text:p>
          </table:table-cell>
          <table:table-cell office:value-type="string">
            <text:p>(2, 1, 1, 9, 4, 5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2, 1, 1, 9, 5, 4, 0)</text:p>
          </table:table-cell>
          <table:table-cell office:value-type="string">
            <text:p>Shaine</text:p>
          </table:table-cell>
          <table:table-cell office:value-type="string">
            <text:p>(2, 1, 1, 9, 5, 4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1, 0, 3, 3, 0, 0)</text:p>
          </table:table-cell>
          <table:table-cell office:value-type="string">
            <text:p>Epic_Gabriel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Newo</text:p>
          </table:table-cell>
          <table:table-cell office:value-type="string">
            <text:p>(1, 1, 0, 3, 3, 0, 0)</text:p>
          </table:table-cell>
          <table:table-cell office:value-type="string">
            <text:p>Newo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RBERIAN" table:style-name="ta17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Zarberia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NotHbox</text:p>
          </table:table-cell>
          <table:table-cell office:value-type="string">
            <text:p>(1, 1, 0, 3, 2, 1, 0)</text:p>
          </table:table-cell>
          <table:table-cell office:value-type="string">
            <text:p>NotHbox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DM</text:p>
          </table:table-cell>
          <table:table-cell office:value-type="string">
            <text:p>(1, 0, 1, 2, 0, 2, 0)</text:p>
          </table:table-cell>
          <table:table-cell office:value-type="string">
            <text:p>D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arwhal</text:p>
          </table:table-cell>
          <table:table-cell office:value-type="string">
            <text:p>(1, 1, 0, 3, 2, 1, 0)</text:p>
          </table:table-cell>
          <table:table-cell office:value-type="string">
            <text:p>Narwhal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Second Floor Basement</text:p>
          </table:table-cell>
          <table:table-cell office:value-type="string">
            <text:p>(1, 1, 0, 3, 2, 1, 0)</text:p>
          </table:table-cell>
          <table:table-cell office:value-type="string">
            <text:p>Second Floor Basement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Anthzeny</text:p>
          </table:table-cell>
          <table:table-cell office:value-type="string">
            <text:p>(1, 1, 0, 3, 2, 1, 0)</text:p>
          </table:table-cell>
          <table:table-cell office:value-type="string">
            <text:p>Anthzeny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Koloax</text:p>
          </table:table-cell>
          <table:table-cell office:value-type="string">
            <text:p>(1, 0, 1, 2, 0, 2, 0)</text:p>
          </table:table-cell>
          <table:table-cell office:value-type="string">
            <text:p>Koloa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SSQUIK" table:style-name="ta18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NessQuik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HyperLuvsGod</text:p>
          </table:table-cell>
          <table:table-cell office:value-type="string">
            <text:p>(1, 1, 0, 2, 2, 0, 0)</text:p>
          </table:table-cell>
          <table:table-cell office:value-type="string">
            <text:p>HyperLuvsGo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oobii</text:p>
          </table:table-cell>
          <table:table-cell office:value-type="string">
            <text:p>(1, 1, 0, 2, 2, 0, 0)</text:p>
          </table:table-cell>
          <table:table-cell office:value-type="string">
            <text:p>poobi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M</text:p>
          </table:table-cell>
          <table:table-cell office:value-type="string">
            <text:p>(1, 0, 1, 2, 0, 2, 0)</text:p>
          </table:table-cell>
          <table:table-cell office:value-type="string">
            <text:p>D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1, 1, 0, 2, 2, 0, 0)</text:p>
          </table:table-cell>
          <table:table-cell office:value-type="string">
            <text:p>Squishy~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fiend</text:p>
          </table:table-cell>
          <table:table-cell office:value-type="string">
            <text:p>(1, 1, 0, 2, 2, 0, 0)</text:p>
          </table:table-cell>
          <table:table-cell office:value-type="string">
            <text:p>fien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arZ</text:p>
          </table:table-cell>
          <table:table-cell office:value-type="string">
            <text:p>(1, 0, 1, 2, 0, 2, 0)</text:p>
          </table:table-cell>
          <table:table-cell office:value-type="string">
            <text:p>StarZ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CHUCK" table:style-name="ta18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UpChuck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DiRT</text:p>
          </table:table-cell>
          <table:table-cell office:value-type="string">
            <text:p>(1, 1, 0, 2, 2, 0, 0)</text:p>
          </table:table-cell>
          <table:table-cell office:value-type="string">
            <text:p>DiR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arZ</text:p>
          </table:table-cell>
          <table:table-cell office:value-type="string">
            <text:p>(1, 0, 1, 2, 0, 2, 0)</text:p>
          </table:table-cell>
          <table:table-cell office:value-type="string">
            <text:p>StarZ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hnissugah</text:p>
          </table:table-cell>
          <table:table-cell office:value-type="string">
            <text:p>(1, 1, 0, 2, 2, 0, 0)</text:p>
          </table:table-cell>
          <table:table-cell office:value-type="string">
            <text:p>Shnissuga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Oki</text:p>
          </table:table-cell>
          <table:table-cell office:value-type="string">
            <text:p>(1, 0, 1, 3, 1, 2, 0)</text:p>
          </table:table-cell>
          <table:table-cell office:value-type="string">
            <text:p>Oki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NaClg0d</text:p>
          </table:table-cell>
          <table:table-cell office:value-type="string">
            <text:p>(1, 1, 0, 3, 2, 1, 0)</text:p>
          </table:table-cell>
          <table:table-cell office:value-type="string">
            <text:p>NaClg0d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G00MBA</text:p>
          </table:table-cell>
          <table:table-cell office:value-type="string">
            <text:p>(1, 1, 0, 2, 2, 0, 0)</text:p>
          </table:table-cell>
          <table:table-cell office:value-type="string">
            <text:p>G00MB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1, 0, 1, 2, 0, 2, 0)</text:p>
          </table:table-cell>
          <table:table-cell office:value-type="string">
            <text:p>DarthCJ8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CYWINGZ11" table:style-name="ta18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picywingz11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entPain</text:p>
          </table:table-cell>
          <table:table-cell office:value-type="string">
            <text:p>(0, 0, 0, 0, 0, 0, 1)</text:p>
          </table:table-cell>
          <table:table-cell office:value-type="string">
            <text:p>SentPai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1, 1, 0, 2, 2, 0, 0)</text:p>
          </table:table-cell>
          <table:table-cell office:value-type="string">
            <text:p>Bhan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1, 0, 1, 2, 0, 2, 0)</text:p>
          </table:table-cell>
          <table:table-cell office:value-type="string">
            <text:p>DarthCJ8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lean</text:p>
          </table:table-cell>
          <table:table-cell office:value-type="string">
            <text:p>(1, 0, 1, 2, 0, 2, 0)</text:p>
          </table:table-cell>
          <table:table-cell office:value-type="string">
            <text:p>clea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itrobone</text:p>
          </table:table-cell>
          <table:table-cell office:value-type="string">
            <text:p>(0, 0, 0, 0, 0, 0, 1)</text:p>
          </table:table-cell>
          <table:table-cell office:value-type="string">
            <text:p>Nitrobon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lucida</text:p>
          </table:table-cell>
          <table:table-cell office:value-type="string">
            <text:p>(1, 0, 1, 3, 1, 2, 0)</text:p>
          </table:table-cell>
          <table:table-cell office:value-type="string">
            <text:p>lucida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Hiddekel</text:p>
          </table:table-cell>
          <table:table-cell office:value-type="string">
            <text:p>(1, 0, 1, 2, 0, 2, 0)</text:p>
          </table:table-cell>
          <table:table-cell office:value-type="string">
            <text:p>Hiddek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uff</text:p>
          </table:table-cell>
          <table:table-cell office:value-type="string">
            <text:p>(1, 1, 0, 2, 2, 0, 0)</text:p>
          </table:table-cell>
          <table:table-cell office:value-type="string">
            <text:p>Puff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Lucky</text:p>
          </table:table-cell>
          <table:table-cell office:value-type="string">
            <text:p>(1, 0, 1, 2, 0, 2, 0)</text:p>
          </table:table-cell>
          <table:table-cell office:value-type="string">
            <text:p>Luck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imicx18</text:p>
          </table:table-cell>
          <table:table-cell office:value-type="string">
            <text:p>(0, 0, 0, 0, 0, 0, 1)</text:p>
          </table:table-cell>
          <table:table-cell office:value-type="string">
            <text:p>Mimicx18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Yukoa</text:p>
          </table:table-cell>
          <table:table-cell office:value-type="string">
            <text:p>(1, 1, 0, 2, 2, 0, 0)</text:p>
          </table:table-cell>
          <table:table-cell office:value-type="string">
            <text:p>Yuko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asterqz</text:p>
          </table:table-cell>
          <table:table-cell office:value-type="string">
            <text:p>(1, 0, 1, 2, 0, 2, 0)</text:p>
          </table:table-cell>
          <table:table-cell office:value-type="string">
            <text:p>masterqz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WSMSUN" table:style-name="ta18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Awsmsu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Ryeiscool</text:p>
          </table:table-cell>
          <table:table-cell office:value-type="string">
            <text:p>(1, 1, 0, 2, 2, 0, 0)</text:p>
          </table:table-cell>
          <table:table-cell office:value-type="string">
            <text:p>Ryeiscoo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ana</text:p>
          </table:table-cell>
          <table:table-cell office:value-type="string">
            <text:p>(1, 1, 0, 2, 2, 0, 0)</text:p>
          </table:table-cell>
          <table:table-cell office:value-type="string">
            <text:p>Man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entPain</text:p>
          </table:table-cell>
          <table:table-cell office:value-type="string">
            <text:p>(0, 0, 0, 0, 0, 0, 1)</text:p>
          </table:table-cell>
          <table:table-cell office:value-type="string">
            <text:p>SentPai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1, 1, 0, 3, 2, 1, 0)</text:p>
          </table:table-cell>
          <table:table-cell office:value-type="string">
            <text:p>LuMiSaDi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clean</text:p>
          </table:table-cell>
          <table:table-cell office:value-type="string">
            <text:p>(1, 0, 1, 2, 0, 2, 0)</text:p>
          </table:table-cell>
          <table:table-cell office:value-type="string">
            <text:p>clea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!MAMA_MIA!" table:style-name="ta18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!Mama_Mia!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Rob</text:p>
          </table:table-cell>
          <table:table-cell office:value-type="string">
            <text:p>(1, 1, 0, 2, 2, 0, 0)</text:p>
          </table:table-cell>
          <table:table-cell office:value-type="string">
            <text:p>Rob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0, 0, 0, 0, 0, 0, 1)</text:p>
          </table:table-cell>
          <table:table-cell office:value-type="string">
            <text:p>Strobics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(1, 0, 1, 2, 0, 2, 0)</text:p>
          </table:table-cell>
          <table:table-cell office:value-type="string">
            <text:p>Samerson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1, 0, 1, 2, 0, 2, 0)</text:p>
          </table:table-cell>
          <table:table-cell office:value-type="string">
            <text:p>Bhan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B" table:style-name="ta18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Rob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!Mama_Mia!</text:p>
          </table:table-cell>
          <table:table-cell office:value-type="string">
            <text:p>(1, 0, 1, 2, 0, 2, 0)</text:p>
          </table:table-cell>
          <table:table-cell office:value-type="string">
            <text:p>!Mama_Mia!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Oki</text:p>
          </table:table-cell>
          <table:table-cell office:value-type="string">
            <text:p>(1, 0, 1, 2, 0, 2, 0)</text:p>
          </table:table-cell>
          <table:table-cell office:value-type="string">
            <text:p>Ok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8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clea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hnissugah</text:p>
          </table:table-cell>
          <table:table-cell office:value-type="string">
            <text:p>(1, 1, 0, 2, 2, 0, 0)</text:p>
          </table:table-cell>
          <table:table-cell office:value-type="string">
            <text:p>Shnissuga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(2, 1, 1, 6, 3, 3, 0)</text:p>
          </table:table-cell>
          <table:table-cell office:value-type="string">
            <text:p>SamersonT</text:p>
          </table:table-cell>
          <table:table-cell office:value-type="string">
            <text:p>(2, 1, 1, 6, 3, 3, 0)</text:p>
          </table:table-cell>
          <table:table-cell table:number-columns-repeated="1020"/>
        </table:table-row>
        <table:table-row table:style-name="ro1">
          <table:table-cell office:value-type="string">
            <text:p>DiRT</text:p>
          </table:table-cell>
          <table:table-cell office:value-type="string">
            <text:p>(1, 1, 0, 2, 2, 0, 0)</text:p>
          </table:table-cell>
          <table:table-cell office:value-type="string">
            <text:p>DiR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0, 0, 0, 0, 0, 0, 1)</text:p>
          </table:table-cell>
          <table:table-cell office:value-type="string">
            <text:p>Strobics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picywingz11</text:p>
          </table:table-cell>
          <table:table-cell office:value-type="string">
            <text:p>(1, 1, 0, 2, 2, 0, 0)</text:p>
          </table:table-cell>
          <table:table-cell office:value-type="string">
            <text:p>spicywingz11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Awsmsun</text:p>
          </table:table-cell>
          <table:table-cell office:value-type="string">
            <text:p>(1, 1, 0, 2, 2, 0, 0)</text:p>
          </table:table-cell>
          <table:table-cell office:value-type="string">
            <text:p>Awsmsu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eal King Barbaros</text:p>
          </table:table-cell>
          <table:table-cell office:value-type="string">
            <text:p>(1, 0, 1, 3, 1, 2, 0)</text:p>
          </table:table-cell>
          <table:table-cell office:value-type="string">
            <text:p>Seal King Barbaros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NISSUGAH" table:style-name="ta18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hnissugah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clean</text:p>
          </table:table-cell>
          <table:table-cell office:value-type="string">
            <text:p>(1, 0, 1, 2, 0, 2, 0)</text:p>
          </table:table-cell>
          <table:table-cell office:value-type="string">
            <text:p>clea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UpChuck</text:p>
          </table:table-cell>
          <table:table-cell office:value-type="string">
            <text:p>(1, 0, 1, 2, 0, 2, 0)</text:p>
          </table:table-cell>
          <table:table-cell office:value-type="string">
            <text:p>UpChuc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Yunaka</text:p>
          </table:table-cell>
          <table:table-cell office:value-type="string">
            <text:p>(0, 0, 0, 0, 0, 0, 1)</text:p>
          </table:table-cell>
          <table:table-cell office:value-type="string">
            <text:p>Yunaka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MrNubs</text:p>
          </table:table-cell>
          <table:table-cell office:value-type="string">
            <text:p>(0, 0, 0, 0, 0, 0, 1)</text:p>
          </table:table-cell>
          <table:table-cell office:value-type="string">
            <text:p>MrNubs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1, 0, 1, 2, 0, 2, 0)</text:p>
          </table:table-cell>
          <table:table-cell office:value-type="string">
            <text:p>HaydenEatsShrimp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Viri</text:p>
          </table:table-cell>
          <table:table-cell office:value-type="string">
            <text:p>(0, 0, 0, 0, 0, 0, 1)</text:p>
          </table:table-cell>
          <table:table-cell office:value-type="string">
            <text:p>Viri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1, 0, 1, 2, 0, 2, 0)</text:p>
          </table:table-cell>
          <table:table-cell office:value-type="string">
            <text:p>Chavalav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Livan the Amnesty</text:p>
          </table:table-cell>
          <table:table-cell office:value-type="string">
            <text:p>(1, 0, 1, 2, 0, 2, 0)</text:p>
          </table:table-cell>
          <table:table-cell office:value-type="string">
            <text:p>Livan the Amnest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TnKaos</text:p>
          </table:table-cell>
          <table:table-cell office:value-type="string">
            <text:p>(1, 0, 1, 2, 0, 2, 0)</text:p>
          </table:table-cell>
          <table:table-cell office:value-type="string">
            <text:p>TnKao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Z" table:style-name="ta18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tarZ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UpChuck</text:p>
          </table:table-cell>
          <table:table-cell office:value-type="string">
            <text:p>(1, 1, 0, 2, 2, 0, 0)</text:p>
          </table:table-cell>
          <table:table-cell office:value-type="string">
            <text:p>UpChuc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1, 1, 0, 2, 2, 0, 0)</text:p>
          </table:table-cell>
          <table:table-cell office:value-type="string">
            <text:p>LuMiSaD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1, 1, 0, 2, 2, 0, 0)</text:p>
          </table:table-cell>
          <table:table-cell office:value-type="string">
            <text:p>DarthCJ8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essQuik</text:p>
          </table:table-cell>
          <table:table-cell office:value-type="string">
            <text:p>(1, 1, 0, 2, 2, 0, 0)</text:p>
          </table:table-cell>
          <table:table-cell office:value-type="string">
            <text:p>NessQui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0, 1, 3, 0, 3, 0)</text:p>
          </table:table-cell>
          <table:table-cell office:value-type="string">
            <text:p>Epic_Gabriel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MISADI" table:style-name="ta18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LuMiSaDi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18"/>
        </table:table-row>
        <table:table-row table:style-name="ro1">
          <table:table-cell office:value-type="string">
            <text:p>Oki</text:p>
          </table:table-cell>
          <table:table-cell office:value-type="string">
            <text:p>(1, 1, 0, 3, 2, 1, 0)</text:p>
          </table:table-cell>
          <table:table-cell office:value-type="string">
            <text:p>Hod Strat</text:p>
          </table:table-cell>
          <table:table-cell office:value-type="string">
            <text:p>(1, 0, 1, 3, 1, 2, 0)</text:p>
          </table:table-cell>
          <table:table-cell office:value-type="string">
            <text:p>Oki</text:p>
          </table:table-cell>
          <table:table-cell office:value-type="string">
            <text:p>(1, 1, 0, 3, 2, 1, 0)</text:p>
          </table:table-cell>
          <table:table-cell table:number-columns-repeated="1018"/>
        </table:table-row>
        <table:table-row table:style-name="ro1">
          <table:table-cell office:value-type="string">
            <text:p>StarZ</text:p>
          </table:table-cell>
          <table:table-cell office:value-type="string">
            <text:p>(1, 0, 1, 2, 0, 2, 0)</text:p>
          </table:table-cell>
          <table:table-cell office:value-type="string">
            <text:p>masterqz</text:p>
          </table:table-cell>
          <table:table-cell office:value-type="string">
            <text:p>(0, 0, 0, 0, 0, 0, 1)</text:p>
          </table:table-cell>
          <table:table-cell office:value-type="string">
            <text:p>StarZ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office:value-type="string">
            <text:p>Awsmsun</text:p>
          </table:table-cell>
          <table:table-cell office:value-type="string">
            <text:p>(1, 0, 1, 3, 1, 2, 0)</text:p>
          </table:table-cell>
          <table:table-cell office:value-type="string">
            <text:p>Navé</text:p>
          </table:table-cell>
          <table:table-cell office:value-type="string">
            <text:p>(0, 0, 0, 0, 0, 0, 1)</text:p>
          </table:table-cell>
          <table:table-cell office:value-type="string">
            <text:p>Awsmsun</text:p>
          </table:table-cell>
          <table:table-cell office:value-type="string">
            <text:p>(1, 0, 1, 3, 1, 2, 0)</text:p>
          </table:table-cell>
          <table:table-cell table:number-columns-repeated="1018"/>
        </table:table-row>
        <table:table-row table:style-name="ro1">
          <table:table-cell office:value-type="string">
            <text:p>Synvy</text:p>
          </table:table-cell>
          <table:table-cell office:value-type="string">
            <text:p>(1, 1, 0, 2, 2, 0, 0)</text:p>
          </table:table-cell>
          <table:table-cell office:value-type="string">
            <text:p>Hordan</text:p>
          </table:table-cell>
          <table:table-cell office:value-type="string">
            <text:p>(1, 0, 1, 2, 0, 2, 0)</text:p>
          </table:table-cell>
          <table:table-cell office:value-type="string">
            <text:p>Synvy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Navé</text:p>
          </table:table-cell>
          <table:table-cell office:value-type="string">
            <text:p>(1, 0, 1, 2, 0, 2, 0)</text:p>
          </table:table-cell>
          <table:table-cell table:number-columns-repeated="2"/>
          <table:table-cell office:value-type="string">
            <text:p>Navé</text:p>
          </table:table-cell>
          <table:table-cell office:value-type="string">
            <text:p>(1, 0, 1, 2, 0, 2, 1)</text:p>
          </table:table-cell>
          <table:table-cell table:number-columns-repeated="1018"/>
        </table:table-row>
        <table:table-row table:style-name="ro1">
          <table:table-cell office:value-type="string">
            <text:p>GoldenDark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GoldenDark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fiend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fiend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Jean Papitas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Jean Papitas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chpstks</text:p>
          </table:table-cell>
          <table:table-cell office:value-type="string">
            <text:p>(1, 0, 1, 2, 0, 2, 0)</text:p>
          </table:table-cell>
          <table:table-cell table:number-columns-repeated="2"/>
          <table:table-cell office:value-type="string">
            <text:p>chpstks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office:value-type="string">
            <text:p>syntax</text:p>
          </table:table-cell>
          <table:table-cell office:value-type="string">
            <text:p>(1, 0, 1, 3, 1, 2, 0)</text:p>
          </table:table-cell>
          <table:table-cell table:number-columns-repeated="2"/>
          <table:table-cell office:value-type="string">
            <text:p>syntax</text:p>
          </table:table-cell>
          <table:table-cell office:value-type="string">
            <text:p>(1, 0, 1, 3, 1, 2, 0)</text:p>
          </table:table-cell>
          <table:table-cell table:number-columns-repeated="1018"/>
        </table:table-row>
        <table:table-row table:style-name="ro1">
          <table:table-cell office:value-type="string">
            <text:p>OwiePowie69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OwiePowie69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MrNubs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MrNubs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The Chuckster</text:p>
          </table:table-cell>
          <table:table-cell office:value-type="string">
            <text:p>(1, 0, 1, 2, 0, 2, 0)</text:p>
          </table:table-cell>
          <table:table-cell table:number-columns-repeated="2"/>
          <table:table-cell office:value-type="string">
            <text:p>The Chuckster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office:value-type="string">
            <text:p>TnKaos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TnKaos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Livan the Amnesty</text:p>
          </table:table-cell>
          <table:table-cell office:value-type="string">
            <text:p>(1, 0, 1, 3, 1, 2, 0)</text:p>
          </table:table-cell>
          <table:table-cell table:number-columns-repeated="2"/>
          <table:table-cell office:value-type="string">
            <text:p>Livan the Amnesty</text:p>
          </table:table-cell>
          <table:table-cell office:value-type="string">
            <text:p>(1, 0, 1, 3, 1, 2, 0)</text:p>
          </table:table-cell>
          <table:table-cell table:number-columns-repeated="1018"/>
        </table:table-row>
        <table:table-row table:style-name="ro1">
          <table:table-cell office:value-type="string">
            <text:p>Kryon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Kryon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Pellonian</text:p>
          </table:table-cell>
          <table:table-cell office:value-type="string">
            <text:p>(1, 0, 1, 2, 0, 2, 0)</text:p>
          </table:table-cell>
          <table:table-cell table:number-columns-repeated="2"/>
          <table:table-cell office:value-type="string">
            <text:p>Pellonian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office:value-type="string">
            <text:p>Doormatt</text:p>
          </table:table-cell>
          <table:table-cell office:value-type="string">
            <text:p>(1, 1, 0, 3, 2, 1, 0)</text:p>
          </table:table-cell>
          <table:table-cell table:number-columns-repeated="2"/>
          <table:table-cell office:value-type="string">
            <text:p>Doormatt</text:p>
          </table:table-cell>
          <table:table-cell office:value-type="string">
            <text:p>(1, 1, 0, 3, 2, 1, 0)</text:p>
          </table:table-cell>
          <table:table-cell table:number-columns-repeated="1018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1, 0, 1, 3, 1, 2, 0)</text:p>
          </table:table-cell>
          <table:table-cell table:number-columns-repeated="2"/>
          <table:table-cell office:value-type="string">
            <text:p>WonderBread</text:p>
          </table:table-cell>
          <table:table-cell office:value-type="string">
            <text:p>(1, 0, 1, 3, 1, 2, 0)</text:p>
          </table:table-cell>
          <table:table-cell table:number-columns-repeated="1018"/>
        </table:table-row>
        <table:table-row table:style-name="ro1">
          <table:table-cell office:value-type="string">
            <text:p>World Jade Center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World Jade Center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Cless</text:p>
          </table:table-cell>
          <table:table-cell office:value-type="string">
            <text:p>(1, 0, 1, 3, 1, 2, 0)</text:p>
          </table:table-cell>
          <table:table-cell table:number-columns-repeated="2"/>
          <table:table-cell office:value-type="string">
            <text:p>Cless</text:p>
          </table:table-cell>
          <table:table-cell office:value-type="string">
            <text:p>(1, 0, 1, 3, 1, 2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Hod Strat</text:p>
          </table:table-cell>
          <table:table-cell office:value-type="string">
            <text:p>(1, 0, 1, 3, 1, 2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masterqz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Hordan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KI" table:style-name="ta19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Oki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1, 0, 1, 3, 1, 2, 0)</text:p>
          </table:table-cell>
          <table:table-cell office:value-type="string">
            <text:p>LuMiSaDi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Rob</text:p>
          </table:table-cell>
          <table:table-cell office:value-type="string">
            <text:p>(1, 1, 0, 2, 2, 0, 0)</text:p>
          </table:table-cell>
          <table:table-cell office:value-type="string">
            <text:p>Rob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UpChuck</text:p>
          </table:table-cell>
          <table:table-cell office:value-type="string">
            <text:p>(1, 1, 0, 3, 2, 1, 0)</text:p>
          </table:table-cell>
          <table:table-cell office:value-type="string">
            <text:p>UpChuck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2, 1, 1, 6, 3, 3, 0)</text:p>
          </table:table-cell>
          <table:table-cell office:value-type="string">
            <text:p>Chez</text:p>
          </table:table-cell>
          <table:table-cell office:value-type="string">
            <text:p>(2, 1, 1, 6, 3, 3, 0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2, 2, 0, 4, 4, 0, 0)</text:p>
          </table:table-cell>
          <table:table-cell office:value-type="string">
            <text:p>Bhand</text:p>
          </table:table-cell>
          <table:table-cell office:value-type="string">
            <text:p>(2, 2, 0, 4, 4, 0, 0)</text:p>
          </table:table-cell>
          <table:table-cell table:number-columns-repeated="1020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1, 1, 0, 3, 2, 1, 0)</text:p>
          </table:table-cell>
          <table:table-cell office:value-type="string">
            <text:p>DarthCJ8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0, 1, 3, 1, 2, 0)</text:p>
          </table:table-cell>
          <table:table-cell office:value-type="string">
            <text:p>Hungrybox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derk</text:p>
          </table:table-cell>
          <table:table-cell office:value-type="string">
            <text:p>(1, 1, 0, 3, 2, 1, 0)</text:p>
          </table:table-cell>
          <table:table-cell office:value-type="string">
            <text:p>derk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2, 0, 2, 6, 2, 4, 0)</text:p>
          </table:table-cell>
          <table:table-cell office:value-type="string">
            <text:p>Benji</text:p>
          </table:table-cell>
          <table:table-cell office:value-type="string">
            <text:p>(2, 0, 2, 6, 2, 4, 0)</text:p>
          </table:table-cell>
          <table:table-cell table:number-columns-repeated="1020"/>
        </table:table-row>
        <table:table-row table:style-name="ro1">
          <table:table-cell office:value-type="string">
            <text:p>Lowgun</text:p>
          </table:table-cell>
          <table:table-cell office:value-type="string">
            <text:p>(1, 1, 0, 2, 2, 0, 0)</text:p>
          </table:table-cell>
          <table:table-cell office:value-type="string">
            <text:p>Lowgu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ap</text:p>
          </table:table-cell>
          <table:table-cell office:value-type="string">
            <text:p>(2, 1, 1, 5, 3, 2, 0)</text:p>
          </table:table-cell>
          <table:table-cell office:value-type="string">
            <text:p>nap</text:p>
          </table:table-cell>
          <table:table-cell office:value-type="string">
            <text:p>(2, 1, 1, 5, 3, 2, 0)</text:p>
          </table:table-cell>
          <table:table-cell table:number-columns-repeated="1020"/>
        </table:table-row>
        <table:table-row table:style-name="ro1">
          <table:table-cell office:value-type="string">
            <text:p>Tabby</text:p>
          </table:table-cell>
          <table:table-cell office:value-type="string">
            <text:p>(1, 1, 0, 2, 2, 0, 0)</text:p>
          </table:table-cell>
          <table:table-cell office:value-type="string">
            <text:p>Tabb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ewiby (Entropy)</text:p>
          </table:table-cell>
          <table:table-cell office:value-type="string">
            <text:p>(1, 1, 0, 3, 2, 1, 0)</text:p>
          </table:table-cell>
          <table:table-cell office:value-type="string">
            <text:p>Newiby (Entropy)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NIMROD69</text:p>
          </table:table-cell>
          <table:table-cell office:value-type="string">
            <text:p>(1, 1, 0, 2, 2, 0, 0)</text:p>
          </table:table-cell>
          <table:table-cell office:value-type="string">
            <text:p>NIMROD69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anzana</text:p>
          </table:table-cell>
          <table:table-cell office:value-type="string">
            <text:p>(1, 0, 1, 2, 0, 2, 0)</text:p>
          </table:table-cell>
          <table:table-cell office:value-type="string">
            <text:p>Manzan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olt</text:p>
          </table:table-cell>
          <table:table-cell office:value-type="string">
            <text:p>(1, 1, 0, 2, 2, 0, 0)</text:p>
          </table:table-cell>
          <table:table-cell office:value-type="string">
            <text:p>Col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hpstks</text:p>
          </table:table-cell>
          <table:table-cell office:value-type="string">
            <text:p>(1, 0, 1, 3, 1, 2, 0)</text:p>
          </table:table-cell>
          <table:table-cell office:value-type="string">
            <text:p>chpstks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Doormatt</text:p>
          </table:table-cell>
          <table:table-cell office:value-type="string">
            <text:p>(1, 1, 0, 3, 2, 1, 0)</text:p>
          </table:table-cell>
          <table:table-cell office:value-type="string">
            <text:p>Doormatt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LESPECTER" table:style-name="ta19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VileSpecter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0, 0, 0, 0, 0, 0, 1)</text:p>
          </table:table-cell>
          <table:table-cell office:value-type="string">
            <text:p>Chez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entPain</text:p>
          </table:table-cell>
          <table:table-cell office:value-type="string">
            <text:p>(0, 0, 0, 0, 0, 0, 1)</text:p>
          </table:table-cell>
          <table:table-cell office:value-type="string">
            <text:p>SentPai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LXIX</text:p>
          </table:table-cell>
          <table:table-cell office:value-type="string">
            <text:p>(1, 1, 0, 2, 2, 0, 0)</text:p>
          </table:table-cell>
          <table:table-cell office:value-type="string">
            <text:p>LXI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sysilex</text:p>
          </table:table-cell>
          <table:table-cell office:value-type="string">
            <text:p>(1, 0, 1, 3, 1, 2, 0)</text:p>
          </table:table-cell>
          <table:table-cell office:value-type="string">
            <text:p>Psysilex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ChezFarach001</text:p>
          </table:table-cell>
          <table:table-cell office:value-type="string">
            <text:p>(1, 0, 1, 2, 0, 2, 0)</text:p>
          </table:table-cell>
          <table:table-cell office:value-type="string">
            <text:p>ChezFarach001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ball</text:p>
          </table:table-cell>
          <table:table-cell office:value-type="string">
            <text:p>(1, 1, 0, 2, 2, 0, 0)</text:p>
          </table:table-cell>
          <table:table-cell office:value-type="string">
            <text:p>bbal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inimaxify</text:p>
          </table:table-cell>
          <table:table-cell office:value-type="string">
            <text:p>(1, 0, 1, 2, 0, 2, 0)</text:p>
          </table:table-cell>
          <table:table-cell office:value-type="string">
            <text:p>Minimaxif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Zetsubo</text:p>
          </table:table-cell>
          <table:table-cell office:value-type="string">
            <text:p>(1, 1, 0, 3, 2, 1, 0)</text:p>
          </table:table-cell>
          <table:table-cell office:value-type="string">
            <text:p>Zetsubo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NotHbox</text:p>
          </table:table-cell>
          <table:table-cell office:value-type="string">
            <text:p>(1, 0, 1, 2, 0, 2, 0)</text:p>
          </table:table-cell>
          <table:table-cell office:value-type="string">
            <text:p>NotHbo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OBICS" table:style-name="ta19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trobics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!Mama_Mia!</text:p>
          </table:table-cell>
          <table:table-cell office:value-type="string">
            <text:p>(0, 0, 0, 0, 0, 0, 1)</text:p>
          </table:table-cell>
          <table:table-cell office:value-type="string">
            <text:p>!Mama_Mia!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clean</text:p>
          </table:table-cell>
          <table:table-cell office:value-type="string">
            <text:p>(0, 0, 0, 0, 0, 0, 1)</text:p>
          </table:table-cell>
          <table:table-cell office:value-type="string">
            <text:p>clea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JDQ05</text:p>
          </table:table-cell>
          <table:table-cell office:value-type="string">
            <text:p>(1, 1, 0, 2, 2, 0, 0)</text:p>
          </table:table-cell>
          <table:table-cell office:value-type="string">
            <text:p>JDQ05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1, 1, 0, 3, 2, 1, 0)</text:p>
          </table:table-cell>
          <table:table-cell office:value-type="string">
            <text:p>HaydenEatsShrimp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1, 0, 1, 3, 1, 2, 0)</text:p>
          </table:table-cell>
          <table:table-cell office:value-type="string">
            <text:p>Benji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bignews.co</text:p>
          </table:table-cell>
          <table:table-cell office:value-type="string">
            <text:p>(1, 1, 0, 2, 2, 0, 0)</text:p>
          </table:table-cell>
          <table:table-cell office:value-type="string">
            <text:p>bignews.c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reezy 400</text:p>
          </table:table-cell>
          <table:table-cell office:value-type="string">
            <text:p>(1, 0, 1, 3, 1, 2, 0)</text:p>
          </table:table-cell>
          <table:table-cell office:value-type="string">
            <text:p>Breezy 400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DOOM!</text:p>
          </table:table-cell>
          <table:table-cell office:value-type="string">
            <text:p>(1, 1, 0, 2, 2, 0, 0)</text:p>
          </table:table-cell>
          <table:table-cell office:value-type="string">
            <text:p>DOOM!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adera</text:p>
          </table:table-cell>
          <table:table-cell office:value-type="string">
            <text:p>(1, 1, 0, 2, 2, 0, 0)</text:p>
          </table:table-cell>
          <table:table-cell office:value-type="string">
            <text:p>Mader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1, 0, 1, 3, 1, 2, 0)</text:p>
          </table:table-cell>
          <table:table-cell office:value-type="string">
            <text:p>Plummet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KurryRose</text:p>
          </table:table-cell>
          <table:table-cell office:value-type="string">
            <text:p>(0, 0, 0, 0, 0, 0, 1)</text:p>
          </table:table-cell>
          <table:table-cell office:value-type="string">
            <text:p>KurryRos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Packet</text:p>
          </table:table-cell>
          <table:table-cell office:value-type="string">
            <text:p>(1, 1, 0, 3, 2, 1, 0)</text:p>
          </table:table-cell>
          <table:table-cell office:value-type="string">
            <text:p>Packet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Keegore</text:p>
          </table:table-cell>
          <table:table-cell office:value-type="string">
            <text:p>(1, 1, 0, 2, 2, 0, 0)</text:p>
          </table:table-cell>
          <table:table-cell office:value-type="string">
            <text:p>Keegor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be</text:p>
          </table:table-cell>
          <table:table-cell office:value-type="string">
            <text:p>(1, 1, 0, 2, 2, 0, 0)</text:p>
          </table:table-cell>
          <table:table-cell office:value-type="string">
            <text:p>Kob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LightningCam</text:p>
          </table:table-cell>
          <table:table-cell office:value-type="string">
            <text:p>(1, 1, 0, 3, 2, 1, 0)</text:p>
          </table:table-cell>
          <table:table-cell office:value-type="string">
            <text:p>LightningCam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WonderBread</text:p>
          </table:table-cell>
          <table:table-cell office:value-type="string">
            <text:p>(1, 0, 1, 3, 0, 3, 0)</text:p>
          </table:table-cell>
          <table:table-cell office:value-type="string">
            <text:p>WonderBread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Viri</text:p>
          </table:table-cell>
          <table:table-cell office:value-type="string">
            <text:p>(1, 0, 1, 3, 0, 3, 0)</text:p>
          </table:table-cell>
          <table:table-cell office:value-type="string">
            <text:p>Viri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aidanbobaidan</text:p>
          </table:table-cell>
          <table:table-cell office:value-type="string">
            <text:p>(1, 1, 0, 2, 2, 0, 0)</text:p>
          </table:table-cell>
          <table:table-cell office:value-type="string">
            <text:p>aidanbobaida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FBJacob</text:p>
          </table:table-cell>
          <table:table-cell office:value-type="string">
            <text:p>(1, 1, 0, 2, 2, 0, 0)</text:p>
          </table:table-cell>
          <table:table-cell office:value-type="string">
            <text:p>NFBJacob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anzana</text:p>
          </table:table-cell>
          <table:table-cell office:value-type="string">
            <text:p>(1, 0, 1, 2, 0, 2, 0)</text:p>
          </table:table-cell>
          <table:table-cell office:value-type="string">
            <text:p>Manzan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1, 1, 0, 2, 2, 0, 0)</text:p>
          </table:table-cell>
          <table:table-cell office:value-type="string">
            <text:p>Chavalav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MoC</text:p>
          </table:table-cell>
          <table:table-cell office:value-type="string">
            <text:p>(1, 1, 0, 2, 2, 0, 0)</text:p>
          </table:table-cell>
          <table:table-cell office:value-type="string">
            <text:p>BMoC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1, 1, 0, 2, 2, 0, 0)</text:p>
          </table:table-cell>
          <table:table-cell office:value-type="string">
            <text:p>McFunn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WiFi warrior</text:p>
          </table:table-cell>
          <table:table-cell office:value-type="string">
            <text:p>(1, 0, 1, 3, 1, 2, 0)</text:p>
          </table:table-cell>
          <table:table-cell office:value-type="string">
            <text:p>WiFi warrior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HO!" table:style-name="ta19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Yho!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Quelity</text:p>
          </table:table-cell>
          <table:table-cell office:value-type="string">
            <text:p>(1, 1, 0, 4, 3, 1, 0)</text:p>
          </table:table-cell>
          <table:table-cell office:value-type="string">
            <text:p>Quelity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0, 1, 3, 0, 3, 0)</text:p>
          </table:table-cell>
          <table:table-cell office:value-type="string">
            <text:p>Hungrybox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CCgrabs</text:p>
          </table:table-cell>
          <table:table-cell office:value-type="string">
            <text:p>(1, 1, 0, 5, 3, 2, 0)</text:p>
          </table:table-cell>
          <table:table-cell office:value-type="string">
            <text:p>CCgrabs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20xQuest</text:p>
          </table:table-cell>
          <table:table-cell office:value-type="string">
            <text:p>(1, 0, 1, 3, 0, 3, 0)</text:p>
          </table:table-cell>
          <table:table-cell office:value-type="string">
            <text:p>20xQuest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UYA" table:style-name="ta19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Kuya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Lars</text:p>
          </table:table-cell>
          <table:table-cell office:value-type="string">
            <text:p>(1, 1, 0, 2, 2, 0, 0)</text:p>
          </table:table-cell>
          <table:table-cell office:value-type="string">
            <text:p>Lar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20xQuest</text:p>
          </table:table-cell>
          <table:table-cell office:value-type="string">
            <text:p>(1, 1, 0, 5, 3, 2, 0)</text:p>
          </table:table-cell>
          <table:table-cell office:value-type="string">
            <text:p>20xQuest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0, 1, 4, 1, 3, 0)</text:p>
          </table:table-cell>
          <table:table-cell office:value-type="string">
            <text:p>Hungrybox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SandBag</text:p>
          </table:table-cell>
          <table:table-cell office:value-type="string">
            <text:p>(1, 1, 0, 4, 3, 1, 0)</text:p>
          </table:table-cell>
          <table:table-cell office:value-type="string">
            <text:p>SandBag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(1, 1, 0, 4, 3, 1, 0)</text:p>
          </table:table-cell>
          <table:table-cell office:value-type="string">
            <text:p>Hod Strat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Franco</text:p>
          </table:table-cell>
          <table:table-cell office:value-type="string">
            <text:p>(1, 0, 1, 4, 1, 3, 0)</text:p>
          </table:table-cell>
          <table:table-cell office:value-type="string">
            <text:p>Franco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RS" table:style-name="ta19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Lars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Kuya</text:p>
          </table:table-cell>
          <table:table-cell office:value-type="string">
            <text:p>(1, 0, 1, 2, 0, 2, 0)</text:p>
          </table:table-cell>
          <table:table-cell office:value-type="string">
            <text:p>Kuy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entinel</text:p>
          </table:table-cell>
          <table:table-cell office:value-type="string">
            <text:p>(1, 0, 1, 2, 0, 2, 0)</text:p>
          </table:table-cell>
          <table:table-cell office:value-type="string">
            <text:p>Sentin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XQUEST" table:style-name="ta19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20xQuest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entinel</text:p>
          </table:table-cell>
          <table:table-cell office:value-type="string">
            <text:p>(1, 1, 0, 2, 2, 0, 0)</text:p>
          </table:table-cell>
          <table:table-cell office:value-type="string">
            <text:p>Sentine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uya</text:p>
          </table:table-cell>
          <table:table-cell office:value-type="string">
            <text:p>(1, 0, 1, 5, 2, 3, 0)</text:p>
          </table:table-cell>
          <table:table-cell office:value-type="string">
            <text:p>Kuya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tgags</text:p>
          </table:table-cell>
          <table:table-cell office:value-type="string">
            <text:p>(1, 1, 0, 3, 3, 0, 0)</text:p>
          </table:table-cell>
          <table:table-cell office:value-type="string">
            <text:p>tgags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Yho!</text:p>
          </table:table-cell>
          <table:table-cell office:value-type="string">
            <text:p>(1, 1, 0, 3, 3, 0, 0)</text:p>
          </table:table-cell>
          <table:table-cell office:value-type="string">
            <text:p>Yho!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Sneakywill</text:p>
          </table:table-cell>
          <table:table-cell office:value-type="string">
            <text:p>(1, 0, 1, 4, 1, 3, 0)</text:p>
          </table:table-cell>
          <table:table-cell office:value-type="string">
            <text:p>Sneakywill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INEL" table:style-name="ta19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entinel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20xQuest</text:p>
          </table:table-cell>
          <table:table-cell office:value-type="string">
            <text:p>(1, 0, 1, 2, 0, 2, 0)</text:p>
          </table:table-cell>
          <table:table-cell office:value-type="string">
            <text:p>20xQues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Lars</text:p>
          </table:table-cell>
          <table:table-cell office:value-type="string">
            <text:p>(1, 1, 0, 2, 2, 0, 0)</text:p>
          </table:table-cell>
          <table:table-cell office:value-type="string">
            <text:p>Lar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itan</text:p>
          </table:table-cell>
          <table:table-cell office:value-type="string">
            <text:p>(1, 0, 1, 3, 0, 3, 0)</text:p>
          </table:table-cell>
          <table:table-cell office:value-type="string">
            <text:p>Titan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RON" table:style-name="ta19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Aaron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18"/>
        </table:table-row>
        <table:table-row table:style-name="ro1">
          <table:table-cell office:value-type="string">
            <text:p>Textbook</text:p>
          </table:table-cell>
          <table:table-cell office:value-type="string">
            <text:p>(1, 1, 0, 2, 2, 0, 0)</text:p>
          </table:table-cell>
          <table:table-cell office:value-type="string">
            <text:p>StepKnightUp</text:p>
          </table:table-cell>
          <table:table-cell office:value-type="string">
            <text:p>(1, 1, 0, 2, 2, 0, 0)</text:p>
          </table:table-cell>
          <table:table-cell office:value-type="string">
            <text:p>Textbook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Equilateral</text:p>
          </table:table-cell>
          <table:table-cell office:value-type="string">
            <text:p>(1, 0, 1, 3, 0, 3, 0)</text:p>
          </table:table-cell>
          <table:table-cell office:value-type="string">
            <text:p>Minimaxify</text:p>
          </table:table-cell>
          <table:table-cell office:value-type="string">
            <text:p>(1, 1, 0, 2, 2, 0, 0)</text:p>
          </table:table-cell>
          <table:table-cell office:value-type="string">
            <text:p>Equilateral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uhline</text:p>
          </table:table-cell>
          <table:table-cell office:value-type="string">
            <text:p>(1, 1, 0, 3, 3, 0, 0)</text:p>
          </table:table-cell>
          <table:table-cell office:value-type="string">
            <text:p>Psysilex</text:p>
          </table:table-cell>
          <table:table-cell office:value-type="string">
            <text:p>(1, 1, 0, 3, 2, 1, 0)</text:p>
          </table:table-cell>
          <table:table-cell office:value-type="string">
            <text:p>uhline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Kip</text:p>
          </table:table-cell>
          <table:table-cell office:value-type="string">
            <text:p>(1, 1, 0, 4, 3, 1, 0)</text:p>
          </table:table-cell>
          <table:table-cell office:value-type="string">
            <text:p>Shaine</text:p>
          </table:table-cell>
          <table:table-cell office:value-type="string">
            <text:p>(1, 0, 1, 3, 1, 2, 0)</text:p>
          </table:table-cell>
          <table:table-cell office:value-type="string">
            <text:p>Kip</text:p>
          </table:table-cell>
          <table:table-cell office:value-type="string">
            <text:p>(1, 1, 0, 4, 3, 1, 0)</text:p>
          </table:table-cell>
          <table:table-cell table:number-columns-repeated="1018"/>
        </table:table-row>
        <table:table-row table:style-name="ro1">
          <table:table-cell office:value-type="string">
            <text:p>pace</text:p>
          </table:table-cell>
          <table:table-cell office:value-type="string">
            <text:p>(1, 0, 1, 4, 1, 3, 0)</text:p>
          </table:table-cell>
          <table:table-cell office:value-type="string">
            <text:p>Riku</text:p>
          </table:table-cell>
          <table:table-cell office:value-type="string">
            <text:p>(1, 1, 0, 2, 2, 0, 0)</text:p>
          </table:table-cell>
          <table:table-cell office:value-type="string">
            <text:p>pace</text:p>
          </table:table-cell>
          <table:table-cell office:value-type="string">
            <text:p>(1, 0, 1, 4, 1, 3, 0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Venikki</text:p>
          </table:table-cell>
          <table:table-cell office:value-type="string">
            <text:p>(1, 1, 0, 3, 3, 0, 0)</text:p>
          </table:table-cell>
          <table:table-cell office:value-type="string">
            <text:p>StepKnightUp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ticccy</text:p>
          </table:table-cell>
          <table:table-cell office:value-type="string">
            <text:p>(1, 1, 0, 4, 3, 1, 0)</text:p>
          </table:table-cell>
          <table:table-cell office:value-type="string">
            <text:p>Minimaxify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pic_Gabriel</text:p>
          </table:table-cell>
          <table:table-cell office:value-type="string">
            <text:p>(1, 0, 1, 3, 0, 3, 0)</text:p>
          </table:table-cell>
          <table:table-cell office:value-type="string">
            <text:p>Psysilex</text:p>
          </table:table-cell>
          <table:table-cell office:value-type="string">
            <text:p>(1, 1, 0, 3, 2, 1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haine</text:p>
          </table:table-cell>
          <table:table-cell office:value-type="string">
            <text:p>(1, 0, 1, 3, 1, 2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iku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Venikki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ticccy</text:p>
          </table:table-cell>
          <table:table-cell office:value-type="string">
            <text:p>(1, 1, 0, 4, 3, 1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Epic_Gabriel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XTBOOK" table:style-name="ta19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Textbook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Aaron</text:p>
          </table:table-cell>
          <table:table-cell office:value-type="string">
            <text:p>(1, 0, 1, 2, 0, 2, 0)</text:p>
          </table:table-cell>
          <table:table-cell office:value-type="string">
            <text:p>Aaro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appuccino</text:p>
          </table:table-cell>
          <table:table-cell office:value-type="string">
            <text:p>(1, 0, 1, 3, 0, 3, 0)</text:p>
          </table:table-cell>
          <table:table-cell office:value-type="string">
            <text:p>Cappuccino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40P" table:style-name="ta20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240p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tylish thug slayer</text:p>
          </table:table-cell>
          <table:table-cell office:value-type="string">
            <text:p>(0, 0, 0, 0, 0, 0, 1)</text:p>
          </table:table-cell>
          <table:table-cell office:value-type="string">
            <text:p>Stylish thug slayer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Panda</text:p>
          </table:table-cell>
          <table:table-cell office:value-type="string">
            <text:p>(1, 0, 1, 3, 0, 3, 0)</text:p>
          </table:table-cell>
          <table:table-cell office:value-type="string">
            <text:p>Panda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drc</text:p>
          </table:table-cell>
          <table:table-cell office:value-type="string">
            <text:p>(1, 1, 0, 3, 3, 0, 0)</text:p>
          </table:table-cell>
          <table:table-cell office:value-type="string">
            <text:p>drc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Howie</text:p>
          </table:table-cell>
          <table:table-cell office:value-type="string">
            <text:p>(1, 0, 1, 4, 1, 3, 0)</text:p>
          </table:table-cell>
          <table:table-cell office:value-type="string">
            <text:p>Howie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YLISH THUG SLAYER" table:style-name="ta20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tylish thug slayer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240p</text:p>
          </table:table-cell>
          <table:table-cell office:value-type="string">
            <text:p>(0, 0, 0, 0, 0, 0, 1)</text:p>
          </table:table-cell>
          <table:table-cell office:value-type="string">
            <text:p>240p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(0, 0, 0, 0, 0, 0, 1)</text:p>
          </table:table-cell>
          <table:table-cell office:value-type="string">
            <text:p>Hod Strat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Isosceles</text:p>
          </table:table-cell>
          <table:table-cell office:value-type="string">
            <text:p>(1, 0, 1, 3, 0, 3, 0)</text:p>
          </table:table-cell>
          <table:table-cell office:value-type="string">
            <text:p>Isosceles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NotTony</text:p>
          </table:table-cell>
          <table:table-cell office:value-type="string">
            <text:p>(1, 1, 0, 3, 3, 0, 0)</text:p>
          </table:table-cell>
          <table:table-cell office:value-type="string">
            <text:p>NotTony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Hordan</text:p>
          </table:table-cell>
          <table:table-cell office:value-type="string">
            <text:p>(1, 0, 1, 3, 0, 3, 0)</text:p>
          </table:table-cell>
          <table:table-cell office:value-type="string">
            <text:p>Hordan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1.EXE" table:style-name="ta20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A1.exe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Bobateatime</text:p>
          </table:table-cell>
          <table:table-cell office:value-type="string">
            <text:p>(1, 1, 0, 2, 2, 0, 0)</text:p>
          </table:table-cell>
          <table:table-cell office:value-type="string">
            <text:p>Bobateatim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OG Kid</text:p>
          </table:table-cell>
          <table:table-cell office:value-type="string">
            <text:p>(1, 0, 1, 3, 0, 3, 0)</text:p>
          </table:table-cell>
          <table:table-cell office:value-type="string">
            <text:p>OG Kid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ThatOneGuy</text:p>
          </table:table-cell>
          <table:table-cell office:value-type="string">
            <text:p>(1, 1, 0, 3, 3, 0, 0)</text:p>
          </table:table-cell>
          <table:table-cell office:value-type="string">
            <text:p>ThatOneGuy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Jape</text:p>
          </table:table-cell>
          <table:table-cell office:value-type="string">
            <text:p>(1, 0, 1, 3, 0, 3, 0)</text:p>
          </table:table-cell>
          <table:table-cell office:value-type="string">
            <text:p>Jape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BATEATIME" table:style-name="ta20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Bobateatime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A1.exe</text:p>
          </table:table-cell>
          <table:table-cell office:value-type="string">
            <text:p>(1, 0, 1, 2, 0, 2, 0)</text:p>
          </table:table-cell>
          <table:table-cell office:value-type="string">
            <text:p>A1.ex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andBag</text:p>
          </table:table-cell>
          <table:table-cell office:value-type="string">
            <text:p>(1, 0, 1, 3, 0, 3, 0)</text:p>
          </table:table-cell>
          <table:table-cell office:value-type="string">
            <text:p>SandBag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Quelity</text:p>
          </table:table-cell>
          <table:table-cell office:value-type="string">
            <text:p>(1, 1, 0, 4, 3, 1, 0)</text:p>
          </table:table-cell>
          <table:table-cell office:value-type="string">
            <text:p>Quelity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Panda</text:p>
          </table:table-cell>
          <table:table-cell office:value-type="string">
            <text:p>(1, 0, 1, 3, 0, 3, 0)</text:p>
          </table:table-cell>
          <table:table-cell office:value-type="string">
            <text:p>Panda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ThatOneGuy</text:p>
          </table:table-cell>
          <table:table-cell office:value-type="string">
            <text:p>(1, 1, 0, 3, 3, 0, 0)</text:p>
          </table:table-cell>
          <table:table-cell office:value-type="string">
            <text:p>ThatOneGuy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(1, 0, 1, 3, 0, 3, 0)</text:p>
          </table:table-cell>
          <table:table-cell office:value-type="string">
            <text:p>Hod Strat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ITMASTERSWAG" table:style-name="ta20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jitmasterswag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neakywill</text:p>
          </table:table-cell>
          <table:table-cell office:value-type="string">
            <text:p>(0, 0, 0, 0, 0, 0, 1)</text:p>
          </table:table-cell>
          <table:table-cell office:value-type="string">
            <text:p>Sneakywill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ThatOneGuy</text:p>
          </table:table-cell>
          <table:table-cell office:value-type="string">
            <text:p>(0, 0, 0, 0, 0, 0, 1)</text:p>
          </table:table-cell>
          <table:table-cell office:value-type="string">
            <text:p>ThatOneGu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MATE" table:style-name="ta20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Checkmate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18"/>
        </table:table-row>
        <table:table-row table:style-name="ro1">
          <table:table-cell office:value-type="string">
            <text:p>Abraham</text:p>
          </table:table-cell>
          <table:table-cell office:value-type="string">
            <text:p>(0, 0, 0, 0, 0, 0, 1)</text:p>
          </table:table-cell>
          <table:table-cell office:value-type="string">
            <text:p>Mr. J</text:p>
          </table:table-cell>
          <table:table-cell office:value-type="string">
            <text:p>(1, 0, 1, 2, 0, 2, 0)</text:p>
          </table:table-cell>
          <table:table-cell office:value-type="string">
            <text:p>Abraham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office:value-type="string">
            <text:p>Wizzrobe</text:p>
          </table:table-cell>
          <table:table-cell office:value-type="string">
            <text:p>(1, 0, 1, 3, 0, 3, 0)</text:p>
          </table:table-cell>
          <table:table-cell office:value-type="string">
            <text:p>Colt</text:p>
          </table:table-cell>
          <table:table-cell office:value-type="string">
            <text:p>(1, 0, 1, 2, 0, 2, 0)</text:p>
          </table:table-cell>
          <table:table-cell office:value-type="string">
            <text:p>Wizzrobe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NotTony</text:p>
          </table:table-cell>
          <table:table-cell office:value-type="string">
            <text:p>(1, 1, 0, 3, 3, 0, 0)</text:p>
          </table:table-cell>
          <table:table-cell table:number-columns-repeated="2"/>
          <table:table-cell office:value-type="string">
            <text:p>NotTony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Cappuccino</text:p>
          </table:table-cell>
          <table:table-cell office:value-type="string">
            <text:p>(1, 0, 1, 3, 0, 3, 0)</text:p>
          </table:table-cell>
          <table:table-cell table:number-columns-repeated="2"/>
          <table:table-cell office:value-type="string">
            <text:p>Cappuccino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Mr. J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Colt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PUCCINO" table:style-name="ta20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Cappuccino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okusuii</text:p>
          </table:table-cell>
          <table:table-cell office:value-type="string">
            <text:p>(1, 1, 0, 2, 2, 0, 0)</text:p>
          </table:table-cell>
          <table:table-cell office:value-type="string">
            <text:p>okusui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AzLu</text:p>
          </table:table-cell>
          <table:table-cell office:value-type="string">
            <text:p>(1, 0, 1, 3, 0, 3, 0)</text:p>
          </table:table-cell>
          <table:table-cell office:value-type="string">
            <text:p>AzLu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Textbook</text:p>
          </table:table-cell>
          <table:table-cell office:value-type="string">
            <text:p>(1, 1, 0, 3, 3, 0, 0)</text:p>
          </table:table-cell>
          <table:table-cell office:value-type="string">
            <text:p>Textbook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Checkmate</text:p>
          </table:table-cell>
          <table:table-cell office:value-type="string">
            <text:p>(1, 1, 0, 3, 3, 0, 0)</text:p>
          </table:table-cell>
          <table:table-cell office:value-type="string">
            <text:p>Checkmate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1, 0, 1, 5, 2, 3, 0)</text:p>
          </table:table-cell>
          <table:table-cell office:value-type="string">
            <text:p>Slowpez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rndy</text:p>
          </table:table-cell>
          <table:table-cell office:value-type="string">
            <text:p>(1, 1, 0, 2, 2, 0, 0)</text:p>
          </table:table-cell>
          <table:table-cell office:value-type="string">
            <text:p>rnd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ardon</text:p>
          </table:table-cell>
          <table:table-cell office:value-type="string">
            <text:p>(1, 1, 0, 2, 2, 0, 0)</text:p>
          </table:table-cell>
          <table:table-cell office:value-type="string">
            <text:p>bardo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1, 0, 1, 3, 0, 3, 0)</text:p>
          </table:table-cell>
          <table:table-cell office:value-type="string">
            <text:p>Captain G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Peele</text:p>
          </table:table-cell>
          <table:table-cell office:value-type="string">
            <text:p>(1, 1, 0, 3, 3, 0, 0)</text:p>
          </table:table-cell>
          <table:table-cell office:value-type="string">
            <text:p>Peele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Sneakywill</text:p>
          </table:table-cell>
          <table:table-cell office:value-type="string">
            <text:p>(1, 1, 0, 3, 3, 0, 0)</text:p>
          </table:table-cell>
          <table:table-cell office:value-type="string">
            <text:p>Sneakywill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OG Kid</text:p>
          </table:table-cell>
          <table:table-cell office:value-type="string">
            <text:p>(1, 0, 1, 3, 0, 3, 0)</text:p>
          </table:table-cell>
          <table:table-cell office:value-type="string">
            <text:p>OG Kid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HLINE" table:style-name="ta20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uhline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AzLu</text:p>
          </table:table-cell>
          <table:table-cell office:value-type="string">
            <text:p>(1, 0, 1, 2, 0, 2, 0)</text:p>
          </table:table-cell>
          <table:table-cell office:value-type="string">
            <text:p>AzLu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okusuii</text:p>
          </table:table-cell>
          <table:table-cell office:value-type="string">
            <text:p>(1, 1, 0, 3, 3, 0, 0)</text:p>
          </table:table-cell>
          <table:table-cell office:value-type="string">
            <text:p>okusuii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Aaron</text:p>
          </table:table-cell>
          <table:table-cell office:value-type="string">
            <text:p>(1, 0, 1, 3, 0, 3, 0)</text:p>
          </table:table-cell>
          <table:table-cell office:value-type="string">
            <text:p>Aaron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Chichi Pumpa</text:p>
          </table:table-cell>
          <table:table-cell office:value-type="string">
            <text:p>(1, 1, 0, 3, 3, 0, 0)</text:p>
          </table:table-cell>
          <table:table-cell office:value-type="string">
            <text:p>Chichi Pumpa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Komodo</text:p>
          </table:table-cell>
          <table:table-cell office:value-type="string">
            <text:p>(1, 0, 1, 3, 0, 3, 0)</text:p>
          </table:table-cell>
          <table:table-cell office:value-type="string">
            <text:p>Komodo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Ban</text:p>
          </table:table-cell>
          <table:table-cell office:value-type="string">
            <text:p>(0, 0, 0, 0, 0, 0, 1)</text:p>
          </table:table-cell>
          <table:table-cell office:value-type="string">
            <text:p>Ba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Lapi</text:p>
          </table:table-cell>
          <table:table-cell office:value-type="string">
            <text:p>(1, 1, 0, 5, 3, 2, 0)</text:p>
          </table:table-cell>
          <table:table-cell office:value-type="string">
            <text:p>Lapi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Jovian</text:p>
          </table:table-cell>
          <table:table-cell office:value-type="string">
            <text:p>(1, 0, 1, 3, 0, 3, 0)</text:p>
          </table:table-cell>
          <table:table-cell office:value-type="string">
            <text:p>Jovian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LATERAL" table:style-name="ta20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Equilateral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Aaron</text:p>
          </table:table-cell>
          <table:table-cell office:value-type="string">
            <text:p>(1, 1, 0, 3, 3, 0, 0)</text:p>
          </table:table-cell>
          <table:table-cell office:value-type="string">
            <text:p>Aaron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brokenyew</text:p>
          </table:table-cell>
          <table:table-cell office:value-type="string">
            <text:p>(1, 1, 0, 3, 3, 0, 0)</text:p>
          </table:table-cell>
          <table:table-cell office:value-type="string">
            <text:p>brokenyew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0, 1, 4, 1, 3, 0)</text:p>
          </table:table-cell>
          <table:table-cell office:value-type="string">
            <text:p>Hungrybox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Komodo</text:p>
          </table:table-cell>
          <table:table-cell office:value-type="string">
            <text:p>(1, 1, 0, 3, 3, 0, 0)</text:p>
          </table:table-cell>
          <table:table-cell office:value-type="string">
            <text:p>Komodo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OG Kid</text:p>
          </table:table-cell>
          <table:table-cell office:value-type="string">
            <text:p>(1, 0, 1, 5, 2, 3, 0)</text:p>
          </table:table-cell>
          <table:table-cell office:value-type="string">
            <text:p>OG Kid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CE" table:style-name="ta20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pace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Hod Strat</text:p>
          </table:table-cell>
          <table:table-cell office:value-type="string">
            <text:p>(1, 1, 0, 4, 3, 1, 0)</text:p>
          </table:table-cell>
          <table:table-cell office:value-type="string">
            <text:p>Hod Strat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1, 0, 1, 4, 1, 3, 0)</text:p>
          </table:table-cell>
          <table:table-cell office:value-type="string">
            <text:p>Captain G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>
          <table:table-cell office:value-type="string">
            <text:p>Aaron</text:p>
          </table:table-cell>
          <table:table-cell office:value-type="string">
            <text:p>(1, 1, 0, 4, 3, 1, 0)</text:p>
          </table:table-cell>
          <table:table-cell office:value-type="string">
            <text:p>Aaron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Sneakywill</text:p>
          </table:table-cell>
          <table:table-cell office:value-type="string">
            <text:p>(1, 1, 0, 5, 3, 2, 0)</text:p>
          </table:table-cell>
          <table:table-cell office:value-type="string">
            <text:p>Sneakywill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OG Kid</text:p>
          </table:table-cell>
          <table:table-cell office:value-type="string">
            <text:p>(1, 0, 1, 3, 0, 3, 0)</text:p>
          </table:table-cell>
          <table:table-cell office:value-type="string">
            <text:p>OG Kid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ZZROBE" table:style-name="ta21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Wizzrobe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Checkmate</text:p>
          </table:table-cell>
          <table:table-cell office:value-type="string">
            <text:p>(1, 1, 0, 3, 3, 0, 0)</text:p>
          </table:table-cell>
          <table:table-cell office:value-type="string">
            <text:p>Checkmate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AzLu</text:p>
          </table:table-cell>
          <table:table-cell office:value-type="string">
            <text:p>(1, 1, 0, 3, 3, 0, 0)</text:p>
          </table:table-cell>
          <table:table-cell office:value-type="string">
            <text:p>AzLu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Franco</text:p>
          </table:table-cell>
          <table:table-cell office:value-type="string">
            <text:p>(2, 2, 0, 6, 6, 0, 0)</text:p>
          </table:table-cell>
          <table:table-cell office:value-type="string">
            <text:p>Franco</text:p>
          </table:table-cell>
          <table:table-cell office:value-type="string">
            <text:p>(2, 2, 0, 6, 6, 0, 0)</text:p>
          </table:table-cell>
          <table:table-cell table:number-columns-repeated="1020"/>
        </table:table-row>
        <table:table-row table:style-name="ro1">
          <table:table-cell office:value-type="string">
            <text:p>Krudo</text:p>
          </table:table-cell>
          <table:table-cell office:value-type="string">
            <text:p>(4, 1, 3, 17, 6, 11, 0)</text:p>
          </table:table-cell>
          <table:table-cell office:value-type="string">
            <text:p>Krudo</text:p>
          </table:table-cell>
          <table:table-cell office:value-type="string">
            <text:p>(4, 1, 3, 17, 6, 11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3, 3, 0, 11, 9, 2, 0)</text:p>
          </table:table-cell>
          <table:table-cell office:value-type="string">
            <text:p>Hungrybox</text:p>
          </table:table-cell>
          <table:table-cell office:value-type="string">
            <text:p>(3, 3, 0, 11, 9, 2, 0)</text:p>
          </table:table-cell>
          <table:table-cell table:number-columns-repeated="1020"/>
        </table:table-row>
        <table:table-row table:style-name="ro1">
          <table:table-cell office:value-type="string">
            <text:p>OG Kid</text:p>
          </table:table-cell>
          <table:table-cell office:value-type="string">
            <text:p>(1, 1, 0, 5, 3, 2, 0)</text:p>
          </table:table-cell>
          <table:table-cell office:value-type="string">
            <text:p>OG Kid</text:p>
          </table:table-cell>
          <table:table-cell office:value-type="string">
            <text:p>(1, 1, 0, 5, 3, 2, 0)</text:p>
          </table:table-cell>
          <table:table-cell table:number-columns-repeated="1020"/>
        </table:table-row>
        <table:table-row table:style-name="ro1">
          <table:table-cell office:value-type="string">
            <text:p>Panda</text:p>
          </table:table-cell>
          <table:table-cell office:value-type="string">
            <text:p>(2, 2, 0, 8, 6, 2, 0)</text:p>
          </table:table-cell>
          <table:table-cell office:value-type="string">
            <text:p>Panda</text:p>
          </table:table-cell>
          <table:table-cell office:value-type="string">
            <text:p>(2, 2, 0, 8, 6, 2, 0)</text:p>
          </table:table-cell>
          <table:table-cell table:number-columns-repeated="1020"/>
        </table:table-row>
        <table:table-row table:style-name="ro1">
          <table:table-cell office:value-type="string">
            <text:p>Isosceles</text:p>
          </table:table-cell>
          <table:table-cell office:value-type="string">
            <text:p>(1, 1, 0, 3, 3, 0, 0)</text:p>
          </table:table-cell>
          <table:table-cell office:value-type="string">
            <text:p>Isosceles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>
          <table:table-cell office:value-type="string">
            <text:p>Komodo</text:p>
          </table:table-cell>
          <table:table-cell office:value-type="string">
            <text:p>(1, 1, 0, 3, 3, 0, 0)</text:p>
          </table:table-cell>
          <table:table-cell office:value-type="string">
            <text:p>Komodo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ANCO" table:style-name="ta21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Franco</text:p>
          </table:table-cell>
          <table:table-cell table:number-columns-repeated="1023"/>
        </table:table-row>
        <table:table-row table:style-name="ro1"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18"/>
        </table:table-row>
        <table:table-row table:style-name="ro1">
          <table:table-cell office:value-type="string">
            <text:p>Ricky6</text:p>
          </table:table-cell>
          <table:table-cell office:value-type="string">
            <text:p>(1, 1, 0, 3, 3, 0, 0)</text:p>
          </table:table-cell>
          <table:table-cell office:value-type="string">
            <text:p>Yukoa</text:p>
          </table:table-cell>
          <table:table-cell office:value-type="string">
            <text:p>(1, 0, 1, 2, 0, 2, 0)</text:p>
          </table:table-cell>
          <table:table-cell office:value-type="string">
            <text:p>Ricky6</text:p>
          </table:table-cell>
          <table:table-cell office:value-type="string">
            <text:p>(1, 1, 0, 3, 3, 0, 0)</text:p>
          </table:table-cell>
          <table:table-cell table:number-columns-repeated="1018"/>
        </table:table-row>
        <table:table-row table:style-name="ro1">
          <table:table-cell office:value-type="string">
            <text:p>Komodo</text:p>
          </table:table-cell>
          <table:table-cell office:value-type="string">
            <text:p>(2, 1, 1, 9, 4, 5, 0)</text:p>
          </table:table-cell>
          <table:table-cell office:value-type="string">
            <text:p>Redpik</text:p>
          </table:table-cell>
          <table:table-cell office:value-type="string">
            <text:p>(1, 1, 0, 2, 2, 0, 0)</text:p>
          </table:table-cell>
          <table:table-cell office:value-type="string">
            <text:p>Komodo</text:p>
          </table:table-cell>
          <table:table-cell office:value-type="string">
            <text:p>(2, 1, 1, 9, 4, 5, 0)</text:p>
          </table:table-cell>
          <table:table-cell table:number-columns-repeated="1018"/>
        </table:table-row>
        <table:table-row table:style-name="ro1">
          <table:table-cell office:value-type="string">
            <text:p>Wizzrobe</text:p>
          </table:table-cell>
          <table:table-cell office:value-type="string">
            <text:p>(2, 0, 2, 6, 0, 6, 0)</text:p>
          </table:table-cell>
          <table:table-cell office:value-type="string">
            <text:p>nap</text:p>
          </table:table-cell>
          <table:table-cell office:value-type="string">
            <text:p>(1, 0, 1, 2, 0, 2, 0)</text:p>
          </table:table-cell>
          <table:table-cell office:value-type="string">
            <text:p>Wizzrobe</text:p>
          </table:table-cell>
          <table:table-cell office:value-type="string">
            <text:p>(2, 0, 2, 6, 0, 6, 0)</text:p>
          </table:table-cell>
          <table:table-cell table:number-columns-repeated="1018"/>
        </table:table-row>
        <table:table-row table:style-name="ro1">
          <table:table-cell office:value-type="string">
            <text:p>Kuya</text:p>
          </table:table-cell>
          <table:table-cell office:value-type="string">
            <text:p>(1, 1, 0, 4, 3, 1, 0)</text:p>
          </table:table-cell>
          <table:table-cell table:number-columns-repeated="2"/>
          <table:table-cell office:value-type="string">
            <text:p>Kuya</text:p>
          </table:table-cell>
          <table:table-cell office:value-type="string">
            <text:p>(1, 1, 0, 4, 3, 1, 0)</text:p>
          </table:table-cell>
          <table:table-cell table:number-columns-repeated="1018"/>
        </table:table-row>
        <table:table-row table:style-name="ro1">
          <table:table-cell office:value-type="string">
            <text:p>Captain G</text:p>
          </table:table-cell>
          <table:table-cell office:value-type="string">
            <text:p>(1, 0, 1, 4, 1, 3, 0)</text:p>
          </table:table-cell>
          <table:table-cell table:number-columns-repeated="2"/>
          <table:table-cell office:value-type="string">
            <text:p>Captain G</text:p>
          </table:table-cell>
          <table:table-cell office:value-type="string">
            <text:p>(1, 0, 1, 4, 1, 3, 0)</text:p>
          </table:table-cell>
          <table:table-cell table:number-columns-repeated="1018"/>
        </table:table-row>
        <table:table-row table:style-name="ro1">
          <table:table-cell office:value-type="string">
            <text:p>OncomingTraffic</text:p>
          </table:table-cell>
          <table:table-cell office:value-type="string">
            <text:p>(1, 1, 0, 4, 3, 1, 0)</text:p>
          </table:table-cell>
          <table:table-cell table:number-columns-repeated="2"/>
          <table:table-cell office:value-type="string">
            <text:p>OncomingTraffic</text:p>
          </table:table-cell>
          <table:table-cell office:value-type="string">
            <text:p>(1, 1, 0, 4, 3, 1, 0)</text:p>
          </table:table-cell>
          <table:table-cell table:number-columns-repeated="1018"/>
        </table:table-row>
        <table:table-row table:style-name="ro1">
          <table:table-cell office:value-type="string">
            <text:p>AzLu</text:p>
          </table:table-cell>
          <table:table-cell office:value-type="string">
            <text:p>(2, 2, 0, 8, 6, 2, 0)</text:p>
          </table:table-cell>
          <table:table-cell table:number-columns-repeated="2"/>
          <table:table-cell office:value-type="string">
            <text:p>AzLu</text:p>
          </table:table-cell>
          <table:table-cell office:value-type="string">
            <text:p>(2, 2, 0, 8, 6, 2, 0)</text:p>
          </table:table-cell>
          <table:table-cell table:number-columns-repeated="1018"/>
        </table:table-row>
        <table:table-row table:style-name="ro1">
          <table:table-cell office:value-type="string">
            <text:p>Profanity</text:p>
          </table:table-cell>
          <table:table-cell office:value-type="string">
            <text:p>(1, 0, 1, 3, 0, 3, 0)</text:p>
          </table:table-cell>
          <table:table-cell table:number-columns-repeated="2"/>
          <table:table-cell office:value-type="string">
            <text:p>Profanity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office:value-type="string">
            <text:p>Cloak</text:p>
          </table:table-cell>
          <table:table-cell office:value-type="string">
            <text:p>(0, 0, 0, 0, 0, 0, 1)</text:p>
          </table:table-cell>
          <table:table-cell table:number-columns-repeated="2"/>
          <table:table-cell office:value-type="string">
            <text:p>Cloak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office:value-type="string">
            <text:p>TESTIKYLE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TESTIKYLE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brokenyew</text:p>
          </table:table-cell>
          <table:table-cell office:value-type="string">
            <text:p>(1, 1, 0, 5, 3, 2, 0)</text:p>
          </table:table-cell>
          <table:table-cell table:number-columns-repeated="2"/>
          <table:table-cell office:value-type="string">
            <text:p>brokenyew</text:p>
          </table:table-cell>
          <table:table-cell office:value-type="string">
            <text:p>(1, 1, 0, 5, 3, 2, 0)</text:p>
          </table:table-cell>
          <table:table-cell table:number-columns-repeated="1018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0, 1, 3, 0, 3, 0)</text:p>
          </table:table-cell>
          <table:table-cell table:number-columns-repeated="2"/>
          <table:table-cell office:value-type="string">
            <text:p>Hungrybox</text:p>
          </table:table-cell>
          <table:table-cell office:value-type="string">
            <text:p>(1, 0, 1, 3, 0, 3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ukoa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edpik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nap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GK" table:style-name="ta21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DGK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Mr.Feeny</text:p>
          </table:table-cell>
          <table:table-cell office:value-type="string">
            <text:p>(1, 1, 0, 2, 2, 0, 0)</text:p>
          </table:table-cell>
          <table:table-cell office:value-type="string">
            <text:p>Mr.Feen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rymlynn</text:p>
          </table:table-cell>
          <table:table-cell office:value-type="string">
            <text:p>(1, 0, 1, 3, 1, 2, 0)</text:p>
          </table:table-cell>
          <table:table-cell office:value-type="string">
            <text:p>Grymlynn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1, 0, 1, 3, 1, 2, 0)</text:p>
          </table:table-cell>
          <table:table-cell office:value-type="string">
            <text:p>xXx_PeterGokuGriffin_xXx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Wiccan</text:p>
          </table:table-cell>
          <table:table-cell office:value-type="string">
            <text:p>(0, 0, 0, 0, 0, 0, 1)</text:p>
          </table:table-cell>
          <table:table-cell office:value-type="string">
            <text:p>Wicca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Navé</text:p>
          </table:table-cell>
          <table:table-cell office:value-type="string">
            <text:p>(1, 1, 0, 2, 2, 0, 0)</text:p>
          </table:table-cell>
          <table:table-cell office:value-type="string">
            <text:p>Navé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0g3</text:p>
          </table:table-cell>
          <table:table-cell office:value-type="string">
            <text:p>(1, 0, 1, 2, 0, 2, 0)</text:p>
          </table:table-cell>
          <table:table-cell office:value-type="string">
            <text:p>D0g3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1, 1, 0, 3, 2, 1, 0)</text:p>
          </table:table-cell>
          <table:table-cell office:value-type="string">
            <text:p>DarthCJ8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derk</text:p>
          </table:table-cell>
          <table:table-cell office:value-type="string">
            <text:p>(1, 0, 1, 2, 0, 2, 0)</text:p>
          </table:table-cell>
          <table:table-cell office:value-type="string">
            <text:p>der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O_PINK" table:style-name="ta21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TOTO_PINK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1, 1, 0, 3, 2, 1, 0)</text:p>
          </table:table-cell>
          <table:table-cell office:value-type="string">
            <text:p>xXx_PeterGokuGriffin_xXx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Venikki</text:p>
          </table:table-cell>
          <table:table-cell office:value-type="string">
            <text:p>(1, 0, 1, 2, 0, 2, 0)</text:p>
          </table:table-cell>
          <table:table-cell office:value-type="string">
            <text:p>Venikk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r.Feeny</text:p>
          </table:table-cell>
          <table:table-cell office:value-type="string">
            <text:p>(1, 1, 0, 2, 2, 0, 0)</text:p>
          </table:table-cell>
          <table:table-cell office:value-type="string">
            <text:p>Mr.Feen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1, 0, 1, 2, 0, 2, 0)</text:p>
          </table:table-cell>
          <table:table-cell office:value-type="string">
            <text:p>Twiligh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UNAKA" table:style-name="ta21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Yunaka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hnissugah</text:p>
          </table:table-cell>
          <table:table-cell office:value-type="string">
            <text:p>(0, 0, 0, 0, 0, 0, 1)</text:p>
          </table:table-cell>
          <table:table-cell office:value-type="string">
            <text:p>Shnissugah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. Phantm</text:p>
          </table:table-cell>
          <table:table-cell office:value-type="string">
            <text:p>(1, 0, 1, 2, 0, 2, 0)</text:p>
          </table:table-cell>
          <table:table-cell office:value-type="string">
            <text:p>S. Phant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Floppy_duck049</text:p>
          </table:table-cell>
          <table:table-cell office:value-type="string">
            <text:p>(1, 1, 0, 2, 2, 0, 0)</text:p>
          </table:table-cell>
          <table:table-cell office:value-type="string">
            <text:p>Floppy_duck049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ev7x</text:p>
          </table:table-cell>
          <table:table-cell office:value-type="string">
            <text:p>(2, 2, 0, 4, 4, 0, 0)</text:p>
          </table:table-cell>
          <table:table-cell office:value-type="string">
            <text:p>sev7x</text:p>
          </table:table-cell>
          <table:table-cell office:value-type="string">
            <text:p>(2, 2, 0, 4, 4, 0, 0)</text:p>
          </table:table-cell>
          <table:table-cell table:number-columns-repeated="1020"/>
        </table:table-row>
        <table:table-row table:style-name="ro1">
          <table:table-cell office:value-type="string">
            <text:p>D0g3</text:p>
          </table:table-cell>
          <table:table-cell office:value-type="string">
            <text:p>(1, 0, 1, 3, 1, 2, 0)</text:p>
          </table:table-cell>
          <table:table-cell office:value-type="string">
            <text:p>D0g3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TommySN</text:p>
          </table:table-cell>
          <table:table-cell office:value-type="string">
            <text:p>(0, 0, 0, 0, 0, 0, 1)</text:p>
          </table:table-cell>
          <table:table-cell office:value-type="string">
            <text:p>TommyS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1, 0, 1, 2, 0, 2, 0)</text:p>
          </table:table-cell>
          <table:table-cell office:value-type="string">
            <text:p>Bhan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tepKnightUp</text:p>
          </table:table-cell>
          <table:table-cell office:value-type="string">
            <text:p>(1, 1, 0, 2, 2, 0, 0)</text:p>
          </table:table-cell>
          <table:table-cell office:value-type="string">
            <text:p>StepKnightUp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READ</text:p>
          </table:table-cell>
          <table:table-cell office:value-type="string">
            <text:p>(1, 1, 0, 2, 2, 0, 0)</text:p>
          </table:table-cell>
          <table:table-cell office:value-type="string">
            <text:p>DREA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1, 1, 0, 3, 2, 1, 0)</text:p>
          </table:table-cell>
          <table:table-cell office:value-type="string">
            <text:p>Twilight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Black Lemonade</text:p>
          </table:table-cell>
          <table:table-cell office:value-type="string">
            <text:p>(1, 0, 1, 3, 1, 2, 0)</text:p>
          </table:table-cell>
          <table:table-cell office:value-type="string">
            <text:p>Black Lemonade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NATOR" table:style-name="ta21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Dominator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MrNubs</text:p>
          </table:table-cell>
          <table:table-cell office:value-type="string">
            <text:p>(1, 1, 0, 2, 2, 0, 0)</text:p>
          </table:table-cell>
          <table:table-cell office:value-type="string">
            <text:p>MrNub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oobii</text:p>
          </table:table-cell>
          <table:table-cell office:value-type="string">
            <text:p>(1, 1, 0, 2, 2, 0, 0)</text:p>
          </table:table-cell>
          <table:table-cell office:value-type="string">
            <text:p>poobi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rymlynn</text:p>
          </table:table-cell>
          <table:table-cell office:value-type="string">
            <text:p>(1, 1, 0, 3, 2, 1, 0)</text:p>
          </table:table-cell>
          <table:table-cell office:value-type="string">
            <text:p>Grymlynn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Venikki</text:p>
          </table:table-cell>
          <table:table-cell office:value-type="string">
            <text:p>(1, 1, 0, 2, 2, 0, 0)</text:p>
          </table:table-cell>
          <table:table-cell office:value-type="string">
            <text:p>Venikk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1, 1, 0, 4, 3, 1, 0)</text:p>
          </table:table-cell>
          <table:table-cell office:value-type="string">
            <text:p>Shaine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2, 2, 0, 8, 6, 2, 0)</text:p>
          </table:table-cell>
          <table:table-cell office:value-type="string">
            <text:p>BeastModePaul</text:p>
          </table:table-cell>
          <table:table-cell office:value-type="string">
            <text:p>(2, 2, 0, 8, 6, 2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2, 2, 0, 9, 6, 3, 0)</text:p>
          </table:table-cell>
          <table:table-cell office:value-type="string">
            <text:p>Epic_Gabriel</text:p>
          </table:table-cell>
          <table:table-cell office:value-type="string">
            <text:p>(2, 2, 0, 9, 6, 3, 0)</text:p>
          </table:table-cell>
          <table:table-cell table:number-columns-repeated="1020"/>
        </table:table-row>
        <table:table-row table:style-name="ro1">
          <table:table-cell office:value-type="string">
            <text:p>Squish</text:p>
          </table:table-cell>
          <table:table-cell office:value-type="string">
            <text:p>(1, 1, 0, 2, 2, 0, 0)</text:p>
          </table:table-cell>
          <table:table-cell office:value-type="string">
            <text:p>Squis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MoC</text:p>
          </table:table-cell>
          <table:table-cell office:value-type="string">
            <text:p>(1, 1, 0, 2, 2, 0, 0)</text:p>
          </table:table-cell>
          <table:table-cell office:value-type="string">
            <text:p>BMoC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anzana</text:p>
          </table:table-cell>
          <table:table-cell office:value-type="string">
            <text:p>(1, 1, 0, 2, 2, 0, 0)</text:p>
          </table:table-cell>
          <table:table-cell office:value-type="string">
            <text:p>Manzan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ESAM</text:p>
          </table:table-cell>
          <table:table-cell office:value-type="string">
            <text:p>(1, 1, 0, 3, 2, 1, 0)</text:p>
          </table:table-cell>
          <table:table-cell office:value-type="string">
            <text:p>ESAM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Karu!</text:p>
          </table:table-cell>
          <table:table-cell office:value-type="string">
            <text:p>(1, 1, 0, 4, 3, 1, 0)</text:p>
          </table:table-cell>
          <table:table-cell office:value-type="string">
            <text:p>Karu!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NIC" table:style-name="ta21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Tunic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poobii</text:p>
          </table:table-cell>
          <table:table-cell office:value-type="string">
            <text:p>(1, 0, 1, 2, 0, 2, 0)</text:p>
          </table:table-cell>
          <table:table-cell office:value-type="string">
            <text:p>poobi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(1, 0, 1, 2, 0, 2, 0)</text:p>
          </table:table-cell>
          <table:table-cell office:value-type="string">
            <text:p>Samerson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0G3" table:style-name="ta21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D0g3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1, 1, 0, 2, 2, 0, 0)</text:p>
          </table:table-cell>
          <table:table-cell office:value-type="string">
            <text:p>Vinny, The Lic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rymlynn</text:p>
          </table:table-cell>
          <table:table-cell office:value-type="string">
            <text:p>(1, 0, 1, 3, 1, 2, 0)</text:p>
          </table:table-cell>
          <table:table-cell office:value-type="string">
            <text:p>Grymlynn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Yunaka</text:p>
          </table:table-cell>
          <table:table-cell office:value-type="string">
            <text:p>(1, 1, 0, 3, 2, 1, 0)</text:p>
          </table:table-cell>
          <table:table-cell office:value-type="string">
            <text:p>Yunaka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1, 1, 0, 2, 2, 0, 0)</text:p>
          </table:table-cell>
          <table:table-cell office:value-type="string">
            <text:p>Twiligh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loax</text:p>
          </table:table-cell>
          <table:table-cell office:value-type="string">
            <text:p>(1, 1, 0, 2, 2, 0, 0)</text:p>
          </table:table-cell>
          <table:table-cell office:value-type="string">
            <text:p>Koloa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1, 0, 1, 2, 0, 2, 0)</text:p>
          </table:table-cell>
          <table:table-cell office:value-type="string">
            <text:p>Benj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Luffysupreme</text:p>
          </table:table-cell>
          <table:table-cell office:value-type="string">
            <text:p>(0, 0, 0, 0, 0, 0, 1)</text:p>
          </table:table-cell>
          <table:table-cell office:value-type="string">
            <text:p>Luffysuprem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Viprskreen</text:p>
          </table:table-cell>
          <table:table-cell office:value-type="string">
            <text:p>(0, 0, 0, 0, 0, 0, 1)</text:p>
          </table:table-cell>
          <table:table-cell office:value-type="string">
            <text:p>Viprskree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limBubbles</text:p>
          </table:table-cell>
          <table:table-cell office:value-type="string">
            <text:p>(0, 0, 0, 0, 0, 0, 1)</text:p>
          </table:table-cell>
          <table:table-cell office:value-type="string">
            <text:p>SlimBubbles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Doormatt</text:p>
          </table:table-cell>
          <table:table-cell office:value-type="string">
            <text:p>(1, 1, 0, 2, 2, 0, 0)</text:p>
          </table:table-cell>
          <table:table-cell office:value-type="string">
            <text:p>Doormat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GK</text:p>
          </table:table-cell>
          <table:table-cell office:value-type="string">
            <text:p>(1, 1, 0, 2, 2, 0, 0)</text:p>
          </table:table-cell>
          <table:table-cell office:value-type="string">
            <text:p>DG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avé</text:p>
          </table:table-cell>
          <table:table-cell office:value-type="string">
            <text:p>(1, 1, 0, 2, 2, 0, 0)</text:p>
          </table:table-cell>
          <table:table-cell office:value-type="string">
            <text:p>Navé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ori</text:p>
          </table:table-cell>
          <table:table-cell office:value-type="string">
            <text:p>(1, 1, 0, 3, 2, 1, 0)</text:p>
          </table:table-cell>
          <table:table-cell office:value-type="string">
            <text:p>Nori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Viri</text:p>
          </table:table-cell>
          <table:table-cell office:value-type="string">
            <text:p>(1, 0, 1, 2, 0, 2, 0)</text:p>
          </table:table-cell>
          <table:table-cell office:value-type="string">
            <text:p>Vir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YMLYNN" table:style-name="ta21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Grymlyn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DGK</text:p>
          </table:table-cell>
          <table:table-cell office:value-type="string">
            <text:p>(1, 1, 0, 3, 2, 1, 0)</text:p>
          </table:table-cell>
          <table:table-cell office:value-type="string">
            <text:p>DGK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D0g3</text:p>
          </table:table-cell>
          <table:table-cell office:value-type="string">
            <text:p>(1, 1, 0, 3, 2, 1, 0)</text:p>
          </table:table-cell>
          <table:table-cell office:value-type="string">
            <text:p>D0g3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Dominator</text:p>
          </table:table-cell>
          <table:table-cell office:value-type="string">
            <text:p>(1, 0, 1, 3, 1, 2, 0)</text:p>
          </table:table-cell>
          <table:table-cell office:value-type="string">
            <text:p>Dominator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S. Phantm</text:p>
          </table:table-cell>
          <table:table-cell office:value-type="string">
            <text:p>(1, 0, 1, 2, 0, 2, 0)</text:p>
          </table:table-cell>
          <table:table-cell office:value-type="string">
            <text:p>S. Phant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Ginger</text:p>
          </table:table-cell>
          <table:table-cell office:value-type="string">
            <text:p>(1, 1, 0, 3, 2, 1, 0)</text:p>
          </table:table-cell>
          <table:table-cell office:value-type="string">
            <text:p>Ginger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My Dad</text:p>
          </table:table-cell>
          <table:table-cell office:value-type="string">
            <text:p>(1, 1, 0, 2, 2, 0, 0)</text:p>
          </table:table-cell>
          <table:table-cell office:value-type="string">
            <text:p>My Da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(1, 0, 1, 3, 1, 2, 0)</text:p>
          </table:table-cell>
          <table:table-cell office:value-type="string">
            <text:p>Dingodile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1, 0, 1, 2, 0, 2, 0)</text:p>
          </table:table-cell>
          <table:table-cell office:value-type="string">
            <text:p>McFunn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acky</text:p>
          </table:table-cell>
          <table:table-cell office:value-type="string">
            <text:p>(1, 1, 0, 2, 2, 0, 0)</text:p>
          </table:table-cell>
          <table:table-cell office:value-type="string">
            <text:p>Pack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1, 1, 0, 2, 2, 0, 0)</text:p>
          </table:table-cell>
          <table:table-cell office:value-type="string">
            <text:p>DarthCJ8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RilL</text:p>
          </table:table-cell>
          <table:table-cell office:value-type="string">
            <text:p>(1, 1, 0, 2, 2, 0, 0)</text:p>
          </table:table-cell>
          <table:table-cell office:value-type="string">
            <text:p>KRil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lack Lemonade</text:p>
          </table:table-cell>
          <table:table-cell office:value-type="string">
            <text:p>(1, 1, 0, 2, 2, 0, 0)</text:p>
          </table:table-cell>
          <table:table-cell office:value-type="string">
            <text:p>Black Lemonad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1, 1, 0, 2, 2, 0, 0)</text:p>
          </table:table-cell>
          <table:table-cell office:value-type="string">
            <text:p>Bhan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Viri</text:p>
          </table:table-cell>
          <table:table-cell office:value-type="string">
            <text:p>(1, 0, 1, 4, 1, 3, 0)</text:p>
          </table:table-cell>
          <table:table-cell office:value-type="string">
            <text:p>Viri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. PHANTM" table:style-name="ta21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. Phantm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Yunaka</text:p>
          </table:table-cell>
          <table:table-cell office:value-type="string">
            <text:p>(1, 1, 0, 2, 2, 0, 0)</text:p>
          </table:table-cell>
          <table:table-cell office:value-type="string">
            <text:p>Yunak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loax</text:p>
          </table:table-cell>
          <table:table-cell office:value-type="string">
            <text:p>(1, 0, 1, 3, 1, 2, 0)</text:p>
          </table:table-cell>
          <table:table-cell office:value-type="string">
            <text:p>Koloax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2, 2, 0, 4, 4, 0, 0)</text:p>
          </table:table-cell>
          <table:table-cell office:value-type="string">
            <text:p>xXx_PeterGokuGriffin_xXx</text:p>
          </table:table-cell>
          <table:table-cell office:value-type="string">
            <text:p>(2, 2, 0, 4, 4, 0, 0)</text:p>
          </table:table-cell>
          <table:table-cell table:number-columns-repeated="1020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(1, 1, 0, 2, 2, 0, 0)</text:p>
          </table:table-cell>
          <table:table-cell office:value-type="string">
            <text:p>Samerson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rymlynn</text:p>
          </table:table-cell>
          <table:table-cell office:value-type="string">
            <text:p>(1, 1, 0, 2, 2, 0, 0)</text:p>
          </table:table-cell>
          <table:table-cell office:value-type="string">
            <text:p>Grymlyn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Riku</text:p>
          </table:table-cell>
          <table:table-cell office:value-type="string">
            <text:p>(2, 0, 2, 5, 1, 4, 0)</text:p>
          </table:table-cell>
          <table:table-cell office:value-type="string">
            <text:p>Riku</text:p>
          </table:table-cell>
          <table:table-cell office:value-type="string">
            <text:p>(2, 0, 2, 5, 1, 4, 0)</text:p>
          </table:table-cell>
          <table:table-cell table:number-columns-repeated="1020"/>
        </table:table-row>
        <table:table-row table:style-name="ro1">
          <table:table-cell office:value-type="string">
            <text:p>Luffysupreme</text:p>
          </table:table-cell>
          <table:table-cell office:value-type="string">
            <text:p>(1, 1, 0, 2, 2, 0, 0)</text:p>
          </table:table-cell>
          <table:table-cell office:value-type="string">
            <text:p>Luffysuprem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oobii</text:p>
          </table:table-cell>
          <table:table-cell office:value-type="string">
            <text:p>(1, 1, 0, 2, 2, 0, 0)</text:p>
          </table:table-cell>
          <table:table-cell office:value-type="string">
            <text:p>poobi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Livan the Amnesty</text:p>
          </table:table-cell>
          <table:table-cell office:value-type="string">
            <text:p>(1, 0, 1, 2, 0, 2, 0)</text:p>
          </table:table-cell>
          <table:table-cell office:value-type="string">
            <text:p>Livan the Amnest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OG Kid</text:p>
          </table:table-cell>
          <table:table-cell office:value-type="string">
            <text:p>(1, 1, 0, 2, 2, 0, 0)</text:p>
          </table:table-cell>
          <table:table-cell office:value-type="string">
            <text:p>OG Ki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1, 1, 0, 2, 2, 0, 0)</text:p>
          </table:table-cell>
          <table:table-cell office:value-type="string">
            <text:p>Chavalava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nKaos</text:p>
          </table:table-cell>
          <table:table-cell office:value-type="string">
            <text:p>(1, 1, 0, 2, 2, 0, 0)</text:p>
          </table:table-cell>
          <table:table-cell office:value-type="string">
            <text:p>TnKao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inimaxify</text:p>
          </table:table-cell>
          <table:table-cell office:value-type="string">
            <text:p>(1, 1, 0, 2, 2, 0, 0)</text:p>
          </table:table-cell>
          <table:table-cell office:value-type="string">
            <text:p>Minimaxif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JMxfia</text:p>
          </table:table-cell>
          <table:table-cell office:value-type="string">
            <text:p>(1, 0, 1, 2, 0, 2, 0)</text:p>
          </table:table-cell>
          <table:table-cell office:value-type="string">
            <text:p>JMxfi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_SLAM" table:style-name="ta22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B_Slam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BooBell</text:p>
          </table:table-cell>
          <table:table-cell office:value-type="string">
            <text:p>(1, 1, 0, 2, 2, 0, 0)</text:p>
          </table:table-cell>
          <table:table-cell office:value-type="string">
            <text:p>BooBel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ebat</text:p>
          </table:table-cell>
          <table:table-cell office:value-type="string">
            <text:p>(1, 1, 0, 3, 2, 1, 0)</text:p>
          </table:table-cell>
          <table:table-cell office:value-type="string">
            <text:p>ebat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(1, 0, 1, 2, 0, 2, 0)</text:p>
          </table:table-cell>
          <table:table-cell office:value-type="string">
            <text:p>Dingodil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WNBD3" table:style-name="ta22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hawnbd3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yntax</text:p>
          </table:table-cell>
          <table:table-cell office:value-type="string">
            <text:p>(0, 0, 0, 0, 0, 0, 1)</text:p>
          </table:table-cell>
          <table:table-cell office:value-type="string">
            <text:p>syntax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chpstks</text:p>
          </table:table-cell>
          <table:table-cell office:value-type="string">
            <text:p>(1, 0, 1, 2, 0, 2, 0)</text:p>
          </table:table-cell>
          <table:table-cell office:value-type="string">
            <text:p>chpstk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GoldenDark</text:p>
          </table:table-cell>
          <table:table-cell office:value-type="string">
            <text:p>(1, 0, 1, 2, 0, 2, 0)</text:p>
          </table:table-cell>
          <table:table-cell office:value-type="string">
            <text:p>GoldenDar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AX" table:style-name="ta22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yntax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hawnbd3</text:p>
          </table:table-cell>
          <table:table-cell office:value-type="string">
            <text:p>(0, 0, 0, 0, 0, 0, 1)</text:p>
          </table:table-cell>
          <table:table-cell office:value-type="string">
            <text:p>Shawnbd3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Kobe</text:p>
          </table:table-cell>
          <table:table-cell office:value-type="string">
            <text:p>(0, 0, 0, 0, 0, 0, 1)</text:p>
          </table:table-cell>
          <table:table-cell office:value-type="string">
            <text:p>Kob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1, 1, 0, 3, 2, 1, 0)</text:p>
          </table:table-cell>
          <table:table-cell office:value-type="string">
            <text:p>LuMiSaDi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1, 0, 1, 2, 0, 2, 0)</text:p>
          </table:table-cell>
          <table:table-cell office:value-type="string">
            <text:p>Chavalav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IMROD69</text:p>
          </table:table-cell>
          <table:table-cell office:value-type="string">
            <text:p>(0, 0, 0, 0, 0, 0, 1)</text:p>
          </table:table-cell>
          <table:table-cell office:value-type="string">
            <text:p>NIMROD69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Woofie87</text:p>
          </table:table-cell>
          <table:table-cell office:value-type="string">
            <text:p>(0, 0, 0, 0, 0, 0, 1)</text:p>
          </table:table-cell>
          <table:table-cell office:value-type="string">
            <text:p>Woofie87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Mario Circuit 3</text:p>
          </table:table-cell>
          <table:table-cell office:value-type="string">
            <text:p>(1, 0, 1, 3, 1, 2, 0)</text:p>
          </table:table-cell>
          <table:table-cell office:value-type="string">
            <text:p>Mario Circuit 3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LSDEEZNUTS</text:p>
          </table:table-cell>
          <table:table-cell office:value-type="string">
            <text:p>(1, 1, 0, 2, 2, 0, 0)</text:p>
          </table:table-cell>
          <table:table-cell office:value-type="string">
            <text:p>LSDEEZNUT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y Dad</text:p>
          </table:table-cell>
          <table:table-cell office:value-type="string">
            <text:p>(1, 0, 1, 2, 0, 2, 0)</text:p>
          </table:table-cell>
          <table:table-cell office:value-type="string">
            <text:p>My Da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AN PAPITAS" table:style-name="ta22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Jean Papitas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GoldenDark</text:p>
          </table:table-cell>
          <table:table-cell office:value-type="string">
            <text:p>(1, 1, 0, 2, 2, 0, 0)</text:p>
          </table:table-cell>
          <table:table-cell office:value-type="string">
            <text:p>GoldenDar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be</text:p>
          </table:table-cell>
          <table:table-cell office:value-type="string">
            <text:p>(0, 0, 0, 0, 0, 0, 1)</text:p>
          </table:table-cell>
          <table:table-cell office:value-type="string">
            <text:p>Kob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Madera</text:p>
          </table:table-cell>
          <table:table-cell office:value-type="string">
            <text:p>(1, 0, 1, 2, 0, 2, 0)</text:p>
          </table:table-cell>
          <table:table-cell office:value-type="string">
            <text:p>Mader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(1, 1, 0, 3, 2, 1, 0)</text:p>
          </table:table-cell>
          <table:table-cell office:value-type="string">
            <text:p>Dingodile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1, 0, 1, 2, 0, 2, 0)</text:p>
          </table:table-cell>
          <table:table-cell office:value-type="string">
            <text:p>LuMiSaD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ITE" table:style-name="ta22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elite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Pendragon</text:p>
          </table:table-cell>
          <table:table-cell office:value-type="string">
            <text:p>(1, 0, 1, 2, 0, 2, 0)</text:p>
          </table:table-cell>
          <table:table-cell office:value-type="string">
            <text:p>Pendrago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(1, 0, 1, 2, 0, 2, 0)</text:p>
          </table:table-cell>
          <table:table-cell office:value-type="string">
            <text:p>Dingodil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laine</text:p>
          </table:table-cell>
          <table:table-cell office:value-type="string">
            <text:p>(0, 0, 0, 0, 0, 0, 1)</text:p>
          </table:table-cell>
          <table:table-cell office:value-type="string">
            <text:p>Blain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erph</text:p>
          </table:table-cell>
          <table:table-cell office:value-type="string">
            <text:p>(0, 0, 0, 0, 0, 0, 1)</text:p>
          </table:table-cell>
          <table:table-cell office:value-type="string">
            <text:p>Serph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 CHUCKSTER" table:style-name="ta22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The Chuckster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ebat</text:p>
          </table:table-cell>
          <table:table-cell office:value-type="string">
            <text:p>(1, 1, 0, 2, 2, 0, 0)</text:p>
          </table:table-cell>
          <table:table-cell office:value-type="string">
            <text:p>eba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fiend</text:p>
          </table:table-cell>
          <table:table-cell office:value-type="string">
            <text:p>(1, 0, 1, 2, 0, 2, 0)</text:p>
          </table:table-cell>
          <table:table-cell office:value-type="string">
            <text:p>fien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ooBell</text:p>
          </table:table-cell>
          <table:table-cell office:value-type="string">
            <text:p>(1, 1, 0, 2, 2, 0, 0)</text:p>
          </table:table-cell>
          <table:table-cell office:value-type="string">
            <text:p>BooBel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endragon</text:p>
          </table:table-cell>
          <table:table-cell office:value-type="string">
            <text:p>(1, 0, 1, 2, 0, 2, 0)</text:p>
          </table:table-cell>
          <table:table-cell office:value-type="string">
            <text:p>Pendrago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Eliastar</text:p>
          </table:table-cell>
          <table:table-cell office:value-type="string">
            <text:p>(1, 1, 0, 2, 2, 0, 0)</text:p>
          </table:table-cell>
          <table:table-cell office:value-type="string">
            <text:p>Eliasta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Viri</text:p>
          </table:table-cell>
          <table:table-cell office:value-type="string">
            <text:p>(0, 0, 0, 0, 0, 0, 1)</text:p>
          </table:table-cell>
          <table:table-cell office:value-type="string">
            <text:p>Viri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Dingodile</text:p>
          </table:table-cell>
          <table:table-cell office:value-type="string">
            <text:p>(1, 0, 1, 2, 0, 2, 0)</text:p>
          </table:table-cell>
          <table:table-cell office:value-type="string">
            <text:p>Dingodil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1, 1, 0, 2, 2, 0, 0)</text:p>
          </table:table-cell>
          <table:table-cell office:value-type="string">
            <text:p>LuMiSaD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y Dad</text:p>
          </table:table-cell>
          <table:table-cell office:value-type="string">
            <text:p>(1, 1, 0, 2, 2, 0, 0)</text:p>
          </table:table-cell>
          <table:table-cell office:value-type="string">
            <text:p>My Da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r. J</text:p>
          </table:table-cell>
          <table:table-cell office:value-type="string">
            <text:p>(1, 1, 0, 2, 2, 0, 0)</text:p>
          </table:table-cell>
          <table:table-cell office:value-type="string">
            <text:p>Mr. J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1, 0, 3, 2, 1, 0)</text:p>
          </table:table-cell>
          <table:table-cell office:value-type="string">
            <text:p>Hungrybox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Black Lemonade</text:p>
          </table:table-cell>
          <table:table-cell office:value-type="string">
            <text:p>(1, 0, 1, 2, 0, 2, 0)</text:p>
          </table:table-cell>
          <table:table-cell office:value-type="string">
            <text:p>Black Lemonad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uperStatic</text:p>
          </table:table-cell>
          <table:table-cell office:value-type="string">
            <text:p>(2, 2, 0, 5, 4, 1, 0)</text:p>
          </table:table-cell>
          <table:table-cell office:value-type="string">
            <text:p>SuperStatic</text:p>
          </table:table-cell>
          <table:table-cell office:value-type="string">
            <text:p>(2, 2, 0, 5, 4, 1, 0)</text:p>
          </table:table-cell>
          <table:table-cell table:number-columns-repeated="1020"/>
        </table:table-row>
        <table:table-row table:style-name="ro1">
          <table:table-cell office:value-type="string">
            <text:p>Navé</text:p>
          </table:table-cell>
          <table:table-cell office:value-type="string">
            <text:p>(1, 0, 1, 2, 0, 2, 0)</text:p>
          </table:table-cell>
          <table:table-cell office:value-type="string">
            <text:p>Navé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ocks</text:p>
          </table:table-cell>
          <table:table-cell office:value-type="string">
            <text:p>(1, 1, 0, 2, 2, 0, 0)</text:p>
          </table:table-cell>
          <table:table-cell office:value-type="string">
            <text:p>Sock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aru!</text:p>
          </table:table-cell>
          <table:table-cell office:value-type="string">
            <text:p>(1, 0, 1, 2, 0, 2, 0)</text:p>
          </table:table-cell>
          <table:table-cell office:value-type="string">
            <text:p>Karu!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ori</text:p>
          </table:table-cell>
          <table:table-cell office:value-type="string">
            <text:p>(1, 0, 1, 2, 0, 2, 0)</text:p>
          </table:table-cell>
          <table:table-cell office:value-type="string">
            <text:p>Nor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BAT" table:style-name="ta22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ebat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The Chuckster</text:p>
          </table:table-cell>
          <table:table-cell office:value-type="string">
            <text:p>(1, 0, 1, 2, 0, 2, 0)</text:p>
          </table:table-cell>
          <table:table-cell office:value-type="string">
            <text:p>The Chuckster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_Slam</text:p>
          </table:table-cell>
          <table:table-cell office:value-type="string">
            <text:p>(1, 0, 1, 3, 1, 2, 0)</text:p>
          </table:table-cell>
          <table:table-cell office:value-type="string">
            <text:p>B_Slam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MrNubs</text:p>
          </table:table-cell>
          <table:table-cell office:value-type="string">
            <text:p>(0, 0, 0, 0, 0, 0, 1)</text:p>
          </table:table-cell>
          <table:table-cell office:value-type="string">
            <text:p>MrNubs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JediSmash</text:p>
          </table:table-cell>
          <table:table-cell office:value-type="string">
            <text:p>(0, 0, 0, 0, 0, 0, 1)</text:p>
          </table:table-cell>
          <table:table-cell office:value-type="string">
            <text:p>JediSmash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VÉ" table:style-name="ta22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Navé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mele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18"/>
        </table:table-row>
        <table:table-row table:style-name="ro1">
          <table:table-cell office:value-type="string">
            <text:p>LuMiSaDi</text:p>
          </table:table-cell>
          <table:table-cell office:value-type="string">
            <text:p>(1, 1, 0, 2, 2, 0, 0)</text:p>
          </table:table-cell>
          <table:table-cell office:value-type="string">
            <text:p>Alwaysinsync</text:p>
          </table:table-cell>
          <table:table-cell office:value-type="string">
            <text:p>(0, 0, 0, 0, 0, 0, 1)</text:p>
          </table:table-cell>
          <table:table-cell office:value-type="string">
            <text:p>LuMiSaDi</text:p>
          </table:table-cell>
          <table:table-cell office:value-type="string">
            <text:p>(1, 1, 0, 2, 2, 0, 1)</text:p>
          </table:table-cell>
          <table:table-cell table:number-columns-repeated="1018"/>
        </table:table-row>
        <table:table-row table:style-name="ro1">
          <table:table-cell office:value-type="string">
            <text:p>chpstks</text:p>
          </table:table-cell>
          <table:table-cell office:value-type="string">
            <text:p>(1, 0, 1, 2, 0, 2, 0)</text:p>
          </table:table-cell>
          <table:table-cell office:value-type="string">
            <text:p>OG Kid</text:p>
          </table:table-cell>
          <table:table-cell office:value-type="string">
            <text:p>(0, 0, 0, 0, 0, 0, 1)</text:p>
          </table:table-cell>
          <table:table-cell office:value-type="string">
            <text:p>chpstks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office:value-type="string">
            <text:p>Pendragon</text:p>
          </table:table-cell>
          <table:table-cell office:value-type="string">
            <text:p>(1, 1, 0, 2, 2, 0, 0)</text:p>
          </table:table-cell>
          <table:table-cell office:value-type="string">
            <text:p>LuMiSaDi</text:p>
          </table:table-cell>
          <table:table-cell office:value-type="string">
            <text:p>(0, 0, 0, 0, 0, 0, 1)</text:p>
          </table:table-cell>
          <table:table-cell office:value-type="string">
            <text:p>Pendragon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Wiccan</text:p>
          </table:table-cell>
          <table:table-cell office:value-type="string">
            <text:p>(1, 0, 1, 2, 0, 2, 0)</text:p>
          </table:table-cell>
          <table:table-cell table:number-columns-repeated="2"/>
          <table:table-cell office:value-type="string">
            <text:p>Wiccan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office:value-type="string">
            <text:p>juno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juno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poobii</text:p>
          </table:table-cell>
          <table:table-cell office:value-type="string">
            <text:p>(1, 1, 0, 3, 2, 1, 0)</text:p>
          </table:table-cell>
          <table:table-cell table:number-columns-repeated="2"/>
          <table:table-cell office:value-type="string">
            <text:p>poobii</text:p>
          </table:table-cell>
          <table:table-cell office:value-type="string">
            <text:p>(1, 1, 0, 3, 2, 1, 0)</text:p>
          </table:table-cell>
          <table:table-cell table:number-columns-repeated="1018"/>
        </table:table-row>
        <table:table-row table:style-name="ro1">
          <table:table-cell office:value-type="string">
            <text:p>Benji</text:p>
          </table:table-cell>
          <table:table-cell office:value-type="string">
            <text:p>(1, 1, 0, 3, 2, 1, 0)</text:p>
          </table:table-cell>
          <table:table-cell table:number-columns-repeated="2"/>
          <table:table-cell office:value-type="string">
            <text:p>Benji</text:p>
          </table:table-cell>
          <table:table-cell office:value-type="string">
            <text:p>(1, 1, 0, 3, 2, 1, 0)</text:p>
          </table:table-cell>
          <table:table-cell table:number-columns-repeated="1018"/>
        </table:table-row>
        <table:table-row table:style-name="ro1"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table:number-columns-repeated="2"/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table:number-columns-repeated="2"/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office:value-type="string">
            <text:p>Gameboyfreshy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Gameboyfreshy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DGK</text:p>
          </table:table-cell>
          <table:table-cell office:value-type="string">
            <text:p>(1, 0, 1, 2, 0, 2, 0)</text:p>
          </table:table-cell>
          <table:table-cell table:number-columns-repeated="2"/>
          <table:table-cell office:value-type="string">
            <text:p>DGK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office:value-type="string">
            <text:p>Sandwich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Sandwich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Doormatt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Doormatt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KRilL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KRilL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The Chuckster</text:p>
          </table:table-cell>
          <table:table-cell office:value-type="string">
            <text:p>(1, 1, 0, 2, 2, 0, 0)</text:p>
          </table:table-cell>
          <table:table-cell table:number-columns-repeated="2"/>
          <table:table-cell office:value-type="string">
            <text:p>The Chuckster</text:p>
          </table:table-cell>
          <table:table-cell office:value-type="string">
            <text:p>(1, 1, 0, 2, 2, 0, 0)</text:p>
          </table:table-cell>
          <table:table-cell table:number-columns-repeated="1018"/>
        </table:table-row>
        <table:table-row table:style-name="ro1">
          <table:table-cell office:value-type="string">
            <text:p>D0g3</text:p>
          </table:table-cell>
          <table:table-cell office:value-type="string">
            <text:p>(1, 0, 1, 2, 0, 2, 0)</text:p>
          </table:table-cell>
          <table:table-cell table:number-columns-repeated="2"/>
          <table:table-cell office:value-type="string">
            <text:p>D0g3</text:p>
          </table:table-cell>
          <table:table-cell office:value-type="string">
            <text:p>(1, 0, 1, 2, 0, 2, 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lwaysinsync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OG Kid</text:p>
          </table:table-cell>
          <table:table-cell office:value-type="string">
            <text:p>(0, 0, 0, 0, 0, 0, 1)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DERA" table:style-name="ta22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Madera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Wiccan</text:p>
          </table:table-cell>
          <table:table-cell office:value-type="string">
            <text:p>(1, 1, 0, 3, 2, 1, 0)</text:p>
          </table:table-cell>
          <table:table-cell office:value-type="string">
            <text:p>Wiccan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Jean Papitas</text:p>
          </table:table-cell>
          <table:table-cell office:value-type="string">
            <text:p>(1, 1, 0, 2, 2, 0, 0)</text:p>
          </table:table-cell>
          <table:table-cell office:value-type="string">
            <text:p>Jean Papita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urehyper</text:p>
          </table:table-cell>
          <table:table-cell office:value-type="string">
            <text:p>(1, 1, 0, 2, 2, 0, 0)</text:p>
          </table:table-cell>
          <table:table-cell office:value-type="string">
            <text:p>Surehype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0, 1, 3, 1, 2, 0)</text:p>
          </table:table-cell>
          <table:table-cell office:value-type="string">
            <text:p>BeastModePaul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1, 1, 0, 3, 2, 1, 0)</text:p>
          </table:table-cell>
          <table:table-cell office:value-type="string">
            <text:p>Benji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0, 1, 5, 2, 3, 0)</text:p>
          </table:table-cell>
          <table:table-cell office:value-type="string">
            <text:p>Epic_Gabriel</text:p>
          </table:table-cell>
          <table:table-cell office:value-type="string">
            <text:p>(1, 0, 1, 5, 2, 3, 0)</text:p>
          </table:table-cell>
          <table:table-cell table:number-columns-repeated="1020"/>
        </table:table-row>
        <table:table-row table:style-name="ro1">
          <table:table-cell office:value-type="string">
            <text:p>Vinny, The Lick</text:p>
          </table:table-cell>
          <table:table-cell office:value-type="string">
            <text:p>(1, 0, 1, 3, 1, 2, 0)</text:p>
          </table:table-cell>
          <table:table-cell office:value-type="string">
            <text:p>Vinny, The Lick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CarlJT</text:p>
          </table:table-cell>
          <table:table-cell office:value-type="string">
            <text:p>(0, 0, 0, 0, 0, 0, 1)</text:p>
          </table:table-cell>
          <table:table-cell office:value-type="string">
            <text:p>CarlJT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ThitKho</text:p>
          </table:table-cell>
          <table:table-cell office:value-type="string">
            <text:p>(1, 1, 0, 2, 2, 0, 0)</text:p>
          </table:table-cell>
          <table:table-cell office:value-type="string">
            <text:p>ThitKh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urtles</text:p>
          </table:table-cell>
          <table:table-cell office:value-type="string">
            <text:p>(1, 1, 0, 3, 2, 1, 0)</text:p>
          </table:table-cell>
          <table:table-cell office:value-type="string">
            <text:p>Turtles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1, 0, 1, 2, 0, 2, 0)</text:p>
          </table:table-cell>
          <table:table-cell office:value-type="string">
            <text:p>Strobic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REHYPER" table:style-name="ta22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urehyper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Pendragon</text:p>
          </table:table-cell>
          <table:table-cell office:value-type="string">
            <text:p>(1, 1, 0, 3, 2, 1, 0)</text:p>
          </table:table-cell>
          <table:table-cell office:value-type="string">
            <text:p>Pendragon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fiend</text:p>
          </table:table-cell>
          <table:table-cell office:value-type="string">
            <text:p>(1, 1, 0, 2, 2, 0, 0)</text:p>
          </table:table-cell>
          <table:table-cell office:value-type="string">
            <text:p>fien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adera</text:p>
          </table:table-cell>
          <table:table-cell office:value-type="string">
            <text:p>(1, 0, 1, 2, 0, 2, 0)</text:p>
          </table:table-cell>
          <table:table-cell office:value-type="string">
            <text:p>Mader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Wiccan</text:p>
          </table:table-cell>
          <table:table-cell office:value-type="string">
            <text:p>(1, 1, 0, 2, 2, 0, 0)</text:p>
          </table:table-cell>
          <table:table-cell office:value-type="string">
            <text:p>Wicca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sysilex</text:p>
          </table:table-cell>
          <table:table-cell office:value-type="string">
            <text:p>(1, 1, 0, 3, 2, 1, 0)</text:p>
          </table:table-cell>
          <table:table-cell office:value-type="string">
            <text:p>Psysilex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Venikki</text:p>
          </table:table-cell>
          <table:table-cell office:value-type="string">
            <text:p>(1, 0, 1, 2, 0, 2, 0)</text:p>
          </table:table-cell>
          <table:table-cell office:value-type="string">
            <text:p>Venikk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INE" table:style-name="ta23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Blaine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JediSmash</text:p>
          </table:table-cell>
          <table:table-cell office:value-type="string">
            <text:p>(1, 1, 0, 2, 2, 0, 0)</text:p>
          </table:table-cell>
          <table:table-cell office:value-type="string">
            <text:p>JediSmas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rincessPopkorn</text:p>
          </table:table-cell>
          <table:table-cell office:value-type="string">
            <text:p>(1, 1, 0, 3, 2, 1, 0)</text:p>
          </table:table-cell>
          <table:table-cell office:value-type="string">
            <text:p>PrincessPopkorn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Dark4orce</text:p>
          </table:table-cell>
          <table:table-cell office:value-type="string">
            <text:p>(1, 0, 1, 2, 0, 2, 0)</text:p>
          </table:table-cell>
          <table:table-cell office:value-type="string">
            <text:p>Dark4orc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elite</text:p>
          </table:table-cell>
          <table:table-cell office:value-type="string">
            <text:p>(0, 0, 0, 0, 0, 0, 1)</text:p>
          </table:table-cell>
          <table:table-cell office:value-type="string">
            <text:p>elit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poobii</text:p>
          </table:table-cell>
          <table:table-cell office:value-type="string">
            <text:p>(1, 0, 1, 3, 1, 2, 0)</text:p>
          </table:table-cell>
          <table:table-cell office:value-type="string">
            <text:p>poobii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Kakarot</text:p>
          </table:table-cell>
          <table:table-cell office:value-type="string">
            <text:p>(1, 1, 0, 2, 2, 0, 0)</text:p>
          </table:table-cell>
          <table:table-cell office:value-type="string">
            <text:p>Kakaro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juno</text:p>
          </table:table-cell>
          <table:table-cell office:value-type="string">
            <text:p>(1, 0, 1, 2, 0, 2, 0)</text:p>
          </table:table-cell>
          <table:table-cell office:value-type="string">
            <text:p>juno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Gogemon</text:p>
          </table:table-cell>
          <table:table-cell office:value-type="string">
            <text:p>(1, 1, 0, 2, 2, 0, 0)</text:p>
          </table:table-cell>
          <table:table-cell office:value-type="string">
            <text:p>Gogemo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LightningCam</text:p>
          </table:table-cell>
          <table:table-cell office:value-type="string">
            <text:p>(1, 0, 1, 2, 0, 2, 0)</text:p>
          </table:table-cell>
          <table:table-cell office:value-type="string">
            <text:p>LightningCa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harz</text:p>
          </table:table-cell>
          <table:table-cell office:value-type="string">
            <text:p>(0, 0, 0, 0, 0, 0, 1)</text:p>
          </table:table-cell>
          <table:table-cell office:value-type="string">
            <text:p>Charz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1, 1, 0, 2, 2, 0, 0)</text:p>
          </table:table-cell>
          <table:table-cell office:value-type="string">
            <text:p>Benj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eegore</text:p>
          </table:table-cell>
          <table:table-cell office:value-type="string">
            <text:p>(1, 0, 1, 2, 0, 2, 0)</text:p>
          </table:table-cell>
          <table:table-cell office:value-type="string">
            <text:p>Keegor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NTA" table:style-name="ta23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Manta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1, 0, 1, 2, 0, 2, 0)</text:p>
          </table:table-cell>
          <table:table-cell office:value-type="string">
            <text:p>HaydenEatsShrimp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1, 0, 1, 2, 0, 2, 0)</text:p>
          </table:table-cell>
          <table:table-cell office:value-type="string">
            <text:p>Chez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DQ05" table:style-name="ta23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JDQ05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MustSeek</text:p>
          </table:table-cell>
          <table:table-cell office:value-type="string">
            <text:p>(1, 1, 0, 2, 2, 0, 0)</text:p>
          </table:table-cell>
          <table:table-cell office:value-type="string">
            <text:p>MustSee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1, 0, 1, 2, 0, 2, 0)</text:p>
          </table:table-cell>
          <table:table-cell office:value-type="string">
            <text:p>Strobic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api</text:p>
          </table:table-cell>
          <table:table-cell office:value-type="string">
            <text:p>(0, 0, 0, 0, 0, 0, 1)</text:p>
          </table:table-cell>
          <table:table-cell office:value-type="string">
            <text:p>Papi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Black Lemonade</text:p>
          </table:table-cell>
          <table:table-cell office:value-type="string">
            <text:p>(1, 0, 1, 2, 0, 2, 0)</text:p>
          </table:table-cell>
          <table:table-cell office:value-type="string">
            <text:p>Black Lemonad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omingo</text:p>
          </table:table-cell>
          <table:table-cell office:value-type="string">
            <text:p>(1, 1, 0, 2, 2, 0, 0)</text:p>
          </table:table-cell>
          <table:table-cell office:value-type="string">
            <text:p>Doming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1, 0, 1, 2, 0, 2, 0)</text:p>
          </table:table-cell>
          <table:table-cell office:value-type="string">
            <text:p>McFunn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RedPik</text:p>
          </table:table-cell>
          <table:table-cell office:value-type="string">
            <text:p>(1, 1, 0, 2, 2, 0, 0)</text:p>
          </table:table-cell>
          <table:table-cell office:value-type="string">
            <text:p>RedPik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2, 1, 1, 4, 2, 2, 0)</text:p>
          </table:table-cell>
          <table:table-cell office:value-type="string">
            <text:p>HaydenEatsShrimp</text:p>
          </table:table-cell>
          <table:table-cell office:value-type="string">
            <text:p>(2, 1, 1, 4, 2, 2, 0)</text:p>
          </table:table-cell>
          <table:table-cell table:number-columns-repeated="1020"/>
        </table:table-row>
        <table:table-row table:style-name="ro1">
          <table:table-cell office:value-type="string">
            <text:p>My Dad</text:p>
          </table:table-cell>
          <table:table-cell office:value-type="string">
            <text:p>(1, 0, 1, 3, 1, 2, 0)</text:p>
          </table:table-cell>
          <table:table-cell office:value-type="string">
            <text:p>My Dad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Leone_Ace</text:p>
          </table:table-cell>
          <table:table-cell office:value-type="string">
            <text:p>(1, 1, 0, 2, 2, 0, 0)</text:p>
          </table:table-cell>
          <table:table-cell office:value-type="string">
            <text:p>Leone_Ac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(1, 1, 0, 2, 2, 0, 0)</text:p>
          </table:table-cell>
          <table:table-cell office:value-type="string">
            <text:p>Twiligh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TSEEK" table:style-name="ta23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MustSeek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JDQ05</text:p>
          </table:table-cell>
          <table:table-cell office:value-type="string">
            <text:p>(1, 0, 1, 2, 0, 2, 0)</text:p>
          </table:table-cell>
          <table:table-cell office:value-type="string">
            <text:p>JDQ05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Jonin</text:p>
          </table:table-cell>
          <table:table-cell office:value-type="string">
            <text:p>(1, 1, 0, 3, 2, 1, 0)</text:p>
          </table:table-cell>
          <table:table-cell office:value-type="string">
            <text:p>Jonin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1, 0, 1, 2, 0, 2, 0)</text:p>
          </table:table-cell>
          <table:table-cell office:value-type="string">
            <text:p>Chez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NIN" table:style-name="ta23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Joni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Papi</text:p>
          </table:table-cell>
          <table:table-cell office:value-type="string">
            <text:p>(0, 0, 0, 0, 0, 0, 1)</text:p>
          </table:table-cell>
          <table:table-cell office:value-type="string">
            <text:p>Papi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Riku</text:p>
          </table:table-cell>
          <table:table-cell office:value-type="string">
            <text:p>(1, 0, 1, 2, 0, 2, 0)</text:p>
          </table:table-cell>
          <table:table-cell office:value-type="string">
            <text:p>Riku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ustSeek</text:p>
          </table:table-cell>
          <table:table-cell office:value-type="string">
            <text:p>(1, 0, 1, 3, 1, 2, 0)</text:p>
          </table:table-cell>
          <table:table-cell office:value-type="string">
            <text:p>MustSeek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_TWEEKIN" table:style-name="ta23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Pc_tweeki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Packet</text:p>
          </table:table-cell>
          <table:table-cell office:value-type="string">
            <text:p>(0, 0, 0, 0, 0, 0, 1)</text:p>
          </table:table-cell>
          <table:table-cell office:value-type="string">
            <text:p>Packet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ticccy</text:p>
          </table:table-cell>
          <table:table-cell office:value-type="string">
            <text:p>(1, 0, 1, 2, 0, 2, 0)</text:p>
          </table:table-cell>
          <table:table-cell office:value-type="string">
            <text:p>Sticcc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Hiddekel</text:p>
          </table:table-cell>
          <table:table-cell office:value-type="string">
            <text:p>(1, 0, 1, 2, 0, 2, 0)</text:p>
          </table:table-cell>
          <table:table-cell office:value-type="string">
            <text:p>Hiddek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CKET" table:style-name="ta23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Packet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Pc_tweekin</text:p>
          </table:table-cell>
          <table:table-cell office:value-type="string">
            <text:p>(0, 0, 0, 0, 0, 0, 1)</text:p>
          </table:table-cell>
          <table:table-cell office:value-type="string">
            <text:p>Pc_tweeki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Dark4orce</text:p>
          </table:table-cell>
          <table:table-cell office:value-type="string">
            <text:p>(0, 0, 0, 0, 0, 0, 1)</text:p>
          </table:table-cell>
          <table:table-cell office:value-type="string">
            <text:p>Dark4orc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Luffysupreme</text:p>
          </table:table-cell>
          <table:table-cell office:value-type="string">
            <text:p>(0, 0, 0, 0, 0, 0, 1)</text:p>
          </table:table-cell>
          <table:table-cell office:value-type="string">
            <text:p>Luffysupreme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Papi</text:p>
          </table:table-cell>
          <table:table-cell office:value-type="string">
            <text:p>(0, 0, 0, 0, 0, 0, 1)</text:p>
          </table:table-cell>
          <table:table-cell office:value-type="string">
            <text:p>Papi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Mario Circuit 3</text:p>
          </table:table-cell>
          <table:table-cell office:value-type="string">
            <text:p>(1, 1, 0, 2, 2, 0, 0)</text:p>
          </table:table-cell>
          <table:table-cell office:value-type="string">
            <text:p>Mario Circuit 3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1, 0, 1, 3, 1, 2, 0)</text:p>
          </table:table-cell>
          <table:table-cell office:value-type="string">
            <text:p>Strobics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Jackie Chun</text:p>
          </table:table-cell>
          <table:table-cell office:value-type="string">
            <text:p>(1, 0, 1, 3, 1, 2, 0)</text:p>
          </table:table-cell>
          <table:table-cell office:value-type="string">
            <text:p>Jackie Chun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NFBJacob</text:p>
          </table:table-cell>
          <table:table-cell office:value-type="string">
            <text:p>(1, 0, 1, 3, 1, 2, 0)</text:p>
          </table:table-cell>
          <table:table-cell office:value-type="string">
            <text:p>NFBJacob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Gameboyfreshy</text:p>
          </table:table-cell>
          <table:table-cell office:value-type="string">
            <text:p>(0, 0, 0, 0, 0, 0, 1)</text:p>
          </table:table-cell>
          <table:table-cell office:value-type="string">
            <text:p>Gameboyfreshy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DDEKEL" table:style-name="ta23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Hiddekel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PrincessPopkorn</text:p>
          </table:table-cell>
          <table:table-cell office:value-type="string">
            <text:p>(1, 1, 0, 2, 2, 0, 0)</text:p>
          </table:table-cell>
          <table:table-cell office:value-type="string">
            <text:p>PrincessPopkor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1, 0, 1, 2, 0, 2, 0)</text:p>
          </table:table-cell>
          <table:table-cell office:value-type="string">
            <text:p>Bhand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JediSmash</text:p>
          </table:table-cell>
          <table:table-cell office:value-type="string">
            <text:p>(1, 1, 0, 2, 2, 0, 0)</text:p>
          </table:table-cell>
          <table:table-cell office:value-type="string">
            <text:p>JediSmas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c_tweekin</text:p>
          </table:table-cell>
          <table:table-cell office:value-type="string">
            <text:p>(1, 1, 0, 2, 2, 0, 0)</text:p>
          </table:table-cell>
          <table:table-cell office:value-type="string">
            <text:p>Pc_tweeki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1, 0, 1, 3, 1, 2, 0)</text:p>
          </table:table-cell>
          <table:table-cell office:value-type="string">
            <text:p>HaydenEatsShrimp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masterqz</text:p>
          </table:table-cell>
          <table:table-cell office:value-type="string">
            <text:p>(1, 0, 1, 3, 1, 2, 0)</text:p>
          </table:table-cell>
          <table:table-cell office:value-type="string">
            <text:p>masterqz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BooBell</text:p>
          </table:table-cell>
          <table:table-cell office:value-type="string">
            <text:p>(1, 1, 0, 2, 2, 0, 0)</text:p>
          </table:table-cell>
          <table:table-cell office:value-type="string">
            <text:p>BooBel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picywingz11</text:p>
          </table:table-cell>
          <table:table-cell office:value-type="string">
            <text:p>(1, 1, 0, 2, 2, 0, 0)</text:p>
          </table:table-cell>
          <table:table-cell office:value-type="string">
            <text:p>spicywingz11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unktastic</text:p>
          </table:table-cell>
          <table:table-cell office:value-type="string">
            <text:p>(1, 1, 0, 2, 2, 0, 0)</text:p>
          </table:table-cell>
          <table:table-cell office:value-type="string">
            <text:p>dunktastic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Zorrin</text:p>
          </table:table-cell>
          <table:table-cell office:value-type="string">
            <text:p>(1, 1, 0, 3, 2, 1, 0)</text:p>
          </table:table-cell>
          <table:table-cell office:value-type="string">
            <text:p>Zorrin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xXx_PeterGokuGriffin_xXx</text:p>
          </table:table-cell>
          <table:table-cell office:value-type="string">
            <text:p>(1, 1, 0, 2, 2, 0, 0)</text:p>
          </table:table-cell>
          <table:table-cell office:value-type="string">
            <text:p>xXx_PeterGokuGriffin_xX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office:value-type="string">
            <text:p>Kob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owerstar</text:p>
          </table:table-cell>
          <table:table-cell office:value-type="string">
            <text:p>(1, 1, 0, 2, 2, 0, 0)</text:p>
          </table:table-cell>
          <table:table-cell office:value-type="string">
            <text:p>Powersta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1, 0, 1, 2, 0, 2, 0)</text:p>
          </table:table-cell>
          <table:table-cell office:value-type="string">
            <text:p>Benj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IMROD69</text:p>
          </table:table-cell>
          <table:table-cell office:value-type="string">
            <text:p>(1, 1, 0, 2, 2, 0, 0)</text:p>
          </table:table-cell>
          <table:table-cell office:value-type="string">
            <text:p>NIMROD69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ori</text:p>
          </table:table-cell>
          <table:table-cell office:value-type="string">
            <text:p>(1, 0, 1, 3, 1, 2, 0)</text:p>
          </table:table-cell>
          <table:table-cell office:value-type="string">
            <text:p>Nori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RK4ORCE" table:style-name="ta23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Dark4orce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Packet</text:p>
          </table:table-cell>
          <table:table-cell office:value-type="string">
            <text:p>(0, 0, 0, 0, 0, 0, 1)</text:p>
          </table:table-cell>
          <table:table-cell office:value-type="string">
            <text:p>Packet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Blaine</text:p>
          </table:table-cell>
          <table:table-cell office:value-type="string">
            <text:p>(1, 1, 0, 2, 2, 0, 0)</text:p>
          </table:table-cell>
          <table:table-cell office:value-type="string">
            <text:p>Blain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1, 0, 1, 2, 0, 2, 0)</text:p>
          </table:table-cell>
          <table:table-cell office:value-type="string">
            <text:p>Benji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CK LEMONADE" table:style-name="ta23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Black Lemonade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HaydenEatsShrimp</text:p>
          </table:table-cell>
          <table:table-cell office:value-type="string">
            <text:p>(1, 0, 1, 3, 1, 2, 0)</text:p>
          </table:table-cell>
          <table:table-cell office:value-type="string">
            <text:p>HaydenEatsShrimp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JDQ05</text:p>
          </table:table-cell>
          <table:table-cell office:value-type="string">
            <text:p>(1, 1, 0, 2, 2, 0, 0)</text:p>
          </table:table-cell>
          <table:table-cell office:value-type="string">
            <text:p>JDQ05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3, 3, 0, 8, 6, 2, 0)</text:p>
          </table:table-cell>
          <table:table-cell office:value-type="string">
            <text:p>Bhand</text:p>
          </table:table-cell>
          <table:table-cell office:value-type="string">
            <text:p>(3, 3, 0, 8, 6, 2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1, 0, 1, 3, 1, 2, 0)</text:p>
          </table:table-cell>
          <table:table-cell office:value-type="string">
            <text:p>Benji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CrazySwift</text:p>
          </table:table-cell>
          <table:table-cell office:value-type="string">
            <text:p>(1, 1, 0, 2, 2, 0, 0)</text:p>
          </table:table-cell>
          <table:table-cell office:value-type="string">
            <text:p>CrazySwif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office:value-type="string">
            <text:p>Shain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Yunaka</text:p>
          </table:table-cell>
          <table:table-cell office:value-type="string">
            <text:p>(1, 1, 0, 3, 2, 1, 0)</text:p>
          </table:table-cell>
          <table:table-cell office:value-type="string">
            <text:p>Yunaka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1, 0, 1, 2, 0, 2, 0)</text:p>
          </table:table-cell>
          <table:table-cell office:value-type="string">
            <text:p>McFunny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ElMexicano</text:p>
          </table:table-cell>
          <table:table-cell office:value-type="string">
            <text:p>(0, 0, 0, 0, 0, 0, 1)</text:p>
          </table:table-cell>
          <table:table-cell office:value-type="string">
            <text:p>ElMexicano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Ginger</text:p>
          </table:table-cell>
          <table:table-cell office:value-type="string">
            <text:p>(1, 1, 0, 2, 2, 0, 0)</text:p>
          </table:table-cell>
          <table:table-cell office:value-type="string">
            <text:p>Ginge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he Chuckster</text:p>
          </table:table-cell>
          <table:table-cell office:value-type="string">
            <text:p>(1, 1, 0, 2, 2, 0, 0)</text:p>
          </table:table-cell>
          <table:table-cell office:value-type="string">
            <text:p>The Chuckste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rymlynn</text:p>
          </table:table-cell>
          <table:table-cell office:value-type="string">
            <text:p>(1, 0, 1, 2, 0, 2, 0)</text:p>
          </table:table-cell>
          <table:table-cell office:value-type="string">
            <text:p>Grymlyn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erk</text:p>
          </table:table-cell>
          <table:table-cell office:value-type="string">
            <text:p>(1, 1, 0, 3, 2, 1, 0)</text:p>
          </table:table-cell>
          <table:table-cell office:value-type="string">
            <text:p>derk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Manzana</text:p>
          </table:table-cell>
          <table:table-cell office:value-type="string">
            <text:p>(1, 0, 1, 3, 1, 2, 0)</text:p>
          </table:table-cell>
          <table:table-cell office:value-type="string">
            <text:p>Manzana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Big</text:p>
          </table:table-cell>
          <table:table-cell office:value-type="string">
            <text:p>(1, 1, 0, 2, 2, 0, 0)</text:p>
          </table:table-cell>
          <table:table-cell office:value-type="string">
            <text:p>Big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asterqz</text:p>
          </table:table-cell>
          <table:table-cell office:value-type="string">
            <text:p>(1, 1, 0, 2, 2, 0, 0)</text:p>
          </table:table-cell>
          <table:table-cell office:value-type="string">
            <text:p>masterqz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oemiglazer67</text:p>
          </table:table-cell>
          <table:table-cell office:value-type="string">
            <text:p>(1, 0, 1, 2, 0, 2, 0)</text:p>
          </table:table-cell>
          <table:table-cell office:value-type="string">
            <text:p>noemiglazer67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D</text:p>
          </table:table-cell>
          <table:table-cell office:value-type="string">
            <text:p>(1, 1, 0, 2, 2, 0, 0)</text:p>
          </table:table-cell>
          <table:table-cell office:value-type="string">
            <text:p>C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LightningCam</text:p>
          </table:table-cell>
          <table:table-cell office:value-type="string">
            <text:p>(1, 0, 1, 2, 0, 2, 0)</text:p>
          </table:table-cell>
          <table:table-cell office:value-type="string">
            <text:p>LightningCa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KU" table:style-name="ta24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Riku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Jonin</text:p>
          </table:table-cell>
          <table:table-cell office:value-type="string">
            <text:p>(1, 1, 0, 2, 2, 0, 0)</text:p>
          </table:table-cell>
          <table:table-cell office:value-type="string">
            <text:p>Joni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nji</text:p>
          </table:table-cell>
          <table:table-cell office:value-type="string">
            <text:p>(1, 1, 0, 2, 2, 0, 0)</text:p>
          </table:table-cell>
          <table:table-cell office:value-type="string">
            <text:p>Benj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icccy</text:p>
          </table:table-cell>
          <table:table-cell office:value-type="string">
            <text:p>(1, 0, 1, 3, 1, 2, 0)</text:p>
          </table:table-cell>
          <table:table-cell office:value-type="string">
            <text:p>Sticccy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1, 1, 0, 2, 2, 0, 0)</text:p>
          </table:table-cell>
          <table:table-cell office:value-type="string">
            <text:p>Squishy~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. Phantm</text:p>
          </table:table-cell>
          <table:table-cell office:value-type="string">
            <text:p>(2, 2, 0, 5, 4, 1, 0)</text:p>
          </table:table-cell>
          <table:table-cell office:value-type="string">
            <text:p>S. Phantm</text:p>
          </table:table-cell>
          <table:table-cell office:value-type="string">
            <text:p>(2, 2, 0, 5, 4, 1, 0)</text:p>
          </table:table-cell>
          <table:table-cell table:number-columns-repeated="1020"/>
        </table:table-row>
        <table:table-row table:style-name="ro1">
          <table:table-cell office:value-type="string">
            <text:p>Aaron</text:p>
          </table:table-cell>
          <table:table-cell office:value-type="string">
            <text:p>(1, 0, 1, 2, 0, 2, 0)</text:p>
          </table:table-cell>
          <table:table-cell office:value-type="string">
            <text:p>Aaro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RonaldX</text:p>
          </table:table-cell>
          <table:table-cell office:value-type="string">
            <text:p>(1, 1, 0, 2, 2, 0, 0)</text:p>
          </table:table-cell>
          <table:table-cell office:value-type="string">
            <text:p>Ronald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Freshness</text:p>
          </table:table-cell>
          <table:table-cell office:value-type="string">
            <text:p>(1, 1, 0, 2, 2, 0, 0)</text:p>
          </table:table-cell>
          <table:table-cell office:value-type="string">
            <text:p>Freshnes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WiFi warrior</text:p>
          </table:table-cell>
          <table:table-cell office:value-type="string">
            <text:p>(1, 1, 0, 3, 2, 1, 0)</text:p>
          </table:table-cell>
          <table:table-cell office:value-type="string">
            <text:p>WiFi warrior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hpstks</text:p>
          </table:table-cell>
          <table:table-cell office:value-type="string">
            <text:p>(1, 1, 0, 2, 2, 0, 0)</text:p>
          </table:table-cell>
          <table:table-cell office:value-type="string">
            <text:p>chpstk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ESAM</text:p>
          </table:table-cell>
          <table:table-cell office:value-type="string">
            <text:p>(1, 0, 1, 4, 1, 3, 0)</text:p>
          </table:table-cell>
          <table:table-cell office:value-type="string">
            <text:p>ESAM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ICCCY" table:style-name="ta24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ticccy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Pc_tweekin</text:p>
          </table:table-cell>
          <table:table-cell office:value-type="string">
            <text:p>(1, 1, 0, 2, 2, 0, 0)</text:p>
          </table:table-cell>
          <table:table-cell office:value-type="string">
            <text:p>Pc_tweeki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1, 1, 0, 2, 2, 0, 0)</text:p>
          </table:table-cell>
          <table:table-cell office:value-type="string">
            <text:p>Bhan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Riku</text:p>
          </table:table-cell>
          <table:table-cell office:value-type="string">
            <text:p>(1, 1, 0, 3, 2, 1, 0)</text:p>
          </table:table-cell>
          <table:table-cell office:value-type="string">
            <text:p>Riku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1, 0, 2, 2, 0, 0)</text:p>
          </table:table-cell>
          <table:table-cell office:value-type="string">
            <text:p>Epic_Gabriel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0, 1, 3, 0, 3, 0)</text:p>
          </table:table-cell>
          <table:table-cell office:value-type="string">
            <text:p>BeastModePaul</text:p>
          </table:table-cell>
          <table:table-cell office:value-type="string">
            <text:p>(1, 0, 1, 3, 0, 3, 0)</text:p>
          </table:table-cell>
          <table:table-cell table:number-columns-repeated="1020"/>
        </table:table-row>
        <table:table-row table:style-name="ro1">
          <table:table-cell office:value-type="string">
            <text:p>Aaron</text:p>
          </table:table-cell>
          <table:table-cell office:value-type="string">
            <text:p>(1, 0, 1, 4, 1, 3, 0)</text:p>
          </table:table-cell>
          <table:table-cell office:value-type="string">
            <text:p>Aaron</text:p>
          </table:table-cell>
          <table:table-cell office:value-type="string">
            <text:p>(1, 0, 1, 4, 1, 3, 0)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00MBA" table:style-name="ta24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G00MBA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ChezFarach001</text:p>
          </table:table-cell>
          <table:table-cell office:value-type="string">
            <text:p>(1, 0, 1, 2, 0, 2, 0)</text:p>
          </table:table-cell>
          <table:table-cell office:value-type="string">
            <text:p>ChezFarach001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UpChuck</text:p>
          </table:table-cell>
          <table:table-cell office:value-type="string">
            <text:p>(1, 0, 1, 2, 0, 2, 0)</text:p>
          </table:table-cell>
          <table:table-cell office:value-type="string">
            <text:p>UpChuck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LG0D" table:style-name="ta24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NaClg0d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UpChuck</text:p>
          </table:table-cell>
          <table:table-cell office:value-type="string">
            <text:p>(1, 0, 1, 3, 1, 2, 0)</text:p>
          </table:table-cell>
          <table:table-cell office:value-type="string">
            <text:p>UpChuck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ChezFarach001</text:p>
          </table:table-cell>
          <table:table-cell office:value-type="string">
            <text:p>(1, 0, 1, 3, 1, 2, 0)</text:p>
          </table:table-cell>
          <table:table-cell office:value-type="string">
            <text:p>ChezFarach001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NGER" table:style-name="ta24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Ginger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a_Successor</text:p>
          </table:table-cell>
          <table:table-cell office:value-type="string">
            <text:p>(1, 1, 0, 2, 2, 0, 1)</text:p>
          </table:table-cell>
          <table:table-cell office:value-type="string">
            <text:p>a_Successor</text:p>
          </table:table-cell>
          <table:table-cell office:value-type="string">
            <text:p>(1, 1, 0, 2, 2, 0, 1)</text:p>
          </table:table-cell>
          <table:table-cell table:number-columns-repeated="1020"/>
        </table:table-row>
        <table:table-row table:style-name="ro1">
          <table:table-cell office:value-type="string">
            <text:p>My Dad</text:p>
          </table:table-cell>
          <table:table-cell office:value-type="string">
            <text:p>(0, 0, 0, 0, 0, 0, 1)</text:p>
          </table:table-cell>
          <table:table-cell office:value-type="string">
            <text:p>My Dad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OwiePowie69</text:p>
          </table:table-cell>
          <table:table-cell office:value-type="string">
            <text:p>(1, 1, 0, 2, 2, 0, 0)</text:p>
          </table:table-cell>
          <table:table-cell office:value-type="string">
            <text:p>OwiePowie69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rymlynn</text:p>
          </table:table-cell>
          <table:table-cell office:value-type="string">
            <text:p>(1, 0, 1, 3, 1, 2, 0)</text:p>
          </table:table-cell>
          <table:table-cell office:value-type="string">
            <text:p>Grymlynn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JediSmash</text:p>
          </table:table-cell>
          <table:table-cell office:value-type="string">
            <text:p>(1, 1, 0, 2, 2, 0, 0)</text:p>
          </table:table-cell>
          <table:table-cell office:value-type="string">
            <text:p>JediSmas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1, 0, 1, 3, 1, 2, 0)</text:p>
          </table:table-cell>
          <table:table-cell office:value-type="string">
            <text:p>McFunny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Milkboy</text:p>
          </table:table-cell>
          <table:table-cell office:value-type="string">
            <text:p>(1, 1, 0, 2, 2, 0, 0)</text:p>
          </table:table-cell>
          <table:table-cell office:value-type="string">
            <text:p>Milkbo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lack Lemonade</text:p>
          </table:table-cell>
          <table:table-cell office:value-type="string">
            <text:p>(1, 0, 1, 2, 0, 2, 0)</text:p>
          </table:table-cell>
          <table:table-cell office:value-type="string">
            <text:p>Black Lemonade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Nightmare Fredbear</text:p>
          </table:table-cell>
          <table:table-cell office:value-type="string">
            <text:p>(0, 0, 0, 0, 0, 0, 1)</text:p>
          </table:table-cell>
          <table:table-cell office:value-type="string">
            <text:p>Nightmare Fredbear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Hungrybox</text:p>
          </table:table-cell>
          <table:table-cell office:value-type="string">
            <text:p>(1, 1, 0, 2, 2, 0, 0)</text:p>
          </table:table-cell>
          <table:table-cell office:value-type="string">
            <text:p>Hungrybox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erk</text:p>
          </table:table-cell>
          <table:table-cell office:value-type="string">
            <text:p>(2, 0, 2, 4, 0, 4, 0)</text:p>
          </table:table-cell>
          <table:table-cell office:value-type="string">
            <text:p>derk</text:p>
          </table:table-cell>
          <table:table-cell office:value-type="string">
            <text:p>(2, 0, 2, 4, 0, 4, 0)</text:p>
          </table:table-cell>
          <table:table-cell table:number-columns-repeated="1020"/>
        </table:table-row>
        <table:table-row table:style-name="ro1">
          <table:table-cell office:value-type="string">
            <text:p>AzLu</text:p>
          </table:table-cell>
          <table:table-cell office:value-type="string">
            <text:p>(1, 1, 0, 2, 2, 0, 0)</text:p>
          </table:table-cell>
          <table:table-cell office:value-type="string">
            <text:p>AzLu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JMxfia</text:p>
          </table:table-cell>
          <table:table-cell office:value-type="string">
            <text:p>(1, 0, 1, 2, 0, 2, 0)</text:p>
          </table:table-cell>
          <table:table-cell office:value-type="string">
            <text:p>JMxfi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reezy 400</text:p>
          </table:table-cell>
          <table:table-cell office:value-type="string">
            <text:p>(1, 1, 0, 3, 2, 1, 0)</text:p>
          </table:table-cell>
          <table:table-cell office:value-type="string">
            <text:p>Breezy 400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AXIFY" table:style-name="ta24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Minimaxify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My Dad</text:p>
          </table:table-cell>
          <table:table-cell office:value-type="string">
            <text:p>(1, 1, 0, 2, 2, 0, 0)</text:p>
          </table:table-cell>
          <table:table-cell office:value-type="string">
            <text:p>My Da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Aaron</text:p>
          </table:table-cell>
          <table:table-cell office:value-type="string">
            <text:p>(1, 0, 1, 2, 0, 2, 0)</text:p>
          </table:table-cell>
          <table:table-cell office:value-type="string">
            <text:p>Aaro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1, 1, 0, 2, 2, 0, 0)</text:p>
          </table:table-cell>
          <table:table-cell office:value-type="string">
            <text:p>DarthCJ8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1, 0, 1, 3, 1, 2, 0)</text:p>
          </table:table-cell>
          <table:table-cell office:value-type="string">
            <text:p>McFunny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Ronaldo Goat</text:p>
          </table:table-cell>
          <table:table-cell office:value-type="string">
            <text:p>(1, 1, 0, 2, 2, 0, 0)</text:p>
          </table:table-cell>
          <table:table-cell office:value-type="string">
            <text:p>Ronaldo Goat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VileSpecter</text:p>
          </table:table-cell>
          <table:table-cell office:value-type="string">
            <text:p>(1, 1, 0, 2, 2, 0, 0)</text:p>
          </table:table-cell>
          <table:table-cell office:value-type="string">
            <text:p>VileSpecte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WiFi warrior</text:p>
          </table:table-cell>
          <table:table-cell office:value-type="string">
            <text:p>(1, 0, 1, 2, 0, 2, 0)</text:p>
          </table:table-cell>
          <table:table-cell office:value-type="string">
            <text:p>WiFi warrior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office:value-type="string">
            <text:p>Chez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. Phantm</text:p>
          </table:table-cell>
          <table:table-cell office:value-type="string">
            <text:p>(1, 0, 1, 2, 0, 2, 0)</text:p>
          </table:table-cell>
          <table:table-cell office:value-type="string">
            <text:p>S. Phant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SYSILEX" table:style-name="ta24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Psysilex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VileSpecter</text:p>
          </table:table-cell>
          <table:table-cell office:value-type="string">
            <text:p>(1, 1, 0, 3, 2, 1, 0)</text:p>
          </table:table-cell>
          <table:table-cell office:value-type="string">
            <text:p>VileSpecter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1, 1, 0, 2, 2, 0, 0)</text:p>
          </table:table-cell>
          <table:table-cell office:value-type="string">
            <text:p>McFunn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Aaron</text:p>
          </table:table-cell>
          <table:table-cell office:value-type="string">
            <text:p>(1, 0, 1, 3, 1, 2, 0)</text:p>
          </table:table-cell>
          <table:table-cell office:value-type="string">
            <text:p>Aaron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Hispanic! at the Disco</text:p>
          </table:table-cell>
          <table:table-cell office:value-type="string">
            <text:p>(1, 1, 0, 2, 2, 0, 0)</text:p>
          </table:table-cell>
          <table:table-cell office:value-type="string">
            <text:p>Hispanic! at the Disco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urehyper</text:p>
          </table:table-cell>
          <table:table-cell office:value-type="string">
            <text:p>(1, 0, 1, 3, 1, 2, 0)</text:p>
          </table:table-cell>
          <table:table-cell office:value-type="string">
            <text:p>Surehyper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PANIC! AT THE DISCO" table:style-name="ta247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Hispanic! at the Disco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DarthCJ8</text:p>
          </table:table-cell>
          <table:table-cell office:value-type="string">
            <text:p>(1, 1, 0, 2, 2, 0, 0)</text:p>
          </table:table-cell>
          <table:table-cell office:value-type="string">
            <text:p>DarthCJ8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1, 0, 1, 3, 1, 2, 0)</text:p>
          </table:table-cell>
          <table:table-cell office:value-type="string">
            <text:p>Shaine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My Dad</text:p>
          </table:table-cell>
          <table:table-cell office:value-type="string">
            <text:p>(1, 1, 0, 2, 2, 0, 0)</text:p>
          </table:table-cell>
          <table:table-cell office:value-type="string">
            <text:p>My Da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ChezFarach001</text:p>
          </table:table-cell>
          <table:table-cell office:value-type="string">
            <text:p>(1, 1, 0, 2, 2, 0, 0)</text:p>
          </table:table-cell>
          <table:table-cell office:value-type="string">
            <text:p>ChezFarach001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Psysilex</text:p>
          </table:table-cell>
          <table:table-cell office:value-type="string">
            <text:p>(1, 0, 1, 2, 0, 2, 0)</text:p>
          </table:table-cell>
          <table:table-cell office:value-type="string">
            <text:p>Psysilex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NZANA" table:style-name="ta248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Manzana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a_Successor</text:p>
          </table:table-cell>
          <table:table-cell office:value-type="string">
            <text:p>(1, 1, 0, 2, 2, 0, 0)</text:p>
          </table:table-cell>
          <table:table-cell office:value-type="string">
            <text:p>a_Successo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juno</text:p>
          </table:table-cell>
          <table:table-cell office:value-type="string">
            <text:p>(1, 1, 0, 3, 2, 1, 0)</text:p>
          </table:table-cell>
          <table:table-cell office:value-type="string">
            <text:p>juno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Shaine</text:p>
          </table:table-cell>
          <table:table-cell office:value-type="string">
            <text:p>(1, 0, 1, 3, 1, 2, 0)</text:p>
          </table:table-cell>
          <table:table-cell office:value-type="string">
            <text:p>Shaine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McFunny</text:p>
          </table:table-cell>
          <table:table-cell office:value-type="string">
            <text:p>(1, 1, 0, 3, 2, 1, 0)</text:p>
          </table:table-cell>
          <table:table-cell office:value-type="string">
            <text:p>McFunny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chpstks</text:p>
          </table:table-cell>
          <table:table-cell office:value-type="string">
            <text:p>(1, 1, 0, 3, 2, 1, 0)</text:p>
          </table:table-cell>
          <table:table-cell office:value-type="string">
            <text:p>chpstks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office:value-type="string">
            <text:p>Epic_Gabrie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EternalBran</text:p>
          </table:table-cell>
          <table:table-cell office:value-type="string">
            <text:p>(1, 1, 0, 2, 2, 0, 0)</text:p>
          </table:table-cell>
          <table:table-cell office:value-type="string">
            <text:p>EternalBra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piker</text:p>
          </table:table-cell>
          <table:table-cell office:value-type="string">
            <text:p>(1, 1, 0, 2, 2, 0, 0)</text:p>
          </table:table-cell>
          <table:table-cell office:value-type="string">
            <text:p>Spike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ilios</text:p>
          </table:table-cell>
          <table:table-cell office:value-type="string">
            <text:p>(1, 0, 1, 3, 1, 2, 0)</text:p>
          </table:table-cell>
          <table:table-cell office:value-type="string">
            <text:p>stilios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Pellonian</text:p>
          </table:table-cell>
          <table:table-cell office:value-type="string">
            <text:p>(1, 1, 0, 2, 2, 0, 0)</text:p>
          </table:table-cell>
          <table:table-cell office:value-type="string">
            <text:p>Pellonia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Oki</text:p>
          </table:table-cell>
          <table:table-cell office:value-type="string">
            <text:p>(1, 1, 0, 2, 2, 0, 0)</text:p>
          </table:table-cell>
          <table:table-cell office:value-type="string">
            <text:p>Oki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Livan the Amnesty</text:p>
          </table:table-cell>
          <table:table-cell office:value-type="string">
            <text:p>(1, 1, 0, 3, 2, 1, 0)</text:p>
          </table:table-cell>
          <table:table-cell office:value-type="string">
            <text:p>Livan the Amnesty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Black Lemonade</text:p>
          </table:table-cell>
          <table:table-cell office:value-type="string">
            <text:p>(1, 1, 0, 3, 2, 1, 0)</text:p>
          </table:table-cell>
          <table:table-cell office:value-type="string">
            <text:p>Black Lemonade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LightningCam</text:p>
          </table:table-cell>
          <table:table-cell office:value-type="string">
            <text:p>(1, 0, 1, 3, 1, 2, 0)</text:p>
          </table:table-cell>
          <table:table-cell office:value-type="string">
            <text:p>LightningCam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Aghybrid</text:p>
          </table:table-cell>
          <table:table-cell office:value-type="string">
            <text:p>(1, 1, 0, 2, 2, 0, 0)</text:p>
          </table:table-cell>
          <table:table-cell office:value-type="string">
            <text:p>Aghybri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erph</text:p>
          </table:table-cell>
          <table:table-cell office:value-type="string">
            <text:p>(1, 1, 0, 2, 2, 0, 0)</text:p>
          </table:table-cell>
          <table:table-cell office:value-type="string">
            <text:p>Serph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1, 1, 0, 2, 2, 0, 0)</text:p>
          </table:table-cell>
          <table:table-cell office:value-type="string">
            <text:p>Strobic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Dominator</text:p>
          </table:table-cell>
          <table:table-cell office:value-type="string">
            <text:p>(1, 0, 1, 2, 0, 2, 0)</text:p>
          </table:table-cell>
          <table:table-cell office:value-type="string">
            <text:p>Dominator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Anthzeny</text:p>
          </table:table-cell>
          <table:table-cell office:value-type="string">
            <text:p>(1, 1, 0, 2, 2, 0, 0)</text:p>
          </table:table-cell>
          <table:table-cell office:value-type="string">
            <text:p>Anthzen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JMxfia</text:p>
          </table:table-cell>
          <table:table-cell office:value-type="string">
            <text:p>(1, 1, 0, 3, 2, 1, 0)</text:p>
          </table:table-cell>
          <table:table-cell office:value-type="string">
            <text:p>JMxfia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noemiglazer67</text:p>
          </table:table-cell>
          <table:table-cell office:value-type="string">
            <text:p>(1, 0, 1, 3, 1, 2, 0)</text:p>
          </table:table-cell>
          <table:table-cell office:value-type="string">
            <text:p>noemiglazer67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NGO" table:style-name="ta249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Domingo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JDQ05</text:p>
          </table:table-cell>
          <table:table-cell office:value-type="string">
            <text:p>(1, 0, 1, 2, 0, 2, 0)</text:p>
          </table:table-cell>
          <table:table-cell office:value-type="string">
            <text:p>JDQ05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1, 0, 1, 2, 0, 2, 0)</text:p>
          </table:table-cell>
          <table:table-cell office:value-type="string">
            <text:p>Chavalav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DPIK" table:style-name="ta250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RedPik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Chavalava</text:p>
          </table:table-cell>
          <table:table-cell office:value-type="string">
            <text:p>(1, 0, 1, 2, 0, 2, 0)</text:p>
          </table:table-cell>
          <table:table-cell office:value-type="string">
            <text:p>Chavalav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JDQ05</text:p>
          </table:table-cell>
          <table:table-cell office:value-type="string">
            <text:p>(1, 0, 1, 2, 0, 2, 0)</text:p>
          </table:table-cell>
          <table:table-cell office:value-type="string">
            <text:p>JDQ05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ChuckFug</text:p>
          </table:table-cell>
          <table:table-cell office:value-type="string">
            <text:p>(0, 0, 0, 0, 0, 0, 1)</text:p>
          </table:table-cell>
          <table:table-cell office:value-type="string">
            <text:p>ChuckFug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NIMROD69</text:p>
          </table:table-cell>
          <table:table-cell office:value-type="string">
            <text:p>(0, 0, 0, 0, 0, 0, 1)</text:p>
          </table:table-cell>
          <table:table-cell office:value-type="string">
            <text:p>NIMROD69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CarlJT</text:p>
          </table:table-cell>
          <table:table-cell office:value-type="string">
            <text:p>(0, 0, 0, 0, 0, 0, 1)</text:p>
          </table:table-cell>
          <table:table-cell office:value-type="string">
            <text:p>CarlJT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JNIKHAZY" table:style-name="ta251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tjnikhazy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JediSmash</text:p>
          </table:table-cell>
          <table:table-cell office:value-type="string">
            <text:p>(1, 0, 1, 3, 1, 2, 0)</text:p>
          </table:table-cell>
          <table:table-cell office:value-type="string">
            <text:p>JediSmash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MrNubs</text:p>
          </table:table-cell>
          <table:table-cell office:value-type="string">
            <text:p>(1, 0, 1, 3, 1, 2, 0)</text:p>
          </table:table-cell>
          <table:table-cell office:value-type="string">
            <text:p>MrNubs</text:p>
          </table:table-cell>
          <table:table-cell office:value-type="string">
            <text:p>(1, 0, 1, 3, 1, 2, 0)</text:p>
          </table:table-cell>
          <table:table-cell table:number-columns-repeated="1020"/>
        </table:table-row>
        <table:table-row table:style-name="ro1">
          <table:table-cell office:value-type="string">
            <text:p>Slowpez</text:p>
          </table:table-cell>
          <table:table-cell office:value-type="string">
            <text:p>(1, 1, 0, 2, 2, 0, 0)</text:p>
          </table:table-cell>
          <table:table-cell office:value-type="string">
            <text:p>Slowpez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erph</text:p>
          </table:table-cell>
          <table:table-cell office:value-type="string">
            <text:p>(1, 0, 1, 2, 0, 2, 0)</text:p>
          </table:table-cell>
          <table:table-cell office:value-type="string">
            <text:p>Serph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BeefCalculator</text:p>
          </table:table-cell>
          <table:table-cell office:value-type="string">
            <text:p>(1, 1, 0, 2, 2, 0, 0)</text:p>
          </table:table-cell>
          <table:table-cell office:value-type="string">
            <text:p>BeefCalculator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Twonny</text:p>
          </table:table-cell>
          <table:table-cell office:value-type="string">
            <text:p>(1, 1, 0, 2, 2, 0, 0)</text:p>
          </table:table-cell>
          <table:table-cell office:value-type="string">
            <text:p>Twonny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Franknbean</text:p>
          </table:table-cell>
          <table:table-cell office:value-type="string">
            <text:p>(1, 0, 1, 2, 0, 2, 0)</text:p>
          </table:table-cell>
          <table:table-cell office:value-type="string">
            <text:p>Franknbea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I" table:style-name="ta252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Viri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The Chuckster</text:p>
          </table:table-cell>
          <table:table-cell office:value-type="string">
            <text:p>(0, 0, 0, 0, 0, 0, 1)</text:p>
          </table:table-cell>
          <table:table-cell office:value-type="string">
            <text:p>The Chuckster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hnissugah</text:p>
          </table:table-cell>
          <table:table-cell office:value-type="string">
            <text:p>(0, 0, 0, 0, 0, 0, 1)</text:p>
          </table:table-cell>
          <table:table-cell office:value-type="string">
            <text:p>Shnissugah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Fapple</text:p>
          </table:table-cell>
          <table:table-cell office:value-type="string">
            <text:p>(1, 1, 0, 2, 2, 0, 0)</text:p>
          </table:table-cell>
          <table:table-cell office:value-type="string">
            <text:p>Fapple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Second Floor Basement</text:p>
          </table:table-cell>
          <table:table-cell office:value-type="string">
            <text:p>(0, 0, 0, 0, 0, 0, 1)</text:p>
          </table:table-cell>
          <table:table-cell office:value-type="string">
            <text:p>Second Floor Basement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Zorrin</text:p>
          </table:table-cell>
          <table:table-cell office:value-type="string">
            <text:p>(1, 1, 0, 2, 2, 0, 0)</text:p>
          </table:table-cell>
          <table:table-cell office:value-type="string">
            <text:p>Zorrin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hand</text:p>
          </table:table-cell>
          <table:table-cell office:value-type="string">
            <text:p>(1, 1, 0, 2, 2, 0, 0)</text:p>
          </table:table-cell>
          <table:table-cell office:value-type="string">
            <text:p>Bhand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Newo</text:p>
          </table:table-cell>
          <table:table-cell office:value-type="string">
            <text:p>(2, 0, 2, 8, 3, 5, 0)</text:p>
          </table:table-cell>
          <table:table-cell office:value-type="string">
            <text:p>Newo</text:p>
          </table:table-cell>
          <table:table-cell office:value-type="string">
            <text:p>(2, 0, 2, 8, 3, 5, 0)</text:p>
          </table:table-cell>
          <table:table-cell table:number-columns-repeated="1020"/>
        </table:table-row>
        <table:table-row table:style-name="ro1">
          <table:table-cell office:value-type="string">
            <text:p>D0g3</text:p>
          </table:table-cell>
          <table:table-cell office:value-type="string">
            <text:p>(1, 1, 0, 2, 2, 0, 0)</text:p>
          </table:table-cell>
          <table:table-cell office:value-type="string">
            <text:p>D0g3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Grymlynn</text:p>
          </table:table-cell>
          <table:table-cell office:value-type="string">
            <text:p>(1, 1, 0, 4, 3, 1, 0)</text:p>
          </table:table-cell>
          <table:table-cell office:value-type="string">
            <text:p>Grymlynn</text:p>
          </table:table-cell>
          <table:table-cell office:value-type="string">
            <text:p>(1, 1, 0, 4, 3, 1, 0)</text:p>
          </table:table-cell>
          <table:table-cell table:number-columns-repeated="1020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1, 1, 0, 3, 3, 0, 0)</text:p>
          </table:table-cell>
          <table:table-cell office:value-type="string">
            <text:p>Strobics</text:p>
          </table:table-cell>
          <table:table-cell office:value-type="string">
            <text:p>(1, 1, 0, 3, 3, 0, 0)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DAYGARY" table:style-name="ta25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SundayGary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BooBell</text:p>
          </table:table-cell>
          <table:table-cell office:value-type="string">
            <text:p>(1, 0, 1, 2, 0, 2, 0)</text:p>
          </table:table-cell>
          <table:table-cell office:value-type="string">
            <text:p>BooBel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office:value-type="string">
            <text:p>Squishy~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LightningCam</text:p>
          </table:table-cell>
          <table:table-cell office:value-type="string">
            <text:p>(1, 0, 1, 2, 0, 2, 0)</text:p>
          </table:table-cell>
          <table:table-cell office:value-type="string">
            <text:p>LightningCam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Gogemon</text:p>
          </table:table-cell>
          <table:table-cell office:value-type="string">
            <text:p>(1, 0, 1, 2, 0, 2, 0)</text:p>
          </table:table-cell>
          <table:table-cell office:value-type="string">
            <text:p>Gogemo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ITKHO" table:style-name="ta25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ThitKho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Pryvate Pigeon</text:p>
          </table:table-cell>
          <table:table-cell office:value-type="string">
            <text:p>(1, 1, 0, 2, 2, 0, 1)</text:p>
          </table:table-cell>
          <table:table-cell office:value-type="string">
            <text:p>Pryvate Pigeon</text:p>
          </table:table-cell>
          <table:table-cell office:value-type="string">
            <text:p>(1, 1, 0, 2, 2, 0, 1)</text:p>
          </table:table-cell>
          <table:table-cell table:number-columns-repeated="1020"/>
        </table:table-row>
        <table:table-row table:style-name="ro1">
          <table:table-cell office:value-type="string">
            <text:p>Plummet</text:p>
          </table:table-cell>
          <table:table-cell office:value-type="string">
            <text:p>(1, 0, 1, 2, 0, 2, 0)</text:p>
          </table:table-cell>
          <table:table-cell office:value-type="string">
            <text:p>Plummet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ana</text:p>
          </table:table-cell>
          <table:table-cell office:value-type="string">
            <text:p>(1, 1, 0, 3, 2, 1, 0)</text:p>
          </table:table-cell>
          <table:table-cell office:value-type="string">
            <text:p>Mana</text:p>
          </table:table-cell>
          <table:table-cell office:value-type="string">
            <text:p>(1, 1, 0, 3, 2, 1, 0)</text:p>
          </table:table-cell>
          <table:table-cell table:number-columns-repeated="1020"/>
        </table:table-row>
        <table:table-row table:style-name="ro1">
          <table:table-cell office:value-type="string">
            <text:p>Madera</text:p>
          </table:table-cell>
          <table:table-cell office:value-type="string">
            <text:p>(1, 0, 1, 2, 0, 2, 0)</text:p>
          </table:table-cell>
          <table:table-cell office:value-type="string">
            <text:p>Madera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damashi</text:p>
          </table:table-cell>
          <table:table-cell office:value-type="string">
            <text:p>(0, 0, 0, 0, 0, 0, 1)</text:p>
          </table:table-cell>
          <table:table-cell office:value-type="string">
            <text:p>damashi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Charz</text:p>
          </table:table-cell>
          <table:table-cell office:value-type="string">
            <text:p>(0, 0, 0, 0, 0, 0, 1)</text:p>
          </table:table-cell>
          <table:table-cell office:value-type="string">
            <text:p>Charz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Notorious</text:p>
          </table:table-cell>
          <table:table-cell office:value-type="string">
            <text:p>(1, 1, 0, 2, 2, 0, 0)</text:p>
          </table:table-cell>
          <table:table-cell office:value-type="string">
            <text:p>Notorious</text:p>
          </table:table-cell>
          <table:table-cell office:value-type="string">
            <text:p>(1, 1, 0, 2, 2, 0, 0)</text:p>
          </table:table-cell>
          <table:table-cell table:number-columns-repeated="1020"/>
        </table:table-row>
        <table:table-row table:style-name="ro1"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office:value-type="string">
            <text:p>BeastModePau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MrNubs</text:p>
          </table:table-cell>
          <table:table-cell office:value-type="string">
            <text:p>(1, 0, 1, 2, 0, 2, 0)</text:p>
          </table:table-cell>
          <table:table-cell office:value-type="string">
            <text:p>MrNub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YVATE PIGEON" table:style-name="ta255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Pryvate Pigeon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ThitKho</text:p>
          </table:table-cell>
          <table:table-cell office:value-type="string">
            <text:p>(1, 0, 1, 2, 0, 2, 1)</text:p>
          </table:table-cell>
          <table:table-cell office:value-type="string">
            <text:p>ThitKho</text:p>
          </table:table-cell>
          <table:table-cell office:value-type="string">
            <text:p>(1, 0, 1, 2, 0, 2, 1)</text:p>
          </table:table-cell>
          <table:table-cell table:number-columns-repeated="1020"/>
        </table:table-row>
        <table:table-row table:style-name="ro1">
          <table:table-cell office:value-type="string">
            <text:p>Zorrin</text:p>
          </table:table-cell>
          <table:table-cell office:value-type="string">
            <text:p>(0, 0, 0, 0, 0, 0, 1)</text:p>
          </table:table-cell>
          <table:table-cell office:value-type="string">
            <text:p>Zorrin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BooBell</text:p>
          </table:table-cell>
          <table:table-cell office:value-type="string">
            <text:p>(1, 0, 1, 2, 0, 2, 0)</text:p>
          </table:table-cell>
          <table:table-cell office:value-type="string">
            <text:p>BooBell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NEWS.CO" table:style-name="ta256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bignews.co</text:p>
          </table:table-cell>
          <table:table-cell table:number-columns-repeated="1023"/>
        </table:table-row>
        <table:table-row table:style-name="ro1">
          <table:table-cell office:value-type="string">
            <text:p>ultimate-singles</text:p>
          </table:table-cell>
          <table:table-cell office:value-type="string">
            <text:p>record</text:p>
          </table:table-cell>
          <table:table-cell office:value-type="string">
            <text:p>Opponent</text:p>
          </table:table-cell>
          <table:table-cell office:value-type="string">
            <text:p>Overall Record</text:p>
          </table:table-cell>
          <table:table-cell table:number-columns-repeated="1020"/>
        </table:table-row>
        <table:table-row table:style-name="ro1">
          <table:table-cell office:value-type="string">
            <text:p>CarlJT</text:p>
          </table:table-cell>
          <table:table-cell office:value-type="string">
            <text:p>(0, 0, 0, 0, 0, 0, 1)</text:p>
          </table:table-cell>
          <table:table-cell office:value-type="string">
            <text:p>CarlJT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Strobics</text:p>
          </table:table-cell>
          <table:table-cell office:value-type="string">
            <text:p>(1, 0, 1, 2, 0, 2, 0)</text:p>
          </table:table-cell>
          <table:table-cell office:value-type="string">
            <text:p>Strobics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>
          <table:table-cell office:value-type="string">
            <text:p>SamersonT</text:p>
          </table:table-cell>
          <table:table-cell office:value-type="string">
            <text:p>(0, 0, 0, 0, 0, 0, 1)</text:p>
          </table:table-cell>
          <table:table-cell office:value-type="string">
            <text:p>SamersonT</text:p>
          </table:table-cell>
          <table:table-cell office:value-type="string">
            <text:p>(0, 0, 0, 0, 0, 0, 1)</text:p>
          </table:table-cell>
          <table:table-cell table:number-columns-repeated="1020"/>
        </table:table-row>
        <table:table-row table:style-name="ro1">
          <table:table-cell office:value-type="string">
            <text:p>Zorrin</text:p>
          </table:table-cell>
          <table:table-cell office:value-type="string">
            <text:p>(1, 0, 1, 2, 0, 2, 0)</text:p>
          </table:table-cell>
          <table:table-cell office:value-type="string">
            <text:p>Zorrin</text:p>
          </table:table-cell>
          <table:table-cell office:value-type="string">
            <text:p>(1, 0, 1, 2, 0, 2, 0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5">03/25/2026</text:date>, <text:time>07:0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ltimate-singles_20_Set_20_Records" style:display-name="PageStyle_ultimate-singles Set Rec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ltimate-singles_20_Match_20_Records" style:display-name="PageStyle_ultimate-singles Match Rec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lee-singles_20_Set_20_Records" style:display-name="PageStyle_melee-singles Set Rec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lee-singles_20_Match_20_Records" style:display-name="PageStyle_melee-singles Match Rec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urnament_20_1" style:display-name="PageStyle_Tourname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urnament_20_2" style:display-name="PageStyle_Tourname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urnament_20_3" style:display-name="PageStyle_Tourname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urnament_20_4" style:display-name="PageStyle_Tourname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urnament_20_5" style:display-name="PageStyle_Tourname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urnament_20_6" style:display-name="PageStyle_Tourname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DISMASH" style:display-name="PageStyle_JEDISMAS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UFFED" style:display-name="PageStyle_SCUFF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ORRIN" style:display-name="PageStyle_ZORR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WIEPOWIE69" style:display-name="PageStyle_OWIEPOWIE6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EZ" style:display-name="PageStyle_CH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EMPTION" style:display-name="PageStyle_REDEM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R-HUGE" style:display-name="PageStyle_SR-HU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RRYROSE" style:display-name="PageStyle_KURRYR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NNY_2c__20_THE_20_LICK" style:display-name="PageStyle_VINNY, THE 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LYWOOD" style:display-name="PageStyle_HOLLYWO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CEN" style:display-name="PageStyle_JA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" style:display-name="PageStyle_R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EYSMEMETEAM" style:display-name="PageStyle_JOEYSMEME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TPAIN" style:display-name="PageStyle_SENTP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QUILLIAM_20_AFTON" style:display-name="PageStyle_SQUILLIAM AFT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NEGG" style:display-name="PageStyle_DONEG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M" style:display-name="PageStyle_DI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XIX" style:display-name="PageStyle_LX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OMBA" style:display-name="PageStyle_ZOMB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ICA" style:display-name="PageStyle_FONI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UMMET" style:display-name="PageStyle_PLUMM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NIKKI" style:display-name="PageStyle_VENIK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EZY_20_400" style:display-name="PageStyle_BREEZY 4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IKI" style:display-name="PageStyle_KI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M_20_NO_20_JUTSU" style:display-name="PageStyle_SPAM NO JUTS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O" style:display-name="PageStyle_OC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SEN" style:display-name="PageStyle_OLS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WILIGHT" style:display-name="PageStyle_TWILIGH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RO" style:display-name="PageStyle_SHI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RTHCJ8" style:display-name="PageStyle_DARTHCJ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V7X" style:display-name="PageStyle_SEV7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DRAGON" style:display-name="PageStyle_PENDRAG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AMAOKAI" style:display-name="PageStyle_YAMAOK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UNNING" style:display-name="PageStyle_SHUNN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JG" style:display-name="PageStyle_AJ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O" style:display-name="PageStyle_MAY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LAXIA" style:display-name="PageStyle_GALAX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RNUBS" style:display-name="PageStyle_MRNU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" style:display-name="PageStyle_DA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ERSONT" style:display-name="PageStyle_SAMERSO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ZAR" style:display-name="PageStyle_CZ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ASTMODEPAUL" style:display-name="PageStyle_BEASTMODEPAU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UNGRYBOX" style:display-name="PageStyle_HUNGRYBO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HAND" style:display-name="PageStyle_BH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NSLINGING_20_GATOS" style:display-name="PageStyle_GUNSLINGING G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WO" style:display-name="PageStyle_NEW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NGODILE" style:display-name="PageStyle_DINGOD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PSTKS" style:display-name="PageStyle_CHPST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ESP" style:display-name="PageStyle_ZES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NIEL" style:display-name="PageStyle_ZANI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AN_20_LING" style:display-name="PageStyle_ROAN L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NVY" style:display-name="PageStyle_SYNV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CCAN" style:display-name="PageStyle_WICC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IASTAR" style:display-name="PageStyle_ELIAST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IBAMAN" style:display-name="PageStyle_SAIBAM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_20_FLOOR_20_BASEMENT" style:display-name="PageStyle_SECOND FLOOR BAS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TAINLED" style:display-name="PageStyle_CAPTAINL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WGF" style:display-name="PageStyle_EWG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NEAKERS_20_O_27_TOOLE" style:display-name="PageStyle_SNEAKERS O'TOO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WLIN" style:display-name="PageStyle_BOWL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F" style:display-name="PageStyle_SCH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ST_5f_A_5f_TARRASQUE" style:display-name="PageStyle_JUST_A_TARRAS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RT" style:display-name="PageStyle_DI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O" style:display-name="PageStyle_JU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_5f_SUCCESSOR" style:display-name="PageStyle_A_SUCCESS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PIC_5f_GABRIEL" style:display-name="PageStyle_EPIC_GABRI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_20_DAD" style:display-name="PageStyle_MY D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FUNNY" style:display-name="PageStyle_MCFUN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QUISHY_7e_" style:display-name="PageStyle_SQUISHY~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INE" style:display-name="PageStyle_SHA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CIDA" style:display-name="PageStyle_LUCI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LOAX" style:display-name="PageStyle_KOLO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MEHOWNERDY" style:display-name="PageStyle_SOMEHOWNER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YEISCOOL" style:display-name="PageStyle_RYEISCO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3M1X" style:display-name="PageStyle_R3M1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EZFARACH001" style:display-name="PageStyle_CHEZFARACH0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NA" style:display-name="PageStyle_MA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MESSKYY" style:display-name="PageStyle_NAMESSKY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PI" style:display-name="PageStyle_PAP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HBOX" style:display-name="PageStyle_NOTHBO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LD_20_JADE_20_CENTER" style:display-name="PageStyle_WORLD JADE CEN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_20_SHOCK" style:display-name="PageStyle_DOC SHO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LDENDARK" style:display-name="PageStyle_GOLDENDAR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YDENEATSSHRIMP" style:display-name="PageStyle_HAYDENEATSSHRIM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LTSTORM" style:display-name="PageStyle_SALTST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VALAVA" style:display-name="PageStyle_CHAVALA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NCESSPOPKORN" style:display-name="PageStyle_PRINCESSPOPKOR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RYON" style:display-name="PageStyle_KRY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PH" style:display-name="PageStyle_SER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RU_21_" style:display-name="PageStyle_KARU!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XX_5f_PETERGOKUGRIFFIN_5f_XXX" style:display-name="PageStyle_XXX_PETERGOKUGRIFFIN_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NJI" style:display-name="PageStyle_BENJ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AL_20_KING_20_BARBAROS" style:display-name="PageStyle_SEAL KING BARBA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BLIN" style:display-name="PageStyle_GOBL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OBII" style:display-name="PageStyle_POOB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NDERBREAD" style:display-name="PageStyle_WONDERB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END" style:display-name="PageStyle_FI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ARDVARK" style:display-name="PageStyle_FRARDVAR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OKENYEW" style:display-name="PageStyle_BROKENY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VIAN" style:display-name="PageStyle_JOVI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ETI" style:display-name="PageStyle_YET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PI" style:display-name="PageStyle_LAP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HTZU" style:display-name="PageStyle_GAHTZ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OWPEZ" style:display-name="PageStyle_SLOWP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CKY6" style:display-name="PageStyle_RICKY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LITY" style:display-name="PageStyle_QUEL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TAIN_20_G" style:display-name="PageStyle_CAPTAIN 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GAGS" style:display-name="PageStyle_TG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D_20_STRAT" style:display-name="PageStyle_HOD STR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GRABS" style:display-name="PageStyle_CCGRA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" style:display-name="PageStyle_PRO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C" style:display-name="PageStyle_DR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ING_20_MOMO" style:display-name="PageStyle_KING MOM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TONY" style:display-name="PageStyle_NOTTO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NNY" style:display-name="PageStyle_BEN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KUSUII" style:display-name="PageStyle_OKUSU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WIE" style:display-name="PageStyle_H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OAK" style:display-name="PageStyle_CLOA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G_20_KID" style:display-name="PageStyle_OG K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ATONEGUY" style:display-name="PageStyle_THATONEGU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NDBAG" style:display-name="PageStyle_SANDBA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H4RKY" style:display-name="PageStyle_PSH4RK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RUDO" style:display-name="PageStyle_KRU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NDA" style:display-name="PageStyle_PAN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FTSPANK" style:display-name="PageStyle_SWIFTSPAN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HIMELEC_20_VELEZ" style:display-name="PageStyle_AHIMELEC VEL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RAHAM" style:display-name="PageStyle_ABRAH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TAN" style:display-name="PageStyle_TIT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AT0NEGUY" style:display-name="PageStyle_THAT0NEGU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NTNER" style:display-name="PageStyle_VINTN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-K_20_SIN" style:display-name="PageStyle_A-K S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TT" style:display-name="PageStyle_LIT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D." style:display-name="PageStyle_TED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ZLU" style:display-name="PageStyle_AZL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ELE" style:display-name="PageStyle_PEE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MODO" style:display-name="PageStyle_KOMO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CHU" style:display-name="PageStyle_JCH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AM" style:display-name="PageStyle_ES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UNGRY_20_PIGEON" style:display-name="PageStyle_HUNGRY PIGE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ALCO" style:display-name="PageStyle_JFAL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NEAKYWILL" style:display-name="PageStyle_SNEAKYWI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IP" style:display-name="PageStyle_KI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PE" style:display-name="PageStyle_JA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INUS" style:display-name="PageStyle_PAIN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AD" style:display-name="PageStyle_RO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XL" style:display-name="PageStyle_AX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_20_PINGU" style:display-name="PageStyle_EL PING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PRSKREEN" style:display-name="PageStyle_VIPRSKRE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THEMAN" style:display-name="PageStyle_DTHEM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P" style:display-name="PageStyle_N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PPY_5f_DUCK049" style:display-name="PageStyle_FLOPPY_DUCK04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OCA" style:display-name="PageStyle_NUO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ORMATT" style:display-name="PageStyle_DOORMAT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PPLE" style:display-name="PageStyle_FAP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EPKNIGHTUP" style:display-name="PageStyle_STEPKNIGH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ELO.PLAYS" style:display-name="PageStyle_AELO.PLAY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NDON" style:display-name="PageStyle_ROND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BE" style:display-name="PageStyle_KOB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LLONIAN" style:display-name="PageStyle_PELLONI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ITZ" style:display-name="PageStyle_BLIT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R.FEENY" style:display-name="PageStyle_MR.FE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RUSH" style:display-name="PageStyle_IRUS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YPERLUVSGOD" style:display-name="PageStyle_HYPERLUVSG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OBELL" style:display-name="PageStyle_BOOBE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RWHAL" style:display-name="PageStyle_NARWH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THZENY" style:display-name="PageStyle_ANTHZ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ILIOS" style:display-name="PageStyle_STIL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M" style:display-name="PageStyle_D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RBERIAN" style:display-name="PageStyle_ZARBERI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SSQUIK" style:display-name="PageStyle_NESSQUI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PCHUCK" style:display-name="PageStyle_UPCHU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ICYWINGZ11" style:display-name="PageStyle_SPICYWINGZ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WSMSUN" style:display-name="PageStyle_AWSMSU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1_MAMA_5f_MIA_21_" style:display-name="PageStyle_!MAMA_MIA!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B" style:display-name="PageStyle_RO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EAN" style:display-name="PageStyle_CL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NISSUGAH" style:display-name="PageStyle_SHNISSUGA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RZ" style:display-name="PageStyle_STAR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MISADI" style:display-name="PageStyle_LUMISAD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KI" style:display-name="PageStyle_O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LESPECTER" style:display-name="PageStyle_VILESPEC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OBICS" style:display-name="PageStyle_STROB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HO_21_" style:display-name="PageStyle_YHO!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YA" style:display-name="PageStyle_KUY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RS" style:display-name="PageStyle_LA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XQUEST" style:display-name="PageStyle_20XQU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TINEL" style:display-name="PageStyle_SENTI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RON" style:display-name="PageStyle_AAR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BOOK" style:display-name="PageStyle_TEXTBOO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P" style:display-name="PageStyle_240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YLISH_20_THUG_20_SLAYER" style:display-name="PageStyle_STYLISH THUG SLAY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1.EXE" style:display-name="PageStyle_A1.EX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BATEATIME" style:display-name="PageStyle_BOBATEATI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ITMASTERSWAG" style:display-name="PageStyle_JITMASTERSWA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ECKMATE" style:display-name="PageStyle_CHECKM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PUCCINO" style:display-name="PageStyle_CAPPUCCI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HLINE" style:display-name="PageStyle_UHL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QUILATERAL" style:display-name="PageStyle_EQUILAT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E" style:display-name="PageStyle_PA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ZZROBE" style:display-name="PageStyle_WIZZROB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ANCO" style:display-name="PageStyle_FRAN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GK" style:display-name="PageStyle_DG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O_5f_PINK" style:display-name="PageStyle_TOTO_PIN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UNAKA" style:display-name="PageStyle_YUNAK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MINATOR" style:display-name="PageStyle_DOMINA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UNIC" style:display-name="PageStyle_TUN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0G3" style:display-name="PageStyle_D0G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YMLYNN" style:display-name="PageStyle_GRYMLYN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._20_PHANTM" style:display-name="PageStyle_S. PHANT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SLAM" style:display-name="PageStyle_B_SL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WNBD3" style:display-name="PageStyle_SHAWNBD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NTAX" style:display-name="PageStyle_SYNT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AN_20_PAPITAS" style:display-name="PageStyle_JEAN PAPI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ITE" style:display-name="PageStyle_EL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E_20_CHUCKSTER" style:display-name="PageStyle_THE CHUCK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BAT" style:display-name="PageStyle_EB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VÉ" style:display-name="PageStyle_NAVÉ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DERA" style:display-name="PageStyle_MADE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REHYPER" style:display-name="PageStyle_SUREHYP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INE" style:display-name="PageStyle_BLA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NTA" style:display-name="PageStyle_MAN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DQ05" style:display-name="PageStyle_JDQ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STSEEK" style:display-name="PageStyle_MUSTSE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NIN" style:display-name="PageStyle_JON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_5f_TWEEKIN" style:display-name="PageStyle_PC_TWEEK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" style:display-name="PageStyle_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DDEKEL" style:display-name="PageStyle_HIDDEK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RK4ORCE" style:display-name="PageStyle_DARK4OR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CK_20_LEMONADE" style:display-name="PageStyle_BLACK LEMONA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KU" style:display-name="PageStyle_RIK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ICCCY" style:display-name="PageStyle_STICC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00MBA" style:display-name="PageStyle_G00MB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LG0D" style:display-name="PageStyle_NACLG0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NGER" style:display-name="PageStyle_GING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IMAXIFY" style:display-name="PageStyle_MINIMAXIF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YSILEX" style:display-name="PageStyle_PSYSIL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PANIC_21__20_AT_20_THE_20_DISCO" style:display-name="PageStyle_HISPANIC! AT THE DIS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NZANA" style:display-name="PageStyle_MANZA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MINGO" style:display-name="PageStyle_DOMIN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PIK" style:display-name="PageStyle_REDPI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JNIKHAZY" style:display-name="PageStyle_TJNIKHAZ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RI" style:display-name="PageStyle_VI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NDAYGARY" style:display-name="PageStyle_SUNDAYG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ITKHO" style:display-name="PageStyle_THITKH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YVATE_20_PIGEON" style:display-name="PageStyle_PRYVATE PIGE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GNEWS.CO" style:display-name="PageStyle_BIGNEWS.C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3-25T07:02:24.83</dc:date>
    <dc:creator>squeeyah </dc:creator>
    <meta:document-statistic meta:table-count="256" meta:cell-count="19067" meta:object-count="0"/>
    <meta:generator>OpenOffice/4.1.15$Win32 OpenOffice.org_project/4115m2$Build-9813</meta:generator>
  </office:meta>
</office:document-meta>
</file>